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odfrey, M.W., German, D.M.: The past, present, and future of software evolution. In: 2008 Frontiers of Software Maintenance, pp. 129–138. IEEE (2008)</text:p>
          </table:table-cell>
          <table:table-cell table:style-name="ce6"/>
          <table:table-cell table:style-name="ce2" office:value-type="string" calcext:value-type="string">
            <text:p><text:a xlink:href="https://doi.org/10.1109/FOSM.2008.4659256" xlink:type="simple">https://doi.org/10.1109/FOSM.2008.465925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hiting, E., Andrews, S.: Drift and erosion in software architecture: summary and prevention strategies. In: Proceedings of the 2020 the 4th International Conference on Information System and Data Mining, pp. 132–138 (2020)</text:p>
          </table:table-cell>
          <table:table-cell table:style-name="ce1"/>
          <table:table-cell table:style-name="ce2" office:value-type="string" calcext:value-type="string">
            <text:p><text:a xlink:href="https://doi.org/10.1145/3404663.3404665" xlink:type="simple">https://doi.org/10.1145/3404663.340466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aum, D., Dietrich, J., Anslow, C., Müller, R.: Visualizing design erosion: how big balls of mud are made. In: 2018 IEEE Working Conference on Software Visualization (VISSOFT), pp. 122–126. IEEE (2018)</text:p>
          </table:table-cell>
          <table:table-cell table:style-name="ce6"/>
          <table:table-cell table:style-name="ce4" office:value-type="string" calcext:value-type="string">
            <text:p><text:a xlink:href="https://doi.org/10.1109/VISSOFT.2018.00022" xlink:type="simple">https://doi.org/10.1109/VISSOFT.2018.0002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ios, N., Spínola, R.O., Mendonça, M., Seaman, C.: The most common causes and effects of technical debt: first results from a global family of industrial surveys. In: Proceedings of the 12th ACM/IEEE International Symposium on Empirical Software Engineering and Measurement, pp. 1–10 (2018)</text:p>
          </table:table-cell>
          <table:table-cell table:style-name="ce1"/>
          <table:table-cell table:style-name="ce4" office:value-type="string" calcext:value-type="string">
            <text:p><text:a xlink:href="https://doi.org/10.1145/3239235.3268917" xlink:type="simple">https://doi.org/10.1145/3239235.32689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e Silva, L., Balasubramaniam, D.: Controlling software architecture erosion: a survey. J. Syst. Softw. 85(1), 132–151 (2012)</text:p>
          </table:table-cell>
          <table:table-cell table:style-name="ce1"/>
          <table:table-cell table:style-name="ce2" office:value-type="string" calcext:value-type="string">
            <text:p><text:a xlink:href="https://doi.org/10.1016/j.jss.2011.07.036" xlink:type="simple">https://doi.org/10.1016/j.jss.2011.07.03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319-67425-4_12" xlink:type="simple">Dragoni, N., Giallorenzo, S., Lafuente, A.L., Mazzara, M., Montesi, F., Mustafin, R., Safina, L.: Microservices: yesterday, today, and tomorrow. In: Present and Ulterior Software Engineering, pp. 195–216. Springer, Cham (2017). https://doi.org/10.1007/978-3-319-67425-4_12</text:a></text:p>
          </table:table-cell>
          <table:table-cell table:style-name="ce6"/>
          <table:table-cell table:style-name="ce4" office:value-type="string" calcext:value-type="string">
            <text:p><text:a xlink:href="https://doi.org/10.1007/978-3-319-67425-4_12" xlink:type="simple">https://doi.org/10.1007/978-3-319-67425-4_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ewman, S.: Building Microservices. O’Reilly Media, Inc., Newton (2021)</text:p>
          </table:table-cell>
          <table:table-cell table:style-name="ce6"/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ogner, J., Fritzsch, J., Wagner, S., Zimmermann, A.: Limiting technical debt with maintainability assurance: an industry survey on used techniques and differences with service-and microservice-based systems. In: Proceedings of the 2018 International Conference on Technical Debt, pp. 125–133 (2018)</text:p>
          </table:table-cell>
          <table:table-cell table:style-name="ce1"/>
          <table:table-cell table:style-name="ce4" office:value-type="string" calcext:value-type="string">
            <text:p><text:a xlink:href="https://doi.org/10.1145/3194164.3194166" xlink:type="simple">https://doi.org/10.1145/3194164.319416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ogner, J., Wagner, S., Zimmermann, A.: Automatically measuring the maintainability of service-and microservice-based systems: a literature review. In: Proceedings of the 27th International Workshop on Software Measurement and 12th International Conference on Software Process and Product Measurement, pp. 107–115 (2017)</text:p>
          </table:table-cell>
          <table:table-cell table:style-name="ce1"/>
          <table:table-cell table:style-name="ce2" office:value-type="string" calcext:value-type="string">
            <text:p><text:a xlink:href="https://doi.org/10.1145/3143434.3143443" xlink:type="simple">https://doi.org/10.1145/3143434.314344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319-69035-3_29" xlink:type="simple">Zdun, U., Navarro, E., Leymann, F.: Ensuring and assessing architecture conformance to microservice decomposition patterns. In: Maximilien, M., Vallecillo, A., Wang, J., Oriol, M. (eds.) ICSOC 2017. LNCS, vol. 10601, pp. 411–429. Springer, Cham (2017). https://doi.org/10.1007/978-3-319-69035-3_29</text:a></text:p>
          </table:table-cell>
          <table:table-cell table:style-name="ce6"/>
          <table:table-cell table:style-name="ce2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alker, A., Das, D., Cerny, T.: Automated code-smell detection in microservices through static analysis: a case study. Appl. Sci. 10(21), 7800 (2020)</text:p>
          </table:table-cell>
          <table:table-cell table:style-name="ce1"/>
          <table:table-cell table:style-name="ce4" office:value-type="string" calcext:value-type="string">
            <text:p><text:a xlink:href="https://doi.org/10.3390/app10217800" xlink:type="simple">https://doi.org/10.3390/app1021780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a, S.-P., Fan, C.-Y., Chuang, Y., Liu, I.-H., Lan, C.-W.: Graph-based and scenario-driven microservice analysis, retrieval, and testing. Futur. Gener. Comput. Syst. 100, 724–735 (2019)</text:p>
          </table:table-cell>
          <table:table-cell table:style-name="ce1"/>
          <table:table-cell table:style-name="ce4" office:value-type="string" calcext:value-type="string">
            <text:p><text:a xlink:href="https://doi.org/10.1016/j.future.2019.05.048" xlink:type="simple">https://doi.org/10.1016/j.future.2019.05.04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e Toledo, S.S., Martini, A., Przybyszewska, A., Sjøberg, D.I.: Architectural technical debt in microservices: a case study in a large company. In: 2019 IEEE/ACM International Conference on Technical Debt, pp. 78–87. IEEE (2019)</text:p>
          </table:table-cell>
          <table:table-cell table:style-name="ce1"/>
          <table:table-cell table:style-name="ce4" office:value-type="string" calcext:value-type="string">
            <text:p><text:a xlink:href="https://doi.org/10.1109/TechDebt.2019.00026" xlink:type="simple">https://doi.org/10.1109/TechDebt.2019.0002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ucasse, S., Pollet, D.: Software architecture reconstruction: a process-oriented taxonomy. IEEE Trans. Softw. Eng. 35(4), 573–591 (2009)</text:p>
          </table:table-cell>
          <table:table-cell table:style-name="ce1"/>
          <table:table-cell table:style-name="ce4" office:value-type="string" calcext:value-type="string">
            <text:p><text:a xlink:href="https://doi.org/10.1109/TSE.2009.19" xlink:type="simple">https://doi.org/10.1109/TSE.2009.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erny, T., Abdelfattah, A.S., Bushong, V., Al Maruf, A., Taibi, D.: Microservice architecture reconstruction and visualization techniques: a review. In: 2022 IEEE International Conference on Service-Oriented System Engineering (SOSE), pp. 39–48. IEEE (2022)</text:p>
          </table:table-cell>
          <table:table-cell table:style-name="ce6"/>
          <table:table-cell table:style-name="ce4" office:value-type="string" calcext:value-type="string">
            <text:p><text:a xlink:href="https://doi.org/10.1109/SOSE55356.2022.00011" xlink:type="simple">https://doi.org/10.1109/SOSE55356.2022.000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ushong, V., Das, D., Al Maruf, A., Cerny, T.: Using static analysis to address microservice architecture reconstruction. In: 2021 36th IEEE/ACM International Conference on Automated Software Engineering (ASE), pp. 1199–1201. IEEE (2021)</text:p>
          </table:table-cell>
          <table:table-cell table:style-name="ce1"/>
          <table:table-cell table:style-name="ce2" office:value-type="string" calcext:value-type="string">
            <text:p><text:a xlink:href="https://doi.org/10.1109/ASE51524.2021.9678749" xlink:type="simple">https://doi.org/10.1109/ASE51524.2021.967874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ushong, V., Das, D., Cernỳ, T.: Reconstructing the holistic architecture of microservice systems using static analysis. In: CLOSER, pp. 149–157 (2022)</text:p>
          </table:table-cell>
          <table:table-cell table:style-name="ce1"/>
          <table:table-cell table:style-name="ce4" office:value-type="string" calcext:value-type="string">
            <text:p><text:a xlink:href="http://doi.org/10.5220/0011032100003200" xlink:type="simple">http://doi.org/10.5220/001103210000320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arnes, J.M., Garlan, D., Schmerl, B.: Evolution styles: foundations and models for software architecture evolution. Softw. Syst. Model. 13, 649–678 (2014)</text:p>
          </table:table-cell>
          <table:table-cell table:style-name="ce6"/>
          <table:table-cell table:style-name="ce2" office:value-type="string" calcext:value-type="string">
            <text:p><text:a xlink:href="https://doi.org/10.1007/s10270-012-0301-9" xlink:type="simple">https://doi.org/10.1007/s10270-012-0301-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oreira, M.G., De França, B.B.N.: Analysis of microservice evolution using cohesion metrics. In: Proceedings of the 16th Brazilian Symposium on Software Components, Architectures, and Reuse, pp. 40–49 (2022)</text:p>
          </table:table-cell>
          <table:table-cell table:style-name="ce1"/>
          <table:table-cell table:style-name="ce4" office:value-type="string" calcext:value-type="string">
            <text:p><text:a xlink:href="https://doi.org/10.1145/3559712.3559716" xlink:type="simple">https://doi.org/10.1145/3559712.35597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izzei, L.P., Azevedo, L., Soares, E., Thiago, R., Costa, R.: On the maintenance of a scientific application based on microservices: an experience report. In: 2020 IEEE International Conference on Web Services (ICWS), pp. 102–109. IEEE (2020)</text:p>
          </table:table-cell>
          <table:table-cell table:style-name="ce6"/>
          <table:table-cell table:style-name="ce4" office:value-type="string" calcext:value-type="string">
            <text:p><text:a xlink:href="https://doi.org/10.1109/ICWS49710.2020.00021" xlink:type="simple">https://doi.org/10.1109/ICWS49710.2020.0002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ampaio, A.R., et al.: Supporting microservice evolution. In: 2017 IEEE International Conference on Software Maintenance and Evolution (ICSME), pp. 539–543. IEEE (2017)</text:p>
          </table:table-cell>
          <table:table-cell table:style-name="ce1"/>
          <table:table-cell table:style-name="ce5" office:value-type="string" calcext:value-type="string">
            <text:p><text:a xlink:href="https://doi.org/10.1109/ICSME.2017.63" xlink:type="simple">https://doi.org/10.1109/ICSME.2017.6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031-48421-6_8" xlink:type="simple">He, X., Shao, Z., Wang, T., Shi, H., Chen, Y., Wang, Z.: Predicting effect and cost of microservice system evolution using graph neural network. In: Monti, F., Rinderle-Ma, S., Ruiz Cortes, A., Zheng, Z., Mecella, M. (eds.) International Conference on Service-Oriented Computing, pp. 103–118. Springer, Heidelberg (2023). https://doi.org/10.1007/978-3-031-48421-6_8</text:a></text:p>
          </table:table-cell>
          <table:table-cell table:style-name="ce1"/>
          <table:table-cell table:style-name="ce5" office:value-type="string" calcext:value-type="string">
            <text:p><text:a xlink:href="https://doi.org/10.1007/978-3-031-48421-6_8" xlink:type="simple">https://doi.org/10.1007/978-3-031-48421-6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tocker, M., Zimmermann, O.: From code refactoring to API refactoring: agile service design and evolution. In: Barzen, J. (ed.) SummerSOC 2021. CCIS, vol. 1429, pp. 174–193. Springer, Cham (2021). https://doi.org/10.1007/978-3-030-87568-8_11</text:p>
          </table:table-cell>
          <table:table-cell table:style-name="ce6"/>
          <table:table-cell table:style-name="ce5" office:value-type="string" calcext:value-type="string">
            <text:p><text:a xlink:href="https://doi.org/10.1007/978-3-030-87568-8_11" xlink:type="simple">https://doi.org/10.1007/978-3-030-87568-8_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ercher, A., Glock, J., Macho, C., Pinzger, M.: Microservice api evolution in practice: a study on strategies and challenges. arXiv:2311.08175 (2023)</text:p>
          </table:table-cell>
          <table:table-cell table:style-name="ce6"/>
          <table:table-cell table:style-name="ce5" office:value-type="string" calcext:value-type="string">
            <text:p><text:a xlink:href="https://doi.org/10.1016/j.jss.2024.112110" xlink:type="simple">https://doi.org/10.1016/j.jss.2024.1121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ssunção, W.K., Krüger, J., Mosser, S., Selaoui, S.: How do microservices evolve? an empirical analysis of changes in open-source microservice repositories. J. Syst. Softw. 204, 111788 (2023)</text:p>
          </table:table-cell>
          <table:table-cell table:style-name="ce6"/>
          <table:table-cell table:style-name="ce5" office:value-type="string" calcext:value-type="string">
            <text:p><text:a xlink:href="https://doi.org/10.1016/j.jss.2023.111788" xlink:type="simple">https://doi.org/10.1016/j.jss.2023.11178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eseding, F., Scheibel, W., Döllner, J.: Tooling for time-and space-efficient git repository mining. In: Proceedings of the 19th International Conference on Mining Software Repositories, pp. 413–417 (2022)</text:p>
          </table:table-cell>
          <table:table-cell table:style-name="ce6"/>
          <table:table-cell table:style-name="ce5" office:value-type="string" calcext:value-type="string">
            <text:p><text:a xlink:href="https://doi.org/10.1145/3524842.3528503" xlink:type="simple">https://doi.org/10.1145/3524842.352850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642-35843-2_6" xlink:type="simple">Kolassa, C., Riehle, D., Salim, M.A.: A model of the commit size distribution of open source. In: van Emde Boas, P., Groen, F.C.A., Italiano, G.F., Nawrocki, J., Sack, H. (eds.) SOFSEM 2013. LNCS, vol. 7741, pp. 52–66. Springer, Heidelberg (2013). https://doi.org/10.1007/978-3-642-35843-2_6</text:a></text:p>
          </table:table-cell>
          <table:table-cell table:style-name="ce6"/>
          <table:table-cell table:style-name="ce5" office:value-type="string" calcext:value-type="string">
            <text:p><text:a xlink:href="https://doi.org/10.1007/978-3-642-35843-2_6" xlink:type="simple">https://doi.org/10.1007/978-3-642-35843-2_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osik, J., Le Gear, A., Buckley, J., Babar, M. A., Connolly, D.: Assessing architectural drift in commercial software development: a case study. Softw. Pract. Exp. 41(1), 63–86 (2011)</text:p>
          </table:table-cell>
          <table:table-cell table:style-name="ce1"/>
          <table:table-cell table:style-name="ce5" office:value-type="string" calcext:value-type="string">
            <text:p><text:a xlink:href="https://doi.org/10.1002/spe.999" xlink:type="simple">https://doi.org/10.1002/spe.99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3" office:value-type="string" calcext:value-type="string">
            <text:p>Ntentos, E.: Detector-based component model abstraction for microservice-based systems. Computing 103(11), 2521–2551 (2021)</text:p>
          </table:table-cell>
          <table:table-cell table:style-name="ce1"/>
          <table:table-cell table:style-name="ce5" office:value-type="string" calcext:value-type="string">
            <text:p><text:a xlink:href="https://doi.org/10.1007/s00607-021-01002-z" xlink:type="simple">https://doi.org/10.1007/s00607-021-01002-z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4" office:value-type="string" calcext:value-type="string">
            <text:p><text:a xlink:href="https://doi.org/10.1007/978-3-030-86044-8_15" xlink:type="simple">Genfer, P., Zdun, U.: Identifying domain-based cyclic dependencies in microservice APIs using source code detectors. In: Biffl, S., Navarro, E., Löwe, W., Sirjani, M., Mirandola, R., Weyns, D. (eds.) ECSA 2021. LNCS, vol. 12857, pp. 207–222. Springer, Cham (2021). https://doi.org/10.1007/978-3-030-86044-8_15</text:a></text:p>
          </table:table-cell>
          <table:table-cell table:style-name="ce1"/>
          <table:table-cell table:style-name="ce5" office:value-type="string" calcext:value-type="string">
            <text:p><text:a xlink:href="https://doi.org/10.1007/978-3-030-86044-8_15" xlink:type="simple">https://doi.org/10.1007/978-3-030-86044-8_1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5" office:value-type="string" calcext:value-type="string">
            <text:p><text:a xlink:href="https://doi.org/10.1007/978-3-642-01247-1_5" xlink:type="simple">Hirzalla, M., Cleland-Huang, J., Arsanjani, A.: A metrics suite for evaluating flexibility and complexity in service oriented architectures. In: Feuerlicht, G., Lamersdorf, W. (eds.) ICSOC 2008. LNCS, vol. 5472, pp. 41–52. Springer, Heidelberg (2009). https://doi.org/10.1007/978-3-642-01247-1_5</text:a></text:p>
          </table:table-cell>
          <table:table-cell table:style-name="ce1"/>
          <table:table-cell table:style-name="ce5" office:value-type="string" calcext:value-type="string">
            <text:p><text:a xlink:href="https://doi.org/10.1007/978-3-642-01247-1_5" xlink:type="simple">https://doi.org/10.1007/978-3-642-01247-1_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5" office:value-type="string" calcext:value-type="string">
            <text:p><text:a xlink:href="https://doi.org/10.1007/978-3-030-58923-3_1" xlink:type="simple">Ntentos, E., Zdun, U., Plakidas, K., Meixner, S., Geiger, S.: Assessing architecture conformance to coupling-related patterns and practices in microservices. In: Jansen, A., Malavolta, I., Muccini, H., Ozkaya, I., Zimmermann, O. (eds.) ECSA 2020. LNCS, vol. 12292, pp. 3–20. Springer, Cham (2020). https://doi.org/10.1007/978-3-030-58923-3_1</text:a></text:p>
          </table:table-cell>
          <table:table-cell table:style-name="ce1"/>
          <table:table-cell table:style-name="ce5" office:value-type="string" calcext:value-type="string">
            <text:p><text:a xlink:href="https://doi.org/10.1007/978-3-030-58923-3_1" xlink:type="simple">https://doi.org/10.1007/978-3-030-58923-3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5" office:value-type="string" calcext:value-type="string">
            <text:p><text:a xlink:href="https://doi.org/10.1145/3183440.3194991" xlink:type="simple">Zhou, X., et al.: Benchmarking microservice systems for software engineering research. In: Proceedings of the 40th International Conference on Software Engineering: Companion Proceeedings, ser. ICSE 2018, pp. 323–324. Association for Computing Machinery, New York (2018). https://doi.org/10.1145/3183440.3194991</text:a></text:p>
          </table:table-cell>
          <table:table-cell table:style-name="ce1"/>
          <table:table-cell table:style-name="ce5" office:value-type="string" calcext:value-type="string">
            <text:p><text:a xlink:href="https://doi.org/10.1145/3183440.3194991" xlink:type="simple">https://doi.org/10.1145/3183440.319499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i, B., Peng, X., Xiang, Q., Wang, H., Xie, T., Sun, J., Liu, X.: Enjoy your observability: an industrial survey of microservice tracing and analysis. Empir. Softw. Eng. 27, 1–28 (2022)</text:p>
          </table:table-cell>
          <table:table-cell table:style-name="ce1"/>
          <table:table-cell table:style-name="ce5" office:value-type="string" calcext:value-type="string">
            <text:p><text:a xlink:href="https://doi.org/10.1007/s10664-021-10063-9" xlink:type="simple">https://doi.org/10.1007/s10664-021-10063-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hang, C., et al.: Deeptralog: trace-log combined microservice anomaly detection through graph-based deep learning. In: Proceedings of the 44th International Conference on Software Engineering, pp. 623–634 (2022)</text:p>
          </table:table-cell>
          <table:table-cell table:style-name="ce1"/>
          <table:table-cell table:style-name="ce5" office:value-type="string" calcext:value-type="string">
            <text:p><text:a xlink:href="https://doi.org/10.1145/3510003.3510180" xlink:type="simple">https://doi.org/10.1145/3510003.351018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ERNY, Tomas; GOULIS, Gabriel; ABDELFATTAH, Amr S. Towards change impact analysis in microservices-based system evolution. In: 2025 IEEE International Conference on Software Analysis, Evolution and Reengineering (SANER). IEEE, 2025. p. 159-169.</text:p>
          </table:table-cell>
          <table:table-cell table:style-name="ce1"/>
          <table:table-cell table:style-name="ce5" office:value-type="string" calcext:value-type="string">
            <text:p><text:a xlink:href="https://doi.org/10.1109/SANER64311.2025.00023" xlink:type="simple">https://doi.org/10.1109/SANER64311.2025.0002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BDELFATTAH, Amr S. et al. Assessing evolution of microservices using static analysis. Applied Sciences, v. 14, n. 22, p. 10725, 2024.</text:p>
          </table:table-cell>
          <table:table-cell table:style-name="ce1"/>
          <table:table-cell table:style-name="ce5" office:value-type="string" calcext:value-type="string">
            <text:p><text:a xlink:href="https://doi.org/10.3390/app142210725" xlink:type="simple">https://doi.org/10.3390/app14221072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ERNY, Tomas et al. Analyzing evolution of microservice-based systems. In: Proceedings of the 33rd ACM International Conference on the Foundations of Software Engineering. 2025. p. 1030-1034.</text:p>
          </table:table-cell>
          <table:table-cell table:style-name="ce1"/>
          <table:table-cell table:style-name="ce5" office:value-type="string" calcext:value-type="string">
            <text:p><text:a xlink:href="https://doi.org/10.1145/3696630.3728575" xlink:type="simple">https://doi.org/10.1145/3696630.372857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AUDEL, Bhuwan; GONZALEZ-HUERTA, Javier; ZABARDAST, Ehsan. Temporal Evolution of Architectural Complexity and Technical Debt in Microservices: An Exploratory Case Study. In: International Conference on Product-Focused Software Process Improvement. Cham: Springer Nature Switzerland, 2025. p. 285-302.</text:p>
          </table:table-cell>
          <table:table-cell table:style-name="ce1"/>
          <table:table-cell table:style-name="ce5" office:value-type="string" calcext:value-type="string">
            <text:p><text:a xlink:href="https://doi.org/10.1007/978-3-032-12089-2_18" xlink:type="simple">https://doi.org/10.1007/978-3-032-12089-2_1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ENFER, Patric; ZDUN, Uwe. Using Guided Community Detection to Improve Existing Microservice Designs. In: International Conference on Service-Oriented Computing. Singapore: Springer Nature Singapore, 2025. p. 205-220.</text:p>
          </table:table-cell>
          <table:table-cell table:style-name="ce1"/>
          <table:table-cell table:style-name="ce5" office:value-type="string" calcext:value-type="string">
            <text:p><text:a xlink:href="https://doi.org/10.1007/978-981-95-5012-8_15" xlink:type="simple">https://doi.org/10.1007/978-981-95-5012-8_15</text:a></text:p>
          </table:table-cell>
          <table:table-cell table:style-name="ce1" table:number-columns-repeated="20"/>
          <table:table-cell table:number-columns-repeated="999"/>
        </table:table-row>
        <table:table-row table:style-name="ro1" table:number-rows-repeated="7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4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" meta:object-count="0"/>
    <meta:generator>LibreOfficeDev/6.0.5.2$Linux_X86_64 LibreOffice_project/</meta:generator>
  </office:meta>
</office:document-meta>
</file>