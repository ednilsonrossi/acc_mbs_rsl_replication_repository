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lshuqayran, N., Ali, N., Evans, R.: A systematic mapping study in microservice architecture. In: IEEE 9th International Conference on Service-Oriented Computing and Applications (SOCA), pp. 44–51. IEEE (2016)</text:p>
          </table:table-cell>
          <table:table-cell table:style-name="ce1"/>
          <table:table-cell table:style-name="ce2" office:value-type="string" calcext:value-type="string">
            <text:p><text:a xlink:href="https://doi.org/10.1109/SOCA.2016.15" xlink:type="simple">https://doi.org/10.1109/SOCA.2016.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, B.: API patterns. In: API Management, pp. 81–104. Apress, Berkeley, CA (2017).</text:p>
          </table:table-cell>
          <table:table-cell table:style-name="ce1"/>
          <table:table-cell table:style-name="ce2" office:value-type="string" calcext:value-type="string">
            <text:p><text:a xlink:href="https://doi.org/10.1007/978-1-4842-1305-6_5" xlink:type="simple">https://doi.org/10.1007/978-1-4842-1305-6_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uo, D., Wang, W., Zeng, G., Wei, Z.: Microservices architecture based cloudware deployment platform for service computing. In: 2016 IEEE Symposium on Service-Oriented System Engineering (SOSE), pp. 358–363. IEEE (2016)</text:p>
          </table:table-cell>
          <table:table-cell table:style-name="ce1"/>
          <table:table-cell table:style-name="ce2" office:value-type="string" calcext:value-type="string">
            <text:p><text:a xlink:href="https://doi.org/10.1109/SOSE.2016.22" xlink:type="simple">https://doi.org/10.1109/SOSE.2016.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uo, G.Y., Atlee, J.M., Kazman, R.: A software architecture reconstruction method. In: Donohoe, P. (ed.) Software Architecture. ITIFIP, vol. 12, pp. 15–33. Springer, Boston, MA (1999). </text:p>
          </table:table-cell>
          <table:table-cell table:style-name="ce1"/>
          <table:table-cell table:style-name="ce2" office:value-type="string" calcext:value-type="string">
            <text:p><text:a xlink:href="https://doi.org/10.1007/978-0-387-35563-4_2" xlink:type="simple">https://doi.org/10.1007/978-0-387-35563-4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upta, A.: Microservice design patterns (2017).</text:p>
          </table:table-cell>
          <table:table-cell table:style-name="ce2" office:value-type="string" calcext:value-type="string">
            <text:p><text:a xlink:href="http://blog.arungupta.me/microservice-design-patterns/" xlink:type="simple">http://blog.arungupta.me/microservice-design-patterns/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aitzer, T., Zdun, U.: Semi-automated architectural abstraction specifications for supporting software evolution. Sci. Comput. Program. 90, 135–160 (2014)</text:p>
          </table:table-cell>
          <table:table-cell table:style-name="ce1"/>
          <table:table-cell table:style-name="ce2" office:value-type="string" calcext:value-type="string">
            <text:p><text:a xlink:href="https://doi.org/10.1016/j.scico.2013.10.004" xlink:type="simple">https://doi.org/10.1016/j.scico.2013.10.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ohpe, G., Woolf, B.: Enterprise Integration Patterns. Addison-Wesley, Boston (2003)</text:p>
          </table:table-cell>
          <table:table-cell table:style-name="ce2" office:value-type="string" calcext:value-type="string">
            <text:p><text:a xlink:href="https://books.google.com/books?hl=pt-BR&amp;lr=&amp;id=bUlsAQAAQBAJ&amp;oi=fnd&amp;pg=PR7&amp;ots=590uV1O0M4&amp;sig=IW96tfTkbM1LXVKSyIcJKWc59vc" xlink:type="simple">https://books.google.com/books?hl=pt-BR&amp;lr=&amp;id=bUlsAQAAQBAJ&amp;oi=fnd&amp;pg=PR7&amp;ots=590uV1O0M4&amp;sig=IW96tfTkbM1LXVKSyIcJKWc59vc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ang, H., Le, M., Tao, S.: Container and microservice driven design for cloud infrastructure DevOps. In: 2016 IEEE International Conference on Cloud Engineering (IC2E), pp. 202–211. IEEE (2016)</text:p>
          </table:table-cell>
          <table:table-cell table:style-name="ce1"/>
          <table:table-cell table:style-name="ce2" office:value-type="string" calcext:value-type="string">
            <text:p><text:a xlink:href="https://doi.org/10.1109/IC2E.2016.26" xlink:type="simple">https://doi.org/10.1109/IC2E.2016.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ratzke, N.: About microservices, containers and their underestimated impact on network performance. In: Proceedings of Cloud Computing, pp. 165–169 (2015)</text:p>
          </table:table-cell>
          <table:table-cell table:style-name="ce1"/>
          <table:table-cell table:style-name="ce2" office:value-type="string" calcext:value-type="string">
            <text:p><text:a xlink:href="https://doi.org/10.48550/arXiv.1710.04049" xlink:type="simple">https://doi.org/10.48550/arXiv.1710.0404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urhinen, H., Lampi, M.: Micro-services based distributable workflow for digital archives. In: Archiving Conference, vol. 1, pp. 47–51. Society for Imaging Science and Tech. (2014)</text:p>
          </table:table-cell>
          <table:table-cell table:style-name="ce1"/>
          <table:table-cell table:style-name="ce2" office:value-type="string" calcext:value-type="string">
            <text:p><text:a xlink:href="https://doi.org/10.2352/issn.2168-3204.2014.11.1.art00011" xlink:type="simple">https://doi.org/10.2352/issn.2168-3204.2014.11.1.art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e Lange, P., Nicolaescu, P., Derntl, M., Jarke, M., Klamma, R.: Community application editor: collaborative near real-time modeling and composition of microservice-based web applications. In: Modellierung (Workshops), pp. 123–128 (2016)</text:p>
          </table:table-cell>
          <table:table-cell table:style-name="ce2" office:value-type="string" calcext:value-type="string">
            <text:p><text:a xlink:href="https://dl.gi.de/items/ab88e4d9-a6cf-4798-a4e1-c9758380ee57" xlink:type="simple">https://dl.gi.de/items/ab88e4d9-a6cf-4798-a4e1-c9758380ee57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, V.D., Neff, M.M., Stewart, R.V., Kelley, R., Fritzinger, E., Dascalu, S.M., Harris, F.C.: Microservice-based architecture for the NRDC. In: 2015 IEEE 13th International Conference on Industrial Informatics (INDIN), pp. 1659–1664. IEEE (2015)</text:p>
          </table:table-cell>
          <table:table-cell table:style-name="ce1"/>
          <table:table-cell table:style-name="ce2" office:value-type="string" calcext:value-type="string">
            <text:p><text:a xlink:href="https://doi.org/10.1109/INDIN.2015.7281983" xlink:type="simple">https://doi.org/10.1109/INDIN.2015.728198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vcovitz, A., Terra, R., Valente, M.T.: Towards a technique for extracting microservices from monolithic enterprise systems. arXiv preprint arXiv:1605.03175 (2016)</text:p>
          </table:table-cell>
          <table:table-cell table:style-name="ce1"/>
          <table:table-cell table:style-name="ce2" office:value-type="string" calcext:value-type="string">
            <text:p><text:a xlink:href="https://doi.org/10.48550/arXiv.1605.03175" xlink:type="simple">https://doi.org/10.48550/arXiv.1605.0317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Lewis, J., Fowler, M.: Microservices: a definition of this new architectural term, March 2004. http://martinfowler.com/articles/microservices.html</text:p>
          </table:table-cell>
          <table:table-cell table:style-name="ce2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ewman, S.: Building Microservices: Designing Fine-Grained Systems. O’Reilly, New York (2015)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hl, C., Jamshidi, P.: Microservices: a systematic mapping study. In: 6th International Conference on Cloud Computing and Services Science, pp. 137–146 (2016)</text:p>
          </table:table-cell>
          <table:table-cell table:style-name="ce1"/>
          <table:table-cell table:style-name="ce2" office:value-type="string" calcext:value-type="string">
            <text:p><text:a xlink:href="https://doi.org/10.5220/0005785501370146" xlink:type="simple">https://doi.org/10.5220/000578550137014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ssos, L., Terra, R., Valente, M.T., Diniz, R., das ChagasMendonca, N.: Static architecture-conformance checking: an illustrative overview. IEEE Softw. 27(5), 82–89 (2010)</text:p>
          </table:table-cell>
          <table:table-cell table:style-name="ce1"/>
          <table:table-cell table:style-name="ce2" office:value-type="string" calcext:value-type="string">
            <text:p><text:a xlink:href="https://doi.org/10.1109/MS.2009.117" xlink:type="simple">https://doi.org/10.1109/MS.2009.1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utasso, C., Zimmermann, O., Amundsen, M., Lewis, J., Josuttis, N.: Microservices in practice, part 1: reality check and service design. IEEE Softw. 34(1), 91–98 (2017)</text:p>
          </table:table-cell>
          <table:table-cell table:style-name="ce1"/>
          <table:table-cell table:style-name="ce2" office:value-type="string" calcext:value-type="string">
            <text:p><text:a xlink:href="https://doi.org/10.1109/MS.2017.24" xlink:type="simple">https://doi.org/10.1109/MS.2017.2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utasso, C., Wilde, E.: Why is the web loosely coupled?: a multi-faceted metric for service design. In: 18th International Conference on World wide web, pp. 911–920. ACM (2009)</text:p>
          </table:table-cell>
          <table:table-cell table:style-name="ce1"/>
          <table:table-cell table:style-name="ce2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erry, D.E., Wolf, A.L.: Foundations for the study of software architecture. ACM SIGSOFT Softw. Eng. Notes 17(4), 40–52 (1992)</text:p>
          </table:table-cell>
          <table:table-cell table:style-name="ce1"/>
          <table:table-cell table:style-name="ce2" office:value-type="string" calcext:value-type="string">
            <text:p><text:a xlink:href="https://doi.org/10.1145/141874.141884" xlink:type="simple">https://doi.org/10.1145/141874.14188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://microservices.io/patterns/index.html" xlink:type="simple">Richardson, C.: A pattern language for microservices (2017). http://microservices.io/patterns/index.html</text:a></text:p>
          </table:table-cell>
          <table:table-cell table:style-name="ce2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osenberg, F., Celikovic, P., Michlmayr, A., Leitner, P., Dustdar, S.: An end-to-end approach for QoS-aware service composition. In: IEEE International Conference on Enterprise Distributed Object Computing Conference (EDOC 2009), pp. 151–160. IEEE (2009)</text:p>
          </table:table-cell>
          <table:table-cell table:style-name="ce1"/>
          <table:table-cell table:style-name="ce2" office:value-type="string" calcext:value-type="string">
            <text:p><text:a xlink:href="https://doi.org/10.1109/EDOC.2009.14" xlink:type="simple">https://doi.org/10.1109/EDOC.2009.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ramer, M.: Introduction to data mining. Principles of Data Mining. UTCS, pp. 1–8. Springer, London (2016). doi:10.1007/978-1-4471-7307-6_1</text:p>
          </table:table-cell>
          <table:table-cell table:style-name="ce1"/>
          <table:table-cell table:style-name="ce2" office:value-type="string" calcext:value-type="string">
            <text:p><text:a xlink:href="https://doi.org/10.1007/978-1-4471-7307-6_1" xlink:type="simple">https://doi.org/10.1007/978-1-4471-7307-6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an Deursen, A., Hofmeister, C., Koschke, R., Moonen, L., Riva, C.: Symphony: view-driven software architecture reconstruction. In: 4th Working IEEE/IFIP Conference on Software Architecturen (WICSA 2004), pp. 122–132. IEEE (2004)</text:p>
          </table:table-cell>
          <table:table-cell table:style-name="ce1"/>
          <table:table-cell table:style-name="ce2" office:value-type="string" calcext:value-type="string">
            <text:p><text:a xlink:href="https://doi.org/10.1109/WICSA.2004.1310696" xlink:type="simple">https://doi.org/10.1109/WICSA.2004.131069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iennot, N., Lécuyer, M., Bell, J., Geambasu, R., Nieh, J.: Synapse: a microservices architecture for heterogeneous-database web applications. In: 10th European Conference on Computer Systems, p. 21. ACM (2015)</text:p>
          </table:table-cell>
          <table:table-cell table:style-name="ce1"/>
          <table:table-cell table:style-name="ce2" office:value-type="string" calcext:value-type="string">
            <text:p><text:a xlink:href="https://doi.org/10.1145/2741948.2741975" xlink:type="simple">https://doi.org/10.1145/2741948.274197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dun, U.: A DSL toolkit for deferring architectural decisions in DSL-based software design. Inf. Softw. Technol. 52(7), 733–748 (2010)</text:p>
          </table:table-cell>
          <table:table-cell table:style-name="ce1"/>
          <table:table-cell table:style-name="ce2" office:value-type="string" calcext:value-type="string">
            <text:p><text:a xlink:href="https://doi.org/10.1016/j.infsof.2010.03.004" xlink:type="simple">https://doi.org/10.1016/j.infsof.2010.03.0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: Microservices tenets. Comput. Sci. Res. Dev. 32(3), 301–310 (2017)</text:p>
          </table:table-cell>
          <table:table-cell table:style-name="ce1"/>
          <table:table-cell table:style-name="ce2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immermann, O., Gschwind, T., Küster, J., Leymann, F., Schuster, N.: Reusable architectural decision models for enterprise application development. In: Overhage, S., Szyperski, C.A., Reussner, R., Stafford, J.A. (eds.) QoSA 2007. LNCS, vol. 4880, pp. 15–32. Springer, Heidelberg (2007). doi:10.1007/978-3-540-77619-2_2</text:p>
          </table:table-cell>
          <table:table-cell table:style-name="ce1"/>
          <table:table-cell table:style-name="ce2" office:value-type="string" calcext:value-type="string">
            <text:p><text:a xlink:href="https://doi.org/10.1007/978-3-540-77619-2_2" xlink:type="simple">https://doi.org/10.1007/978-3-540-77619-2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NARDUZZI, Valentina et al. Does migrating a monolithic system to microservices decrease the technical debt?. Journal of Systems and Software, v. 169, p. 110710, 2020.</text:p>
          </table:table-cell>
          <table:table-cell table:style-name="ce1"/>
          <table:table-cell table:style-name="ce2" office:value-type="string" calcext:value-type="string">
            <text:p><text:a xlink:href="https://doi.org/10.1016/j.jss.2020.110710" xlink:type="simple">https://doi.org/10.1016/j.jss.2020.1107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RCHER, Alexander et al. Microservice API evolution in practice: A study on strategies and challenges. Journal of Systems and Software, v. 215, p. 112110, 2024.</text:p>
          </table:table-cell>
          <table:table-cell table:style-name="ce1"/>
          <table:table-cell table:style-name="ce2" office:value-type="string" calcext:value-type="string">
            <text:p><text:a xlink:href="https://doi.org/10.1016/j.jss.2024.112110" xlink:type="simple">https://doi.org/10.1016/j.jss.2024.1121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JOSEPH, Christina Terese; CHANDRASEKARAN, K. Straddling the crevasse: A review of microservice software architecture foundations and recent advancements. Software: Practice and Experience, v. 49, n. 10, p. 1448-1484, 2019.</text:p>
          </table:table-cell>
          <table:table-cell table:style-name="ce1"/>
          <table:table-cell table:style-name="ce2" office:value-type="string" calcext:value-type="string">
            <text:p><text:a xlink:href="https://doi.org/10.1002/spe.2729" xlink:type="simple">https://doi.org/10.1002/spe.27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RTIZ, Guadalupe et al. A microservice architecture for real-time IoT data processing: A reusable Web of things approach for smart ports. Computer Standards &amp; Interfaces, v. 81, p. 103604, 2022.</text:p>
          </table:table-cell>
          <table:table-cell table:style-name="ce1"/>
          <table:table-cell table:style-name="ce2" office:value-type="string" calcext:value-type="string">
            <text:p><text:a xlink:href="https://doi.org/10.1016/j.csi.2021.103604" xlink:type="simple">https://doi.org/10.1016/j.csi.2021.103604</text:a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ENGEL, Thomas et al. Evaluation of microservice architectures: A metric and tool-based approach. In: International Conference on Advanced Information Systems Engineering. Cham: Springer International Publishing, 2018. p. 74-89.</text:p>
          </table:table-cell>
          <table:table-cell table:style-name="ce1"/>
          <table:table-cell table:style-name="ce2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ADEMACHER, Florian; SACHWEH, Sabine; ZÜNDORF, Albert. A modeling method for systematic architecture reconstruction of microservice-based software systems. In: International Conference on Business Process Modeling, Development and Support. Cham: Springer International Publishing, 2020. p. 311-326.</text:p>
          </table:table-cell>
          <table:table-cell table:style-name="ce1"/>
          <table:table-cell table:style-name="ce2" office:value-type="string" calcext:value-type="string">
            <text:p><text:a xlink:href="https://doi.org/10.1007/978-3-030-49418-6_21" xlink:type="simple">https://doi.org/10.1007/978-3-030-49418-6_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DUN, Uwe et al. Microservice security metrics for secure communication, identity management, and observability. ACM transactions on software engineering and methodology, v. 32, n. 1, p. 1-34, 2023.</text:p>
          </table:table-cell>
          <table:table-cell table:style-name="ce1"/>
          <table:table-cell table:style-name="ce2" office:value-type="string" calcext:value-type="string">
            <text:p><text:a xlink:href="https://doi.org/10.1145/3532183" xlink:type="simple">https://doi.org/10.1145/353218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COJOCARU, Michel-Daniel; UTA, Alexandru; OPRESCU, Ana-Maria. Attributes assessing the quality of microservices automatically decomposed from monolithic applications. In: 2019 18th International Symposium on Parallel and Distributed Computing (ISPDC). IEEE, 2019. p. 84-93.</text:p>
          </table:table-cell>
          <table:table-cell table:style-name="ce1"/>
          <table:table-cell table:style-name="ce2" office:value-type="string" calcext:value-type="string">
            <text:p><text:a xlink:href="https://doi.org/10.1109/ISPDC.2019.00021" xlink:type="simple">https://doi.org/10.1109/ISPDC.2019.000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WALKER, Andrew; LAIRD, Ian; CERNY, Tomas. On automatic software architecture reconstruction of microservice applications. In: Information Science and Applications: Proceedings of ICISA 2020. Singapore: Springer Singapore, 2021. p. 223-234.</text:p>
          </table:table-cell>
          <table:table-cell table:style-name="ce1"/>
          <table:table-cell table:style-name="ce2" office:value-type="string" calcext:value-type="string">
            <text:p><text:a xlink:href="https://doi.org/10.1007/978-981-33-6385-4_21" xlink:type="simple">https://doi.org/10.1007/978-981-33-6385-4_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EL MALKI, Amine; ZDUN, Uwe. Guiding architectural decision making on service mesh based microservice architectures. In: European Conference on Software Architecture. Cham: Springer International Publishing, 2019. p. 3-19.</text:p>
          </table:table-cell>
          <table:table-cell table:style-name="ce1"/>
          <table:table-cell table:style-name="ce2" office:value-type="string" calcext:value-type="string">
            <text:p><text:a xlink:href="https://doi.org/10.1007/978-3-030-29983-5_1" xlink:type="simple">https://doi.org/10.1007/978-3-030-29983-5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On the understandability of design-level security practices in infrastructure-as-code scripts and deployment architectures. ACM transactions on software engineering and methodology, v. 34, n. 1, p. 1-37, 2025.</text:p>
          </table:table-cell>
          <table:table-cell table:style-name="ce1"/>
          <table:table-cell table:style-name="ce2" office:value-type="string" calcext:value-type="string">
            <text:p><text:a xlink:href="https://doi.org/10.1145/3691630" xlink:type="simple">https://doi.org/10.1145/369163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RTIZ, Guadalupe et al. Real-time context-aware microservice architecture for predictive analytics and smart decision-making. IEEE Access, v. 7, p. 183177-183194, 2019.</text:p>
          </table:table-cell>
          <table:table-cell table:style-name="ce1"/>
          <table:table-cell table:style-name="ce2" office:value-type="string" calcext:value-type="string">
            <text:p><text:a xlink:href="https://doi.org/10.1109/ACCESS.2019.2960516" xlink:type="simple">https://doi.org/10.1109/ACCESS.2019.29605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ÉVAL, Pierre-Jean et al. On the understandability of coupling-related practices in infrastructure-as-code based deployments. Information and Software Technology, v. 185, p. 107761, 2025.</text:p>
          </table:table-cell>
          <table:table-cell table:style-name="ce1"/>
          <table:table-cell table:style-name="ce2" office:value-type="string" calcext:value-type="string">
            <text:p><text:a xlink:href="https://doi.org/10.1016/j.infsof.2025.107761" xlink:type="simple">https://doi.org/10.1016/j.infsof.2025.10776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Assessing architecture conformance to coupling-related patterns and practices in microservices. In: European Conference on Software Architecture. Cham: Springer International Publishing, 2020. p. 3-20.</text:p>
          </table:table-cell>
          <table:table-cell table:style-name="ce1"/>
          <table:table-cell table:style-name="ce2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ENFER, Patric; ZDUN, Uwe. Exploring architectural evolution in microservice systems using repository mining techniques and static code analysis. In: European Conference on Software Architecture. Cham: Springer Nature Switzerland, 2024. p. 157-173.</text:p>
          </table:table-cell>
          <table:table-cell table:style-name="ce1"/>
          <table:table-cell table:style-name="ce2" office:value-type="string" calcext:value-type="string">
            <text:p><text:a xlink:href="https://doi.org/10.1007/978-3-031-70797-1_10" xlink:type="simple">https://doi.org/10.1007/978-3-031-70797-1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E OLIVEIRA ROSA, Thatiane et al. CharM—Evaluating a model for characterizing service-based architectures. Journal of Systems and Software, v. 206, p. 111826, 2023.</text:p>
          </table:table-cell>
          <table:table-cell table:style-name="ce1"/>
          <table:table-cell table:style-name="ce2" office:value-type="string" calcext:value-type="string">
            <text:p><text:a xlink:href="https://doi.org/10.1016/j.jss.2023.111826" xlink:type="simple">https://doi.org/10.1016/j.jss.2023.1118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Conformance assessment of Architectural Design Decisions on API endpoint designs derived from domain models. Journal of Systems and Software, v. 193, p. 111433, 2022.</text:p>
          </table:table-cell>
          <table:table-cell table:style-name="ce1"/>
          <table:table-cell table:style-name="ce2" office:value-type="string" calcext:value-type="string">
            <text:p><text:a xlink:href="https://doi.org/10.1016/j.jss.2022.111433" xlink:type="simple">https://doi.org/10.1016/j.jss.2022.1114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ENFER, Patric; ZDUN, Uwe. Identifying domain-based cyclic dependencies in microservice apis using source code detectors. In: European Conference on Software Architecture. Cham: Springer International Publishing, 2021. p. 207-222.</text:p>
          </table:table-cell>
          <table:table-cell table:style-name="ce1"/>
          <table:table-cell table:style-name="ce2" office:value-type="string" calcext:value-type="string">
            <text:p><text:a xlink:href="https://doi.org/10.1007/978-3-030-86044-8_15" xlink:type="simple">https://doi.org/10.1007/978-3-030-86044-8_1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Towards a quality model for cloud-native applications. In: European Conference on Service-Oriented and Cloud Computing. Cham: Springer International Publishing, 2022. p. 109-117.</text:p>
          </table:table-cell>
          <table:table-cell table:style-name="ce1"/>
          <table:table-cell table:style-name="ce2" office:value-type="string" calcext:value-type="string">
            <text:p><text:a xlink:href="https://doi.org/10.1007/978-3-031-04718-3_7" xlink:type="simple">https://doi.org/10.1007/978-3-031-04718-3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DUN, Uwe et al. Detection strategies for microservice security tactics. IEEE transactions on dependable and secure computing, v. 21, n. 3, p. 1257-1273, 2023.</text:p>
          </table:table-cell>
          <table:table-cell table:style-name="ce1"/>
          <table:table-cell table:style-name="ce2" office:value-type="string" calcext:value-type="string">
            <text:p><text:a xlink:href="https://doi.org/10.1109/TDSC.2023.3276487" xlink:type="simple">https://doi.org/10.1109/TDSC.2023.327648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TATO, Genc et al. Split and migrate: Resource-driven placement and discovery of microservices at the edge. In: OPODIS 2019: 23rd International Conference On Principles Of Distributed Systems. 2019. p. 1-16.</text:p>
          </table:table-cell>
          <table:table-cell table:style-name="ce2" office:value-type="string" calcext:value-type="string">
            <text:p><text:a xlink:href="https://inria.hal.science/hal-02401933/document" xlink:type="simple">https://inria.hal.science/hal-02401933/document</text:a></text:p>
          </table:table-cell>
          <table:table-cell table:style-name="ce2" office:value-type="string" calcext:value-type="string">
            <text:p><text:a xlink:href="https://doi.org/10.4230/LIPIcs.OPODIS.2019.29" xlink:type="simple">https://doi.org/10.4230/LIPIcs.OPODIS.2019.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LMEIDA, João Franscisco; SILVA, António Rito. Monolith migration complexity tuning through the application of microservices patterns. In: European Conference on Software Architecture. Cham: Springer International Publishing, 2020. p. 39-54.</text:p>
          </table:table-cell>
          <table:table-cell table:style-name="ce1"/>
          <table:table-cell table:style-name="ce2" office:value-type="string" calcext:value-type="string">
            <text:p><text:a xlink:href="https://doi.org/10.1007/978-3-030-58923-3_3" xlink:type="simple">https://doi.org/10.1007/978-3-030-58923-3_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Metrics for assessing architecture conformance to microservice architecture patterns and practices. In: International Conference on Service-Oriented Computing. Cham: Springer International Publishing, 2020. p. 580-596.</text:p>
          </table:table-cell>
          <table:table-cell table:style-name="ce1"/>
          <table:table-cell table:style-name="ce2" office:value-type="string" calcext:value-type="string">
            <text:p><text:a xlink:href="https://doi.org/10.1007/978-3-030-65310-1_42" xlink:type="simple">https://doi.org/10.1007/978-3-030-65310-1_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SOUDI, Sepideh et al. A Non-Intrusive Framework for Deferred Integration of Cloud Patterns in Energy-Efficient Data-Sharing Pipelines. In: International Conference on Service-Oriented Computing. Singapore: Springer Nature Singapore, 2025. p. 429-438.</text:p>
          </table:table-cell>
          <table:table-cell table:style-name="ce1"/>
          <table:table-cell table:style-name="ce2" office:value-type="string" calcext:value-type="string">
            <text:p><text:a xlink:href="https://doi.org/10.1007/978-981-95-5012-8_31" xlink:type="simple">https://doi.org/10.1007/978-981-95-5012-8_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OS SANTOS, Eder; CASAS, Sandra. Unveiling quality in API management: A systematic mapping study. In: 2024 L Latin American Computer Conference (CLEI). IEEE, 2024. p. 1-10.</text:p>
          </table:table-cell>
          <table:table-cell table:style-name="ce1"/>
          <table:table-cell table:style-name="ce2" office:value-type="string" calcext:value-type="string">
            <text:p><text:a xlink:href="https://doi.org/10.1109/CLEI64178.2024.10700447" xlink:type="simple">https://doi.org/10.1109/CLEI64178.2024.1070044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ING, Yongchao et al. Catalog, Impact, and Evaluation of Microservice Bad Smells: A Systematic Literature Review. Software: Practice and Experience, 2026.</text:p>
          </table:table-cell>
          <table:table-cell table:style-name="ce1"/>
          <table:table-cell table:style-name="ce2" office:value-type="string" calcext:value-type="string">
            <text:p><text:a xlink:href="https://doi.org/10.1002/spe.70053" xlink:type="simple">https://doi.org/10.1002/spe.7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Detecting and resolving coupling-related infrastructure as code based architecture smells in microservice deployments. In: 2023 IEEE 16th International Conference on Cloud Computing (CLOUD). IEEE, 2023. p. 201-211.</text:p>
          </table:table-cell>
          <table:table-cell table:style-name="ce1"/>
          <table:table-cell table:style-name="ce2" office:value-type="string" calcext:value-type="string">
            <text:p><text:a xlink:href="https://doi.org/10.1109/CLOUD60044.2023.00031" xlink:type="simple">https://doi.org/10.1109/CLOUD60044.2023.00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; WARNETT, Stephen John; ZDUN, Uwe. On the understandability of machine learning practices in deep learning and reinforcement learning based systems. Journal of Systems and Software, v. 222, p. 112343, 2025.</text:p>
          </table:table-cell>
          <table:table-cell table:style-name="ce1"/>
          <table:table-cell table:style-name="ce2" office:value-type="string" calcext:value-type="string">
            <text:p><text:a xlink:href="https://doi.org/10.1016/j.jss.2025.112343" xlink:type="simple">https://doi.org/10.1016/j.jss.2025.11234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KRIEGER, Christoph et al. Monitoring behavioral compliance with architectural patterns based on complex event processing. In: European Conference on Service-Oriented and Cloud Computing. Cham: Springer International Publishing, 2020. p. 125-140.</text:p>
          </table:table-cell>
          <table:table-cell table:style-name="ce1"/>
          <table:table-cell table:style-name="ce2" office:value-type="string" calcext:value-type="string">
            <text:p><text:a xlink:href="https://doi.org/10.1007/978-3-030-44769-4_10" xlink:type="simple">https://doi.org/10.1007/978-3-030-44769-4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EBEL, Andrés. Arquitectura de microservicios para plataformas de integración. 2019.</text:p>
          </table:table-cell>
          <table:table-cell table:style-name="ce2" office:value-type="string" calcext:value-type="string">
            <text:p><text:a xlink:href="https://www.lareferencia.info/vufind/Record/UY_af185ab1aace94010653f2348f8868f6" xlink:type="simple">https://www.lareferencia.info/vufind/Record/UY_af185ab1aace94010653f2348f8868f6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Assessing architecture conformance to coupling-related infrastructure-as-code best practices: Metrics and case studies. In: European Conference on Software Architecture. Cham: Springer International Publishing, 2022. p. 101-116.</text:p>
          </table:table-cell>
          <table:table-cell table:style-name="ce1"/>
          <table:table-cell table:style-name="ce2" office:value-type="string" calcext:value-type="string">
            <text:p><text:a xlink:href="https://doi.org/10.1007/978-3-031-16697-6_7" xlink:type="simple">https://doi.org/10.1007/978-3-031-16697-6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Assessing architecture conformance to security-related practices in infrastructure as code based deployments. In: 2022 IEEE International Conference on Services Computing (SCC). IEEE, 2022. p. 123-133.</text:p>
          </table:table-cell>
          <table:table-cell table:style-name="ce1"/>
          <table:table-cell table:style-name="ce2" office:value-type="string" calcext:value-type="string">
            <text:p><text:a xlink:href="https://doi.org/10.1109/SCC55611.2022.00029" xlink:type="simple">https://doi.org/10.1109/SCC55611.2022.000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OGNER, Justus et al. Exploring maintainability assurance research for service-and microservice-based systems: Directions and differences. In: Joint Post-proceedings of the First and Second International Conference on Microservices (Microservices 2017/2019). Schloss Dagstuhl–Leibniz-Zentrum für Informatik, 2020. p. 3: 1-3: 22.</text:p>
          </table:table-cell>
          <table:table-cell table:style-name="ce1"/>
          <table:table-cell table:style-name="ce2" office:value-type="string" calcext:value-type="string">
            <text:p><text:a xlink:href="https://doi.org/10.4230/OASIcs.Microservices.2017-2019.3" xlink:type="simple">https://doi.org/10.4230/OASIcs.Microservices.2017-2019.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AKUTYNSKYI, I. V.; RABODZEY, I. Y. MICROSERVICE COMMUNICATION FOR IOT-BASED SYSTEMS. ARCHITECTURE REVIEW AND PERFORMANCE TEST. Electronics &amp; Control Systems, v. 74, n. 4, 2022.</text:p>
          </table:table-cell>
          <table:table-cell table:style-name="ce1"/>
          <table:table-cell table:style-name="ce2" office:value-type="string" calcext:value-type="string">
            <text:p><text:a xlink:href="https://doi.org/10.18372/1990-5548.74.17311" xlink:type="simple">https://doi.org/10.18372/1990-5548.74.173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GIALLORENZO, Saverio et al. A Toolchain for Checking Domain-and Model-Driven Properties of Jolie Microservices. In: International Conference on Service-Oriented Computing. Singapore: Springer Nature Singapore, 2024. p. 161-175.</text:p>
          </table:table-cell>
          <table:table-cell table:style-name="ce1"/>
          <table:table-cell table:style-name="ce2" office:value-type="string" calcext:value-type="string">
            <text:p><text:a xlink:href="https://doi.org/10.1007/978-981-96-0808-9_13" xlink:type="simple">https://doi.org/10.1007/978-981-96-0808-9_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E BOER, Willemijn. A Meshed Up Data Architecture Design. Retrieved November, v. 14, p. 2022, 2022.</text:p>
          </table:table-cell>
          <table:table-cell table:style-name="ce2" office:value-type="string" calcext:value-type="string">
            <text:p><text:a xlink:href="https://repository.tudelft.nl/file/File_b15620fc-e9c8-4a5b-9d39-dc0738482be2" xlink:type="simple">https://repository.tudelft.nl/file/File_b15620fc-e9c8-4a5b-9d39-dc0738482be2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HAO, Ke; ZHAO, Junfeng. Fuzzy hierarchy analysis based microservice splitting result evaluation. In: 2023 IEEE International Performance, Computing, and Communications Conference (IPCCC). IEEE, 2023. p. 60-65.</text:p>
          </table:table-cell>
          <table:table-cell table:style-name="ce1"/>
          <table:table-cell table:style-name="ce2" office:value-type="string" calcext:value-type="string">
            <text:p><text:a xlink:href="https://doi.org/10.1109/IPCCC59175.2023.10253880" xlink:type="simple">https://doi.org/10.1109/IPCCC59175.2023.1025388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ZDUN, Uwe et al. On the design and architecture of deployment pipelines in cloud-and service-based computing-A model-based qualitative study. In: 2019 IEEE International Conference on Services Computing (SCC). IEEE, 2019. p. 141-145.</text:p>
          </table:table-cell>
          <table:table-cell table:style-name="ce1"/>
          <table:table-cell table:style-name="ce2" office:value-type="string" calcext:value-type="string">
            <text:p><text:a xlink:href="https://doi.org/10.1109/SCC.2019.00033" xlink:type="simple">https://doi.org/10.1109/SCC.2019.000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HMED, Eman; NASHAAT, Heba; RIZK, Rawya. Machine learning for fog computing: perceiving QoE for IoT applications. In: International Conference on Advanced Intelligent Systems and Informatics. Cham: Springer Nature Switzerland, 2023. p. 482-496.</text:p>
          </table:table-cell>
          <table:table-cell table:style-name="ce1"/>
          <table:table-cell table:style-name="ce2" office:value-type="string" calcext:value-type="string">
            <text:p><text:a xlink:href="https://doi.org/10.1007/978-3-031-43247-7_42" xlink:type="simple">https://doi.org/10.1007/978-3-031-43247-7_4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API description-based conformance assessment of architectural design decision. In: 2022 IEEE International Conference on Service-Oriented System Engineering (SOSE). IEEE, 2022. p. 59-68.</text:p>
          </table:table-cell>
          <table:table-cell table:style-name="ce1"/>
          <table:table-cell table:style-name="ce2" office:value-type="string" calcext:value-type="string">
            <text:p><text:a xlink:href="https://doi.org/10.1109/SOSE55356.2022.00013" xlink:type="simple">https://doi.org/10.1109/SOSE55356.2022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ASOUDI, Sepideh; DALY, Mark Edward Michael; KIESEL, Jannis. in Energy-Efficient Data-Sharing. In: Service-Oriented Computing: 23rd International Conference, ICSOC 2025, Shenzhen, China, December 1–4, 2025, Proceedings, Part I. Springer Nature, 2026. p. 429.</text:p>
          </table:table-cell>
          <table:table-cell table:style-name="ce2" office:value-type="string" calcext:value-type="string">
            <text:p><text:a xlink:href="https://books.google.com/books?hl=pt-BR&amp;lr=&amp;id=an-lEQAAQBAJ&amp;oi=fnd&amp;pg=PA429&amp;ots=uvhZJkCAB-&amp;sig=s8FT2gyraaEhmwPUPg709hvL42A" xlink:type="simple">https://books.google.com/books?hl=pt-BR&amp;lr=&amp;id=an-lEQAAQBAJ&amp;oi=fnd&amp;pg=PA429&amp;ots=uvhZJkCAB-&amp;sig=s8FT2gyraaEhmwPUPg709hvL42A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RTIZ BELLOT, Guadalupe et al. A microservice architecture for real-time IoT data processing: A reusable Web of things approach for smart ports. 2022.</text:p>
          </table:table-cell>
          <table:table-cell table:style-name="ce1"/>
          <table:table-cell table:style-name="ce2" office:value-type="string" calcext:value-type="string">
            <text:p><text:a xlink:href="http://dx.doi.org/10.1016/j.csi.2021.103604" xlink:type="simple">http://dx.doi.org/10.1016/j.csi.2021.10360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ERCHER, Alexander et al. The Journal of Systems &amp; Software.</text:p>
          </table:table-cell>
          <table:table-cell table:style-name="ce1"/>
          <table:table-cell table:style-name="ce2" office:value-type="string" calcext:value-type="string">
            <text:p><text:a xlink:href="https://doi.org/10.1016/j.jss.2024.112110" xlink:type="simple">https://doi.org/10.1016/j.jss.2024.11211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ARAUJO, Elena A. et al. Applying a Multi-platform Architectural Conformance Solution in a Real-world Microservice-based System. In: Proceedings of the 14th Brazilian Symposium on Software Components, Architectures, and Reuse. 2020. p. 41-50.</text:p>
          </table:table-cell>
          <table:table-cell table:style-name="ce1"/>
          <table:table-cell table:style-name="ce2" office:value-type="string" calcext:value-type="string">
            <text:p><text:a xlink:href="https://doi.org/10.1145/3425269.3425270" xlink:type="simple">https://doi.org/10.1145/3425269.342527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>
            <text:p><text:a xlink:href="https://doi.org/10.1142/S1793962323500113." xlink:type="simple">MIRZAIE, Mansooreh; ABADEH, Maryam Nooraei. An approach to modeling and simulating resiliency in multidisciplinary microservice networks. International Journal of Modeling, Simulation, and Scientific Computing, v. 14, n. 3, p. 2350011, 2023. DOI: https://doi.org/10.1142/S1793962323500113.</text:a></text:p>
          </table:table-cell>
          <table:table-cell table:style-name="ce1"/>
          <table:table-cell table:style-name="ce2" office:value-type="string" calcext:value-type="string">
            <text:p><text:a xlink:href="https://doi.org/10.1142/S1793962323500113" xlink:type="simple">https://doi.org/10.1142/S17939623235001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HAMODARAN, Bala Krishna. Applicability of Fractal Architecture Based Microservices on System-of-Systems. In: PLAIS EuroSymposium on Digital Transformation. Cham: Springer International Publishing, 2022. p. 109-125.</text:p>
          </table:table-cell>
          <table:table-cell table:style-name="ce1"/>
          <table:table-cell table:style-name="ce2" office:value-type="string" calcext:value-type="string">
            <text:p><text:a xlink:href="https://doi.org/10.1007/978-3-031-23012-7_7" xlink:type="simple">https://doi.org/10.1007/978-3-031-23012-7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RTIZ, Guadalupe; GARCIA-DE-PRADO, Alfonso. Towards Sustainable Water Resource Management: a Software Architecture for Smart Water Supply Networks.</text:p>
          </table:table-cell>
          <table:table-cell table:style-name="ce1"/>
          <table:table-cell table:style-name="ce2" office:value-type="string" calcext:value-type="string">
            <text:p><text:a xlink:href="https://doi.org/10.17758/EARES11.EAP0422211" xlink:type="simple">https://doi.org/10.17758/EARES11.EAP04222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E SYNTHÈSE, RAPPORT DE PROJET; KOÏTA, MOHAMED DRAMANE JEAN-PHILIPPE. CARACTÉRISATION DES DÉPENDANCES LOGICIELLES ARCHITECTURALES INTER-SERVICES: UNE ANALYSE EMPIRIQUE SUR 13 ARCHITECTURES OPEN-SOURCE. 2022.</text:p>
          </table:table-cell>
          <table:table-cell table:style-name="ce2" office:value-type="string" calcext:value-type="string">
            <text:p><text:a xlink:href="https://mosser.github.io/files/students/koita22.pdf" xlink:type="simple">https://mosser.github.io/files/students/koita22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ANGERMEIER, Melanie. Generic analysis support for understanding, evaluating and comparing enterprise architecture models. 2019. Tese de Doutorado. Dissertation, Augsburg, Universität Augsburg, 2019.</text:p>
          </table:table-cell>
          <table:table-cell table:style-name="ce2" office:value-type="string" calcext:value-type="string">
            <text:p><text:a xlink:href="https://opus.bibliothek.uni-augsburg.de/opus4/frontdoor/deliver/index/docId/77609/file/Dissertation+Langermeier.pdf" xlink:type="simple">https://opus.bibliothek.uni-augsburg.de/opus4/frontdoor/deliver/index/docId/77609/file/Dissertation+Langermeier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RTIZ BELLOT, Guadalupe et al. Real-Time Context-Aware Microservice Architecture for Predictive Analytics and Smart Decision-Making. 2019.</text:p>
          </table:table-cell>
          <table:table-cell table:style-name="ce1"/>
          <table:table-cell table:style-name="ce2" office:value-type="string" calcext:value-type="string">
            <text:p><text:a xlink:href="http://dx.doi.org/10.1109/ACCESS.2019.2960516" xlink:type="simple">http://dx.doi.org/10.1109/ACCESS.2019.29605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ENGEL, Thomas; LANGERMEIER, Melanie; BAUER, Bernhard. A Metric and Tool-Based Approach. In: Information Systems in the Big Data Era: CAiSE Forum 2018, Tallinn, Estonia, June 11-15, 2018, Proceedings. Springer, 2018. p. 74.</text:p>
          </table:table-cell>
          <table:table-cell table:style-name="ce1"/>
          <table:table-cell table:style-name="ce2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AOUD, Mohamed Taoufik. Vers une approche d’identification automatique de microservices pour les besoins de migration de systèmes d’information. 2021. Tese de Doutorado. Université de Lyon.</text:p>
          </table:table-cell>
          <table:table-cell table:style-name="ce2" office:value-type="string" calcext:value-type="string">
            <text:p><text:a xlink:href="https://theses.hal.science/tel-03663589/" xlink:type="simple">https://theses.hal.science/tel-03663589/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" meta:object-count="0"/>
    <meta:generator>LibreOfficeDev/6.0.5.2$Linux_X86_64 LibreOffice_project/</meta:generator>
  </office:meta>
</office:document-meta>
</file>