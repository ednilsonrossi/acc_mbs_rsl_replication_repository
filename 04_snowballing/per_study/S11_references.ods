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“Microservices tenets,” Computer Science-Research and Development, vol. 32, no. 3-4, pp. 301–310, Jul. 2017.</text:p>
          </table:table-cell>
          <table:table-cell table:style-name="ce3"/>
          <table:table-cell table:style-name="ce5" office:value-type="string" calcext:value-type="string">
            <text:p><text:a xlink:href="https://doi.org/10.1007/s00450-016-0337-0" xlink:type="simple">https://doi.org/10.1007/s00450-016-0337-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M. Stocker, D. Lübke, C. Pautasso, and U. Zdun, “Introduction to microservice api patterns (map),” Post-proceedings of Microservices 2017/2019, vol. 78, no. 4, pp. 1–17, 2020.</text:p>
          </table:table-cell>
          <table:table-cell table:style-name="ce4" office:value-type="string" calcext:value-type="string">
            <text:p><text:a xlink:href="https://eprints.cs.univie.ac.at/6230/" xlink:type="simple">https://eprints.cs.univie.ac.at/6230/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. Evans, Domain-Driven Design: Tacking Complexity In the Heart of Software. Reading, MA.: Addison-Wesley, 2003.</text:p>
          </table:table-cell>
          <table:table-cell table:style-name="ce3" office:value-type="string" calcext:value-type="string">
            <text:p><text:a xlink:href="https://books.google.com.br/books?hl=en&amp;lr=&amp;id=xColAAPGubgC&amp;oi=fnd&amp;pg=PR9&amp;ots=qdZBefRR4r&amp;sig=ucvOsiDspvqBs8U0bcXp8eTRlJc&amp;redir_esc=y#v=onepage&amp;q&amp;f=false" xlink:type="simple">https://books.google.com.br/books?hl=en&amp;lr=&amp;id=xColAAPGubgC&amp;oi=fnd&amp;pg=PR9&amp;ots=qdZBefRR4r&amp;sig=ucvOsiDspvqBs8U0bcXp8eTRlJc&amp;redir_esc=y#v=onepage&amp;q&amp;f=false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S. van der Ven, A. G. Jansen, J. A. Nijhuis, and J. Bosch, “Design decisions: The bridge between rationale and architecture,” in Rationale management in software engineering. Springer, 2006, pp. 329–348.</text:p>
          </table:table-cell>
          <table:table-cell table:style-name="ce3"/>
          <table:table-cell table:style-name="ce6" office:value-type="string" calcext:value-type="string">
            <text:p><text:a xlink:href="https://doi.org/10.1007/978-3-540-30998-7_16" xlink:type="simple">https://doi.org/10.1007/978-3-540-30998-7_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Quartel and M. van Sinderen, “On interoperability and conformance assessment in service composition,” in 11th IEEE International Enterprise Distributed Object Computing Conference (EDOC 2007), 2007, pp. 229–229.</text:p>
          </table:table-cell>
          <table:table-cell table:style-name="ce3"/>
          <table:table-cell table:style-name="ce5" office:value-type="string" calcext:value-type="string">
            <text:p><text:a xlink:href="https://doi.org/10.1109/EDOC.2007.11" xlink:type="simple">https://doi.org/10.1109/EDOC.2007.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F. Deissenboeck, L. Heinemann, B. Hummel, and E. Juergens, “Flexible architecture conformance assessment with conqat,” in 2010 ACM/IEEE 32nd International Conference on Software Engineering, vol. 2, 2010, pp. 247–250.</text:p>
          </table:table-cell>
          <table:table-cell table:style-name="ce3"/>
          <table:table-cell table:style-name="ce6" office:value-type="string" calcext:value-type="string">
            <text:p><text:a xlink:href="https://doi.org/10.1145/1810295.1810343" xlink:type="simple">https://doi.org/10.1145/1810295.181034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. Lee and P. Kruchten, “A tool to visualize architectural design decisions,” in International Conference on the Quality of Software Architectures. Springer, 2008, pp. 43–54.</text:p>
          </table:table-cell>
          <table:table-cell table:style-name="ce3"/>
          <table:table-cell table:style-name="ce6" office:value-type="string" calcext:value-type="string">
            <text:p><text:a xlink:href="https://doi.org/10.1007/978-3-540-87879-7_3" xlink:type="simple">https://doi.org/10.1007/978-3-540-87879-7_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Singjai, U. Zdun, O. Zimmermann, and C. Pautasso, “Patterns on deriving apis and their endpoints from domain models,” in The 25th European Conference on Pattern Languages of Programs, 2021.</text:p>
          </table:table-cell>
          <table:table-cell table:style-name="ce1"/>
          <table:table-cell table:style-name="ce6" office:value-type="string" calcext:value-type="string">
            <text:p><text:a xlink:href="https://doi.org/10.1145/3489449.3489976" xlink:type="simple">https://doi.org/10.1145/3489449.348997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M. Stocker, D. Lübke, C. Pautasso, and U. Zdun, “Microservice api patterns,” https://microservice-api-patterns.org/, 2021.</text:p>
          </table:table-cell>
          <table:table-cell table:style-name="ce3" office:value-type="string" calcext:value-type="string">
            <text:p><text:a xlink:href="https://microservice-api-patterns.org" xlink:type="simple">https://microservice-api-patterns.org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Singjai, U. Zdun, and O. Zimmermann, “Practitioner views on the interrelation of microservice apis and domain-driven design: A grey literature study based on grounded theory,” in 18th IEEE International Conference on Software Architecture (ICSA 2021). Washington, DC, USA : IEEE, March 2021.</text:p>
          </table:table-cell>
          <table:table-cell table:style-name="ce3"/>
          <table:table-cell table:style-name="ce5" office:value-type="string" calcext:value-type="string">
            <text:p><text:a xlink:href="https://doi.org/10.1109/ICSA51549.2021.00011" xlink:type="simple">https://doi.org/10.1109/ICSA51549.2021.000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. Schwarz, “Uber engineering’s micro deploy: Deploying daily with confidence,” https://eng.uber.com/micro-deploy-code/, 2016.</text:p>
          </table:table-cell>
          <table:table-cell table:style-name="ce5" office:value-type="string" calcext:value-type="string">
            <text:p><text:a xlink:href="https://eng.uber.com/micro-deploy-code" xlink:type="simple">https://eng.uber.com/micro-deploy-code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oogle, “Devops tech: Architecture,” https://cloud.google.com/architecture/devops/devops-tech-architecture, 2021.</text:p>
          </table:table-cell>
          <table:table-cell table:style-name="ce3" office:value-type="string" calcext:value-type="string">
            <text:p><text:a xlink:href="https://cloud.google.com/architecture/devops/devops-tech-architecture" xlink:type="simple">https://cloud.google.com/architecture/devops/devops-tech-architecture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. D. Nguyen, “A design analysis of cloud-based microservices architecture at netflix,” https://medium.com/swlh/a-design-analysis-of-cloud-based-microservices-architecture-at-netflix-98836b2da45fe, 2020.</text:p>
          </table:table-cell>
          <table:table-cell table:style-name="ce5" office:value-type="string" calcext:value-type="string">
            <text:p><text:a xlink:href="https://medium.com/swlh/a-design-analysis-of-cloud-based-microservices-architecture-at-netflix-98836b2da45fe" xlink:type="simple">https://medium.com/swlh/a-design-analysis-of-cloud-based-microservices-architecture-at-netflix-98836b2da45fe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Lübke, O. Zimmermann, C. Pautasso, U. Zdun, and M. Stocker, “Interface evolution patterns: Balancing compatibility and extensibility across service life cycles,” in Proceedings of the 24th European Con-ference on Pattern Languages of Programs, ser. EuroPLop ’19. ACM, 2019.</text:p>
          </table:table-cell>
          <table:table-cell table:style-name="ce3"/>
          <table:table-cell table:style-name="ce6" office:value-type="string" calcext:value-type="string">
            <text:p><text:a xlink:href="https://doi.org/10.1145/3361149.3361164" xlink:type="simple">https://doi.org/10.1145/3361149.336116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. Runeson, M. Host, A. Rainer, and B. Regnell, Case study research in software engineering: Guidelines and examples. John Wiley Sons, 2012.</text:p>
          </table:table-cell>
          <table:table-cell table:style-name="ce3"/>
          <table:table-cell table:style-name="ce6" office:value-type="string" calcext:value-type="string">
            <text:p><text:a xlink:href="http://doi.org/10.1002/9781118181034" xlink:type="simple">http://doi.org/10.1002/978111818103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S. Shapiro and M. B. Wilk, “An analysis of variance test for normality (complete samples),” Biometrika, vol. 52, no. 3/4, pp. 591–611, 1965.</text:p>
          </table:table-cell>
          <table:table-cell table:style-name="ce1"/>
          <table:table-cell table:style-name="ce3" office:value-type="string" calcext:value-type="string">
            <text:p><text:a xlink:href="https://doi.org/10.2307/2333709" xlink:type="simple">https://doi.org/10.2307/233370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W. Pratt, “Remarks on zeros and ties in the wilcoxon signed rank procedures,” Journal of the American Statistical Association, vol. 54, no. 287, pp. 655–667, 1959.</text:p>
          </table:table-cell>
          <table:table-cell table:style-name="ce3"/>
          <table:table-cell table:style-name="ce6" office:value-type="string" calcext:value-type="string">
            <text:p><text:a xlink:href="https://doi.org/10.1080/01621459.1959.10501526" xlink:type="simple">https://doi.org/10.1080/01621459.1959.1050152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. Cliff, Ordinal methods for behavioral data analysis. Psychology Press, 2014.</text:p>
          </table:table-cell>
          <table:table-cell table:style-name="ce3"/>
          <table:table-cell table:style-name="ce5" office:value-type="string" calcext:value-type="string">
            <text:p><text:a xlink:href="https://doi.org/10.4324/9781315806730" xlink:type="simple">https://doi.org/10.4324/978131580673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. Kitchenham, L. Madeyski, D. Budgen, J. Keung, P. Brereton, S. Charters, S. Gibbs, and A. Pohthong, “Robust statistical methods for empirical software engineering,” Empirical Software Engineering, vol. 22, no. 2, pp. 579–630, 2017.</text:p>
          </table:table-cell>
          <table:table-cell table:style-name="ce3"/>
          <table:table-cell table:style-name="ce6" office:value-type="string" calcext:value-type="string">
            <text:p><text:a xlink:href="https://doi.org/10.1007/s10664-016-9437-5" xlink:type="simple">https://doi.org/10.1007/s10664-016-9437-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Romano, J. D. Kromrey, J. Coraggio, and J. Skowronek, “Appropriate statistics for ordinal level data: Should we really be using t-test and cohen’sd for evaluating group differences on the nsse and other surveys,” in annual meeting of the Florida Association of Institutional Research, vol. 13, 2006.</text:p>
          </table:table-cell>
          <table:table-cell table:style-name="ce3"/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Larichev and H. Moskovich, “Unstructured problems and devel-opment of prescriptive decision making methods,” in Advances in multicriteria analysis. Springer, 1995, pp. 47–80.</text:p>
          </table:table-cell>
          <table:table-cell table:style-name="ce3"/>
          <table:table-cell table:style-name="ce4" office:value-type="string" calcext:value-type="string">
            <text:p><text:a xlink:href="https://doi.org/10.1007/978-1-4757-2383-0_4" xlink:type="simple">https://doi.org/10.1007/978-1-4757-2383-0_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W. D. Perreault Jr and L. E. Leigh, “Reliability of nominal data based on qualitative judgments,” Journal of marketing research, vol. 26, no. 2, pp. 135–148, 1989.</text:p>
          </table:table-cell>
          <table:table-cell table:style-name="ce3"/>
          <table:table-cell table:style-name="ce4" office:value-type="string" calcext:value-type="string">
            <text:p><text:a xlink:href="https://doi.org/10.2307/3172601" xlink:type="simple">https://doi.org/10.2307/317260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. Canfora, L. Cerulo, and L. Troiano, “Transforming quantities into qualities in assessment of software systems,” in Proceedings 27th Annual International Computer Software and Applications Conference. COMPAC 2003. IEEE, 2003, pp. 312–319.</text:p>
          </table:table-cell>
          <table:table-cell table:style-name="ce3"/>
          <table:table-cell table:style-name="ce4" office:value-type="string" calcext:value-type="string">
            <text:p><text:a xlink:href="https://doi.org/10.1109/CMPSAC.2003.1245359" xlink:type="simple">https://doi.org/10.1109/CMPSAC.2003.124535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HONG, Chenxing et al. Domain-driven design for microservices: An evidence-based investigation. IEEE Transactions on Software Engineering, v. 50, n. 6, p. 1425-1449, 2024.</text:p>
          </table:table-cell>
          <table:table-cell table:style-name="ce3"/>
          <table:table-cell table:style-name="ce4" office:value-type="string" calcext:value-type="string">
            <text:p><text:a xlink:href="https://doi.org/10.1109/TSE.2024.3385835" xlink:type="simple">https://doi.org/10.1109/TSE.2024.3385835</text:a></text:p>
          </table:table-cell>
          <table:table-cell table:style-name="ce1" table:number-columns-repeated="20"/>
          <table:table-cell table:number-columns-repeated="999"/>
        </table:table-row>
        <table:table-row table:style-name="ro1" table:number-rows-repeated="3">
          <table:table-cell table:style-name="ce1" table:number-columns-repeated="3"/>
          <table:table-cell table:style-name="ce3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22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5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7">
          <table:table-cell table:style-name="ce1" table:number-columns-repeated="2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0"/>
    <meta:generator>LibreOfficeDev/6.0.5.2$Linux_X86_64 LibreOffice_project/</meta:generator>
  </office:meta>
</office:document-meta>
</file>