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Newman, Building Microservices: Designing Fine-Grained Systems. Sebastopol, CA, USA : O’Reilly, 2015.</text:p>
          </table:table-cell>
          <table:table-cell table:style-name="ce4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Lewis and M. Fowler, “Microservices: A definition of this new architectural term,” Mar. 2004. [Online]. Available: http://martinfowler.com/articles/microservices.html</text:p>
          </table:table-cell>
          <table:table-cell table:style-name="ce2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Richardson, “A pattern language for microservices,” 2017. [Online]. Available: http://microservices.io/patterns/index.html</text:p>
          </table:table-cell>
          <table:table-cell table:style-name="ce2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6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“Microservices tenets,” Comput. Sci.- Res. Develop., vol. 32, no. 3/4, pp. 301–310, Jul. 2017.</text:p>
          </table:table-cell>
          <table:table-cell table:style-name="ce4"/>
          <table:table-cell table:style-name="ce4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www.nist.gov/news-events/news/2019/08/security-strategies-microservices-based-application-systems-nist-publishes" xlink:type="simple">NIST, “NIST special publication (SP) 800–204, security strategies for microservices-based application systems,” 2019. [Online]. Available: https://www.nist.gov/news-events/news/2019/08/security-strategies-microservices-based-application-systems-nist-publishes</text:a></text:p>
          </table:table-cell>
          <table:table-cell table:style-name="ce4" office:value-type="string" calcext:value-type="string">
            <text:p><text:a xlink:href="https://www.nist.gov/news-events/news/2019/08/security-strategies-microservices-based-application-systems-nist-publishes" xlink:type="simple">https://www.nist.gov/news-events/news/2019/08/security-strategies-microservices-based-application-systems-nist-publishes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cheatsheetseries.owasp.org/cheatsheets/Microservices_based_Security_Arch_Doc_Cheat_Sheet.html" xlink:type="simple">OWASP, “Microservices based security arch doc cheat sheet,” 2021. [Online]. Available: https://cheatsheetseries.owasp.org/cheatsheets/Microservices_based_Security_Arch_Doc_Cheat_Sheet.html</text:a></text:p>
          </table:table-cell>
          <table:table-cell table:style-name="ce4" office:value-type="string" calcext:value-type="string">
            <text:p><text:a xlink:href="https://cheatsheetseries.owasp.org/cheatsheets/Microservices_based_Security_Arch_Doc_Cheat_Sheet.html" xlink:type="simple">https://cheatsheetseries.owasp.org/cheatsheets/Microservices_based_Security_Arch_Doc_Cheat_Sheet.html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loud Security Alliance, “Best practices in implementing a secure microservices architecture,” 2020. [Online]. Available: https://cloudsecurityalliance.org/artifacts/best-practices-in-implementing-a-secure-microservices-architecture/</text:p>
          </table:table-cell>
          <table:table-cell table:style-name="ce2" office:value-type="string" calcext:value-type="string">
            <text:p><text:a xlink:href="https://cloudsecurityalliance.org/artifacts/best-practices-in-implementing-a-secure-microservices-architecture/" xlink:type="simple">https://cloudsecurityalliance.org/artifacts/best-practices-in-implementing-a-secure-microservices-architecture/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Quartel and M. van Sinderen, “On interoperability and conformance assessment in service composition,” in Proc. IEEE 11th Int. Enterprise Distrib. Object Comput. Conf., 2007, pp. 229–229.</text:p>
          </table:table-cell>
          <table:table-cell table:style-name="ce4"/>
          <table:table-cell table:style-name="ce4" office:value-type="string" calcext:value-type="string">
            <text:p><text:a xlink:href="https://doi.org/10.1109/EDOC.2007.11" xlink:type="simple">https://doi.org/10.1109/EDOC.2007.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. Deissenboeck, L. Heinemann, B. Hummel, and E. Juergens, “Flexible architecture conformance assessment with conqat,” in Proc. ACM/IEEE 32nd Int. Conf. Softw. Eng., Washington, DC, USA, 2010, pp. 247–250.</text:p>
          </table:table-cell>
          <table:table-cell table:style-name="ce4"/>
          <table:table-cell table:style-name="ce4" office:value-type="string" calcext:value-type="string">
            <text:p><text:a xlink:href="https://doi.org/10.1145/1810295.1810343" xlink:type="simple">https://doi.org/10.1145/1810295.18103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. Marinescu, “Detection strategies: Metrics-based rules for detecting design flaws,” in Proc. IEEE 20th Int. Conf. Softw. Maintenance, 2004, pp. 350–359.</text:p>
          </table:table-cell>
          <table:table-cell table:style-name="ce4"/>
          <table:table-cell table:style-name="ce4" office:value-type="string" calcext:value-type="string">
            <text:p><text:a xlink:href="https://doi.org/10.1109/ICSM.2004.1357820" xlink:type="simple">https://doi.org/10.1109/ICSM.2004.13578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U. Zdun, “Microservice security metrics for secure communication, identity management, and observability,” Trans. Softw. Eng. Methodol., 2023. [Online]. Available: https://dl.acm.org/doi/10.1145/3532183</text:p>
          </table:table-cell>
          <table:table-cell table:style-name="ce4"/>
          <table:table-cell table:style-name="ce4" office:value-type="string" calcext:value-type="string">
            <text:p><text:a xlink:href="https://doi.org/10.1145/3532183" xlink:type="simple">https://doi.org/10.1145/353218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Ntentos, “Detector-based component model abstraction for microservice-based systems,” Computing, vol. 103, pp. 2521–2551, 2021.</text:p>
          </table:table-cell>
          <table:table-cell table:style-name="ce4"/>
          <table:table-cell table:style-name="ce4" office:value-type="string" calcext:value-type="string">
            <text:p><text:a xlink:href="https://doi.org/10.1007/s00607-021-01002-z" xlink:type="simple">https://doi.org/10.1007/s00607-021-01002-z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Frank and E. Harrell, Regression Modeling Strategies: With Applications to Linear Models, Logistic and Ordinal Regression, and Survival Analysis, 2nd ed., Berlin, Heidelberg : Springer, 2015.</text:p>
          </table:table-cell>
          <table:table-cell table:style-name="ce4" office:value-type="string" calcext:value-type="string">
            <text:p><text:a xlink:href="https://link.springer.com/book/10.1007/978-1-4757-3462-1" xlink:type="simple">https://link.springer.com/book/10.1007/978-1-4757-3462-1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cran.r-project.org/web/packages/rms/rms.pdf" xlink:type="simple">F. E. Harrell, “Package ‘RMS’,” 2022. [Online]. Available: https://cran.r-project.org/web/packages/rms/rms.pdf</text:a></text:p>
          </table:table-cell>
          <table:table-cell table:style-name="ce2" office:value-type="string" calcext:value-type="string">
            <text:p><text:a xlink:href="https://mirror.las.iastate.edu/CRAN/web/packages/rms/rms.pdf" xlink:type="simple">https://mirror.las.iastate.edu/CRAN/web/packages/rms/rms.pdf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Gamma, R. Helm, R. Johnson, and J. Vlissides, Design Patterns: Elements of Reusable Object-Oriented Software. Reading, MA, USA : Addison-Wesley, 1995.</text:p>
          </table:table-cell>
          <table:table-cell table:style-name="ce4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U. Zdun, E. Navarro, and F. Leymann, “Ensuring and assessing architecture conformance to microservice decomposition patterns,” in Proc. Int. Conf. Serv.-Oriented Comput., Cham, Springer International Publishing, 2017, pp. 411–429.</text:p>
          </table:table-cell>
          <table:table-cell table:style-name="ce1"/>
          <table:table-cell table:style-name="ce2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Airola, T. Pahikkala, W. Waegeman, B. De Baets, and T. Salakoski, “An experimental comparison of cross-validation techniques for estimating the area under the ROC curve,” Comput. Statist. Data Anal., vol. 55, no. 4, pp. 1828–1844, 2011.</text:p>
          </table:table-cell>
          <table:table-cell table:style-name="ce4"/>
          <table:table-cell table:style-name="ce2" office:value-type="string" calcext:value-type="string">
            <text:p><text:a xlink:href="https://doi.org/10.1016/j.csda.2010.11.018" xlink:type="simple">https://doi.org/10.1016/j.csda.2010.11.0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Baccianella, A. Esuli, and F. Sebastiani, “Evaluation measures for ordinal regression,” in Proc. 9th Int. Conf. Intell. Syst. Des. Appl., 2009, pp. 283–287.</text:p>
          </table:table-cell>
          <table:table-cell table:style-name="ce4"/>
          <table:table-cell table:style-name="ce4" office:value-type="string" calcext:value-type="string">
            <text:p><text:a xlink:href="https://doi.org/10.1109/ISDA.2009.230" xlink:type="simple">https://doi.org/10.1109/ISDA.2009.23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Chen, M. Courtland, A. Faulkner, and A. Ezen-Can, “Error-sensitive evaluation for ordinal target variables,” in Proc. 2nd Workshop Eval. Comparison NLP Syst., Punta Cana, Dominican Republic, Association for Computational Linguistics, 2021, pp. 189–199.</text:p>
          </table:table-cell>
          <table:table-cell table:style-name="ce4"/>
          <table:table-cell table:style-name="ce2" office:value-type="string" calcext:value-type="string">
            <text:p><text:a xlink:href="https://doi.org/10.18653/v1/2021.eval4nlp-1.19" xlink:type="simple">https://doi.org/10.18653/v1/2021.eval4nlp-1.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Genfer and U. Zdun, “Avoiding excessive data exposure through microservice APIs,” in Proc. Eur. Conf. Softw. Architecture, Cham, Springer International Publishing, 2022, pp. 3–18.</text:p>
          </table:table-cell>
          <table:table-cell table:style-name="ce4"/>
          <table:table-cell table:style-name="ce4" office:value-type="string" calcext:value-type="string">
            <text:p><text:a xlink:href="https://doi.org/10.1007/978-3-031-16697-6_1" xlink:type="simple">https://doi.org/10.1007/978-3-031-16697-6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U. Zdun, D. Luebke, and C. Pautasso, “Microservice API patterns,” 2019. [Online]. Available: https://microservice-api-patterns.org</text:p>
          </table:table-cell>
          <table:table-cell table:style-name="ce4" office:value-type="string" calcext:value-type="string">
            <text:p><text:a xlink:href="https://microservice-api-patterns.org" xlink:type="simple">https://microservice-api-patterns.org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hackernoon.com/best-practices-for-event-driven-microservice-architecture-e034p21lk" xlink:type="simple">J. Skowronski, “Best practices for event-driven microservice architecture,” 2019. [Online]. Available: https://hackernoon.com/best-practices-for-event-driven-microservice-architecture-e034p21lk</text:a></text:p>
          </table:table-cell>
          <table:table-cell table:style-name="ce4" office:value-type="string" calcext:value-type="string">
            <text:p><text:a xlink:href="https://hackernoon.com/best-practices-for-event-driven-microservice-architecture-e034p21lk" xlink:type="simple">https://hackernoon.com/best-practices-for-event-driven-microservice-architecture-e034p21lk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Pahl and P. Jamshidi, “Microservices: A systematic mapping study,” in Proc. 6th Int. Conf. Cloud Comput. Serv. Sci., Setubal, PRT, SCITEPRESS, 2016, pp. 137–146.</text:p>
          </table:table-cell>
          <table:table-cell table:style-name="ce4"/>
          <table:table-cell table:style-name="ce2" office:value-type="string" calcext:value-type="string">
            <text:p><text:a xlink:href="https://doi.org/10.5220/0005785501370146" xlink:type="simple">https://doi.org/10.5220/000578550137014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Taibi and V. Lenarduzzi, “On the definition of microservice bad smells,” IEEE Softw., vol. 35, no. 3, pp. 56–62, May/ Jun. 2018.</text:p>
          </table:table-cell>
          <table:table-cell table:style-name="ce4"/>
          <table:table-cell table:style-name="ce2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Hafiz, P. Adamczyk, and R. E. Johnson, “Growing a pattern language (for security),” in Proc. ACM Int. Symp. New Ideas, New Paradigms, Reflections Program. Softw., New York, NY, USA, 2012, pp. 139–158.</text:p>
          </table:table-cell>
          <table:table-cell table:style-name="ce4"/>
          <table:table-cell table:style-name="ce2" office:value-type="string" calcext:value-type="string">
            <text:p><text:a xlink:href="https://doi.org/10.1145/2384592.2384607" xlink:type="simple">https://doi.org/10.1145/2384592.238460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Schumacher, E. Fernandez-Buglioni, D. Hybertson, F. Buschmann, and P. Sommerlad, Security Patterns: Integrating Security and Systems Engineering. New York, NY, USA : Wiley, 2013.</text:p>
          </table:table-cell>
          <table:table-cell table:style-name="ce4"/>
          <table:table-cell table:style-name="ce4" office:value-type="string" calcext:value-type="string">
            <text:p><text:a xlink:href="https://doi.org/10.1007/s002870200223" xlink:type="simple">https://doi.org/10.1007/s00287020022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Rempel, P. Mäder, T. Kuschke, and J. Cleland-Huang, “Mind the gap: Assessing the conformance of software traceability to relevant guidelines,” in Proc. 36th Int. Conf. Softw. Eng., 2014, pp. 943–954.</text:p>
          </table:table-cell>
          <table:table-cell table:style-name="ce4"/>
          <table:table-cell table:style-name="ce2" office:value-type="string" calcext:value-type="string">
            <text:p><text:a xlink:href="https://doi.org/10.1145/2568225.2568290" xlink:type="simple">https://doi.org/10.1145/2568225.256829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. Y. Guo, J. M. Atlee, and R. Kazman, “A software architecture reconstruction method,” in Proc. Work. Conf. Softw. Architecture, Berlin, Heidelberg, Springer, 1999, pp. 15–33.</text:p>
          </table:table-cell>
          <table:table-cell table:style-name="ce4"/>
          <table:table-cell table:style-name="ce4" office:value-type="string" calcext:value-type="string">
            <text:p><text:a xlink:href="https://doi.org/10.1007/978-0-387-35563-4_2" xlink:type="simple">https://doi.org/10.1007/978-0-387-35563-4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Van Deursen, C. Hofmeister, R. Koschke, L. Moonen, and C. Riva, “Symphony: View-driven software architecture reconstruction,” in Proc. IEEE/IFIP 4th Work. Conf. Softw. Architecturen, Washington, DC, USA, 2004, pp. 122–132.</text:p>
          </table:table-cell>
          <table:table-cell table:style-name="ce4"/>
          <table:table-cell table:style-name="ce4" office:value-type="string" calcext:value-type="string">
            <text:p><text:a xlink:href="https://doi.org/10.1109/WICSA.2004.1310696" xlink:type="simple">https://doi.org/10.1109/WICSA.2004.131069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. Haitzer and U. Zdun, “Semi-automated architectural abstraction specifications for supporting software evolution,” Sci. Comput. Program., vol. 90, pp. 135–160, 2014.</text:p>
          </table:table-cell>
          <table:table-cell table:style-name="ce4"/>
          <table:table-cell table:style-name="ce4" office:value-type="string" calcext:value-type="string">
            <text:p><text:a xlink:href="https://doi.org/10.1016/j.scico.2013.10.004" xlink:type="simple">https://doi.org/10.1016/j.scico.2013.10.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C. Payne, “A guide to security metrics,” Rockville, MD, USA: SANS Institute Information Security Reading Room, 2006.</text:p>
          </table:table-cell>
          <table:table-cell table:style-name="ce2" office:value-type="string" calcext:value-type="string">
            <text:p><text:a xlink:href="https://www.researchgate.net/profile/Abdelkader-Bouaziz/post/Security_metrics_refrences/attachment/60eefc98647f3906fc88d119/AS%3A1045487146786816%401626274968696/download/Security+Metics+2.pdf" xlink:type="simple">https://www.researchgate.net/profile/Abdelkader-Bouaziz/post/Security_metrics_refrences/attachment/60eefc98647f3906fc88d119/AS%3A1045487146786816%401626274968696/download/Security+Metics+2.pdf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Ingeno, Software Architect's Handbook: Become a Successful Software Architect by Implementing Effective Architecture Concepts. Birmingham, U.K. : Packt Publishing Ltd, 2018.</text:p>
          </table:table-cell>
          <table:table-cell table:style-name="ce4" office:value-type="string" calcext:value-type="string">
            <text:p><text:a xlink:href="https://books.google.com/books?hl=en&amp;lr=&amp;id=6EZsDwAAQBAJ&amp;oi=fnd&amp;pg=PP1&amp;ots=EKcLndMhJ7&amp;sig=kb-2ne7BdhkXS5gKcpApyxGceTE" xlink:type="simple">https://books.google.com/books?hl=en&amp;lr=&amp;id=6EZsDwAAQBAJ&amp;oi=fnd&amp;pg=PP1&amp;ots=EKcLndMhJ7&amp;sig=kb-2ne7BdhkXS5gKcpApyxGceTE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cheatsheetseries.owasp.org/cheatsheets/Microservices_Security_Cheat_Sheet.html" xlink:type="simple">OWASP, “Microservices security cheat sheet,” 2023. [Online]. Available: https://cheatsheetseries.owasp.org/cheatsheets/Microservices_Security_Cheat_Sheet.html</text:a></text:p>
          </table:table-cell>
          <table:table-cell table:style-name="ce4" office:value-type="string" calcext:value-type="string">
            <text:p><text:a xlink:href="https://cheatsheetseries.owasp.org/cheatsheets/Microservices_Security_Cheat_Sheet.html" xlink:type="simple">https://cheatsheetseries.owasp.org/cheatsheets/Microservices_Security_Cheat_Sheet.html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Parrend, T. Mazzucotelli, and F. Colin, “Using design structure matrices (DSM) as security controls for software architectures,” Complex System Digital Campus, cS-DC Research Report, May 2017, doi: 10.13140/RG.2.2.25336.85761.</text:p>
          </table:table-cell>
          <table:table-cell table:style-name="ce4" office:value-type="string" calcext:value-type="string">
            <text:p><text:a xlink:href="https://www.researchgate.net/profile/Pierre-Parrend/publication/317032985_Using_Design_Structure_Matrices_DSM_as_security_controls_for_software_architectures/links/59203214458515e3d402f383/Using-Design-Structure-Matrices-DSM-as-security-controls-for-software-architectures.pdf" xlink:type="simple">https://www.researchgate.net/profile/Pierre-Parrend/publication/317032985_Using_Design_Structure_Matrices_DSM_as_security_controls_for_software_architectures/links/59203214458515e3d402f383/Using-Design-Structure-Matrices-DSM-as-security-controls-for-software-architectures.pdf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Ramos, M. Lazar, R. H. Filho, and J. J. Rodrigues, “Model-based quantitative network security metrics: A survey,” IEEE Commun. Surv. Tuts., vol. 19, no. 4, pp. 2704–2734, Fourth Quarter 2017.</text:p>
          </table:table-cell>
          <table:table-cell table:style-name="ce4"/>
          <table:table-cell table:style-name="ce5" office:value-type="string" calcext:value-type="string">
            <text:p><text:a xlink:href="https://doi.org/10.1109/COMST.2017.2745505" xlink:type="simple">https://doi.org/10.1109/COMST.2017.274550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Noel and S. Jajodia, “A suite of metrics for network attack graph analytics,” in Network Security Metrics, Berlin, Heidelberg : Springer, 2017, pp. 141–176.</text:p>
          </table:table-cell>
          <table:table-cell table:style-name="ce4"/>
          <table:table-cell table:style-name="ce4" office:value-type="string" calcext:value-type="string">
            <text:p><text:a xlink:href="https://doi.org/10.1007/978-3-319-66505-4_7" xlink:type="simple">https://doi.org/10.1007/978-3-319-66505-4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Wang, T. Islam, T. Long, A. Singhal, and S. Jajodia, “An attack graph-based probabilistic security metric,” in Proc. IFIP Annu. Conf. Data Appl. Secur., Berlin, Heidelberg, Springer, 2008, pp. 283–296.</text:p>
          </table:table-cell>
          <table:table-cell table:style-name="ce4"/>
          <table:table-cell table:style-name="ce5" office:value-type="string" calcext:value-type="string">
            <text:p><text:a xlink:href="https://doi.org/10.1007/978-3-540-70567-3_22" xlink:type="simple">https://doi.org/10.1007/978-3-540-70567-3_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Pautasso and E. Wilde, “Why is the web loosely coupled?: A multi-faceted metric for service design,” in Proc. 18th Int. Conf. On World Wide Web, New York, NY, USA, 2009, pp. 911–920.</text:p>
          </table:table-cell>
          <table:table-cell table:style-name="ce1"/>
          <table:table-cell table:style-name="ce5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Bogner, S. Wagner, and A. Zimmermann, “Towards a practical maintainability quality model for service-and microservice-based systems,” in Proc. 11th Eur. Conf. Softw. Architecture: Companion Proc., New York, NY, USA, 2017, pp. 195–198.</text:p>
          </table:table-cell>
          <table:table-cell table:style-name="ce1"/>
          <table:table-cell table:style-name="ce5" office:value-type="string" calcext:value-type="string">
            <text:p><text:a xlink:href="https://doi.org/10.1145/3129790.3129816" xlink:type="simple">https://doi.org/10.1145/3129790.31298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. Engel, M. Langermeier, B. Bauer, and A. Hofmann, “Evaluation of microservice architectures: A metric and tool-based approach,” in Proc. Int. Conf. Adv. Inf. Syst. Eng., Cham, Springer International Publishing, 2018, pp. 74–89.</text:p>
          </table:table-cell>
          <table:table-cell table:style-name="ce4"/>
          <table:table-cell table:style-name="ce2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. A. Torkura, M. I. Sukmana, A. V. Kayem, F. Cheng, and C. Meinel, “A cyber risk based moving target defense mechanism for microservice architectures,” in Proc. IEEE 16th Int. Symp. Parallel Distrib. Process. Appl., Washington, DC, USA, 2018, pp. 932–939.</text:p>
          </table:table-cell>
          <table:table-cell table:style-name="ce4"/>
          <table:table-cell table:style-name="ce4" office:value-type="string" calcext:value-type="string">
            <text:p><text:a xlink:href="https://doi.org/10.1109/BDCloud.2018.00137" xlink:type="simple">https://doi.org/10.1109/BDCloud.2018.0013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Avritzer, “Challenges and approaches for the assessment of micro-service architecture deployment alternatives in DevOps: A tutorial presented at ICSA 2020,” in Proc. IEEE Int. Conf. Softw. Architecture Companion, Washington, DC, USA, 2020, pp. 1–2.</text:p>
          </table:table-cell>
          <table:table-cell table:style-name="ce1"/>
          <table:table-cell table:style-name="ce2" office:value-type="string" calcext:value-type="string">
            <text:p><text:a xlink:href="https://doi.org/10.1109/ICSA-C50368.2020.00007" xlink:type="simple">https://doi.org/10.1109/ICSA-C50368.2020.0000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Levin and T. A. Benson, “ViperProbe: Rethinking microservice observability with eBPF,” in Proc. IEEE 9th Int. Conf. Cloud Netw., Washington, DC, USA, 2020, pp. 1–8.</text:p>
          </table:table-cell>
          <table:table-cell table:style-name="ce4"/>
          <table:table-cell table:style-name="ce4" office:value-type="string" calcext:value-type="string">
            <text:p><text:a xlink:href="https://doi.org/10.1109/CloudNet51028.2020.9335808" xlink:type="simple">https://doi.org/10.1109/CloudNet51028.2020.933580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Flora, “Improving the security of microservice systems by detecting and tolerating intrusions,” in Proc. IEEE Int. Symp. Softw. Rel. Eng. Workshops, Washington, DC, USA, 2020, pp. 131–134.</text:p>
          </table:table-cell>
          <table:table-cell table:style-name="ce4"/>
          <table:table-cell table:style-name="ce4" office:value-type="string" calcext:value-type="string">
            <text:p><text:a xlink:href="https://doi.org/10.1109/ISSREW51248.2020.00051" xlink:type="simple">https://doi.org/10.1109/ISSREW51248.2020.0005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Chondamrongkul, J. Sun, and I. Warren, “Automated security analysis for microservice architecture,” in Proc. IEEE Int. Conf. Softw. Architecture Companion, Washington, DC, USA, 2020, pp. 79–82.</text:p>
          </table:table-cell>
          <table:table-cell table:style-name="ce4"/>
          <table:table-cell table:style-name="ce5" office:value-type="string" calcext:value-type="string">
            <text:p><text:a xlink:href="https://doi.org/10.1109/ICSA-C50368.2020.00024" xlink:type="simple">https://doi.org/10.1109/ICSA-C50368.2020.000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, Yuanbo et al. An Adaptive Dynamic Defense Strategy for Microservices Based on Deep Reinforcement Learning. Electronics, v. 14, n. 20, p. 4096, 2025.</text:p>
          </table:table-cell>
          <table:table-cell table:style-name="ce4"/>
          <table:table-cell table:style-name="ce4" office:value-type="string" calcext:value-type="string">
            <text:p><text:a xlink:href="https://doi.org/10.3390/electronics14204096" xlink:type="simple">https://doi.org/10.3390/electronics1420409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ENFER, Patric et al. Understanding security tactics in microservice APIs using annotated software architecture decomposition models–a controlled experiment. Empirical Software Engineering, v. 30, n. 3, p. 66, 2025.</text:p>
          </table:table-cell>
          <table:table-cell table:style-name="ce4"/>
          <table:table-cell table:style-name="ce5" office:value-type="string" calcext:value-type="string">
            <text:p><text:a xlink:href="https://doi.org/10.1007/s10664-024-10601-1" xlink:type="simple">https://doi.org/10.1007/s10664-024-10601-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ZHANG, Xing et al. Differentiated security requirements: An exploration of microservice placement algorithms in internet of vehicles. Electronics, v. 13, n. 8, p. 1597, 2024.</text:p>
          </table:table-cell>
          <table:table-cell table:style-name="ce4"/>
          <table:table-cell table:style-name="ce5" office:value-type="string" calcext:value-type="string">
            <text:p><text:a xlink:href="https://doi.org/10.3390/electronics13081597" xlink:type="simple">https://doi.org/10.3390/electronics1308159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YIN, Yanshang et al. MADGuard: A High-Performance Microservice Anomaly Detection System With Multidimensional Data Fusion and Temporal Causal Analysis. IEEE Transactions on Network and Service Management, v. 23, p. 767-788, 2025.</text:p>
          </table:table-cell>
          <table:table-cell table:style-name="ce4"/>
          <table:table-cell table:style-name="ce5" office:value-type="string" calcext:value-type="string">
            <text:p><text:a xlink:href="https://doi.org/10.1109/TNSM.2025.3634590" xlink:type="simple">https://doi.org/10.1109/TNSM.2025.363459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APSIN, Saridraj; PROMPOON, Nakornthip. Design and Development of Security Services Using Security Patterns and Microservices Security Practices. In: 2025 9th International Conference on Management Engineering, Software Engineering and Service Sciences (ICMSS). IEEE, 2025. p. 6-12.</text:p>
          </table:table-cell>
          <table:table-cell table:style-name="ce4"/>
          <table:table-cell table:style-name="ce5" office:value-type="string" calcext:value-type="string">
            <text:p><text:a xlink:href="https://doi.org/10.1109/ICMSS64503.2025.00010" xlink:type="simple">https://doi.org/10.1109/ICMSS64503.2025.000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UNIGA, Clever Nelson Choque; LINO, Roque Yupanqui Ronal; FRED, Torres Cruz. EVALUACION DE LA VULNERABILIDAD EN SISTEMAS DISTRIBUIDOS A TRAVES DE TABLAS DE ARCOÍRIS.</text:p>
          </table:table-cell>
          <table:table-cell table:style-name="ce4" office:value-type="string" calcext:value-type="string">
            <text:p><text:a xlink:href="https://www.researchgate.net/profile/Ronny-Roque-Yupanqui/publication/387428721_EVALUACION_DE_LA_VULNERABILIDAD_USANDO_KALI_LINUX_Y_TABLAS_DE_ARCO_IRIS_FINESI_-_UNAP/links/676d7578fb9aff6eaaee3446/EVALUACION-DE-LA-VULNERABILIDAD-USANDO-KALI-LINUX-Y-TABLAS-DE-ARCO-IRIS-FINESI-UNAP.pdf" xlink:type="simple">https://www.researchgate.net/profile/Ronny-Roque-Yupanqui/publication/387428721_EVALUACION_DE_LA_VULNERABILIDAD_USANDO_KALI_LINUX_Y_TABLAS_DE_ARCO_IRIS_FINESI_-_UNAP/links/676d7578fb9aff6eaaee3446/EVALUACION-DE-LA-VULNERABILIDAD-USANDO-KALI-LINUX-Y-TABLAS-DE-ARCO-IRIS-FINESI-UNAP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ERTL, Lukas. Masterarbeit/Master’s Thesis. 2016. Tese de Doutorado. Universität Wien.</text:p>
          </table:table-cell>
          <table:table-cell table:style-name="ce5" office:value-type="string" calcext:value-type="string">
            <text:p><text:a xlink:href="https://www.researchgate.net/profile/Bertold-Estl/publication/357958408_Das_Internet_in_Osterreich_zwischen_Freiheit_Regulierung_und_Kontrolle/links/61e94c859a753545e2e4ff69/Das-Internet-in-Oesterreich-zwischen-Freiheit-Regulierung-und-Kontrolle.pdf" xlink:type="simple">https://www.researchgate.net/profile/Bertold-Estl/publication/357958408_Das_Internet_in_Osterreich_zwischen_Freiheit_Regulierung_und_Kontrolle/links/61e94c859a753545e2e4ff69/Das-Internet-in-Oesterreich-zwischen-Freiheit-Regulierung-und-Kontrolle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4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" meta:object-count="0"/>
    <meta:generator>LibreOfficeDev/6.0.5.2$Linux_X86_64 LibreOffice_project/</meta:generator>
  </office:meta>
</office:document-meta>
</file>