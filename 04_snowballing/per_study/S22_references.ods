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“Amazon aws composer,” 2023. [Online]. Available: https://aws.amazon.com/application-composer/.</text:p>
          </table:table-cell>
          <table:table-cell table:style-name="ce4" office:value-type="string" calcext:value-type="string">
            <text:p><text:a xlink:href="https://aws.amazon.com/application-composer/" xlink:type="simple">https://aws.amazon.com/application-composer/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5281/zenodo.10829272." xlink:type="simple">“Replication package,” 2024. [Online]. Available: https://doi.org/10.5281/zenodo.10829272.</text:a></text:p>
          </table:table-cell>
          <table:table-cell table:style-name="ce2" office:value-type="string" calcext:value-type="string">
            <text:p><text:a xlink:href="https://doi.org/10.5281/zenodo.10829272" xlink:type="simple">https://doi.org/10.5281/zenodo.10829272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. B. Ali and K. Petersen, “Evaluating strategies for study selection in systematic literature studies,” in Procs of ESEM, 2014.</text:p>
          </table:table-cell>
          <table:table-cell table:style-name="ce1"/>
          <table:table-cell table:style-name="ce5" office:value-type="string" calcext:value-type="string">
            <text:p><text:a xlink:href="https://doi.org/10.1145/2652524.2652557" xlink:type="simple">https://doi.org/10.1145/2652524.265255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Andrews and M. Sheppard, “Software architecture erosion: Impacts, causes, and management.” International Journal of Computer Science and Security(IJCSS), vol. 14, no. 2, pp. 82–94, 2020.</text:p>
          </table:table-cell>
          <table:table-cell table:style-name="ce2" office:value-type="string" calcext:value-type="string">
            <text:p><text:a xlink:href="https://mail.cscjournals.org/manuscript/Journals/IJCSS/Volume14/Issue2/IJCSS-1557.pdf" xlink:type="simple">https://mail.cscjournals.org/manuscript/Journals/IJCSS/Volume14/Issue2/IJCSS-1557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. Avgeriou, “Making decisions - from software architecture theory to practice,” 2023. [Online]. Available: https://www.slideshare.net/ParisAvgeriou/making-decisions-from-software-architecture-theory-to-practice.</text:p>
          </table:table-cell>
          <table:table-cell table:style-name="ce2" office:value-type="string" calcext:value-type="string">
            <text:p><text:a xlink:href="https://www.slideshare.net/ParisAvgeriou/making-decisions-from-software-architecture-theory-to-practice" xlink:type="simple">https://www.slideshare.net/ParisAvgeriou/making-decisions-from-software-architecture-theory-to-practice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. Bass, P. Clements, and R. Kazman, Software architecture in practice. Addison-Wesley Professional, 2003.</text:p>
          </table:table-cell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Bucaioni, A. Di Salle, L. Iovino, I. Malavolta, and P. Pelliccione, “Reference architectures modelling and compliance checking,” Softw. Syst. Model., vol. 22, no. 3, pp. 891–917, 2023. [Online]. Available: https://doi.org/10.1007/s10270-022-01022-z.</text:p>
          </table:table-cell>
          <table:table-cell table:style-name="ce1"/>
          <table:table-cell table:style-name="ce2" office:value-type="string" calcext:value-type="string">
            <text:p><text:a xlink:href="https://doi.org/10.1007/s10270-022-01022-z" xlink:type="simple">https://doi.org/10.1007/s10270-022-01022-z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Bucaioni and P. Pelliccione, “Technical architectures for automotive systems,” in 2020 IEEE International Conference on Software Architecture (ICSA). IEEE, 2020.</text:p>
          </table:table-cell>
          <table:table-cell table:style-name="ce4"/>
          <table:table-cell table:style-name="ce2" office:value-type="string" calcext:value-type="string">
            <text:p><text:a xlink:href="https://doi.org/10.1109/ICSA47634.2020.00013" xlink:type="simple">https://doi.org/10.1109/ICSA47634.2020.0001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Cheesman and J. Daniels, UML components: a simple process for specifying component-based software. Addison-Wesley Longman Publishing Co., Inc., 2000.</text:p>
          </table:table-cell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S. Cruzes and T. Dyba, “Recommended steps for thematic synthesis in software engineering,” in Procs of ESEM, 2011.</text:p>
          </table:table-cell>
          <table:table-cell table:style-name="ce4"/>
          <table:table-cell table:style-name="ce2" office:value-type="string" calcext:value-type="string">
            <text:p><text:a xlink:href="https://doi.org/10.1109/ESEM.2011.36" xlink:type="simple">https://doi.org/10.1109/ESEM.2011.3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. Ernst, R. Kazman, and J. Delange, Technical Debt in Practice: How to Find It and Fix It, 2021.</text:p>
          </table:table-cell>
          <table:table-cell table:style-name="ce2" office:value-type="string" calcext:value-type="string">
            <text:p><text:a xlink:href="https://direct.mit.edu/books/monograph/5160/Technical-Debt-in-PracticeHow-to-Find-It-and-Fix" xlink:type="simple">https://direct.mit.edu/books/monograph/5160/Technical-Debt-in-PracticeHow-to-Find-It-and-Fix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. Fotiou, D. Trossen, and G. C. Polyzos, “Illustrating a publish-subscribe internet architecture,” Telecommunication Systems, vol. 51, pp. 233–245, 2012.</text:p>
          </table:table-cell>
          <table:table-cell table:style-name="ce4"/>
          <table:table-cell table:style-name="ce2" office:value-type="string" calcext:value-type="string">
            <text:p><text:a xlink:href="https://doi.org/10.1007/s11235-011-9432-5" xlink:type="simple">https://doi.org/10.1007/s11235-011-9432-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. Garcés, S. Martínez-Fernández, L. Oliveira, P. Valle, C. Ayala, X. Franch, and E. Y. Nakagawa, “Three decades of software reference architectures: A systematic mapping study,” Journal of Systems and Software, vol. 179, p. 111004, 2021.</text:p>
          </table:table-cell>
          <table:table-cell table:style-name="ce4"/>
          <table:table-cell table:style-name="ce2" office:value-type="string" calcext:value-type="string">
            <text:p><text:a xlink:href="https://doi.org/10.1016/j.jss.2021.111004" xlink:type="simple">https://doi.org/10.1016/j.jss.2021.11100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V. Garousi, M. Felderer, and M. V. Mäntylä, “Guidelines for including grey literature and conducting multivocal literature reviews in software engineering,” Information and Software Technology, vol. 106, pp. 101–121. 2019.</text:p>
          </table:table-cell>
          <table:table-cell table:style-name="ce1"/>
          <table:table-cell table:style-name="ce2" office:value-type="string" calcext:value-type="string">
            <text:p><text:a xlink:href="https://doi.org/10.1016/j.infsof.2018.09.006" xlink:type="simple">https://doi.org/10.1016/j.infsof.2018.09.00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Guth, U. Breitenbücher, M. Falkenthal, P. Fremantle, O. Kopp, F. Leymann, and L. Reinfurt, A Detailed Analysis of IoT Platform Architectures: Concepts, Similarities, and Differences. Springer, 2018, pp. 81–101.</text:p>
          </table:table-cell>
          <table:table-cell table:style-name="ce4"/>
          <table:table-cell table:style-name="ce2" office:value-type="string" calcext:value-type="string">
            <text:p><text:a xlink:href="https://doi.org/10.1007/978-981-10-5861-5_4" xlink:type="simple">https://doi.org/10.1007/978-981-10-5861-5_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Guth, U. Breitenbücher, M. Falkenthal, F. Leymann, and L. Reinfurt, “Comparison of iot platform architectures: A field study based on a reference architecture,” in Cloudification of the Internet of Things. IEEE, 2016, pp. 1–6.</text:p>
          </table:table-cell>
          <table:table-cell table:style-name="ce1"/>
          <table:table-cell table:style-name="ce2" office:value-type="string" calcext:value-type="string">
            <text:p><text:a xlink:href="https://doi.org/10.1109/CIOT.2016.7872918" xlink:type="simple">https://doi.org/10.1109/CIOT.2016.787291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Herold, M. Mair, A. Rausch, and I. Schindler, “Checking conformance with reference architectures: A case study,” in 2013 17th IEEE International Enterprise Distributed Object Computing Conference. IEEE, 2013, pp. 71–80.</text:p>
          </table:table-cell>
          <table:table-cell table:style-name="ce4"/>
          <table:table-cell table:style-name="ce2" office:value-type="string" calcext:value-type="string">
            <text:p><text:a xlink:href="https://doi.org/10.1109/EDOC.2013.17" xlink:type="simple">https://doi.org/10.1109/EDOC.2013.1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. Kitchenham and P. Brereton, “A systematic review of systematic review process research in software engineering,” Information and softwaretechnology, 2013.</text:p>
          </table:table-cell>
          <table:table-cell table:style-name="ce4"/>
          <table:table-cell table:style-name="ce4" office:value-type="string" calcext:value-type="string">
            <text:p><text:a xlink:href="https://doi.org/10.1016/j.infsof.2013.07.010" xlink:type="simple">https://doi.org/10.1016/j.infsof.2013.07.0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Knodel, D. Muthig, and D. Rost, “Constructive architecture compliance checking-an experiment on support by live feedback,” in 2008 IEEE International Conference on Software Maintenance. IEEE, 2008, pp. 287–296.</text:p>
          </table:table-cell>
          <table:table-cell table:style-name="ce4"/>
          <table:table-cell table:style-name="ce2" office:value-type="string" calcext:value-type="string">
            <text:p><text:a xlink:href="https://doi.org/10.1109/ICSM.2008.4658077" xlink:type="simple">https://doi.org/10.1109/ICSM.2008.465807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Knodel, M. Naab, J. Knodel, and M. Naab, “How to perform the architecture compliance check (ace)? ” Pragmatic Evaluation of Software Architectures, pp. 83–94, 2016.</text:p>
          </table:table-cell>
          <table:table-cell table:style-name="ce4"/>
          <table:table-cell table:style-name="ce4" office:value-type="string" calcext:value-type="string">
            <text:p><text:a xlink:href="https://doi.org/10.1007/978-3-319-34177-4_8" xlink:type="simple">https://doi.org/10.1007/978-3-319-34177-4_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S. Kolovos, R. F. Paige, and F. A. Polack, “The epsilon object language (eol),” in European conference on model driven architecture-foundations and applications. Springer, 2006, pp. 128–142.</text:p>
          </table:table-cell>
          <table:table-cell table:style-name="ce4"/>
          <table:table-cell table:style-name="ce4" office:value-type="string" calcext:value-type="string">
            <text:p><text:a xlink:href="https://doi.org/10.1007/11787044_11" xlink:type="simple">https://doi.org/10.1007/11787044_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Kolovos and A. de la Vega, “Flexmi: a generic and modular textual syntax for domain-specific modelling,” Software and Systems Modeling, vol. 22, no. 4, pp. 1197–1215, 2023.</text:p>
          </table:table-cell>
          <table:table-cell table:style-name="ce4"/>
          <table:table-cell table:style-name="ce2" office:value-type="string" calcext:value-type="string">
            <text:p><text:a xlink:href="https://doi.org/10.1007/s10270-022-01064-3" xlink:type="simple">https://doi.org/10.1007/s10270-022-01064-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. Kruchten, H. Obbink, and J. Stafford, “The past, present, and future for software architecture,” IEEE software, vol. 23, no. 2, pp. 22–30, 2006.</text:p>
          </table:table-cell>
          <table:table-cell table:style-name="ce4"/>
          <table:table-cell table:style-name="ce2" office:value-type="string" calcext:value-type="string">
            <text:p><text:a xlink:href="https://doi.org/10.1109/MS.2006.59" xlink:type="simple">https://doi.org/10.1109/MS.2006.5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. Li, P. Liang, M. Soliman, and P. Avgeriou, “Understanding software architecture erosion: A systematic mapping study,” Journal of Software: Evolution and Process, vol. 34, no. 3, p. e2423, 2022.</text:p>
          </table:table-cell>
          <table:table-cell table:style-name="ce4"/>
          <table:table-cell table:style-name="ce2" office:value-type="string" calcext:value-type="string">
            <text:p><text:a xlink:href="https://doi.org/10.1002/smr.2423" xlink:type="simple">https://doi.org/10.1002/smr.242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Madani, D. S. Kolovos, and R. F. Paige, “Parallel model validation with epsilon,” in Modelling Foundations and Applications: 14th European Conference, ECMFA 2018, Held as Part of STAF 2018, Toulouse, France, June 26–28, 2018, Proceedings 14. Springer, 2018, pp. 115–131.</text:p>
          </table:table-cell>
          <table:table-cell table:style-name="ce4"/>
          <table:table-cell table:style-name="ce2" office:value-type="string" calcext:value-type="string">
            <text:p><text:a xlink:href="https://doi.org/10.1007/978-3-319-92997-2_8" xlink:type="simple">https://doi.org/10.1007/978-3-319-92997-2_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. S. Molléri, K. Petersen, and E. Mendes, “Survey guidelines in software engineering: An annotated review,” in Proceedings of the 10th ACM/IEEE international symposium on empirical software engineering and measurement, 2016.</text:p>
          </table:table-cell>
          <table:table-cell table:style-name="ce4"/>
          <table:table-cell table:style-name="ce2" office:value-type="string" calcext:value-type="string">
            <text:p><text:a xlink:href="https://doi.org/10.1145/2961111.2962619" xlink:type="simple">https://doi.org/10.1145/2961111.296261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F. Pinto, R. Terra, E. Guerra, and F. São Sabbas, “Introducing an architectural conformance process in continuous integration.” J. Univers. Comput. Sci., vol. 23, no. 8, pp. 769–805, 2017.</text:p>
          </table:table-cell>
          <table:table-cell table:style-name="ce4" office:value-type="string" calcext:value-type="string">
            <text:p><text:a xlink:href="https://professores.dcc.ufla.br/~terra/publications_files/2017_jucs.pdf" xlink:type="simple">https://professores.dcc.ufla.br/~terra/publications_files/2017_jucs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. M. Rose, R. F. Paige, D. S. Kolovos, and F. A. Polack, “The epsilon generation language,” in Model Driven Architecture-Foundations and Applications: 4th European Conference, ECMDA-FA 2008, Berlin, Germany, June 9–13, 2008. Proceedings 4. Springer, 2008, pp. 1–16.</text:p>
          </table:table-cell>
          <table:table-cell table:style-name="ce4"/>
          <table:table-cell table:style-name="ce4" office:value-type="string" calcext:value-type="string">
            <text:p><text:a xlink:href="https://doi.org/10.1007/978-3-540-69100-6_1" xlink:type="simple">https://doi.org/10.1007/978-3-540-69100-6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Sarkar, S. Ramachandran, G. S. Kumar, M. K. Iyengar, K. Rangarajan, and S. Sivagnanam, “Modularization of a large-scale business application: A case study,” IEEE software, vol. 26, no. 2, pp. 28–35, 2009.</text:p>
          </table:table-cell>
          <table:table-cell table:style-name="ce4"/>
          <table:table-cell table:style-name="ce2" office:value-type="string" calcext:value-type="string">
            <text:p><text:a xlink:href="https://doi.org/10.1109/MS.2009.42" xlink:type="simple">https://doi.org/10.1109/MS.2009.4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F. Shull, J. Singer, and D. I. Sjøberg, Guide to advanced empirical softwareengineering, 2007.</text:p>
          </table:table-cell>
          <table:table-cell table:style-name="ce4"/>
          <table:table-cell table:style-name="ce2" office:value-type="string" calcext:value-type="string">
            <text:p><text:a xlink:href="https://doi.org/10.1007/978-1-84800-044-5" xlink:type="simple">https://doi.org/10.1007/978-1-84800-044-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. Soares Palma, E. Yumi Nakagawa, D. M. Barroso Paiva, and M. Istela Cagnin, “Evolving reference architecture description: Guidelines based on iso/iec/ieee 42010,” arXiv e-prints, pp. arXiv- 2209, 2022.</text:p>
          </table:table-cell>
          <table:table-cell table:style-name="ce1"/>
          <table:table-cell table:style-name="ce4" office:value-type="string" calcext:value-type="string">
            <text:p><text:a xlink:href="https://doi.org/10.48550/arXiv.2209.14714" xlink:type="simple">https://doi.org/10.48550/arXiv.2209.1471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Steinberg, F. Budinsky, E. Merks, and M. Paternostro, EMF: eclipse modeling framework. Pearson Education, 2008.</text:p>
          </table:table-cell>
          <table:table-cell table:style-name="ce4" office:value-type="string" calcext:value-type="string">
            <text:p><text:a xlink:href="https://books.google.com/books?hl=en&amp;lr=&amp;id=sA0zOZuDXhgC&amp;oi=fnd&amp;pg=PT20&amp;ots=2LOFZU0mJq&amp;sig=2LH_JfMoWQ3BLhuCDsrNC97R81Q" xlink:type="simple">https://books.google.com/books?hl=en&amp;lr=&amp;id=sA0zOZuDXhgC&amp;oi=fnd&amp;pg=PT20&amp;ots=2LOFZU0mJq&amp;sig=2LH_JfMoWQ3BLhuCDsrNC97R81Q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. K. Turhan and H. Oğuztüzün, “Metamodeling of reference software architecture and automatic code generation,” in Proccedingsof the 10th European Conference on Software Architecture Workshops, 2016, pp. 1–7.</text:p>
          </table:table-cell>
          <table:table-cell table:style-name="ce4"/>
          <table:table-cell table:style-name="ce4" office:value-type="string" calcext:value-type="string">
            <text:p><text:a xlink:href="https://doi.org/10.1145/2993412.3004850" xlink:type="simple">https://doi.org/10.1145/2993412.300485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. Weinreich and G. Buchgeher, “Automatic reference architecture conformance checking for soa-based software systems,” in 2014 IEEE/IFIP Conference on Software Architecture. IEEE, 2014, pp. 95–104.</text:p>
          </table:table-cell>
          <table:table-cell table:style-name="ce4"/>
          <table:table-cell table:style-name="ce4" office:value-type="string" calcext:value-type="string">
            <text:p><text:a xlink:href="https://doi.org/10.1109/WICSA.2014.22" xlink:type="simple">https://doi.org/10.1109/WICSA.2014.2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FERKO, Enxhi et al. Towards interoperable digital twins: Integrating sysml into aas with higher-order transformations. In: 2024 IEEE 21st International Conference on Software Architecture Companion (ICSA-C). IEEE, 2024. p. 342-349.</text:p>
          </table:table-cell>
          <table:table-cell table:style-name="ce4"/>
          <table:table-cell table:style-name="ce6" office:value-type="string" calcext:value-type="string">
            <text:p><text:a xlink:href="https://doi.org/10.1109/ICSA-C63560.2024.00063" xlink:type="simple">https://doi.org/10.1109/ICSA-C63560.2024.0006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BUCAIONI, Alessio et al. Architecture as code. In: 2025 IEEE 22nd International Conference on Software Architecture (ICSA). IEEE, 2025. p. 187-198.</text:p>
          </table:table-cell>
          <table:table-cell table:style-name="ce4"/>
          <table:table-cell table:style-name="ce4" office:value-type="string" calcext:value-type="string">
            <text:p><text:a xlink:href="https://doi.org/10.1109/ICSA65012.2025.00027" xlink:type="simple">https://doi.org/10.1109/ICSA65012.2025.0002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REICHE, Frederik; REUSSNER, Ralf; HEINRICH, Robert. Detecting Information Flow Security Vulnerabilities by Analysis Coupling. IEEE Transactions on Software Engineering, 2025.</text:p>
          </table:table-cell>
          <table:table-cell table:style-name="ce4"/>
          <table:table-cell table:style-name="ce6" office:value-type="string" calcext:value-type="string">
            <text:p><text:a xlink:href="https://doi.org/10.1109/TSE.2025.3589647" xlink:type="simple">https://doi.org/10.1109/TSE.2025.358964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U, Chaoze et al. Verification of temporal consistency constraints in the evolution of software for intelligent unmanned systems driven by model checking. Scientific Reports, v. 15, n. 1, p. 21755, 2025.</text:p>
          </table:table-cell>
          <table:table-cell table:style-name="ce1"/>
          <table:table-cell table:style-name="ce6" office:value-type="string" calcext:value-type="string">
            <text:p><text:a xlink:href="https://doi.org/10.1038/s41598-025-06523-7" xlink:type="simple">https://doi.org/10.1038/s41598-025-06523-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RUBEI, Riccardo; DI SALLE, Amleto; BUCAIONI, Alessio. LLM-based recommender systems for violation resolutions in continuous architectural conformance. In: 2025 IEEE 22nd International Conference on Software Architecture Companion (ICSA-C). IEEE, 2025. p. 404-409.</text:p>
          </table:table-cell>
          <table:table-cell table:style-name="ce1"/>
          <table:table-cell table:style-name="ce6" office:value-type="string" calcext:value-type="string">
            <text:p><text:a xlink:href="https://doi.org/10.1109/ICSA-C65153.2025.00063" xlink:type="simple">https://doi.org/10.1109/ICSA-C65153.2025.0006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TUYISHIME, Adiel et al. Enhancing model management with automated rest api generation. In: Proceedings of the ACM/IEEE 27th International Conference on Model Driven Engineering Languages and Systems. 2024. p. 36-40.</text:p>
          </table:table-cell>
          <table:table-cell table:style-name="ce4"/>
          <table:table-cell table:style-name="ce2" office:value-type="string" calcext:value-type="string">
            <text:p><text:a xlink:href="https://doi.org/10.1145/3652620.3687787" xlink:type="simple">https://doi.org/10.1145/3652620.368778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EIM, Jan et al. Towards Automated Knowledge Management in the Software Life Cycle. Technical Report. Karlsruher Institut für Technologie (KIT). doi: 10.5445/IR/1000181618, 2025.</text:p>
          </table:table-cell>
          <table:table-cell table:style-name="ce4" office:value-type="string" calcext:value-type="string">
            <text:p><text:a xlink:href="https://www.researchgate.net/profile/Vincenzo-Scotti-2/publication/395307415_Towards_Automated_Knowledge_Management_in_the_Software_Life_Cycle/links/68bbd5226f87c42f3b902725/Towards-Automated-Knowledge-Management-in-the-Software-Life-Cycle.pdf" xlink:type="simple">https://www.researchgate.net/profile/Vincenzo-Scotti-2/publication/395307415_Towards_Automated_Knowledge_Management_in_the_Software_Life_Cycle/links/68bbd5226f87c42f3b902725/Towards-Automated-Knowledge-Management-in-the-Software-Life-Cycle.pdf</text:a></text:p>
          </table:table-cell>
          <table:table-cell table:style-name="ce2" office:value-type="string" calcext:value-type="string">
            <text:p><text:a xlink:href="https://doi.org/10.5445/IR/1000181618" xlink:type="simple">https://doi.org/10.5445/IR/100018161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EIM, Jan; KAPLAN, Angelika. From Scattered to Structured: A Vision for Automating Architectural Knowledge Management. arXiv preprint arXiv:2601.19548, 2026.</text:p>
          </table:table-cell>
          <table:table-cell table:style-name="ce1"/>
          <table:table-cell table:style-name="ce2" office:value-type="string" calcext:value-type="string">
            <text:p><text:a xlink:href="https://doi.org/10.48550/arXiv.2601.19548" xlink:type="simple">https://doi.org/10.48550/arXiv.2601.1954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TUYISHIME, Adiel. Supporting Domain-Independent Model Management through Automated REST APIs Generation. 2025.</text:p>
          </table:table-cell>
          <table:table-cell table:style-name="ce2" office:value-type="string" calcext:value-type="string">
            <text:p><text:a xlink:href="https://dialnet.unirioja.es/servlet/dctes?codigo=397375" xlink:type="simple">https://dialnet.unirioja.es/servlet/dctes?codigo=397375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EIM, Jan. Recovering Trace Links In Software Architecture Documentation. 2025.</text:p>
          </table:table-cell>
          <table:table-cell table:style-name="ce4" office:value-type="string" calcext:value-type="string">
            <text:p><text:a xlink:href="https://publikationen.bibliothek.kit.edu/1000179534" xlink:type="simple">https://publikationen.bibliothek.kit.edu/1000179534</text:a></text:p>
          </table:table-cell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4" table:number-columns-repeated="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4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7">
          <table:table-cell table:style-name="ce1" table:number-columns-repeated="25"/>
          <table:table-cell table:number-columns-repeated="99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" meta:object-count="0"/>
    <meta:generator>LibreOfficeDev/6.0.5.2$Linux_X86_64 LibreOffice_project/</meta:generator>
  </office:meta>
</office:document-meta>
</file>