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7.81pt"/>
    </style:style>
    <style:style style:name="co3" style:family="table-column">
      <style:table-column-properties fo:break-before="auto" style:column-width="14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ágina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Origin Paper</text:p>
          </table:table-cell>
          <table:table-cell table:style-name="ce1" office:value-type="string" calcext:value-type="string">
            <text:p>Snowballing Type</text:p>
          </table:table-cell>
          <table:table-cell table:style-name="ce1" office:value-type="string" calcext:value-type="string">
            <text:p>Reference</text:p>
          </table:table-cell>
          <table:table-cell table:style-name="ce1" office:value-type="string" calcext:value-type="string">
            <text:p>External Link</text:p>
          </table:table-cell>
          <table:table-cell table:style-name="ce1" office:value-type="string" calcext:value-type="string">
            <text:p>DOI</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asili V.R., Weiss D.M. A methodology for collecting valid software engineering data IEEE Trans. Softw. Eng., SE-10 (6) (1984), pp. 728-738, 10.1109/TSE.1984.5010301</text:p>
          </table:table-cell>
          <table:table-cell table:style-name="ce4"/>
          <table:table-cell table:style-name="ce5" office:value-type="string" calcext:value-type="string">
            <text:p><text:a xlink:href="https://doi.org/10.1109/TSE.1984.5010301" xlink:type="simple">https://doi.org/10.1109/TSE.1984.501030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Breivold H.P., Crnkovic I. Analysis of software evolvability in quality models 2009 35th Euromicro Conference on Software Engineering and Advanced Applications, IEEE (2009), pp. 279-282</text:p>
          </table:table-cell>
          <table:table-cell table:style-name="ce1"/>
          <table:table-cell table:style-name="ce5" office:value-type="string" calcext:value-type="string">
            <text:p><text:a xlink:href="https://doi.org/10.1109/SEAA.2009.10" xlink:type="simple">https://doi.org/10.1109/SEAA.2009.10</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anfora G., Cerulo L., Troiano L. Transforming quantities into qualities in assessment of software systems Proceedings 27th Annual International Computer Software and Applications Conference. COMPAC 2003, IEEE (2003), pp. 312-319</text:p>
          </table:table-cell>
          <table:table-cell table:style-name="ce4"/>
          <table:table-cell table:style-name="ce6" office:value-type="string" calcext:value-type="string">
            <text:p><text:a xlink:href="https://doi.org/10.1109/CMPSAC.2003.1245359" xlink:type="simple">https://doi.org/10.1109/CMPSAC.2003.1245359</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Cliff N. Ordinal Methods for Behavioral Data Analysis Psychology Press (2014)</text:p>
          </table:table-cell>
          <table:table-cell table:style-name="ce5" office:value-type="string" calcext:value-type="string">
            <text:p><text:a xlink:href="https://api.taylorfrancis.com/content/books/mono/download?identifierName=doi&amp;identifierValue=10.4324/9781315806730&amp;type=googlepdf" xlink:type="simple">https://api.taylorfrancis.com/content/books/mono/download?identifierName=doi&amp;identifierValue=10.4324/9781315806730&amp;type=googlepdf</text:a></text:p>
          </table:table-cell>
          <table:table-cell table:style-name="ce2"/>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aigneau R. Service Design Patterns: Fundamental Design Solutions for SOAP/WSDL and RESTful Web Services Addison-Wesley (2011)</text:p>
          </table:table-cell>
          <table:table-cell table:style-name="ce5" office:value-type="string" calcext:value-type="string">
            <text:p><text:a xlink:href="https://books.google.com/books?hl=pt-BR&amp;lr=&amp;id=tK3_vB304bEC&amp;oi=fnd&amp;pg=PR7&amp;ots=Dg8hFDp-zN&amp;sig=dLBvw8r8ygizKXI0ZqHx2fshGtg" xlink:type="simple">https://books.google.com/books?hl=pt-BR&amp;lr=&amp;id=tK3_vB304bEC&amp;oi=fnd&amp;pg=PR7&amp;ots=Dg8hFDp-zN&amp;sig=dLBvw8r8ygizKXI0ZqHx2fshGtg</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Deissenboeck F., Heinemann L., Hummel B., Juergens E. Flexible architecture conformance assessment with ConQAT 2010 ACM/IEEE 32nd International Conference on Software Engineering, Vol. 2 (2010), pp. 247-250, 10.1145/1810295.1810343</text:p>
          </table:table-cell>
          <table:table-cell table:style-name="ce4"/>
          <table:table-cell table:style-name="ce6" office:value-type="string" calcext:value-type="string">
            <text:p><text:a xlink:href="https://doi.org/10.1145/1810295.1810343" xlink:type="simple">https://doi.org/10.1145/1810295.1810343</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omain-Driven Design: Tacking Complexity in the Heart of Software Addison-Wesley, Reading, MA. (2003)</text:p>
          </table:table-cell>
          <table:table-cell table:style-name="ce4"/>
          <table:table-cell table:style-name="ce2"/>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Evans E. DDD and microservices: At last, some boundaries! (2016) https://www.youtube.com/watch?v=sFCgXH7DwxM</text:p>
          </table:table-cell>
          <table:table-cell table:style-name="ce5" office:value-type="string" calcext:value-type="string">
            <text:p><text:a xlink:href="https://www.youtube.com/watch?v=sFCgXH7DwxM" xlink:type="simple">https://www.youtube.com/watch?v=sFCgXH7DwxM</text:a></text:p>
          </table:table-cell>
          <table:table-cell table:style-name="ce2"/>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an C.-Y., Ma S.-P. Migrating monolithic mobile application to microservice architecture: An experiment report 2017 IEEE International Conference on AI &amp; Mobile Services (AIMS), IEEE (2017), pp. 109-112</text:p>
          </table:table-cell>
          <table:table-cell table:style-name="ce4"/>
          <table:table-cell table:style-name="ce5" office:value-type="string" calcext:value-type="string">
            <text:p><text:a xlink:href="https://doi.org/10.1109/AIMS.2017.23" xlink:type="simple">https://doi.org/10.1109/AIMS.2017.23</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Fowler M. Patterns of Enterprise Application Architecture Addison-Wesley, USA (2002)</text:p>
          </table:table-cell>
          <table:table-cell table:style-name="ce4"/>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arousi V., Felderer M., Mäntylä M.V., Rainer A. Benefitting from the grey literature in software engineering research Contemporary Empirical Methods in Software Engineering, Springer (2020), pp. 385-413</text:p>
          </table:table-cell>
          <table:table-cell table:style-name="ce1"/>
          <table:table-cell table:style-name="ce6" office:value-type="string" calcext:value-type="string">
            <text:p><text:a xlink:href="https://doi.org/10.1007/978-3-030-32489-6_14" xlink:type="simple">https://doi.org/10.1007/978-3-030-32489-6_14</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laser B.G., Strauss A.L. The Discovery of Grounded Theory: Strategies for Qualitative Research de Gruyter, New York, NY (1967)</text:p>
          </table:table-cell>
          <table:table-cell table:style-name="ce5" office:value-type="string" calcext:value-type="string">
            <text:p><text:a xlink:href="https://api.taylorfrancis.com/content/books/mono/download?identifierName=doi&amp;identifierValue=10.4324/9780203793206&amp;type=googlepdf" xlink:type="simple">https://api.taylorfrancis.com/content/books/mono/download?identifierName=doi&amp;identifierValue=10.4324/9780203793206&amp;type=googlepdf</text:a></text:p>
          </table:table-cell>
          <table:table-cell table:style-name="ce2"/>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Google. DevOps tech: Architecture (2021)</text:p>
          </table:table-cell>
          <table:table-cell table:style-name="ce5" office:value-type="string" calcext:value-type="string">
            <text:p><text:a xlink:href="https://cloud.google.com/architecture/devops/devops-tech-architecture" xlink:type="simple">https://cloud.google.com/architecture/devops/devops-tech-architecture</text:a></text:p>
          </table:table-cell>
          <table:table-cell table:style-name="ce2"/>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Hohpe G., Woolf B. Enterprise Integration Patterns: Designing, Building, and Deploying Messaging Solutions. Addison-Wesley (2003)</text:p>
          </table:table-cell>
          <table:table-cell table:style-name="ce5" office:value-type="string" calcext:value-type="string">
            <text:p><text:a xlink:href="https://books.google.com/books?hl=pt-BR&amp;lr=&amp;id=bUlsAQAAQBAJ&amp;oi=fnd&amp;pg=PR7&amp;ots=590u_3J_Q8&amp;sig=p0vcBkfAb2ZOZ2pyfJnuL7EDDUQ" xlink:type="simple">https://books.google.com/books?hl=pt-BR&amp;lr=&amp;id=bUlsAQAAQBAJ&amp;oi=fnd&amp;pg=PR7&amp;ots=590u_3J_Q8&amp;sig=p0vcBkfAb2ZOZ2pyfJnuL7EDDUQ</text:a></text:p>
          </table:table-cell>
          <table:table-cell table:style-name="ce2"/>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apferer S., Zimmermann O. Domain-specific language and tools for strategic domain-driven design, context mapping and bounded context modeling. Proceedings of the 8th International Conference on Model-Driven Engineering and Software Development, MODELSWARD 2020, Valletta, Feb 2020, ScitePress (2020), pp. 299-306, 10.5220/0008910502990306</text:p>
          </table:table-cell>
          <table:table-cell table:style-name="ce4"/>
          <table:table-cell table:style-name="ce6" office:value-type="string" calcext:value-type="string">
            <text:p><text:a xlink:href="https://doi.org/10.5220/0008910502990306" xlink:type="simple">https://doi.org/10.5220/0008910502990306</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Kitchenham B., Madeyski L., Budgen D., Keung J., Brereton P., Charters S., Gibbs S., Pohthong A. Robust statistical methods for empirical software engineering. Empir. Softw. Eng., 22 (2) (2017), pp. 579-630</text:p>
          </table:table-cell>
          <table:table-cell table:style-name="ce1"/>
          <table:table-cell table:style-name="ce5" office:value-type="string" calcext:value-type="string">
            <text:p><text:a xlink:href="https://doi.org/10.1007/s10664-016-9437-5" xlink:type="simple">https://doi.org/10.1007/s10664-016-9437-5</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arichev O., Moskovich H. Unstructured problems and development of prescriptive decision making methods. Advances in Multicriteria Analysis, Springer (1995), pp. 47-80</text:p>
          </table:table-cell>
          <table:table-cell table:style-name="ce4"/>
          <table:table-cell table:style-name="ce6" office:value-type="string" calcext:value-type="string">
            <text:p><text:a xlink:href="https://doi.org/10.1007/978-1-4757-2383-0_4" xlink:type="simple">https://doi.org/10.1007/978-1-4757-2383-0_4</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ee L., Kruchten P. A tool to visualize architectural design decisions. International Conference on the Quality of Software Architectures, Springer (2008), pp. 43-54</text:p>
          </table:table-cell>
          <table:table-cell table:style-name="ce4"/>
          <table:table-cell table:style-name="ce5" office:value-type="string" calcext:value-type="string">
            <text:p><text:a xlink:href="https://doi.org/10.1007/978-3-540-87879-7_3" xlink:type="simple">https://doi.org/10.1007/978-3-540-87879-7_3</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ourenço J.a.R., Cabral B., Carreiro P., Vieira M., Bernardino J. Choosing the right NoSQL database for the job: a quality attribute evaluation. J. Big Data, 2 (1) (2015), pp. 1-26</text:p>
          </table:table-cell>
          <table:table-cell table:style-name="ce4"/>
          <table:table-cell table:style-name="ce6" office:value-type="string" calcext:value-type="string">
            <text:p><text:a xlink:href="https://doi.org/10.1186/s40537-015-0025-0" xlink:type="simple">https://doi.org/10.1186/s40537-015-0025-0</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Lübke, D., Zimmermann, O., Pautasso, C., Zdun, U., Stocker, M., 2019. Interface evolution patterns: balancing compatibility and extensibility across service life cycles. In: Proceedings of the 24th European Conference on Pattern Languages of Programs, pp. 1–24.</text:p>
          </table:table-cell>
          <table:table-cell table:style-name="ce4"/>
          <table:table-cell table:style-name="ce6" office:value-type="string" calcext:value-type="string">
            <text:p><text:a xlink:href="https://doi.org/10.1145/3361149.3361164" xlink:type="simple">https://doi.org/10.1145/3361149.3361164</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Merson P., Yoder J. Modeling microservices with DDD. 2020 IEEE International Conference on Software Architecture Companion (ICSA-C), IEEE (2020), pp. 7-8</text:p>
          </table:table-cell>
          <table:table-cell table:style-name="ce4"/>
          <table:table-cell table:style-name="ce3" office:value-type="string" calcext:value-type="string">
            <text:p><text:a xlink:href="https://doi.org/10.1109/ICSA-C50368.2020.00010" xlink:type="simple">https://doi.org/10.1109/ICSA-C50368.2020.00010</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ewman S. Building Microservices: Designing Fine-Grained Systems. O’Reilly (2015)</text:p>
          </table:table-cell>
          <table:table-cell table:style-name="ce1" table:number-columns-repeated="22"/>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guyen C.D. A design analysis of cloud-based microservices architecture at netflix. (2020)</text:p>
          </table:table-cell>
          <table:table-cell table:style-name="ce5" office:value-type="string" calcext:value-type="string">
            <text:p><text:a xlink:href="https://medium.com/swlh/a-design-analysis-of-cloud-based-microservices-architecture-at-netflix-98836b2da45fe" xlink:type="simple">https://medium.com/swlh/a-design-analysis-of-cloud-based-microservices-architecture-at-netflix-98836b2da45fe</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tentos E., Zdun U., Plakidas K., Genfer P., Geiger S., Meixner S., Hasselbring W. Detector-based component model abstraction for microservice-based systems. Computing, 103 (2021), pp. 2521-2551</text:p>
          </table:table-cell>
          <table:table-cell table:style-name="ce4"/>
          <table:table-cell table:style-name="ce3" office:value-type="string" calcext:value-type="string">
            <text:p><text:a xlink:href="https://doi.org/10.1007/s00607-021-01002-z" xlink:type="simple">https://doi.org/10.1007/s00607-021-01002-z</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tentos E., Zdun U., Plakidas K., Meixner S., Geiger S. Assessing architecture conformance to coupling-related patterns and practices in microservices. European Conference on Software Architecture, Springer (2020), pp. 3-20</text:p>
          </table:table-cell>
          <table:table-cell table:style-name="ce4"/>
          <table:table-cell table:style-name="ce3" office:value-type="string" calcext:value-type="string">
            <text:p><text:a xlink:href="https://doi.org/10.1007/978-3-030-58923-3_1" xlink:type="simple">https://doi.org/10.1007/978-3-030-58923-3_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Ntentos E., Zdun U., Plakidas K., Meixner S., Geiger S. Metrics for assessing architecture conformance to microservice architecture patterns and practices. International Conference on Service-Oriented Computing, Springer (2020), pp. 580-596</text:p>
          </table:table-cell>
          <table:table-cell table:style-name="ce4"/>
          <table:table-cell table:style-name="ce3" office:value-type="string" calcext:value-type="string">
            <text:p><text:a xlink:href="https://doi.org/10.1007/978-3-030-65310-1_42" xlink:type="simple">https://doi.org/10.1007/978-3-030-65310-1_42</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autasso C., Zimmermann O., Amundsen M., Lewis J., Josuttis N. Microservices in practice, part 1: Reality check and service design. IEEE Softw., 34 (01) (2017), pp. 91-98</text:p>
          </table:table-cell>
          <table:table-cell table:style-name="ce4" office:value-type="string" calcext:value-type="string">
            <text:p><text:a xlink:href="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 xlink:type="simple">https://d1wqtxts1xzle7.cloudfront.net/86218092/MS.2017.2420220520-1-ajzyiq-libre.pdf?1653072988=&amp;response-content-disposition=inline%3B+filename%3DMicroservices_in_Practice_Part_1_Reality.pdf&amp;Expires=1772549330&amp;Signature=akWLuNgdh0DvjI1jCivmufsox9BHCFfk4Ew~8BkBuoC1hRZkk1N7OTtG5g8F3fjltw2aKIOaW0jITpagZlMTImxx7BQsw9EqqBdPSjvCElyBYyEkaM8mw-U8T-VgY24qPANigJhSbjQQF5HZl7qiacsohrrfFIqgvUcGfv7NEIQXT7nYqKZ~yxGudCu96Fb0kRFxXbJvXhR6vkXnReEWBqSadPQZYJZ-zs9FWy0wcjnVy5ipU20O3DOuFuQGCHUc~W~0FNhfXT6ulG6Sx4PnGdPj1AUSrA2O-XrMRtK5vS0HqqkJnSjnrYcnmSyLDJxIt7fBNT1yhQn20RuZE1n2sA__&amp;Key-Pair-Id=APKAJLOHF5GGSLRBV4ZA</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lliccione P., Inverardi P., Muccini H. Charmy: A framework for designing and verifying architectural specifications. IEEE Trans. Softw. Eng., 35 (3) (2008), pp. 325-346</text:p>
          </table:table-cell>
          <table:table-cell table:style-name="ce4"/>
          <table:table-cell table:style-name="ce3" office:value-type="string" calcext:value-type="string">
            <text:p><text:a xlink:href="https://doi.org/10.1109/TSE.2008.104" xlink:type="simple">https://doi.org/10.1109/TSE.2008.104</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erreault Jr. W.D., Leigh L.E. Reliability of nominal data based on qualitative judgments. J. Mar. Res., 26 (2) (1989), pp. 135-148</text:p>
          </table:table-cell>
          <table:table-cell table:style-name="ce4"/>
          <table:table-cell table:style-name="ce3" office:value-type="string" calcext:value-type="string">
            <text:p><text:a xlink:href="https://doi.org/10.1177/002224378902600201" xlink:type="simple">https://doi.org/10.1177/00222437890260020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2" office:value-type="string" calcext:value-type="string">
            <text:p>Petrillo F., Merle P., Moha N., Guéhéneuc Y.-G. Are REST APIs for cloud computing well-designed? An exploratory study. International Conference on Service-Oriented Computing, Springer (2016), pp. 157-170</text:p>
          </table:table-cell>
          <table:table-cell table:style-name="ce1"/>
          <table:table-cell table:style-name="ce3" office:value-type="string" calcext:value-type="string">
            <text:p><text:a xlink:href="https://doi.org/10.1007/978-3-319-46295-0_10" xlink:type="simple">https://doi.org/10.1007/978-3-319-46295-0_10</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2" office:value-type="string" calcext:value-type="string">
            <text:p>Piasecki J., Waligora M., Dranseika V. Google search as an additional source in systematic reviews. Sci. Eng. Ethics, 24 (2) (2018), pp. 809-810</text:p>
          </table:table-cell>
          <table:table-cell table:style-name="ce1"/>
          <table:table-cell table:style-name="ce3" office:value-type="string" calcext:value-type="string">
            <text:p><text:a xlink:href="https://doi.org/10.1007/s11948-017-0010-4" xlink:type="simple">https://doi.org/10.1007/s11948-017-0010-4</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Pratt J.W. Remarks on zeros and ties in the Wilcoxon signed rank procedures. J. Amer. Statist. Assoc., 54 (287) (1959), pp. 655-667</text:p>
          </table:table-cell>
          <table:table-cell table:style-name="ce1"/>
          <table:table-cell table:style-name="ce3" office:value-type="string" calcext:value-type="string">
            <text:p><text:a xlink:href="https://doi.org/10.1080/01621459.1959.10501526" xlink:type="simple">https://doi.org/10.1080/01621459.1959.10501526</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Quartel D., van Sinderen M. On interoperability and conformance assessment in service composition. 11th IEEE International Enterprise Distributed Object Computing Conference (EDOC 2007), IEEE (2007), p. 229</text:p>
          </table:table-cell>
          <table:table-cell table:style-name="ce1"/>
          <table:table-cell table:style-name="ce3" office:value-type="string" calcext:value-type="string">
            <text:p><text:a xlink:href="https://doi.org/10.1109/EDOC.2007.11" xlink:type="simple">https://doi.org/10.1109/EDOC.2007.1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achweh S., Zündorf A. Towards a UML profile for domain-driven design of microservice architectures. International Conference on Software Engineering and Formal Methods, Springer (2017), pp. 230-245</text:p>
          </table:table-cell>
          <table:table-cell table:style-name="ce1"/>
          <table:table-cell table:style-name="ce3" office:value-type="string" calcext:value-type="string">
            <text:p><text:a xlink:href="https://doi.org/10.1007/978-3-319-74781-1_17" xlink:type="simple">https://doi.org/10.1007/978-3-319-74781-1_17</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ademacher F., Sorgalla J., Sachweh S. Challenges of domain-driven microservice design: a model-driven perspective. IEEE Softw., 35 (3) (2018), pp. 36-43</text:p>
          </table:table-cell>
          <table:table-cell table:style-name="ce1"/>
          <table:table-cell table:style-name="ce3" office:value-type="string" calcext:value-type="string">
            <text:p><text:a xlink:href="https://doi.org/10.1109/MS.2018.2141028" xlink:type="simple">https://doi.org/10.1109/MS.2018.2141028</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empel, P., Mäder, P., Kuschke, T., Cleland-Huang, J., 2014. Mind the gap: assessing the conformance of software traceability to relevant guidelines. In: Proceedings of the 36th International Conference on Software Engineering. pp. 943–954.</text:p>
          </table:table-cell>
          <table:table-cell table:style-name="ce1"/>
          <table:table-cell table:style-name="ce3" office:value-type="string" calcext:value-type="string">
            <text:p><text:a xlink:href="https://doi.org/10.1145/2568225.2568290" xlink:type="simple">https://doi.org/10.1145/2568225.2568290</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ichardson C. A pattern language for microservices (2017)</text:p>
          </table:table-cell>
          <table:table-cell table:style-name="ce3" office:value-type="string" calcext:value-type="string">
            <text:p><text:a xlink:href="http://microservices.io/patterns/index.html" xlink:type="simple">http://microservices.io/patterns/index.html</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mano J., Kromrey J.D., Coraggio J., Skowronek J. Appropriate statistics for ordinal level data: Should we really be using t-test and Cohen’sd for evaluating group differences on the NSSE and other surveys. Annual Meeting of the Florida Association of Institutional Research, Vol. 13 (2006)</text:p>
          </table:table-cell>
          <table:table-cell table:style-name="ce1" table:number-columns-repeated="22"/>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owe D., Leaney J., Lowe D. Defining systems evolvability-a taxonomy of change. Change, 94 (1994), pp. 541-545</text:p>
          </table:table-cell>
          <table:table-cell table:style-name="ce1"/>
          <table:table-cell table:style-name="ce3" office:value-type="string" calcext:value-type="string">
            <text:p><text:a xlink:href="https://doi.org/10.1007/978-3-642-78350-0_96" xlink:type="simple">https://doi.org/10.1007/978-3-642-78350-0_96</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Runeson P., Host M., Rainer A., Regnell B. Case Study Research in Software Engineering: Guidelines and Examples. Wiley (2012)</text:p>
          </table:table-cell>
          <table:table-cell table:style-name="ce3" office:value-type="string" calcext:value-type="string">
            <text:p><text:a xlink:href="https://books.google.com/books?hl=pt-BR&amp;lr=&amp;id=T7rXoaxqPIAC&amp;oi=fnd&amp;pg=PA96&amp;ots=bdDnvfEaxG&amp;sig=FHB881dV0jZe_Aum7Hj80rUvlkI" xlink:type="simple">https://books.google.com/books?hl=pt-BR&amp;lr=&amp;id=T7rXoaxqPIAC&amp;oi=fnd&amp;pg=PA96&amp;ots=bdDnvfEaxG&amp;sig=FHB881dV0jZe_Aum7Hj80rUvlkI</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chwarz M. Uber engineering’s micro deploy: Deploying daily with confidence. (2016)</text:p>
          </table:table-cell>
          <table:table-cell table:style-name="ce3" office:value-type="string" calcext:value-type="string">
            <text:p><text:a xlink:href="https://eng.uber.com/micro-deploy-code/" xlink:type="simple">https://eng.uber.com/micro-deploy-code/</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hapiro S.S., Wilk M.B. An analysis of variance test for normality (complete samples). Biometrika, 52 (3/4) (1965), pp. 591-611</text:p>
          </table:table-cell>
          <table:table-cell table:style-name="ce1"/>
          <table:table-cell table:style-name="ce3" office:value-type="string" calcext:value-type="string">
            <text:p><text:a xlink:href="https://doi.org/10.1093/biomet/52.3-4.591" xlink:type="simple">https://doi.org/10.1093/biomet/52.3-4.59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Conformance assessment of architectural design decisions on API endpoint designs derived from domain models: Dataset and code. (2021), 10.5281/zenodo.5031272</text:p>
          </table:table-cell>
          <table:table-cell table:style-name="ce1"/>
          <table:table-cell table:style-name="ce3" office:value-type="string" calcext:value-type="string">
            <text:p><text:a xlink:href="https://doi.org/10.5281/zenodo.5031272" xlink:type="simple">https://doi.org/10.5281/zenodo.5031272</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Singjai A., Zdun U., Zimmermann O. Practitioner views on the interrelation of microservice APIs and domain-driven design: A grey literature study based on grounded theory. 18th IEEE International Conference on Software Architecture (ICSA 2021), IEEE, Washington, DC, USA (2021)</text:p>
          </table:table-cell>
          <table:table-cell table:style-name="ce1"/>
          <table:table-cell table:style-name="ce3" office:value-type="string" calcext:value-type="string">
            <text:p><text:a xlink:href="https://doi.org/10.1109/ICSA51549.2021.00011" xlink:type="simple">https://doi.org/10.1109/ICSA51549.2021.0001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Tan S.H., Marinov D., Tan L., Leavens G.T. @tComment: Testing javadoc comments to detect comment-code inconsistencies. 2012 IEEE Fifth International Conference on Software Testing, Verification and Validation (2012), pp. 260-269, 10.1109/ICST.2012.106</text:p>
          </table:table-cell>
          <table:table-cell table:style-name="ce1"/>
          <table:table-cell table:style-name="ce3" office:value-type="string" calcext:value-type="string">
            <text:p><text:a xlink:href="https://doi.org/10.1109/ICST.2012.106" xlink:type="simple">https://doi.org/10.1109/ICST.2012.106</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Vernon V. Implementing Domain-Driven Design. Addison-Wesley Professional, Boston, USA (2013)</text:p>
          </table:table-cell>
          <table:table-cell table:style-name="ce3" office:value-type="string" calcext:value-type="string">
            <text:p><text:a xlink:href="https://books.google.com/books?hl=pt-BR&amp;lr=&amp;id=X7DpD5g3VP8C&amp;oi=fnd&amp;pg=PR9&amp;ots=tUGGKFwfUT&amp;sig=HBXiCooYld1EbiqSad5lKnmETFU" xlink:type="simple">https://books.google.com/books?hl=pt-BR&amp;lr=&amp;id=X7DpD5g3VP8C&amp;oi=fnd&amp;pg=PR9&amp;ots=tUGGKFwfUT&amp;sig=HBXiCooYld1EbiqSad5lKnmETFU</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Weinstock C.B., Goodenough J.B. On system scalability: Tech. rep. CARNEGIE-MELLON UNIV PITTSBURGH PA SOFTWARE ENGINEERING INST (2006)</text:p>
          </table:table-cell>
          <table:table-cell table:style-name="ce3" office:value-type="string" calcext:value-type="string">
            <text:p><text:a xlink:href="https://apps.dtic.mil/sti/html/tr/ADA457003/" xlink:type="simple">https://apps.dtic.mil/sti/html/tr/ADA457003/</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dun U., Navarro E., Leymann F. Ensuring and assessing architecture conformance to microservice decomposition patterns. International Conference on Service-Oriented Computing, Springer (2017), pp. 411-429</text:p>
          </table:table-cell>
          <table:table-cell table:style-name="ce1"/>
          <table:table-cell table:style-name="ce3" office:value-type="string" calcext:value-type="string">
            <text:p><text:a xlink:href="https://doi.org/10.1007/978-3-319-69035-3_29" xlink:type="simple">https://doi.org/10.1007/978-3-319-69035-3_29</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3" office:value-type="string" calcext:value-type="string">
            <text:p><text:a xlink:href="http://eprints.cs.univie.ac.at/5956/" xlink:type="simple">Zdun U., Stocker M., Zimmermann O., Pautasso C., Lübke D. Guiding architectural decision making on quality aspects in microservice APIs. 16th International Conference on Service-Oriented Computing ICSOC 2018 (2018), pp. 78-89. URL http://eprints.cs.univie.ac.at/5956/</text:a></text:p>
          </table:table-cell>
          <table:table-cell table:style-name="ce1"/>
          <table:table-cell table:style-name="ce3" office:value-type="string" calcext:value-type="string">
            <text:p><text:a xlink:href="https://doi.org/10.1007/978-3-030-03596-9_5" xlink:type="simple">https://doi.org/10.1007/978-3-030-03596-9_5</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Meng N., Li Z., Jia L. An empirical study on API parameter rules. 2020 IEEE/ACM 42nd International Conference on Software Engineering (ICSE) (2020), pp. 899-911</text:p>
          </table:table-cell>
          <table:table-cell table:style-name="ce1"/>
          <table:table-cell table:style-name="ce3" office:value-type="string" calcext:value-type="string">
            <text:p><text:a xlink:href="https://doi.org/10.1145/3377811.3380922" xlink:type="simple">https://doi.org/10.1145/3377811.3380922</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hong H., Zhang L., Xie T., Mei H. Inferring resource specifications from natural language API documentation. 2009 IEEE/ACM International Conference on Automated Software Engineering (2009), pp. 307-318, 10.1109/ASE.2009.94</text:p>
          </table:table-cell>
          <table:table-cell table:style-name="ce1"/>
          <table:table-cell table:style-name="ce3" office:value-type="string" calcext:value-type="string">
            <text:p><text:a xlink:href="https://doi.org/10.1109/ASE.2009.94" xlink:type="simple">https://doi.org/10.1109/ASE.2009.94</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Microservices tenets. Comput. Sci. Res. Dev., 32 (3–4) (2017), pp. 301-310, 10.1007/s00450-016-0337-0</text:p>
          </table:table-cell>
          <table:table-cell table:style-name="ce1"/>
          <table:table-cell table:style-name="ce3" office:value-type="string" calcext:value-type="string">
            <text:p><text:a xlink:href="https://doi.org/10.1007/s00450-016-0337-0" xlink:type="simple">https://doi.org/10.1007/s00450-016-0337-0</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3" office:value-type="string" calcext:value-type="string">
            <text:p><text:a xlink:href="https://ozimmer.ch/practices/2020/06/10/ICWEKeynoteAndDemo.html" xlink:type="simple">Zimmermann O. Domain-driven service design with context mapper and MDSL. (2020) https://ozimmer.ch/practices/2020/06/10/ICWEKeynoteAndDemo.html</text:a></text:p>
          </table:table-cell>
          <table:table-cell table:style-name="ce3" office:value-type="string" calcext:value-type="string">
            <text:p><text:a xlink:href="https://ozimmer.ch/practices/2020/06/10/ICWEKeynoteAndDemo.html" xlink:type="simple">https://ozimmer.ch/practices/2020/06/10/ICWEKeynoteAndDemo.html</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Koehler J., Leymann F., Polley R., Schuster N. Managing architectural decision models with dependency relations, integrity constraints, and production rules. J. Syst. Softw., 82 (8) (2009), 10.1016/j.jss.2009.01.039</text:p>
          </table:table-cell>
          <table:table-cell table:style-name="ce1"/>
          <table:table-cell table:style-name="ce3" office:value-type="string" calcext:value-type="string">
            <text:p><text:a xlink:href="https://doi.org/10.1016/j.jss.2009.01.039" xlink:type="simple">https://doi.org/10.1016/j.jss.2009.01.039</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Lübke D., Zdun U., Pautasso C., Stocker M. Interface responsibility patterns: Processing resources and operation responsibilities. Proceedings of the European Conference on Pattern Languages of Programs 2020, EuroPLoP ’20, ACM, New York, NY, USA (2020), 10.1145/3424771.3424822</text:p>
          </table:table-cell>
          <table:table-cell table:style-name="ce1"/>
          <table:table-cell table:style-name="ce3" office:value-type="string" calcext:value-type="string">
            <text:p><text:a xlink:href="https://doi.org/10.1145/3424771.3424822" xlink:type="simple">https://doi.org/10.1145/3424771.3424822</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Introduction to microservice API patterns (MAP). Post-Proc. Microservices 2017/2019, 78 (4) (2020), pp. 1-17, 10.4230/OASIcs.Microservices.2017-2019.4</text:p>
          </table:table-cell>
          <table:table-cell table:style-name="ce1"/>
          <table:table-cell table:style-name="ce3" office:value-type="string" calcext:value-type="string">
            <text:p><text:a xlink:href="https://doi.org/10.4230/OASIcs.Microservices.2017-2019.4" xlink:type="simple">https://doi.org/10.4230/OASIcs.Microservices.2017-2019.4</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Backward</text:p>
          </table:table-cell>
          <table:table-cell table:style-name="ce1" office:value-type="string" calcext:value-type="string">
            <text:p>Zimmermann O., Stocker M., Lübke D., Pautasso C., Zdun U. Microservice API patterns. (2021)</text:p>
          </table:table-cell>
          <table:table-cell table:style-name="ce3" office:value-type="string" calcext:value-type="string">
            <text:p><text:a xlink:href="https://microservice-api-patterns.org/" xlink:type="simple">https://microservice-api-patterns.org/</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BOATENG, Richard; EFFAH, John. API integration and organisational agility outcomes in digital music platforms: A qualitative case study. Heliyon, v. 10, n. 11, 2024.</text:p>
          </table:table-cell>
          <table:table-cell table:style-name="ce1"/>
          <table:table-cell table:style-name="ce3" office:value-type="string" calcext:value-type="string">
            <text:p><text:a xlink:href="https://doi.org/10.1016/j.heliyon.2024.e31756" xlink:type="simple">https://doi.org/10.1016/j.heliyon.2024.e31756</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HABIB, Mahir; KABIR, Muhammad Ashad; ZHENG, Lihong. LEISA: A scalable microservice-based system for efficient livestock data sharing. arXiv preprint arXiv:2501.14781, 2025.</text:p>
          </table:table-cell>
          <table:table-cell table:style-name="ce1"/>
          <table:table-cell table:style-name="ce3" office:value-type="string" calcext:value-type="string">
            <text:p><text:a xlink:href="https://doi.org/10.48550/arXiv.2501.14781" xlink:type="simple">https://doi.org/10.48550/arXiv.2501.1478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CALDERÓN-GÓMEZ, Huriviades et al. Microservices Architecture to Improve the Performance of Machine Learning Applications in eHealth. In: International Conference on Technologies and Innovation. Cham: Springer Nature Switzerland, 2024. p. 137-153.</text:p>
          </table:table-cell>
          <table:table-cell table:style-name="ce1"/>
          <table:table-cell table:style-name="ce3" office:value-type="string" calcext:value-type="string">
            <text:p><text:a xlink:href="https://doi.org/10.1007/978-3-031-75702-0_11" xlink:type="simple">https://doi.org/10.1007/978-3-031-75702-0_1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OFOEDA, Joshua et al. Exploring the strategies shaping application programming interface development and integration in digital music platforms: A qualitative case study. African Journal of Science, Technology, Innovation and Development, v. 17, n. 7, p. 1008-1024, 2025.</text:p>
          </table:table-cell>
          <table:table-cell table:style-name="ce3" office:value-type="string" calcext:value-type="string">
            <text:p><text:a xlink:href="https://hdl.handle.net/10520/ejc-aa_ajstid_v17_n7_a1008" xlink:type="simple">https://hdl.handle.net/10520/ejc-aa_ajstid_v17_n7_a1008</text:a></text:p>
          </table:table-cell>
          <table:table-cell table:style-name="ce1" table:number-columns-repeated="21"/>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LI, Wen et al. Crawling and Exploring RESTful Web APIs from RapidAPI. In: International Conference on Service Science. Singapore: Springer Nature Singapore, 2024. p. 88-103.</text:p>
          </table:table-cell>
          <table:table-cell table:style-name="ce1"/>
          <table:table-cell table:style-name="ce3" office:value-type="string" calcext:value-type="string">
            <text:p><text:a xlink:href="https://doi.org/10.1007/978-981-97-5760-2_7" xlink:type="simple">https://doi.org/10.1007/978-981-97-5760-2_7</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IMARÃES, Allysson; ANDRADE, Rodrigo. Comparing the Environmental Footprint of Web Stacks in the RealWorld Apps. In: Simpósio Brasileiro de Componentes, Arquiteturas e Reutilização de Software (SBCARS). SBC, 2025. p. 24-35.</text:p>
          </table:table-cell>
          <table:table-cell table:style-name="ce1"/>
          <table:table-cell table:style-name="ce3" office:value-type="string" calcext:value-type="string">
            <text:p><text:a xlink:href="https://doi.org/10.5753/sbcars.2025.14107" xlink:type="simple">https://doi.org/10.5753/sbcars.2025.14107</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SINGJAI, Apitchaka; ZDUN, Uwe. API description-based conformance assessment of architectural design decision. In: 2022 IEEE International Conference on Service-Oriented System Engineering (SOSE). IEEE, 2022. p. 59-68.</text:p>
          </table:table-cell>
          <table:table-cell table:style-name="ce1"/>
          <table:table-cell table:style-name="ce3" office:value-type="string" calcext:value-type="string">
            <text:p><text:a xlink:href="https://doi.org/10.1109/SOSE55356.2022.00013" xlink:type="simple">https://doi.org/10.1109/SOSE55356.2022.00013</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MARTÍN, Daniel San; ANGULO, Guisella; DE CAMARGO, Valter Vieira. A MAPE-K-Based Method for Architectural Conformance Checking in Self-Adaptive Systems. arXiv preprint arXiv:2401.16382, 2024.</text:p>
          </table:table-cell>
          <table:table-cell table:style-name="ce1"/>
          <table:table-cell table:style-name="ce3" office:value-type="string" calcext:value-type="string">
            <text:p><text:a xlink:href="https://doi.org/10.48550/arXiv.2401.16382" xlink:type="simple">https://doi.org/10.48550/arXiv.2401.16382</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PAHLEVI, Dannies; WANG, Gunawan. Design Architecture Influencer Social Media Management System Using Distributed Ledger Technology. Management Analysis Journal, v. 12, n. 1, p. 60-68, 2023.</text:p>
          </table:table-cell>
          <table:table-cell table:style-name="ce1"/>
          <table:table-cell table:style-name="ce3" office:value-type="string" calcext:value-type="string">
            <text:p><text:a xlink:href="https://doi.org/10.15294/maj.v12i1.66641" xlink:type="simple">https://doi.org/10.15294/maj.v12i1.66641</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SAN MARTÍN SANTIBÁÑEZ, Daniel Gustavo; CAMARGO, Valter; ANGULO, Guisella. Architecture Conformance Checking for Self-Adaptive Systems. Available at SSRN 5174803.</text:p>
          </table:table-cell>
          <table:table-cell table:style-name="ce1"/>
          <table:table-cell table:style-name="ce3" office:value-type="string" calcext:value-type="string">
            <text:p><text:a xlink:href="https://dx.doi.org/10.2139/ssrn.5174803" xlink:type="simple">https://dx.doi.org/10.2139/ssrn.5174803</text:a></text:p>
          </table:table-cell>
          <table:table-cell table:style-name="ce1" table:number-columns-repeated="20"/>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GUSTAVSSON, Carl Anton et al. A tailored web-based system for managing and attracting customers. 2023.</text:p>
          </table:table-cell>
          <table:table-cell table:style-name="ce1" table:number-columns-repeated="22"/>
          <table:table-cell table:number-columns-repeated="999"/>
        </table:table-row>
        <table:table-row table:style-name="ro1">
          <table:table-cell table:style-name="ce1" office:value-type="float" office:value="15" calcext:value-type="float">
            <text:p>15</text:p>
          </table:table-cell>
          <table:table-cell table:style-name="ce1" office:value-type="string" calcext:value-type="string">
            <text:p>Forward</text:p>
          </table:table-cell>
          <table:table-cell table:style-name="ce1" office:value-type="string" calcext:value-type="string">
            <text:p>BAWI, Mustafa; FAIZI, Abbas. Migrering till en molnbaserad e-posttjänst för optimering av QBIS Service Desk. 2023.</text:p>
          </table:table-cell>
          <table:table-cell table:style-name="ce3" office:value-type="string" calcext:value-type="string">
            <text:p><text:a xlink:href="https://odr.chalmers.se/server/api/core/bitstreams/a76048c4-89c3-41eb-af3a-37b8a5d06618/content" xlink:type="simple">https://odr.chalmers.se/server/api/core/bitstreams/a76048c4-89c3-41eb-af3a-37b8a5d06618/content</text:a></text:p>
          </table:table-cell>
          <table:table-cell table:style-name="ce1" table:number-columns-repeated="21"/>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2">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table-cell table:style-name="ce1" table:number-columns-repeated="25"/>
          <table:table-cell table:number-columns-repeated="999"/>
        </table:table-row>
        <table:table-row table:style-name="ro1" table:number-rows-repeated="917">
          <table:table-cell table:style-name="ce1" table:number-columns-repeated="25"/>
          <table:table-cell table:number-columns-repeated="999"/>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6" meta:object-count="0"/>
    <meta:generator>LibreOfficeDev/6.0.5.2$Linux_X86_64 LibreOffice_project/</meta:generator>
  </office:meta>
</office:document-meta>
</file>