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4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uha Alshuqayran, Nour Ali, and Roger Evans. 2018. Towards Micro Service Architecture Recovery: An Empirical Study. In 2018 IEEE International Conference on Software Architecture (ICSA). 47--4709.</text:p>
          </table:table-cell>
          <table:table-cell table:style-name="ce3"/>
          <table:table-cell table:style-name="ce3" office:value-type="string" calcext:value-type="string">
            <text:p><text:a xlink:href="https://doi.org/10.1109/ICSA.2018.00014" xlink:type="simple">https://doi.org/10.1109/ICSA.2018.00014</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E. Arisholm, L.C. Briand, S.E. Hove, and Y. Labiche. 2006. The impact of UML documentation on software maintenance: an experimental evaluation. IEEE Transactions on Software Engineering 32, 6 (2006), 365--381.</text:p>
          </table:table-cell>
          <table:table-cell table:style-name="ce1"/>
          <table:table-cell table:style-name="ce4" office:value-type="string" calcext:value-type="string">
            <text:p><text:a xlink:href="https://doi.org/10.1109/TSE.2006.59" xlink:type="simple">https://doi.org/10.1109/TSE.2006.59</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Agathe Blaise, Sicco Verwer, and Filippo Rebecchi. 2022. Learning State Machines to Monitor and Detect Anomalies on a Kubernetes Cluster. In Proceedings of the 17th International Conference on Availability, Reliability and Security (Vienna, Austria) (ARES '22). Association for Computing Machinery, New York, NY, USA, Article 117, 9 pages.</text:p>
          </table:table-cell>
          <table:table-cell table:style-name="ce1"/>
          <table:table-cell table:style-name="ce5" office:value-type="string" calcext:value-type="string">
            <text:p><text:a xlink:href="https://doi.org/10.1145/3538969.3543810" xlink:type="simple">https://doi.org/10.1145/3538969.3543810</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linton Cao, Simon Schneider, Nicolás E. Ferreyra Diaz, Sicco Verwer, A. (Annibale) Panichella, and Riccardo Scandariato. 2023. Appendix for 'CATMA: Conformance Analysis Tool for Microservice Applications'. (10 2023).</text:p>
          </table:table-cell>
          <table:table-cell table:style-name="ce3"/>
          <table:table-cell table:style-name="ce4" office:value-type="string" calcext:value-type="string">
            <text:p><text:a xlink:href="https://doi.org/10.6084/m9.figshare.23942214" xlink:type="simple">https://doi.org/10.6084/m9.figshare.23942214</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Giona Granchelli, Mario Cardarelli, Paolo Di Francesco, Ivano Malavolta, Ludovico Iovino, and Amleto Di Salle. 2017. MicroART: A Software Architecture Recovery Tool for Maintaining Microservice-Based Systems. In 2017 IEEE International Conference on Software Architecture Workshops (ICSAW). 298--302.</text:p>
          </table:table-cell>
          <table:table-cell table:style-name="ce3"/>
          <table:table-cell table:style-name="ce4" office:value-type="string" calcext:value-type="string">
            <text:p><text:a xlink:href="https://doi.org/10.1109/ICSAW.2017.9" xlink:type="simple">https://doi.org/10.1109/ICSAW.2017.9</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armine Gravino, Giuseppe Scanniello, and Genoveffa Tortora. 2015. Source-code comprehension tasks supported by UML design models: Results from a controlled experiment and a differentiated replication. Journal of Visual Languages &amp; Computing 28 (2015), 23--38.</text:p>
          </table:table-cell>
          <table:table-cell table:style-name="ce3"/>
          <table:table-cell table:style-name="ce4" office:value-type="string" calcext:value-type="string">
            <text:p><text:a xlink:href="https://doi.org/10.1016/j.jvlc.2014.12.004" xlink:type="simple">https://doi.org/10.1016/j.jvlc.2014.12.004</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ofeng Guo, Xin Peng, Hanzhang Wang, Wanxue Li, Huai Jiang, Dan Ding, Tao Xie, and Liangfei Su. 2020. Graph-Based Trace Analysis for Microservice Architecture Understanding and Problem Diagnosis. In Proceedings of the 28th ACM Joint Meeting on European Software Engineering Conference and Symposium on the Foundations of Software Engineering (Virtual Event, USA) (ESEC/FSE 2020). Association for Computing Machinery, New York, NY, USA, 1387--1397.</text:p>
          </table:table-cell>
          <table:table-cell table:style-name="ce1"/>
          <table:table-cell table:style-name="ce3" office:value-type="string" calcext:value-type="string">
            <text:p><text:a xlink:href="https://doi.org/10.1145/3368089.3417066" xlink:type="simple">https://doi.org/10.1145/3368089.3417066</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Abdelhakim Hannousse and Salima Yahiouche. 2021. Securing microservices and microservice architectures: A systematic mapping study. Computer Science Review 41 (2021), 100415.</text:p>
          </table:table-cell>
          <table:table-cell table:style-name="ce3"/>
          <table:table-cell table:style-name="ce4" office:value-type="string" calcext:value-type="string">
            <text:p><text:a xlink:href="https://doi.org/10.1016/j.cosrev.2021.100415" xlink:type="simple">https://doi.org/10.1016/j.cosrev.2021.100415</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Valentina Lenarduzzi and Annibale Panichella. 2021. Serverless Testing: Tool Vendors' and Experts' Points of View. IEEE Software 38, 1 (2021), 54--60.</text:p>
          </table:table-cell>
          <table:table-cell table:style-name="ce3"/>
          <table:table-cell table:style-name="ce4" office:value-type="string" calcext:value-type="string">
            <text:p><text:a xlink:href="https://doi.org/10.1109/MS.2020.3030803" xlink:type="simple">https://doi.org/10.1109/MS.2020.3030803</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hang-Pin Ma, I-Hsiu Liu, Chun-Yu Chen, Jiun-Ting Lin, and Nien-Lin Hsueh. 2019. Version-Based Microservice Analysis, Monitoring, and Visualization. In 2019 26th Asia-Pacific Software Engineering Conference (APSEC). 165--172.</text:p>
          </table:table-cell>
          <table:table-cell table:style-name="ce3"/>
          <table:table-cell table:style-name="ce4" office:value-type="string" calcext:value-type="string">
            <text:p><text:a xlink:href="https://doi.org/10.1109/APSEC48747.2019.00031" xlink:type="simple">https://doi.org/10.1109/APSEC48747.2019.00031</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G.C. Murphy, D. Notkin, and K.J. Sullivan. 2001. Software reflexion models: bridging the gap between design and implementation. IEEE Transactions on Software Engineering 27, 4 (2001), 364--380.</text:p>
          </table:table-cell>
          <table:table-cell table:style-name="ce3"/>
          <table:table-cell table:style-name="ce4" office:value-type="string" calcext:value-type="string">
            <text:p><text:a xlink:href="https://doi.org/10.1109/32.917525" xlink:type="simple">https://doi.org/10.1109/32.917525</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Nicolas E. Diaz Ferreyra, Pierre-Jean Queval, Georg Simhandl, Uwe Zdun, and Riccardo Scandariato. 2024. How Dataflow Diagrams Impact Software Security Analysis: an Empirical Experiment. In SANER.</text:p>
          </table:table-cell>
          <table:table-cell table:style-name="ce3"/>
          <table:table-cell table:style-name="ce4" office:value-type="string" calcext:value-type="string">
            <text:p><text:a xlink:href="https://doi.org/10.1109/SANER60148.2024.00103" xlink:type="simple">https://doi.org/10.1109/SANER60148.2024.00103</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and Riccardo Scandariato. 2023. Automatic extraction of security-rich dataflow diagrams for microservice applications written in Java. Journal of Systems and Software 202 (2023), 111722.</text:p>
          </table:table-cell>
          <table:table-cell table:style-name="ce3"/>
          <table:table-cell table:style-name="ce4" office:value-type="string" calcext:value-type="string">
            <text:p><text:a xlink:href="https://doi.org/10.1016/j.jss.2023.111722" xlink:type="simple">https://doi.org/10.1016/j.jss.2023.111722</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mon Schneider, Tufan Özen, Michael Chen, and Riccardo Scandariato. 2023. microSecEnD: A Dataset of Security-Enriched Dataflow Diagrams for Microservice Applications. In 2023 IEEE/ACM 20th International Conference on Mining Software Repositories (MSR). 125--129.</text:p>
          </table:table-cell>
          <table:table-cell table:style-name="ce1"/>
          <table:table-cell table:style-name="ce4" office:value-type="string" calcext:value-type="string">
            <text:p><text:a xlink:href="https://doi.org/10.1109/MSR59073.2023.00030" xlink:type="simple">https://doi.org/10.1109/MSR59073.2023.00030</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3"/>
          <table:table-cell table:style-name="ce4" office:value-type="string" calcext:value-type="string">
            <text:p><text:a xlink:href="https://doi.org/10.1002/spe.2974" xlink:type="simple">https://doi.org/10.1002/spe.2974</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Sicco Verwer and Christian A. Hammerschmidt. 2017. flexfringe: A Passive Automaton Learning Package. In 2017 IEEE International Conference on Software Maintenance and Evolution (ICSME). 638--642.</text:p>
          </table:table-cell>
          <table:table-cell table:style-name="ce1"/>
          <table:table-cell table:style-name="ce4" office:value-type="string" calcext:value-type="string">
            <text:p><text:a xlink:href="https://doi.org/10.1109/ICSME.2017.58" xlink:type="simple">https://doi.org/10.1109/ICSME.2017.58</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Neil Walkinshaw, Ramsay Taylor, and John Derrick. 2016. Inferring Extended Finite State Machine Models from Software Executions. Empirical Software Engineering 21, 3 (jun 2016), 811--853.</text:p>
          </table:table-cell>
          <table:table-cell table:style-name="ce3"/>
          <table:table-cell table:style-name="ce4" office:value-type="string" calcext:value-type="string">
            <text:p><text:a xlink:href="https://doi.org/10.1007/s10664-015-9367-7" xlink:type="simple">https://doi.org/10.1007/s10664-015-9367-7</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Muhammad Waseem, Peng Liang, Mojtaba Shahin, Aakash Ahmad, and Ali Rezaei Nassab. 2021. On the Nature of Issues in Five Open Source Microservices Systems: An Empirical Study. In Proceedings of the 25th International Conference on Evaluation and Assessment in Software Engineering (Trondheim, Norway) (EASE '21). Association for Computing Machinery, New York, NY, USA, 201--210.</text:p>
          </table:table-cell>
          <table:table-cell table:style-name="ce3"/>
          <table:table-cell table:style-name="ce3" office:value-type="string" calcext:value-type="string">
            <text:p><text:a xlink:href="https://doi.org/10.1145/3463274.3463337" xlink:type="simple">https://doi.org/10.1145/3463274.3463337</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Chenxing Zhong, He Zhang, Huang Huang, Zhikun Chen, Chao Li, Xiaodong Liu, and Shanshan Li. 2023. DOMICO: Checking conformance between domain models and implementations. Software: Practice and Experience (2023).</text:p>
          </table:table-cell>
          <table:table-cell table:style-name="ce3"/>
          <table:table-cell table:style-name="ce4" office:value-type="string" calcext:value-type="string">
            <text:p><text:a xlink:href="https://doi.org/10.1002/spe.3272" xlink:type="simple">https://doi.org/10.1002/spe.3272</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Wenhai Li, and Dan Ding. 2018. Fault analysis and debugging of microservice systems: Industrial survey, benchmark system, and empirical study. IEEE Transactions on Software Engineering 47, 2 (2018), 243--260.</text:p>
          </table:table-cell>
          <table:table-cell table:style-name="ce3"/>
          <table:table-cell table:style-name="ce3" office:value-type="string" calcext:value-type="string">
            <text:p><text:a xlink:href="https://doi.org/10.1109/TSE.2018.2887384" xlink:type="simple">https://doi.org/10.1109/TSE.2018.2887384</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Xiang Zhou, Xin Peng, Tao Xie, Jun Sun, Chao Ji, Dewei Liu, Qilin Xiang, and Chuan He. 2019. Latent Error Prediction and Fault Localization for Microservice Applications by Learning from System Trace Logs. In Proceedings of the 2019 27th ACM Joint Meeting on European Software Engineering Conference and Symposium on the Foundations of Software Engineering (Tallinn, Estonia) (ESEC/FSE 2019). Association for Computing Machinery, New York, NY, USA, 683--694.</text:p>
          </table:table-cell>
          <table:table-cell table:style-name="ce3"/>
          <table:table-cell table:style-name="ce3" office:value-type="string" calcext:value-type="string">
            <text:p><text:a xlink:href="https://doi.org/10.1145/3338906.3338961" xlink:type="simple">https://doi.org/10.1145/3338906.3338961</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Comparison of static analysis architecture recovery tools for microservice applications. Empirical Software Engineering, v. 30, n. 5, p. 128, 2025.</text:p>
          </table:table-cell>
          <table:table-cell table:style-name="ce3"/>
          <table:table-cell table:style-name="ce4" office:value-type="string" calcext:value-type="string">
            <text:p><text:a xlink:href="https://doi.org/10.1007/s10664-025-10686-2" xlink:type="simple">https://doi.org/10.1007/s10664-025-10686-2</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How dataflow diagrams impact software security analysis: an empirical experiment. In: 2024 IEEE International Conference on Software Analysis, Evolution and Reengineering (SANER). IEEE, 2024. p. 952-963.</text:p>
          </table:table-cell>
          <table:table-cell table:style-name="ce3"/>
          <table:table-cell table:style-name="ce4" office:value-type="string" calcext:value-type="string">
            <text:p><text:a xlink:href="https://doi.org/10.1109/SANER60148.2024.00103" xlink:type="simple">https://doi.org/10.1109/SANER60148.2024.00103</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CAO, Clinton; PANICHELLA, Annibale; VERWER, Sicco. Automated test-case generation for rest APIs using model inference search heuristic. In: 2025 IEEE/ACM International Conference on Automation of Software Test (AST). IEEE, 2025. p. 29-40.</text:p>
          </table:table-cell>
          <table:table-cell table:style-name="ce3"/>
          <table:table-cell table:style-name="ce4" office:value-type="string" calcext:value-type="string">
            <text:p><text:a xlink:href="https://doi.org/10.1109/AST66626.2025.00010" xlink:type="simple">https://doi.org/10.1109/AST66626.2025.00010</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Automatic rule checking for microservices: Supporting security analysis with explainability. ACM Transactions on Software Engineering and Methodology, 2025.</text:p>
          </table:table-cell>
          <table:table-cell table:style-name="ce3"/>
          <table:table-cell table:style-name="ce4" office:value-type="string" calcext:value-type="string">
            <text:p><text:a xlink:href="https://doi.org/10.1145/3771275" xlink:type="simple">https://doi.org/10.1145/3771275</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CHNEIDER, Simon et al. In Specs We Trust? Conformance-Analysis of Implementation to Specifications in Node-RED and Associated Security Risks. In: International Conference on Availability, Reliability and Security. Cham: Springer Nature Switzerland, 2025. p. 278-300.</text:p>
          </table:table-cell>
          <table:table-cell table:style-name="ce3"/>
          <table:table-cell table:style-name="ce3" office:value-type="string" calcext:value-type="string">
            <text:p><text:a xlink:href="https://doi.org/10.1007/978-3-032-00624-0_14" xlink:type="simple">https://doi.org/10.1007/978-3-032-00624-0_14</text:a></text:p>
          </table:table-cell>
          <table:table-cell table:style-name="ce1" table:number-columns-repeated="20"/>
          <table:table-cell table:number-columns-repeated="999"/>
        </table:table-row>
        <table:table-row table:style-name="ro1">
          <table:table-cell table:style-name="ce1" office:value-type="float" office:value="21" calcext:value-type="float">
            <text:p>21</text:p>
          </table:table-cell>
          <table:table-cell table:style-name="ce1" office:value-type="string" calcext:value-type="string">
            <text:p>Forward</text:p>
          </table:table-cell>
          <table:table-cell table:style-name="ce1" office:value-type="string" calcext:value-type="string">
            <text:p>SAYAGO-HEREDIA, Jaime et al. Systematic Mapping of Support Tools for Microservices. In: International Conference on Applied Technologies. Cham: Springer Nature Switzerland, 2024. p. 3-16.</text:p>
          </table:table-cell>
          <table:table-cell table:style-name="ce3"/>
          <table:table-cell table:style-name="ce4" office:value-type="string" calcext:value-type="string">
            <text:p><text:a xlink:href="https://doi.org/10.1007/978-3-031-89757-3_1" xlink:type="simple">https://doi.org/10.1007/978-3-031-89757-3_1</text:a></text:p>
          </table:table-cell>
          <table:table-cell table:style-name="ce1" table:number-columns-repeated="20"/>
          <table:table-cell table:number-columns-repeated="999"/>
        </table:table-row>
        <table:table-row table:style-name="ro1" table:number-rows-repeated="3">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4"/>
          <table:table-cell table:style-name="ce3"/>
          <table:table-cell table:style-name="ce1" table:number-columns-repeated="20"/>
          <table:table-cell table:number-columns-repeated="999"/>
        </table:table-row>
        <table:table-row table:style-name="ro1">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3"/>
          <table:table-cell table:style-name="ce3" table:number-columns-repeated="2"/>
          <table:table-cell table:style-name="ce1" table:number-columns-repeated="20"/>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2"/>
          <table:table-cell table:style-name="ce2"/>
          <table:table-cell table:style-name="ce3"/>
          <table:table-cell table:style-name="ce1" table:number-columns-repeated="21"/>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3"/>
          <table:table-cell table:style-name="ce3"/>
          <table:table-cell table:style-name="ce1" table:number-columns-repeated="21"/>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4">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917">
          <table:table-cell table:style-name="ce1" table:number-columns-repeated="25"/>
          <table:table-cell table:number-columns-repeated="999"/>
        </table:table-row>
        <table:table-row table:style-name="ro2" table:number-rows-repeated="104757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3" meta:object-count="0"/>
    <meta:generator>LibreOfficeDev/6.0.5.2$Linux_X86_64 LibreOffice_project/</meta:generator>
  </office:meta>
</office:document-meta>
</file>