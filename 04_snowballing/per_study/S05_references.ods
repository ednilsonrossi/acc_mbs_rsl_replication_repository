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7.81pt"/>
    </style:style>
    <style:style style:name="co3" style:family="table-column">
      <style:table-column-properties fo:break-before="auto" style:column-width="143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Origin Paper</text:p>
          </table:table-cell>
          <table:table-cell table:style-name="ce1" office:value-type="string" calcext:value-type="string">
            <text:p>Snowballing Typ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External Link</text:p>
          </table:table-cell>
          <table:table-cell table:style-name="ce1" office:value-type="string" calcext:value-type="string">
            <text:p>DOI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Carlos M. Aderaldo, Nabor C. Mendonça, Claus Pahl, and Pooyan Jamshidi. 2017. Benchmark requirements for microservices architecture research. In 1st International Workshop on Establishing the Community-Wide Infrastructure for Architecture-Based Software Engineering (ECASE). 8--13.</text:p>
          </table:table-cell>
          <table:table-cell table:style-name="ce3" office:value-type="string" calcext:value-type="string">
            <text:p><text:a xlink:href="https://dl.acm.org/doi/10.5555/3101282.3101285" xlink:type="simple">https://dl.acm.org/doi/10.5555/3101282.3101285</text:a></text:p>
          </table:table-cell>
          <table:table-cell table:style-name="ce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Sascha Alpers, Christoph Becker, Andreas Oberweis, and Thomas Schuster. 2015. Microservice based tool support for business process modelling. In 19th International Enterprise Distributed Object Computing Workshop (EDOCW). 71--78.</text:p>
          </table:table-cell>
          <table:table-cell table:style-name="ce2"/>
          <table:table-cell table:style-name="ce3" office:value-type="string" calcext:value-type="string">
            <text:p><text:a xlink:href="https://doi.org/10.1109/EDOCW.2015.32" xlink:type="simple">https://doi.org/10.1109/EDOCW.2015.3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Nuha Alshuqayran, Nour Ali, and Roger Evans. 2016. A systematic mapping study in microservice architecture. In 9th International Conference on Service-Oriented Computing and Applications (SOCA). 44--51.</text:p>
          </table:table-cell>
          <table:table-cell table:style-name="ce2"/>
          <table:table-cell table:style-name="ce3" office:value-type="string" calcext:value-type="string">
            <text:p><text:a xlink:href="https://doi.org/10.1109/SOCA.2016.15" xlink:type="simple">https://doi.org/10.1109/SOCA.2016.1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Jens Borchers. 2011. Invited Talk: Reengineering from a Practitioner's View - A Personal Lesson's Learned Assessment. In 15th European Conference on Software Maintenance and Reengineering (CSMR). 1--2. 10.1109/CSMR.2011.63</text:p>
          </table:table-cell>
          <table:table-cell table:style-name="ce2"/>
          <table:table-cell table:style-name="ce3" office:value-type="string" calcext:value-type="string">
            <text:p><text:a xlink:href="https://doi.org/10.1109/CSMR.2011.63" xlink:type="simple">https://doi.org/10.1109/CSMR.2011.6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Jan Bosch. 2004. Software Architecture: The Next Step. In First European Workshop (EWSA). 194--199. 10.1007/978-3-540-24769-2_14</text:p>
          </table:table-cell>
          <table:table-cell table:style-name="ce2"/>
          <table:table-cell table:style-name="ce3" office:value-type="string" calcext:value-type="string">
            <text:p><text:a xlink:href="https://doi.org/10.1007/978-3-540-24769-2_14" xlink:type="simple">https://doi.org/10.1007/978-3-540-24769-2_1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Thomas Engel, Melanie Langermeier, Bernhard Bauer, and Alexander Hofmann. 2018. Evaluation of Microservice Architectures: A Metric and Tool-Based Approach. In 30th International Conference on Advanced Information Systems Engineering(CAiSE). 74--89.</text:p>
          </table:table-cell>
          <table:table-cell table:style-name="ce2"/>
          <table:table-cell table:style-name="ce3" office:value-type="string" calcext:value-type="string">
            <text:p><text:a xlink:href="https://doi.org/10.1007/978-3-319-92901-9_8" xlink:type="simple">https://doi.org/10.1007/978-3-319-92901-9_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Martin Fowler. 2014. Microservices Resource Guide. https://martinfowler.com/microservices/.</text:p>
          </table:table-cell>
          <table:table-cell table:style-name="ce2" table:number-columns-repeated="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Martin Fowler and James Lewis. 2014. Microservices: a definition of this new architectural term. Disponível em: https://martinfowler.com/articles/microservices.html.</text:p>
          </table:table-cell>
          <table:table-cell table:style-name="ce2" table:number-columns-repeated="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Paolo Di Francesco, Ivano Malavolta, and Patricia Lago. 2017. Research on architecting microservices: trends, focus, and potential for industrial adoption. In 4rd International Conference on Software Architecture (ICSA). 21--30.</text:p>
          </table:table-cell>
          <table:table-cell table:style-name="ce2"/>
          <table:table-cell table:style-name="ce3" office:value-type="string" calcext:value-type="string">
            <text:p><text:a xlink:href="https://doi.org/10.1109/ICSA.2017.24" xlink:type="simple">https://doi.org/10.1109/ICSA.2017.2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Giona Granchelli, Mario Cardarelli, Paolo Di Francesco, Ivano Malavolta, Ludovico Iovino, and Amleto Di Salle. 2017. MicroART: A Software Architecture Recovery Tool for Maintaining Microservice-based Systems. In 1st International Conference on Software Architecture (ICSA). 298--302.</text:p>
          </table:table-cell>
          <table:table-cell table:style-name="ce2"/>
          <table:table-cell table:style-name="ce3" office:value-type="string" calcext:value-type="string">
            <text:p><text:a xlink:href="https://doi.org/10.1109/ICSAW.2017.9" xlink:type="simple">https://doi.org/10.1109/ICSAW.2017.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Giona Granchelli, Mario Cardarelli, Paolo Di Francesco, Ivano Malavolta, Ludovico Iovino, and Amleto Di Salle. 2017. Towards Recovering the Software Architecture of Microservice-Based Systems. In 1st International Conference on Software Architecture Workshops (ICSAW). 46--53.</text:p>
          </table:table-cell>
          <table:table-cell table:style-name="ce2"/>
          <table:table-cell table:style-name="ce3" office:value-type="string" calcext:value-type="string">
            <text:p><text:a xlink:href="https://doi.org/10.1109/ICSAW.2017.48" xlink:type="simple">https://doi.org/10.1109/ICSAW.2017.4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Jens Knodel, Dirk Muthig, Uwe Haury, and Gerald Meier. 2008. Architecture Compliance Checking - Experiences from Successful Technology Transfer to Industry. In 12th European Conference on Software Maintenance and Reengineering (CSMR). 43--52. 10.1109/CSMR.2008.4493299</text:p>
          </table:table-cell>
          <table:table-cell table:style-name="ce2"/>
          <table:table-cell table:style-name="ce3" office:value-type="string" calcext:value-type="string">
            <text:p><text:a xlink:href="https://doi.org/10.1109/CSMR.2008.4493299" xlink:type="simple">https://doi.org/10.1109/CSMR.2008.449329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Benjamin Mayer and Rainer Weinreich. 2018. An Approach to Extract the Architecture of Microservice-Based Software Systems. In 12th Symposium on Service-Oriented System Engineering(SOSE). 21--30.</text:p>
          </table:table-cell>
          <table:table-cell table:style-name="ce2"/>
          <table:table-cell table:style-name="ce3" office:value-type="string" calcext:value-type="string">
            <text:p><text:a xlink:href="https://doi.org/10.1109/SOSE.2018.00012" xlink:type="simple">https://doi.org/10.1109/SOSE.2018.0001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Gail Murphy, David Notkin, and Kevin Sullivan. 1995. Software Reflexion Models: Bridging the Gap Between Source and High-Level Models. In 3rd Symposium on Foundations of Software Engineering(FSE). 18--28. 10.1145/222124.222136</text:p>
          </table:table-cell>
          <table:table-cell table:style-name="ce2"/>
          <table:table-cell table:style-name="ce3" office:value-type="string" calcext:value-type="string">
            <text:p><text:a xlink:href="https://doi.org/10.1145/222132.222136" xlink:type="simple">https://doi.org/10.1145/222132.22213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Gail C. Murphy, David Notkin, and Kevin Sullivan. 1995. Software reflexion models: Bridging the gap between source and high-level models. In 3rd International Symposium on Foundations of Software Engineering (FSE). 18--28.</text:p>
          </table:table-cell>
          <table:table-cell table:style-name="ce2"/>
          <table:table-cell table:style-name="ce3" office:value-type="string" calcext:value-type="string">
            <text:p><text:a xlink:href="https://doi.org/10.1145/222132.222136" xlink:type="simple">https://doi.org/10.1145/222132.22213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Sam Newman. 2015. Building microservices: designing fine-grained systems (1 ed.). O Reilly Media.</text:p>
          </table:table-cell>
          <table:table-cell table:style-name="ce2" table:number-columns-repeated="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Leonardo Passos, Ricardo Terra, Renato Diniz, Marco Tulio Valente, and Nabor Mendonça. 2010. Static Architecture-Conformance Checking: An Illustrative Overview. IEEE Software 27, 5 (2010), 82--89.</text:p>
          </table:table-cell>
          <table:table-cell table:style-name="ce2"/>
          <table:table-cell table:style-name="ce3" office:value-type="string" calcext:value-type="string">
            <text:p><text:a xlink:href="https://doi.org/10.1109/MS.2009.117" xlink:type="simple">https://doi.org/10.1109/MS.2009.11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3" office:value-type="string" calcext:value-type="string">
            <text:p><text:a xlink:href="https://cloud.spring.io/spring-cloud-netflix." xlink:type="simple">Pivotal. 2018. Spring Cloud Netflix. https://cloud.spring.io/spring-cloud-netflix.</text:a></text:p>
          </table:table-cell>
          <table:table-cell table:style-name="ce3" office:value-type="string" calcext:value-type="string">
            <text:p><text:a xlink:href="https://cloud.spring.io/spring-cloud-netflix" xlink:type="simple">https://cloud.spring.io/spring-cloud-netflix</text:a></text:p>
          </table:table-cell>
          <table:table-cell table:style-name="ce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3" office:value-type="string" calcext:value-type="string">
            <text:p><text:a xlink:href="http://microservices.io/patterns/index.html." xlink:type="simple">Chris Richardson. 2017. A pattern language for microservices. http://microservices.io/patterns/index.html.</text:a></text:p>
          </table:table-cell>
          <table:table-cell table:style-name="ce2" table:number-columns-repeated="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Santonu Sarkar, Shubha Ramachandran, G. Sathish Kumar, Madhu K. Iyengar, K. Rangarajan, and Saravanan Sivagnanam. 2009. Modularization of a Large-Scale Business Application: A Case Study. IEEE Software 26 (2009), 28--35. 10.1109/MS.2009.42</text:p>
          </table:table-cell>
          <table:table-cell table:style-name="ce2"/>
          <table:table-cell table:style-name="ce3" office:value-type="string" calcext:value-type="string">
            <text:p><text:a xlink:href="https://doi.org/10.1109/MS.2009.42" xlink:type="simple">https://doi.org/10.1109/MS.2009.4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Ricardo Terra and Marco Tulio Valente. 2008. Verificação Estática de Arquiteturas de Software utilizando Restrições de Dependência. In II Simpósio Brasileiro de Componentes, Arquiteturas e Reutilização de Software (SBCARS). 24--37.</text:p>
          </table:table-cell>
          <table:table-cell table:style-name="ce1"/>
          <table:table-cell table:style-name="ce4" office:value-type="string" calcext:value-type="string">
            <text:p><text:a xlink:href="https://doi.org/10.5753/sbcars.2008.46220" xlink:type="simple">https://doi.org/10.5753/sbcars.2008.4622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Ricardo Terra and Marco Tulio Valente. 2009. A dependency constraint language to manage object-oriented software architectures. Software: Practice and Experience 39, 12 (2009), 1073--1094.</text:p>
          </table:table-cell>
          <table:table-cell table:style-name="ce1"/>
          <table:table-cell table:style-name="ce4" office:value-type="string" calcext:value-type="string">
            <text:p><text:a xlink:href="https://doi.org/10.1002/spe.931" xlink:type="simple">https://doi.org/10.1002/spe.93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Ricardo Terra, Marco Tulio Valente, Krzyszt of Czarnecki, and Roberto S. Bigonha. 2015. A Recommendation System for Repairing Violations Detected by Static Architecture Conformance Checking. Software: Practice and Experience 45, 3 (2015), 315--342. 10.1002/spe.2228</text:p>
          </table:table-cell>
          <table:table-cell table:style-name="ce1"/>
          <table:table-cell table:style-name="ce4" office:value-type="string" calcext:value-type="string">
            <text:p><text:a xlink:href="https://doi.org/10.1002/spe.2228" xlink:type="simple">https://doi.org/10.1002/spe.222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Johannes Thönes. 2015. Microservices. IEEE Software 32, 1 (2015), 116--126.</text:p>
          </table:table-cell>
          <table:table-cell table:style-name="ce1"/>
          <table:table-cell table:style-name="ce4" office:value-type="string" calcext:value-type="string">
            <text:p><text:a xlink:href="https://doi.org/10.1109/MS.2015.11" xlink:type="simple">https://doi.org/10.1109/MS.2015.1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Uwe Zdun, Elena Navarro, and Frank Leymann. 2017. Ensuring and Assessing Architecture Conformance to Microservice Decomposition Patterns. In 15th International Conference on Service-Oriented Computing (ICSOC). 411--429.</text:p>
          </table:table-cell>
          <table:table-cell table:style-name="ce1"/>
          <table:table-cell table:style-name="ce4" office:value-type="string" calcext:value-type="string">
            <text:p><text:a xlink:href="https://doi.org/10.1007/978-3-319-69035-3_29" xlink:type="simple">https://doi.org/10.1007/978-3-319-69035-3_2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Xiang Zhou, Xin Peng, Tao Xie, Jun Sun, Chenjie Xu, Chao Ji, and Wenyun Zhao. 2018. Poster: Benchmarking Microservice Systems for Software Engineering Research. In 40th International Conference on Software Engineering (ICSE). 323324.</text:p>
          </table:table-cell>
          <table:table-cell table:style-name="ce1"/>
          <table:table-cell table:style-name="ce4" office:value-type="string" calcext:value-type="string">
            <text:p><text:a xlink:href="https://doi.org/10.1145/3183440.3194991" xlink:type="simple">https://doi.org/10.1145/3183440.319499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orward</text:p>
          </table:table-cell>
          <table:table-cell table:style-name="ce2" office:value-type="string" calcext:value-type="string">
            <text:p>RAMIREZ MENDEZ, Francisco Miguel. Static analysis learning of annotations in microservices. 2024. Tese de Doutorado. University of Birmingham.</text:p>
          </table:table-cell>
          <table:table-cell table:style-name="ce4" office:value-type="string" calcext:value-type="string">
            <text:p><text:a xlink:href="https://etheses.bham.ac.uk/id/eprint/15347/" xlink:type="simple">https://etheses.bham.ac.uk/id/eprint/15347/</text:a></text:p>
          </table:table-cell>
          <table:table-cell table:style-name="ce1" table:number-columns-repeated="21"/>
          <table:table-cell table:number-columns-repeated="999"/>
        </table:table-row>
        <table:table-row table:style-name="ro1" table:number-rows-repeated="2">
          <table:table-cell table:style-name="ce1" table:number-columns-repeated="2"/>
          <table:table-cell table:style-name="ce2"/>
          <table:table-cell table:style-name="ce1" table:number-columns-repeated="22"/>
          <table:table-cell table:number-columns-repeated="999"/>
        </table:table-row>
        <table:table-row table:style-name="ro1" table:number-rows-repeated="2">
          <table:table-cell table:style-name="ce1" table:number-columns-repeated="2"/>
          <table:table-cell table:style-name="ce2"/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19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7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4"/>
          <table:table-cell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919">
          <table:table-cell table:style-name="ce1" table:number-columns-repeated="25"/>
          <table:table-cell table:number-columns-repeated="99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0" meta:object-count="0"/>
    <meta:generator>LibreOfficeDev/6.0.5.2$Linux_X86_64 LibreOffice_project/</meta:generator>
  </office:meta>
</office:document-meta>
</file>