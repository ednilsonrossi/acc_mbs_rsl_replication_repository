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7.81pt"/>
    </style:style>
    <style:style style:name="co3" style:family="table-column">
      <style:table-column-properties fo:break-before="auto" style:column-width="143.0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ágina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ágin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1" office:value-type="string" calcext:value-type="string">
            <text:p>Origin Paper</text:p>
          </table:table-cell>
          <table:table-cell table:style-name="ce1" office:value-type="string" calcext:value-type="string">
            <text:p>Snowballing Type</text:p>
          </table:table-cell>
          <table:table-cell table:style-name="ce1" office:value-type="string" calcext:value-type="string">
            <text:p>Reference</text:p>
          </table:table-cell>
          <table:table-cell table:style-name="ce1" office:value-type="string" calcext:value-type="string">
            <text:p>External Link</text:p>
          </table:table-cell>
          <table:table-cell table:style-name="ce1" office:value-type="string" calcext:value-type="string">
            <text:p>DOI</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L. Bass, P. Clements, and R. Kazman, Software Architecture in Practice (2nd Edition), 2nd ed. Addison-Wesley Professional, 4 2003</text:p>
          </table:table-cell>
          <table:table-cell table:style-name="ce2" office:value-type="string" calcext:value-type="string">
            <text:p><text:a xlink:href="https://www.academia.edu/download/94904831/software_architecture.pdf" xlink:type="simple">https://www.academia.edu/download/94904831/software_architecture.pdf</text:a></text:p>
          </table:table-cell>
          <table:table-cell table:style-name="ce1" table:number-columns-repeated="21"/>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E. Y. Nakagawa, P. Oliveira Antonino, and M. Becker, "Reference architecture and product line architecture: A subtle but critical difference in Software Architecture, ser. Lecture Notes in Computer Science, I. Crnkovic, V. Gruhn, and M. Book, Eds. Springer Berlin Heidelberg, 2011, vol. 6903, pp. 207-211. [Online]. Available: Http://dx.doi.org/10.1007/978-3-642-23798-0 22</text:p>
          </table:table-cell>
          <table:table-cell table:style-name="ce2" office:value-type="string" calcext:value-type="string">
            <text:p><text:a xlink:href="https://link.springer.com/chapter/10.1007/978-3-642-23798-0_22" xlink:type="simple">https://link.springer.com/chapter/10.1007/978-3-642-23798-0_22</text:a></text:p>
          </table:table-cell>
          <table:table-cell table:style-name="ce2" office:value-type="string" calcext:value-type="string">
            <text:p><text:a xlink:href="https://doi.org/10.1007/978-3-642-23798-0_22" xlink:type="simple">https://doi.org/10.1007/978-3-642-23798-0_22</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S. Angelov, J. J. M. Trienekens, and P. Grefen, "Towards a method for the evaluation of reference architectures: Experiences from a case in ECSA 08: Proceedings of the 2nd European Conference on Software Architecture. Springer Berlin Heidelberg, 2008, pp. 225-240</text:p>
          </table:table-cell>
          <table:table-cell table:style-name="ce2" office:value-type="string" calcext:value-type="string">
            <text:p><text:a xlink:href="https://link.springer.com/chapter/10.1007/978-3-540-88030-1_17" xlink:type="simple">https://link.springer.com/chapter/10.1007/978-3-540-88030-1_17</text:a></text:p>
          </table:table-cell>
          <table:table-cell table:style-name="ce2" office:value-type="string" calcext:value-type="string">
            <text:p><text:a xlink:href="https://doi.org/10.1007/978-3-540-88030-1_17" xlink:type="simple">https://doi.org/10.1007/978-3-540-88030-1_17</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N. Taylor, N. Medvidovic, and E. M. Dashofy, Software Architecture: Foundations, Theory, and Practice. Wiley, 1 2010</text:p>
          </table:table-cell>
          <table:table-cell table:style-name="ce2" office:value-type="string" calcext:value-type="string">
            <text:p><text:a xlink:href="https://dl.acm.org/doi/abs/10.1145/1810295.1810435" xlink:type="simple">https://dl.acm.org/doi/abs/10.1145/1810295.1810435</text:a></text:p>
          </table:table-cell>
          <table:table-cell table:style-name="ce2" office:value-type="string" calcext:value-type="string">
            <text:p><text:a xlink:href="https://doi.org/10.1145/1810295.1810435" xlink:type="simple">https://doi.org/10.1145/1810295.1810435</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D. Greefhorst and E. Proper, Architecture Principles: The Cornerstones of Enterprise Architecture. Springer, 2011, vol. 4</text:p>
          </table:table-cell>
          <table:table-cell table:style-name="ce2" office:value-type="string" calcext:value-type="string">
            <text:p><text:a xlink:href="https://www.erikproper.eu/publications/EP-2024-03-24-13-42-43.pdf" xlink:type="simple">https://www.erikproper.eu/publications/EP-2024-03-24-13-42-43.pdf</text:a></text:p>
          </table:table-cell>
          <table:table-cell table:style-name="ce1" table:number-columns-repeated="21"/>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Cloutier, G. Muller, D. Verma, R. Nilchiani, E. Hole, and M. Bone, "The concept of reference architectures Systems Engineering, pp. 14-27, 2009</text:p>
          </table:table-cell>
          <table:table-cell table:style-name="ce2" office:value-type="string" calcext:value-type="string">
            <text:p><text:a xlink:href="https://incose.onlinelibrary.wiley.com/doi/abs/10.1002/sys.20129" xlink:type="simple">https://incose.onlinelibrary.wiley.com/doi/abs/10.1002/sys.20129</text:a></text:p>
          </table:table-cell>
          <table:table-cell table:style-name="ce2" office:value-type="string" calcext:value-type="string">
            <text:p><text:a xlink:href="https://doi.org/10.1002/sys.20129" xlink:type="simple">https://doi.org/10.1002/sys.20129</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Weinreich, C. Miesbauer, G. Buchgeher, and T. Kriechbaum, "Extracting and facilitating architecture in service-oriented software systems in 2012 Joint 10th IEEE/IFIP Working Conference on Software Architecture 6th European Conference on Software Architecture (WICSA-ECSA 2012), DOI 10.1109/WICSA-ECSA.212.16. IEEE, 2012</text:p>
          </table:table-cell>
          <table:table-cell table:style-name="ce2" office:value-type="string" calcext:value-type="string">
            <text:p><text:a xlink:href="https://ieeexplore.ieee.org/abstract/document/6337764/" xlink:type="simple">https://ieeexplore.ieee.org/abstract/document/6337764/</text:a></text:p>
          </table:table-cell>
          <table:table-cell table:style-name="ce2" office:value-type="string" calcext:value-type="string">
            <text:p><text:a xlink:href="https://doi.org/10.1109/WICSA-ECSA.212.16" xlink:type="simple">https://doi.org/10.1109/WICSA-ECSA.212.16</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G. Buchgeher and R. Weinreich, "Towards continuous reference architecture conformance analysis in 7th European Conference on Software Architecture (ECSA 2013), ser. Lecture Notes in Computer Science, K. Drira, Ed., vol. 7957. Springer Berlin Heidelberg, 2013, pp. 332-335. [Online]. Available: Http://dx.doi.org/10.1007/ 978-3-642-39031-9 32</text:p>
          </table:table-cell>
          <table:table-cell table:style-name="ce2" office:value-type="string" calcext:value-type="string">
            <text:p><text:a xlink:href="https://link.springer.com/chapter/10.1007/978-3-642-39031-9_32" xlink:type="simple">https://link.springer.com/chapter/10.1007/978-3-642-39031-9_32</text:a></text:p>
          </table:table-cell>
          <table:table-cell table:style-name="ce2" office:value-type="string" calcext:value-type="string">
            <text:p><text:a xlink:href="https://doi.org/10.1007/978-3-642-39031-9_32" xlink:type="simple">https://doi.org/10.1007/978-3-642-39031-9_32</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Weinreich and G. Buchgeher, "Towards supporting the software architecture life cycle Journal of Systems and Software, vol. 85, no. 3, pp. 546 -561, 2012. [Online]. Available: Http://www.sciencedirect. com/science/article/ pii/S0164121211001361</text:p>
          </table:table-cell>
          <table:table-cell table:style-name="ce2" office:value-type="string" calcext:value-type="string">
            <text:p><text:a xlink:href="https://www.sciencedirect.com/science/article/pii/S0164121211001361" xlink:type="simple">https://www.sciencedirect.com/science/article/pii/S0164121211001361</text:a></text:p>
          </table:table-cell>
          <table:table-cell table:style-name="ce2" office:value-type="string" calcext:value-type="string">
            <text:p><text:a xlink:href="https://doi.org/10.1016/j.jss.2011.05.036" xlink:type="simple">https://doi.org/10.1016/j.jss.2011.05.036</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N. Kock, Information systems action research: An applied view of emerging concepts and methods, ser. Integrated Series in Information Systems. Springer, 2007, vol. 13</text:p>
          </table:table-cell>
          <table:table-cell table:style-name="ce2" office:value-type="string" calcext:value-type="string">
            <text:p><text:a xlink:href="https://dl.acm.org/doi/abs/10.5555/1197331" xlink:type="simple">https://dl.acm.org/doi/abs/10.5555/1197331</text:a></text:p>
          </table:table-cell>
          <table:table-cell table:style-name="ce1" table:number-columns-repeated="21"/>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A. Lee, Action is an Artifact: What Action Research and Design Science Offer to Each Other, ser. Integrated Series in Information Systems. Boston, MA: Springer US, 2007, vol. 13, ch. 3, pp. 43-60</text:p>
          </table:table-cell>
          <table:table-cell table:style-name="ce2" office:value-type="string" calcext:value-type="string">
            <text:p><text:a xlink:href="https://link.springer.com/content/pdf/10.1007/978-0-387-36060-7_3?pdf=chapter%20toc" xlink:type="simple">https://link.springer.com/content/pdf/10.1007/978-0-387-36060-7_3?pdf=chapter%20toc</text:a></text:p>
          </table:table-cell>
          <table:table-cell table:style-name="ce2" office:value-type="string" calcext:value-type="string">
            <text:p><text:a xlink:href="https://doi.org/10.1007/978-0-387-36060-7_3" xlink:type="simple">https://doi.org/10.1007/978-0-387-36060-7_3</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D. E. Avison, F. Lau, M. D. Myers, and P. A. Nielsen, "Action research Commun. ACM, vol. 42, pp. 94-97, 1 1999</text:p>
          </table:table-cell>
          <table:table-cell table:style-name="ce1"/>
          <table:table-cell table:style-name="ce2" office:value-type="string" calcext:value-type="string">
            <text:p><text:a xlink:href="https://doi.org/10.1145/291469.291479" xlink:type="simple">https://doi.org/10.1145/291469.291479</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G. I. Susman and R. D. Evered, "An assessment of the scientific merits of action research Administrative science quarterly, pp. 582-603, 1978</text:p>
          </table:table-cell>
          <table:table-cell table:style-name="ce2" office:value-type="string" calcext:value-type="string">
            <text:p><text:a xlink:href="https://www.francoangeli.it/riviste/Scheda_rivista.aspx?IDArticolo=72448" xlink:type="simple">https://www.francoangeli.it/riviste/Scheda_rivista.aspx?IDArticolo=72448</text:a></text:p>
          </table:table-cell>
          <table:table-cell table:style-name="ce2" office:value-type="string" calcext:value-type="string">
            <text:p><text:a xlink:href="http://doi.org/10.3280/SO2022-002006" xlink:type="simple">http://doi.org/10.3280/SO2022-002006</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N. Kock, "The three threats of action research: A discussion of methodological antidotes in the context of an information systems study Decision support systems, vol. 37, no. 2, pp. 265-286, 2004</text:p>
          </table:table-cell>
          <table:table-cell table:style-name="ce2" office:value-type="string" calcext:value-type="string">
            <text:p><text:a xlink:href="https://www.sciencedirect.com/science/article/pii/S0167923603000228" xlink:type="simple">https://www.sciencedirect.com/science/article/pii/S0167923603000228</text:a></text:p>
          </table:table-cell>
          <table:table-cell table:style-name="ce2" office:value-type="string" calcext:value-type="string">
            <text:p><text:a xlink:href="https://doi.org/10.1016/S0167-9236(03)00022-8" xlink:type="simple">https://doi.org/10.1016/S0167-9236(03)00022-8</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G. C. Murphy, D. Notkin, and K. J. Sullivan, "Software reflexion models: Bridging the gap between Design and implementation Software Engineering, IEEE Transactions on, vol. 27, no. 4, pp. 364-380, 4 2001</text:p>
          </table:table-cell>
          <table:table-cell table:style-name="ce2" office:value-type="string" calcext:value-type="string">
            <text:p><text:a xlink:href="https://ieeexplore.ieee.org/abstract/document/917525/" xlink:type="simple">https://ieeexplore.ieee.org/abstract/document/917525/</text:a></text:p>
          </table:table-cell>
          <table:table-cell table:style-name="ce2" office:value-type="string" calcext:value-type="string">
            <text:p><text:a xlink:href="https://doi.org/10.1109/32.917525" xlink:type="simple">https://doi.org/10.1109/32.917525</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J. Buckley, S. Mooney, J. Rosik, and N. Ali, "Jittac: A just-in-Time tool for architectural consistency in Proceedings of the 2013 International Conference on Software Engineering, ser. ICSE 13. Piscataway, NJ, USA: IEEE Press, 2013, pp. 1291-1294. [Online]. Available: Http://dl.acm.org/citation.cfm? id=2486788.2486987</text:p>
          </table:table-cell>
          <table:table-cell table:style-name="ce2" office:value-type="string" calcext:value-type="string">
            <text:p><text:a xlink:href="https://ieeexplore.ieee.org/abstract/document/6606700/" xlink:type="simple">https://ieeexplore.ieee.org/abstract/document/6606700/</text:a></text:p>
          </table:table-cell>
          <table:table-cell table:style-name="ce2" office:value-type="string" calcext:value-type="string">
            <text:p><text:a xlink:href="https://doi.org/10.1109/ICSE.2013.6606700" xlink:type="simple">https://doi.org/10.1109/ICSE.2013.6606700</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J. Knodel, D. Muthig, M. Naab, and M. Lindvall, "Static evaluation of software architectures in CSMR 06: Proceedings of the Conference on Software Maintenance and Reengineering. Washington, DC, USA: IEEE Computer Society, 2006, pp. 279-294</text:p>
          </table:table-cell>
          <table:table-cell table:style-name="ce2" office:value-type="string" calcext:value-type="string">
            <text:p><text:a xlink:href="https://ieeexplore.ieee.org/abstract/document/1602379/" xlink:type="simple">https://ieeexplore.ieee.org/abstract/document/1602379/</text:a></text:p>
          </table:table-cell>
          <table:table-cell table:style-name="ce2" office:value-type="string" calcext:value-type="string">
            <text:p><text:a xlink:href="https://doi.org/10.1109/CSMR.2006.53" xlink:type="simple">https://doi.org/10.1109/CSMR.2006.53</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2" office:value-type="string" calcext:value-type="string">
            <text:p><text:a xlink:href="http://doi.acm.org/10.1145/1810295.1810343" xlink:type="simple">F. Deissenboeck, L. Heinemann, B. Hummel, and E. Juergens, "Flexible architecture conformance assessment with conqat in Proceedings of the 32nd ACM/IEEE International Conference on Software Engineering -Volume 2, ser. ICSE 10. New York, NY, USA: ACM, 2010, pp. 247-250. [Online]. Available: Http://doi.acm.org/10.1145/1810295.1810343</text:a></text:p>
          </table:table-cell>
          <table:table-cell table:style-name="ce2" office:value-type="string" calcext:value-type="string">
            <text:p><text:a xlink:href="https://dl.acm.org/doi/abs/10.1145/1810295.1810343" xlink:type="simple">https://dl.acm.org/doi/abs/10.1145/1810295.1810343</text:a></text:p>
          </table:table-cell>
          <table:table-cell table:style-name="ce2" office:value-type="string" calcext:value-type="string">
            <text:p><text:a xlink:href="https://doi.org/10.1145/1810295.1810343" xlink:type="simple">https://doi.org/10.1145/1810295.1810343</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N. Sangal, E. Jordan, V. Sinha, and D. Jackson, "Using dependency models to manage complex software architecture SIGPLAN Not., vol. 40, no. 10, pp. 167-176, 10 2005</text:p>
          </table:table-cell>
          <table:table-cell table:style-name="ce2" office:value-type="string" calcext:value-type="string">
            <text:p><text:a xlink:href="https://dl.acm.org/doi/abs/10.1145/1094811.1094824" xlink:type="simple">https://dl.acm.org/doi/abs/10.1145/1094811.1094824</text:a></text:p>
          </table:table-cell>
          <table:table-cell table:style-name="ce2" office:value-type="string" calcext:value-type="string">
            <text:p><text:a xlink:href="https://doi.org/10.1145/1094811.1094824" xlink:type="simple">https://doi.org/10.1145/1094811.1094824</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S. Sangwan, P. Vercellone-Smith, and P. A. Laplante, "Structural epochs in the complexity of software over time IEEE Software, vol. 25, no. 4, pp. 66-73, 7 2008</text:p>
          </table:table-cell>
          <table:table-cell table:style-name="ce2" office:value-type="string" calcext:value-type="string">
            <text:p><text:a xlink:href="https://ieeexplore.ieee.org/abstract/document/4548410/" xlink:type="simple">https://ieeexplore.ieee.org/abstract/document/4548410/</text:a></text:p>
          </table:table-cell>
          <table:table-cell table:style-name="ce2" office:value-type="string" calcext:value-type="string">
            <text:p><text:a xlink:href="https://doi.org/10.1109/MS.2008.96" xlink:type="simple">https://doi.org/10.1109/MS.2008.96</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Sonargraph. (2013) http://www.hello2morrow.com/products/sonargraph. [Accessed: Jan. 31, 2014]. hello2morrw GmbH</text:p>
          </table:table-cell>
          <table:table-cell table:style-name="ce1" table:number-columns-repeated="22"/>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2" office:value-type="string" calcext:value-type="string">
            <text:p><text:a xlink:href="http://doi.acm.org/10.1145/940071.940081" xlink:type="simple">P. Selonen and J. Xu, "Validating uml models against architectural profiles in Proceedings of the 9th European software engineering conference held jointly with 11th ACM SIGSOFT international symposium on Foundations of software engineering, ser. ESEC/FSE-11. New York, NY, USA: ACM, 2003, pp. 58-67. [Online]. Available: Http://doi.acm.org/10.1145/940071.940081</text:a></text:p>
          </table:table-cell>
          <table:table-cell table:style-name="ce2" office:value-type="string" calcext:value-type="string">
            <text:p><text:a xlink:href="https://dl.acm.org/doi/abs/10.1145/940071.940081" xlink:type="simple">https://dl.acm.org/doi/abs/10.1145/940071.940081</text:a></text:p>
          </table:table-cell>
          <table:table-cell table:style-name="ce2" office:value-type="string" calcext:value-type="string">
            <text:p><text:a xlink:href="https://doi.org/10.1145/940071.940081" xlink:type="simple">https://doi.org/10.1145/940071.940081</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B. Schmerl and D. Garlan, "Acmestudio: Supporting style-centered architecture development in Software Engineering, 2004. ICSE 2004. Proceedings. 26th International Conference on, 2004, pp. 704-705</text:p>
          </table:table-cell>
          <table:table-cell table:style-name="ce2" office:value-type="string" calcext:value-type="string">
            <text:p><text:a xlink:href="https://ieeexplore.ieee.org/abstract/document/1317497/" xlink:type="simple">https://ieeexplore.ieee.org/abstract/document/1317497/</text:a></text:p>
          </table:table-cell>
          <table:table-cell table:style-name="ce2" office:value-type="string" calcext:value-type="string">
            <text:p><text:a xlink:href="https://doi.org/10.1109/ICSE.2004.1317497" xlink:type="simple">https://doi.org/10.1109/ICSE.2004.1317497</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T. Monroe, Capturing Software Architecture Design Expertise with Armani. Carnegie-mellon univ pittsburgh pa school of computer Science, 10 2001</text:p>
          </table:table-cell>
          <table:table-cell table:style-name="ce2" office:value-type="string" calcext:value-type="string">
            <text:p><text:a xlink:href="https://www.cs.cmu.edu/afs/cs/user/bmonroe/www/Armani%20LRM%20TR%20v2.32.pdf" xlink:type="simple">https://www.cs.cmu.edu/afs/cs/user/bmonroe/www/Armani%20LRM%20TR%20v2.32.pdf</text:a></text:p>
          </table:table-cell>
          <table:table-cell table:style-name="ce1" table:number-columns-repeated="21"/>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C. Deiters, P. Dohrmann, S. Herold, and A. Rausch, "Rule-based architectural compliance checks for enterprise architecture management in 2009 IEEE International Enterprise Distributed Object Computing Conference. IEEE, 9 2009, pp. 183-192</text:p>
          </table:table-cell>
          <table:table-cell table:style-name="ce2" office:value-type="string" calcext:value-type="string">
            <text:p><text:a xlink:href="https://ieeexplore.ieee.org/abstract/document/5277678/" xlink:type="simple">https://ieeexplore.ieee.org/abstract/document/5277678/</text:a></text:p>
          </table:table-cell>
          <table:table-cell table:style-name="ce2" office:value-type="string" calcext:value-type="string">
            <text:p><text:a xlink:href="https://doi.org/10.1109/EDOC.2009.15" xlink:type="simple">https://doi.org/10.1109/EDOC.2009.15</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S. Herold, M. Mair, A. Rausch, and I. Schindler, "Checking conformance with reference architectures: A case study in 17th International EDOC Conference (EDOC 2013), Vancouver, Canada. IEEE, 9 2013</text:p>
          </table:table-cell>
          <table:table-cell table:style-name="ce2" office:value-type="string" calcext:value-type="string">
            <text:p><text:a xlink:href="https://ieeexplore.ieee.org/abstract/document/6658265/" xlink:type="simple">https://ieeexplore.ieee.org/abstract/document/6658265/</text:a></text:p>
          </table:table-cell>
          <table:table-cell table:style-name="ce2" office:value-type="string" calcext:value-type="string">
            <text:p><text:a xlink:href="https://doi.org/10.1109/EDOC.2013.17" xlink:type="simple">https://doi.org/10.1109/EDOC.2013.17</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C. Deiters and A. Rausch, "A constructive approach to compositional architecture design in ECSA 11: Proceedings of the 5th European Conference on Software Architecture, ser. Lecture Notes on Computer Science. Springer Berlin Heidelberg, 9 2011, pp. 75-82</text:p>
          </table:table-cell>
          <table:table-cell table:style-name="ce2" office:value-type="string" calcext:value-type="string">
            <text:p><text:a xlink:href="https://link.springer.com/chapter/10.1007/978-3-642-23798-0_8" xlink:type="simple">https://link.springer.com/chapter/10.1007/978-3-642-23798-0_8</text:a></text:p>
          </table:table-cell>
          <table:table-cell table:style-name="ce2" office:value-type="string" calcext:value-type="string">
            <text:p><text:a xlink:href="https://doi.org/10.1007/978-3-642-23798-0_8" xlink:type="simple">https://doi.org/10.1007/978-3-642-23798-0_8</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C. Deiters and A. Rausch, "Assuring architectural properties during compositional architecture design in Proceedings of the 10th International Conference on Software Composition (SC 2011), ser. Lecture Notes in Computer Science, vol. 6708. Springer Berlin Heidelberg, 7 2011, pp. 141-148.</text:p>
          </table:table-cell>
          <table:table-cell table:style-name="ce2" office:value-type="string" calcext:value-type="string">
            <text:p><text:a xlink:href="https://link.springer.com/chapter/10.1007/978-3-642-22045-6_10" xlink:type="simple">https://link.springer.com/chapter/10.1007/978-3-642-22045-6_10</text:a></text:p>
          </table:table-cell>
          <table:table-cell table:style-name="ce2" office:value-type="string" calcext:value-type="string">
            <text:p><text:a xlink:href="https://doi.org/10.1007/978-3-642-22045-6_10" xlink:type="simple">https://doi.org/10.1007/978-3-642-22045-6_10</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UCAIONI, Alessio et al. Continuous conformance of software architectures. In: 2024 IEEE 21st International Conference on Software Architecture (ICSA). IEEE, 2024. p. 112-122.</text:p>
          </table:table-cell>
          <table:table-cell table:style-name="ce2" office:value-type="string" calcext:value-type="string">
            <text:p><text:a xlink:href="https://ieeexplore.ieee.org/abstract/document/10592776" xlink:type="simple">https://ieeexplore.ieee.org/abstract/document/10592776</text:a></text:p>
          </table:table-cell>
          <table:table-cell table:style-name="ce2" office:value-type="string" calcext:value-type="string">
            <text:p><text:a xlink:href="https://doi.org/10.1109/ICSA59870.2024.00019" xlink:type="simple">https://doi.org/10.1109/ICSA59870.2024.00019</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OLIMAN, Mohamed et al. Mining software repositories for software architecture—A systematic mapping study. Information and Software Technology, v. 181, p. 107677, 2025.</text:p>
          </table:table-cell>
          <table:table-cell table:style-name="ce1"/>
          <table:table-cell table:style-name="ce2" office:value-type="string" calcext:value-type="string">
            <text:p><text:a xlink:href="https://doi.org/10.1016/j.infsof.2025.107677" xlink:type="simple">https://doi.org/10.1016/j.infsof.2025.107677</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UCAIONI, Alessio et al. Reference architectures modelling and compliance checking. Software and Systems Modeling, v. 22, n. 3, p. 891-917, 2023.</text:p>
          </table:table-cell>
          <table:table-cell table:style-name="ce1"/>
          <table:table-cell table:style-name="ce2" office:value-type="string" calcext:value-type="string">
            <text:p><text:a xlink:href="https://doi.org/10.1007/s10270-022-01022-z" xlink:type="simple">https://doi.org/10.1007/s10270-022-01022-z</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QUINTON, Clément et al. Evolution in dynamic software product lines. Journal of software: evolution and process, v. 33, n. 2, p. e2293, 2021.</text:p>
          </table:table-cell>
          <table:table-cell table:style-name="ce1"/>
          <table:table-cell table:style-name="ce2" office:value-type="string" calcext:value-type="string">
            <text:p><text:a xlink:href="https://doi.org/10.1002/smr.2293" xlink:type="simple">https://doi.org/10.1002/smr.2293</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KONERSMANN, Marco. Towards a semantically useful definition of conformance with a reference model. 2023.</text:p>
          </table:table-cell>
          <table:table-cell table:style-name="ce1"/>
          <table:table-cell table:style-name="ce2" office:value-type="string" calcext:value-type="string">
            <text:p><text:a xlink:href="http://dx.doi.org/10.5381/jot.2024.23.3.a5" xlink:type="simple">http://dx.doi.org/10.5381/jot.2024.23.3.a5</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ZEPA, Christoph et al. On the understandability of semantic constraints for behavioral software architecture compliance: A controlled experiment. In: 2017 IEEE International Conference on Software Architecture (ICSA). IEEE, 2017. p. 155-164.</text:p>
          </table:table-cell>
          <table:table-cell table:style-name="ce1"/>
          <table:table-cell table:style-name="ce2" office:value-type="string" calcext:value-type="string">
            <text:p><text:a xlink:href="https://doi.org/10.1109/ICSA.2017.10" xlink:type="simple">https://doi.org/10.1109/ICSA.2017.10</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UZUN, Burak; TEKINERDOGAN, Bedir. Detecting deviations in the code using architecture view-based drift analysis. Computer Standards &amp; Interfaces, v. 87, p. 103774, 2024.</text:p>
          </table:table-cell>
          <table:table-cell table:style-name="ce1"/>
          <table:table-cell table:style-name="ce2" office:value-type="string" calcext:value-type="string">
            <text:p><text:a xlink:href="https://doi.org/10.1016/j.csi.2023.103774" xlink:type="simple">https://doi.org/10.1016/j.csi.2023.103774</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KUSMIN, Marge; LAANPERE, Mart. Development and Validation of a Reference Architecture for the Smart Schoolhouse. Baltic Journal of Modern Computing, v. 13, n. 2, 2025.</text:p>
          </table:table-cell>
          <table:table-cell table:style-name="ce1"/>
          <table:table-cell table:style-name="ce2" office:value-type="string" calcext:value-type="string">
            <text:p><text:a xlink:href="https://doi.org/10.22364/bjmc.2025.13.2.02" xlink:type="simple">https://doi.org/10.22364/bjmc.2025.13.2.02</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UCHGEHER, Georg; WEINREICH, Rainer; HUBER, Heinz. A platform for the automated provisioning of architecture information for large-scale service-oriented software systems. In: European Conference on Software Architecture. Cham: Springer International Publishing, 2018. p. 203-218.</text:p>
          </table:table-cell>
          <table:table-cell table:style-name="ce1"/>
          <table:table-cell table:style-name="ce2" office:value-type="string" calcext:value-type="string">
            <text:p><text:a xlink:href="https://doi.org/10.1007/978-3-030-00761-4_14" xlink:type="simple">https://doi.org/10.1007/978-3-030-00761-4_14</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UCHGEHER, Georg et al. Improving testing in an enterprise SOA with an architecture-based approach. In: 2016 13th Working IEEE/IFIP Conference on Software Architecture (WICSA). IEEE, 2016. p. 231-240.</text:p>
          </table:table-cell>
          <table:table-cell table:style-name="ce1"/>
          <table:table-cell table:style-name="ce2" office:value-type="string" calcext:value-type="string">
            <text:p><text:a xlink:href="https://doi.org/10.1109/WICSA.2016.24" xlink:type="simple">https://doi.org/10.1109/WICSA.2016.24</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MASSAGA, Aristide; KOUAMOU, Georges Edouard. Towards a Framework for Evaluating Technologies for Implementing Microservices Architectures. Journal of Software Engineering and Applications, v. 14, n. 8, p. 442-453, 2021.</text:p>
          </table:table-cell>
          <table:table-cell table:style-name="ce1"/>
          <table:table-cell table:style-name="ce2" office:value-type="string" calcext:value-type="string">
            <text:p><text:a xlink:href="https://doi.org/10.4236/jsea.2021.148026" xlink:type="simple">https://doi.org/10.4236/jsea.2021.148026</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HOGAVALLI, Srinivas et al. ArchCrafter: Leveraging LLMs to Scan and Interpretable Software Architecture Flaws. In: 2025 IEEE 16th Annual Information Technology, Electronics and Mobile Communication Conference (IEMCON). IEEE, 2025. p. 0191-0197.</text:p>
          </table:table-cell>
          <table:table-cell table:style-name="ce1"/>
          <table:table-cell table:style-name="ce2" office:value-type="string" calcext:value-type="string">
            <text:p><text:a xlink:href="https://doi.org/10.1109/IEMCON67450.2025.11381148" xlink:type="simple">https://doi.org/10.1109/IEMCON67450.2025.11381148</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HAABANE, Mariam et al. Mining approach for software architectures’ description discovery. In: 2017 IEEE/ACS 14th International Conference on Computer Systems and Applications (AICCSA). IEEE, 2017. p. 879-886.</text:p>
          </table:table-cell>
          <table:table-cell table:style-name="ce1"/>
          <table:table-cell table:style-name="ce2" office:value-type="string" calcext:value-type="string">
            <text:p><text:a xlink:href="https://doi.org/10.1109/AICCSA.2017.169" xlink:type="simple">https://doi.org/10.1109/AICCSA.2017.169</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UCHGEHER, Georg; WEINREICH, Rainer; KRIECHBAUM, Thomas. Making the case for centralized software architecture management. In: International Conference on Software Quality. Cham: Springer International Publishing, 2015. p. 109-121.</text:p>
          </table:table-cell>
          <table:table-cell table:style-name="ce1"/>
          <table:table-cell table:style-name="ce2" office:value-type="string" calcext:value-type="string">
            <text:p><text:a xlink:href="https://doi.org/10.1007/978-3-319-27033-3_8" xlink:type="simple">https://doi.org/10.1007/978-3-319-27033-3_8</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ARACCIOLO, Andrea Enrico Francis. A unified approach to architecture conformance checking. 2016. Tese de Doutorado. Universität Bern.</text:p>
          </table:table-cell>
          <table:table-cell table:style-name="ce2" office:value-type="string" calcext:value-type="string">
            <text:p><text:a xlink:href="https://boristheses.unibe.ch/id/eprint/876" xlink:type="simple">https://boristheses.unibe.ch/id/eprint/876</text:a></text:p>
          </table:table-cell>
          <table:table-cell table:style-name="ce1" table:number-columns-repeated="21"/>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HAABANE, Mariam; RODRIGUEZ, Ismael Bouassida. Architecture Mining Approach for Systems-of-Systems: Monitoring and Discovery. In: International Conference on Service-Oriented Computing. Singapore: Springer Nature Singapore, 2024. p. 15-27.</text:p>
          </table:table-cell>
          <table:table-cell table:style-name="ce1"/>
          <table:table-cell table:style-name="ce2" office:value-type="string" calcext:value-type="string">
            <text:p><text:a xlink:href="https://doi.org/10.1007/978-981-96-7238-7_2" xlink:type="simple">https://doi.org/10.1007/978-981-96-7238-7_2</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OMERS, Benjamin. IT infrastructure modeling for risk identification and prevention. 2024. Tese de Doutorado. Ecole nationale supérieure Mines-Télécom Atlantique.</text:p>
          </table:table-cell>
          <table:table-cell table:style-name="ce2" office:value-type="string" calcext:value-type="string">
            <text:p><text:a xlink:href="https://theses.hal.science/tel-04650035/" xlink:type="simple">https://theses.hal.science/tel-04650035/</text:a></text:p>
          </table:table-cell>
          <table:table-cell table:style-name="ce1" table:number-columns-repeated="21"/>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TROIŃSKI, Andrzej et al. A Hierarchical Process Model Discovery Algorithm for CRS Systems. Bulletin of the Polish Academy of Sciences Technical Sciences, p. 155043-155043.</text:p>
          </table:table-cell>
          <table:table-cell table:style-name="ce1"/>
          <table:table-cell table:style-name="ce2" office:value-type="string" calcext:value-type="string">
            <text:p><text:a xlink:href="http://doi.org/10.24425/bpasts.2025.155043" xlink:type="simple">http://doi.org/10.24425/bpasts.2025.155043</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ARACCIOLO, Andrea et al. Evaluating an Architecture Conformance Monitoring Solution. In: 2016 7th International Workshop on Empirical Software Engineering in Practice (IWESEP). IEEE, 2016. p. 41-44.</text:p>
          </table:table-cell>
          <table:table-cell table:style-name="ce1"/>
          <table:table-cell table:style-name="ce2" office:value-type="string" calcext:value-type="string">
            <text:p><text:a xlink:href="https://doi.org/10.1109/IWESEP.2016.12" xlink:type="simple">https://doi.org/10.1109/IWESEP.2016.12</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QUINTON, Clément. Evolving, Adapting and Optimizing Configurable Software Systems. 2024. Tese de Doutorado. University of Lille.</text:p>
          </table:table-cell>
          <table:table-cell table:style-name="ce2" office:value-type="string" calcext:value-type="string">
            <text:p><text:a xlink:href="https://theses.hal.science/tel-04424609/" xlink:type="simple">https://theses.hal.science/tel-04424609/</text:a></text:p>
          </table:table-cell>
          <table:table-cell table:style-name="ce1" table:number-columns-repeated="21"/>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DWORNIKOWSKI, Dariusz; STROINSKI, Andrzej; BRZEZINSKI, Jerzy. Conformance checking of communicating resource systems with RAs calculus. In: 2015 IEEE International Conference on Services Computing. IEEE, 2015. p. 759-764.</text:p>
          </table:table-cell>
          <table:table-cell table:style-name="ce1"/>
          <table:table-cell table:style-name="ce2" office:value-type="string" calcext:value-type="string">
            <text:p><text:a xlink:href="https://doi.org/10.1109/SCC.2015.109" xlink:type="simple">https://doi.org/10.1109/SCC.2015.109</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KRIECHBAUM, Thomas; BUCHGEHER, Georg; WEINREICH, Rainer. Service development and architecture management for an enterprise soa. In: European Conference on Software Architecture. Cham: Springer International Publishing, 2014. p. 186-201.</text:p>
          </table:table-cell>
          <table:table-cell table:style-name="ce1"/>
          <table:table-cell table:style-name="ce2" office:value-type="string" calcext:value-type="string">
            <text:p><text:a xlink:href="https://doi.org/10.1007/978-3-319-09970-5_17" xlink:type="simple">https://doi.org/10.1007/978-3-319-09970-5_17</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CHRÖDER, Sandra. Ontology-based architecture enforcement: defining and enforcing software architecture as a concept language using ontologies and a controlled natural language. 2020. Tese de Doutorado. Staats-und Universitätsbibliothek Hamburg Carl von Ossietzky.</text:p>
          </table:table-cell>
          <table:table-cell table:style-name="ce2" office:value-type="string" calcext:value-type="string">
            <text:p><text:a xlink:href="https://ediss.sub.uni-hamburg.de/handle/ediss/8671" xlink:type="simple">https://ediss.sub.uni-hamburg.de/handle/ediss/8671</text:a></text:p>
          </table:table-cell>
          <table:table-cell table:style-name="ce1" table:number-columns-repeated="21"/>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LIAGHAT, Zainab et al. Using Reo Formalism for Compliance Checking of Architecture Evolution with Evolutionary Rules. In: Advancing Technology Industrialization Through Intelligent Software Methodologies, Tools and Techniques. IOS Press, 2019. p. 725-738.</text:p>
          </table:table-cell>
          <table:table-cell table:style-name="ce1"/>
          <table:table-cell table:style-name="ce2" office:value-type="string" calcext:value-type="string">
            <text:p><text:a xlink:href="http://doi.org/10.3233/FAIA190093" xlink:type="simple">http://doi.org/10.3233/FAIA190093</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CHRÖDER, Sandra; BUCHGEHER, Georg. Applicability of controlled natural languages for architecture analysis and documentation: an industrial case study. In: Proceedings of the 13th European Conference on Software Architecture-Volume 2. 2019. p. 190-196.</text:p>
          </table:table-cell>
          <table:table-cell table:style-name="ce1"/>
          <table:table-cell table:style-name="ce2" office:value-type="string" calcext:value-type="string">
            <text:p><text:a xlink:href="https://doi.org/10.1145/3344948.3344981" xlink:type="simple">https://doi.org/10.1145/3344948.3344981</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UZUN, Burak. Model-driven software architecture conformance analysis. 2021. Tese de Doutorado. Wageningen University and Research.</text:p>
          </table:table-cell>
          <table:table-cell table:style-name="ce2" office:value-type="string" calcext:value-type="string">
            <text:p><text:a xlink:href="https://www.proquest.com/openview/a6314f94e0477344e55325de431f5526/1?pq-origsite=gscholar&amp;cbl=2026366&amp;diss=y" xlink:type="simple">https://www.proquest.com/openview/a6314f94e0477344e55325de431f5526/1?pq-origsite=gscholar&amp;cbl=2026366&amp;diss=y</text:a></text:p>
          </table:table-cell>
          <table:table-cell table:style-name="ce1" table:number-columns-repeated="21"/>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WELLER, Adrian. Exploring and categorizing maintainability assurance research for service and microservice-based systems. 2019.</text:p>
          </table:table-cell>
          <table:table-cell table:style-name="ce2" office:value-type="string" calcext:value-type="string">
            <text:p><text:a xlink:href="https://elib.uni-stuttgart.de/items/b71d596d-0ace-4f70-a117-1fbf5b2524f8" xlink:type="simple">https://elib.uni-stuttgart.de/items/b71d596d-0ace-4f70-a117-1fbf5b2524f8</text:a></text:p>
          </table:table-cell>
          <table:table-cell table:style-name="ce1" table:number-columns-repeated="21"/>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MARTÍNEZ FERNÁNDEZ, Silverio Juan. Gathering empirical evidence and building a business case for software reference architectures in industry. 2016. Tese de Doutorado. Universitat Politècnica de Catalunya.</text:p>
          </table:table-cell>
          <table:table-cell table:style-name="ce2" office:value-type="string" calcext:value-type="string">
            <text:p><text:a xlink:href="https://hdl.handle.net/2117/96382" xlink:type="simple">https://hdl.handle.net/2117/96382</text:a></text:p>
          </table:table-cell>
          <table:table-cell table:style-name="ce2" office:value-type="string" calcext:value-type="string">
            <text:p><text:a xlink:href="http://dx.doi.org/10.5821/dissertation-2117-96382" xlink:type="simple">http://dx.doi.org/10.5821/dissertation-2117-96382</text:a></text:p>
          </table:table-cell>
          <table:table-cell table:style-name="ce1" table:number-columns-repeated="20"/>
          <table:table-cell table:number-columns-repeated="999"/>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徐永睿; 梁鹏. 面向模式软件体系结构合成中的冲突消解方法. 软件学报, v. 30, n. 8, p. 2428-2452, 2019.</text:p>
          </table:table-cell>
          <table:table-cell table:style-name="ce1"/>
          <table:table-cell table:style-name="ce2" office:value-type="string" calcext:value-type="string">
            <text:p><text:a xlink:href="http://doi.org/10.13328/j.cnki.jos.005511" xlink:type="simple">http://doi.org/10.13328/j.cnki.jos.005511</text:a></text:p>
          </table:table-cell>
          <table:table-cell table:style-name="ce1" table:number-columns-repeated="20"/>
          <table:table-cell table:number-columns-repeated="999"/>
        </table:table-row>
        <table:table-row table:style-name="ro1" table:number-rows-repeated="942">
          <table:table-cell table:style-name="ce1" table:number-columns-repeated="25"/>
          <table:table-cell table:number-columns-repeated="999"/>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ágina1" style:display-name="PageStyle_Págin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56" meta:object-count="0"/>
    <meta:generator>LibreOfficeDev/6.0.5.2$Linux_X86_64 LibreOffice_project/</meta:generator>
  </office:meta>
</office:document-meta>
</file>