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igin Paper</text:p>
          </table:table-cell>
          <table:table-cell table:style-name="ce1" office:value-type="string" calcext:value-type="string">
            <text:p>Snowballing 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xternal Link</text:p>
          </table:table-cell>
          <table:table-cell table:style-name="ce1" office:value-type="string" calcext:value-type="string">
            <text:p>DOI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Bogner, J.; Wagner, S.; Zimmermann, A. Towards a practical maintainability quality model for service- and microservice-based systems, pp. 195–198 (2017).</text:p>
          </table:table-cell>
          <table:table-cell table:style-name="ce3" office:value-type="string" calcext:value-type="string">
            <text:p><text:a xlink:href="https://doi.org/10.1145/3129790.3129816" xlink:type="simple">https://doi.org/10.1145/3129790.3129816</text:a></text:p>
          </table:table-cell>
          <table:table-cell table:style-name="ce3" office:value-type="string" calcext:value-type="string">
            <text:p><text:a xlink:href="https://doi.org/10.1145/3129790.3129816" xlink:type="simple">https://doi.org/10.1145/3129790.312981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Chen, L. Microservices: architecting for continuous delivery and DevOps. In: 2018 IEEE International Conference on Software Architecture (ICSA), pp. 39–397 (2018).</text:p>
          </table:table-cell>
          <table:table-cell table:style-name="ce3" office:value-type="string" calcext:value-type="string">
            <text:p><text:a xlink:href="https://doi.org/10.1109/ICSA.2018.00013" xlink:type="simple">https://doi.org/10.1109/ICSA.2018.00013</text:a></text:p>
          </table:table-cell>
          <table:table-cell table:style-name="ce3" office:value-type="string" calcext:value-type="string">
            <text:p><text:a xlink:href="https://doi.org/10.1109/ICSA.2018.00013" xlink:type="simple">https://doi.org/10.1109/ICSA.2018.0001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Engel, T.; Langermeier, M.; Bauer, B.; Hofmann, A. Evaluation of microservice architectures: a metric and tool-based approach. In: CAiSE 2018, pp. 74–89. Springer, Cham (2018).</text:p>
          </table:table-cell>
          <table:table-cell table:style-name="ce3" office:value-type="string" calcext:value-type="string">
            <text:p><text:a xlink:href="https://doi.org/10.1007/978-3-319-92901-9_8" xlink:type="simple">https://doi.org/10.1007/978-3-319-92901-9_8</text:a></text:p>
          </table:table-cell>
          <table:table-cell table:style-name="ce3" office:value-type="string" calcext:value-type="string">
            <text:p><text:a xlink:href="https://doi.org/10.1007/978-3-319-92901-9_8" xlink:type="simple">https://doi.org/10.1007/978-3-319-92901-9_8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Harrell, F.E. Regression Modeling Strategies. Springer, Cham (2015).</text:p>
          </table:table-cell>
          <table:table-cell table:style-name="ce3" office:value-type="string" calcext:value-type="string">
            <text:p><text:a xlink:href="https://doi.org/10.1007/978-3-319-19425-7" xlink:type="simple">https://doi.org/10.1007/978-3-319-19425-7</text:a></text:p>
          </table:table-cell>
          <table:table-cell table:style-name="ce3" office:value-type="string" calcext:value-type="string">
            <text:p><text:a xlink:href="https://doi.org/10.1007/978-3-319-19425-7" xlink:type="simple">https://doi.org/10.1007/978-3-319-19425-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Guo, G.Y.; Atlee, J.M.; Kazman, R. A software architecture reconstruction method. In: Software Architecture, IFIP, vol. 12, pp. 15–33. Springer (1999).</text:p>
          </table:table-cell>
          <table:table-cell table:style-name="ce3" office:value-type="string" calcext:value-type="string">
            <text:p><text:a xlink:href="https://doi.org/10.1007/978-0-387-35563-4_2" xlink:type="simple">https://doi.org/10.1007/978-0-387-35563-4_2</text:a></text:p>
          </table:table-cell>
          <table:table-cell table:style-name="ce3" office:value-type="string" calcext:value-type="string">
            <text:p><text:a xlink:href="https://doi.org/10.1007/978-0-387-35563-4_2" xlink:type="simple">https://doi.org/10.1007/978-0-387-35563-4_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Haselböck, S.; Weinreich, R.; Buchgeher, G. Decision models for microservices. In: ECSA 2017, LNCS 10475, pp. 155–170. Springer (2017).</text:p>
          </table:table-cell>
          <table:table-cell table:style-name="ce3" office:value-type="string" calcext:value-type="string">
            <text:p><text:a xlink:href="https://doi.org/10.1007/978-3-319-65831-5_11" xlink:type="simple">https://doi.org/10.1007/978-3-319-65831-5_11</text:a></text:p>
          </table:table-cell>
          <table:table-cell table:style-name="ce3" office:value-type="string" calcext:value-type="string">
            <text:p><text:a xlink:href="https://doi.org/10.1007/978-3-319-65831-5_11" xlink:type="simple">https://doi.org/10.1007/978-3-319-65831-5_1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Hohpe, G.; Woolf, B. Enterprise Integration Patterns. Addison-Wesley (2003).</text:p>
          </table:table-cell>
          <table:table-cell table:style-name="ce2" table:number-columns-repeated="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Knoche, H.; Hasselbring, W. Drivers and barriers for microservice adoption. EMISAJ 14(1), 1–35 (2019).</text:p>
          </table:table-cell>
          <table:table-cell table:style-name="ce3" office:value-type="string" calcext:value-type="string">
            <text:p><text:a xlink:href="https://doi.org/10.18417/emisa.14.1" xlink:type="simple">https://doi.org/10.18417/emisa.14.1</text:a></text:p>
          </table:table-cell>
          <table:table-cell table:style-name="ce3" office:value-type="string" calcext:value-type="string">
            <text:p><text:a xlink:href="https://doi.org/10.18417/emisa.14.1" xlink:type="simple">https://doi.org/10.18417/emisa.14.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Lewis, J.; Fowler, M. Microservices: a definition of this new architectural term (2004).</text:p>
          </table:table-cell>
          <table:table-cell table:style-name="ce3" office:value-type="string" calcext:value-type="string">
            <text:p><text:a xlink:href="http://martinfowler.com/articles/microservices.html" xlink:type="simple">http://martinfowler.com/articles/microservices.html</text:a></text:p>
          </table:table-cell>
          <table:table-cell table:style-name="ce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Newman, S. Building Microservices: Designing Fine-Grained Systems. O’Reilly (2015).</text:p>
          </table:table-cell>
          <table:table-cell table:style-name="ce2" table:number-columns-repeated="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Pahl, C.; Jamshidi, P. Microservices: a systematic mapping study. Cloud Computing and Services Science (2016).</text:p>
          </table:table-cell>
          <table:table-cell table:style-name="ce3" office:value-type="string" calcext:value-type="string">
            <text:p><text:a xlink:href="https://doi.org/10.5220/0005785501370146" xlink:type="simple">https://doi.org/10.5220/0005785501370146</text:a></text:p>
          </table:table-cell>
          <table:table-cell table:style-name="ce3" office:value-type="string" calcext:value-type="string">
            <text:p><text:a xlink:href="https://doi.org/10.5220/0005785501370146" xlink:type="simple">https://doi.org/10.5220/0005785501370146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Pautasso, C.; Wilde, E. Why is the web loosely coupled? WWW Conference (2009).</text:p>
          </table:table-cell>
          <table:table-cell table:style-name="ce3" office:value-type="string" calcext:value-type="string">
            <text:p><text:a xlink:href="https://doi.org/10.1145/1526709.1526832" xlink:type="simple">https://doi.org/10.1145/1526709.1526832</text:a></text:p>
          </table:table-cell>
          <table:table-cell table:style-name="ce3" office:value-type="string" calcext:value-type="string">
            <text:p><text:a xlink:href="https://doi.org/10.1145/1526709.1526832" xlink:type="simple">https://doi.org/10.1145/1526709.152683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Pietrantuono, R.; Russo, S.; Guerriero, A. Run-time reliability estimation of microservice architectures. ISSRE (2018).</text:p>
          </table:table-cell>
          <table:table-cell table:style-name="ce3" office:value-type="string" calcext:value-type="string">
            <text:p><text:a xlink:href="https://doi.org/10.1109/ISSRE.2018.00014" xlink:type="simple">https://doi.org/10.1109/ISSRE.2018.00014</text:a></text:p>
          </table:table-cell>
          <table:table-cell table:style-name="ce3" office:value-type="string" calcext:value-type="string">
            <text:p><text:a xlink:href="https://doi.org/10.1109/ISSRE.2018.00014" xlink:type="simple">https://doi.org/10.1109/ISSRE.2018.0001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Richardson, C. A pattern language for microservices (2017).</text:p>
          </table:table-cell>
          <table:table-cell table:style-name="ce3" office:value-type="string" calcext:value-type="string">
            <text:p><text:a xlink:href="http://microservices.io/patterns/index.html" xlink:type="simple">http://microservices.io/patterns/index.html</text:a></text:p>
          </table:table-cell>
          <table:table-cell table:style-name="ce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Skowronski, J. Best practices for event-driven microservice architecture (2019).</text:p>
          </table:table-cell>
          <table:table-cell table:style-name="ce3" office:value-type="string" calcext:value-type="string">
            <text:p><text:a xlink:href="https://hackernoon.com/best-practices-for-event-driven-microservice-architecture-e034p21lk" xlink:type="simple">https://hackernoon.com/best-practices-for-event-driven-microservice-architecture-e034p21lk</text:a></text:p>
          </table:table-cell>
          <table:table-cell table:style-name="ce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Taibi, D.; Lenarduzzi, V. On the definition of microservice bad smells. IEEE Software 35(3), 56–62 (2018).</text:p>
          </table:table-cell>
          <table:table-cell table:style-name="ce3" office:value-type="string" calcext:value-type="string">
            <text:p><text:a xlink:href="https://doi.org/10.1109/MS.2018.2141031" xlink:type="simple">https://doi.org/10.1109/MS.2018.2141031</text:a></text:p>
          </table:table-cell>
          <table:table-cell table:style-name="ce3" office:value-type="string" calcext:value-type="string">
            <text:p><text:a xlink:href="https://doi.org/10.1109/MS.2018.2141031" xlink:type="simple">https://doi.org/10.1109/MS.2018.214103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Van Deursen, A.; Hofmeister, C.; Koschke, R.; Moonen, L.; Riva, C. Symphony: view-driven software architecture reconstruction. WICSA (2004).</text:p>
          </table:table-cell>
          <table:table-cell table:style-name="ce2" table:number-columns-repeated="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Zdun, U.; Navarro, E.; Leymann, F. Ensuring and assessing architecture conformance to microservice decomposition patterns. ICSOC 2017.</text:p>
          </table:table-cell>
          <table:table-cell table:style-name="ce3" office:value-type="string" calcext:value-type="string">
            <text:p><text:a xlink:href="https://doi.org/10.1007/978-3-319-69035-3_29" xlink:type="simple">https://doi.org/10.1007/978-3-319-69035-3_29</text:a></text:p>
          </table:table-cell>
          <table:table-cell table:style-name="ce3" office:value-type="string" calcext:value-type="string">
            <text:p><text:a xlink:href="https://doi.org/10.1007/978-3-319-69035-3_29" xlink:type="simple">https://doi.org/10.1007/978-3-319-69035-3_2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Zimmermann, O. Microservices tenets. Computer Science - Research and Development (2016).</text:p>
          </table:table-cell>
          <table:table-cell table:style-name="ce3" office:value-type="string" calcext:value-type="string">
            <text:p><text:a xlink:href="https://doi.org/10.1007/s00450-016-0337-0" xlink:type="simple">https://doi.org/10.1007/s00450-016-0337-0</text:a></text:p>
          </table:table-cell>
          <table:table-cell table:style-name="ce3" office:value-type="string" calcext:value-type="string">
            <text:p><text:a xlink:href="https://doi.org/10.1007/s00450-016-0337-0" xlink:type="simple">https://doi.org/10.1007/s00450-016-0337-0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kward</text:p>
          </table:table-cell>
          <table:table-cell table:style-name="ce2" office:value-type="string" calcext:value-type="string">
            <text:p>Zimmermann, O.; Stocker, M.; Zdun, U.; Luebke, D.; Pautasso, C. Microservice API patterns (2019).</text:p>
          </table:table-cell>
          <table:table-cell table:style-name="ce3" office:value-type="string" calcext:value-type="string">
            <text:p><text:a xlink:href="https://microservice-api-patterns.org" xlink:type="simple">https://microservice-api-patterns.org</text:a></text:p>
          </table:table-cell>
          <table:table-cell table:style-name="ce2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PASTRANA, Manuel et al. Best Practices Evidenced for Software Development Based on DevOps and Scrum: A Literature Review. Applied Sciences, v. 15, n. 10, p. 5421, 2025.</text:p>
          </table:table-cell>
          <table:table-cell table:style-name="ce1"/>
          <table:table-cell table:style-name="ce4" office:value-type="string" calcext:value-type="string">
            <text:p><text:a xlink:href="https://doi.org/10.3390/app15105421" xlink:type="simple">https://doi.org/10.3390/app15105421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ERBOUT, Souhaila et al. API Rate Limit Adoption--A pattern collection. In: Proceedings of the 28th European Conference on Pattern Languages of Programs. 2023. p. 1-20.</text:p>
          </table:table-cell>
          <table:table-cell table:style-name="ce1"/>
          <table:table-cell table:style-name="ce4" office:value-type="string" calcext:value-type="string">
            <text:p><text:a xlink:href="https://doi.org/10.1145/3628034.3628039" xlink:type="simple">https://doi.org/10.1145/3628034.362803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XING, Yongchao et al. Catalog, Impact, and Evaluation of Microservice Bad Smells: A Systematic Literature Review. Software: Practice and Experience, 2026.</text:p>
          </table:table-cell>
          <table:table-cell table:style-name="ce1"/>
          <table:table-cell table:style-name="ce4" office:value-type="string" calcext:value-type="string">
            <text:p><text:a xlink:href="https://doi.org/10.1002/spe.70053" xlink:type="simple">https://doi.org/10.1002/spe.7005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EL MALKI, Amine; ZDUN, Uwe; PAUTASSO, Cesare. Impact of api rate limit on reliability of microservices-based architectures. In: 2022 IEEE International Conference on Service-Oriented System Engineering (SOSE). IEEE, 2022. p. 19-28.</text:p>
          </table:table-cell>
          <table:table-cell table:style-name="ce1"/>
          <table:table-cell table:style-name="ce4" office:value-type="string" calcext:value-type="string">
            <text:p><text:a xlink:href="https://doi.org/10.1109/SOSE55356.2022.00009" xlink:type="simple">https://doi.org/10.1109/SOSE55356.2022.0000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NTENTOS, Evangelos et al. Semi-automatic feedback for improving architecture conformance to microservice patterns and practices. In: 2021 IEEE 18th International Conference on Software Architecture (ICSA). IEEE, 2021. p. 36-46.</text:p>
          </table:table-cell>
          <table:table-cell table:style-name="ce1"/>
          <table:table-cell table:style-name="ce4" office:value-type="string" calcext:value-type="string">
            <text:p><text:a xlink:href="https://doi.org/10.1109/ICSA51549.2021.00012" xlink:type="simple">https://doi.org/10.1109/ICSA51549.2021.0001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LICHTENTHÄLER, Robin; WIRTZ, Guido. Formulating a quality model for cloud-native software architectures: conceptual and methodological considerations. Cluster Computing, v. 27, n. 4, p. 4077-4093, 2024.</text:p>
          </table:table-cell>
          <table:table-cell table:style-name="ce1"/>
          <table:table-cell table:style-name="ce4" office:value-type="string" calcext:value-type="string">
            <text:p><text:a xlink:href="https://doi.org/10.1007/s10586-024-04343-4" xlink:type="simple">https://doi.org/10.1007/s10586-024-04343-4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INGJAI, Apitchaka; ZDUN, Uwe. Conformance assessment of Architectural Design Decisions on API endpoint designs derived from domain models. Journal of Systems and Software, v. 193, p. 111433, 2022.</text:p>
          </table:table-cell>
          <table:table-cell table:style-name="ce1"/>
          <table:table-cell table:style-name="ce4" office:value-type="string" calcext:value-type="string">
            <text:p><text:a xlink:href="https://doi.org/10.1016/j.jss.2022.111433" xlink:type="simple">https://doi.org/10.1016/j.jss.2022.11143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LICHTENTHÄLER, Robin; WIRTZ, Guido. Towards a quality model for cloud-native applications. In: European Conference on Service-Oriented and Cloud Computing. Cham: Springer International Publishing, 2022. p. 109-117.</text:p>
          </table:table-cell>
          <table:table-cell table:style-name="ce1"/>
          <table:table-cell table:style-name="ce4" office:value-type="string" calcext:value-type="string">
            <text:p><text:a xlink:href="https://doi.org/10.1007/978-3-031-04718-3_7" xlink:type="simple">https://doi.org/10.1007/978-3-031-04718-3_7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FALAZI, Ghareeb et al. Compliance Management of IaC-Based Cloud Deployments During Runtime. In: Proceedings of the IEEE/ACM 16th International Conference on Utility and Cloud Computing. 2023. p. 1-11.</text:p>
          </table:table-cell>
          <table:table-cell table:style-name="ce1"/>
          <table:table-cell table:style-name="ce4" office:value-type="string" calcext:value-type="string">
            <text:p><text:a xlink:href="https://doi.org/10.1145/3603166.3632135" xlink:type="simple">https://doi.org/10.1145/3603166.3632135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NTENTOS, Evangelos et al. Evaluating and improving microservice architecture conformance to architectural design decisions. In: International Conference on Service-Oriented Computing. Cham: Springer International Publishing, 2021. p. 188-203.</text:p>
          </table:table-cell>
          <table:table-cell table:style-name="ce1"/>
          <table:table-cell table:style-name="ce4" office:value-type="string" calcext:value-type="string">
            <text:p><text:a xlink:href="https://doi.org/10.1007/978-3-030-91431-8_12" xlink:type="simple">https://doi.org/10.1007/978-3-030-91431-8_12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WU, Suxiang et al. Csmo: The cross-supervision method for microservice optimization through decentralized data management. In: International Conference on Service-Oriented Computing. Singapore: Springer Nature Singapore, 2024. p. 107-122.</text:p>
          </table:table-cell>
          <table:table-cell table:style-name="ce1"/>
          <table:table-cell table:style-name="ce4" office:value-type="string" calcext:value-type="string">
            <text:p><text:a xlink:href="https://doi.org/10.1007/978-981-96-0808-9_9" xlink:type="simple">https://doi.org/10.1007/978-981-96-0808-9_9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DAASE, Christian et al. Creation of a Framework and a Corresponding Tool Enabling the Test-Driven Development of Microservices. J. Softw., v. 18, n. 2, p. 55-69, 2023.</text:p>
          </table:table-cell>
          <table:table-cell table:style-name="ce1"/>
          <table:table-cell table:style-name="ce4" office:value-type="string" calcext:value-type="string">
            <text:p><text:a xlink:href="https://doi.org/10.17706/jsw.18.2.55-69" xlink:type="simple">https://doi.org/10.17706/jsw.18.2.55-69</text:a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9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SINGJAI, Apitchaka; ZDUN, Uwe. API description-based conformance assessment of architectural design decision. In: 2022 IEEE International Conference on Service-Oriented System Engineering (SOSE). IEEE, 2022. p. 59-68.</text:p>
          </table:table-cell>
          <table:table-cell table:style-name="ce1"/>
          <table:table-cell table:style-name="ce4" office:value-type="string" calcext:value-type="string">
            <text:p><text:a xlink:href="https://doi.org/10.1109/SOSE55356.2022.00013" xlink:type="simple">https://doi.org/10.1109/SOSE55356.2022.00013</text:a>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RADEMACHER, Florian. Correct-By-Construction Microservices with Model-Driven Engineering: The Case for Architectural Pattern Conformance Checking and Pattern-Conform Code Generation. In: Joint Post-proceedings of the Third and Fourth International Conference on Microservices (Microservices 2020/2022). Schloss Dagstuhl–Leibniz-Zentrum für Informatik, 2023. p. 8: 1-8: 25.</text:p>
          </table:table-cell>
          <table:table-cell table:style-name="ce1"/>
          <table:table-cell table:style-name="ce4" office:value-type="string" calcext:value-type="string">
            <text:p><text:a xlink:href="https://doi.org/10.4230/OASIcs.Microservices.2020-2022.8" xlink:type="simple">https://doi.org/10.4230/OASIcs.Microservices.2020-2022.8</text:a></text:p>
          </table:table-cell>
          <table:table-cell table:style-name="ce1" table:number-columns-repeated="20"/>
          <table:table-cell table:number-columns-repeated="999"/>
        </table:table-row>
        <table:table-row table:style-name="ro1" table:number-rows-repeated="6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4"/>
          <table:table-cell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919">
          <table:table-cell table:style-name="ce1" table:number-columns-repeated="25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2" meta:object-count="0"/>
    <meta:generator>LibreOfficeDev/6.0.5.2$Linux_X86_64 LibreOffice_project/</meta:generator>
  </office:meta>
</office:document-meta>
</file>