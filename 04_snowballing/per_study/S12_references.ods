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4" office:value-type="string" calcext:value-type="string">
            <text:p><text:a xlink:href="https://www.torrossa.com/it/resources/an/5241265" xlink:type="simple">https://www.torrossa.com/it/resources/an/5241265</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table:number-columns-repeated="22"/>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4"/>
          <table:table-cell table:style-name="ce3"/>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4"/>
          <table:table-cell table:style-name="ce6" office:value-type="string" calcext:value-type="string">
            <text:p><text:a xlink:href="https://doi.org/10.1109/ICSE-C.2017.162" xlink:type="simple">https://doi.org/10.1109/ICSE-C.2017.162</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Newman, Building Microservices: Designing Fine-Grained Systems. O’Reilly, 2015.</text:p>
          </table:table-cell>
          <table:table-cell table:style-name="ce4"/>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2" office:value-type="string" calcext:value-type="string">
            <text:p><text:a xlink:href="https://www.sciencedirect.com/science/article/pii/S0950584921000720" xlink:type="simple">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a></text:p>
          </table:table-cell>
          <table:table-cell table:style-name="ce4"/>
          <table:table-cell table:style-name="ce6" office:value-type="string" calcext:value-type="string">
            <text:p><text:a xlink:href="https://doi.org/10.1016/j.infsof.2021.106593" xlink:type="simple">https://doi.org/10.1016/j.infsof.2021.106593</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4"/>
          <table:table-cell table:style-name="ce6" office:value-type="string" calcext:value-type="string">
            <text:p><text:a xlink:href="https://doi.org/10.1145/2901739.2901761" xlink:type="simple">https://doi.org/10.1145/2901739.2901761</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table:table-cell table:style-name="ce6" office:value-type="string" calcext:value-type="string">
            <text:p><text:a xlink:href="https://doi.org/10.1109/QUATIC.2018.00040" xlink:type="simple">https://doi.org/10.1109/QUATIC.2018.00040</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4" office:value-type="string" calcext:value-type="string">
            <text:p><text:a xlink:href="https://docs.aws.amazon.com/vpc/latest/userguide/VPC_SecurityGroups.html" xlink:type="simple">https://docs.aws.amazon.com/vpc/latest/userguide/VPC_SecurityGroups.html</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4"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2"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3"/>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2"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3"/>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2"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3"/>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4"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3"/>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4"/>
          <table:table-cell table:style-name="ce6" office:value-type="string" calcext:value-type="string">
            <text:p><text:a xlink:href="https://doi.org/10.1016/j.jss.2020.110726" xlink:type="simple">https://doi.org/10.1016/j.jss.2020.110726</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table:table-cell table:style-name="ce4" office:value-type="string" calcext:value-type="string">
            <text:p><text:a xlink:href="https://doi.org/10.1016/j.softx.2020.100633" xlink:type="simple">https://doi.org/10.1016/j.softx.2020.100633</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4"/>
          <table:table-cell table:style-name="ce6" office:value-type="string" calcext:value-type="string">
            <text:p><text:a xlink:href="https://doi.org/10.1007/978-3-030-58135-0_12" xlink:type="simple">https://doi.org/10.1007/978-3-030-58135-0_12</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2" office:value-type="string" calcext:value-type="string">
            <text:p><text:a xlink:href="https://doi.org/10.1145/3405962.3405979" xlink:type="simple">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a></text:p>
          </table:table-cell>
          <table:table-cell table:style-name="ce4"/>
          <table:table-cell table:style-name="ce2" office:value-type="string" calcext:value-type="string">
            <text:p><text:a xlink:href="https://doi.org/10.1145/3405962.3405979" xlink:type="simple">https://doi.org/10.1145/3405962.3405979</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4"/>
          <table:table-cell table:style-name="ce6" office:value-type="string" calcext:value-type="string">
            <text:p><text:a xlink:href="https://doi.org/10.1145/3377811.3380384" xlink:type="simple">https://doi.org/10.1145/3377811.3380384</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4"/>
          <table:table-cell table:style-name="ce6" office:value-type="string" calcext:value-type="string">
            <text:p><text:a xlink:href="https://doi.org/10.1109/SANER.2018.8330206" xlink:type="simple">https://doi.org/10.1109/SANER.2018.8330206</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4"/>
          <table:table-cell table:style-name="ce5" office:value-type="string" calcext:value-type="string">
            <text:p><text:a xlink:href="https://doi.org/10.1145/3005714" xlink:type="simple">https://doi.org/10.1145/3005714</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 Fischer, U. Breitenbücher, K. Képes, and F. Leymann, “Towards an approach for automatically checking compliance rules in deployment models,” in Proceedings of The Eleventh International Conference on Emerging Security Information, Systems and Technologies (SECUR-WARE). Xpert Publishing Services (XPS), 2017, pp. 150–153.</text:p>
          </table:table-cell>
          <table:table-cell table:style-name="ce2"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4"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 Y. Guo, J. M. Atlee, and R. Kazman, “A software architecture reconstruction method,” in Software Architecture. Springer, 1999, pp. 15–33.</text:p>
          </table:table-cell>
          <table:table-cell table:style-name="ce4"/>
          <table:table-cell table:style-name="ce5" office:value-type="string" calcext:value-type="string">
            <text:p><text:a xlink:href="https://doi.org/10.1007/978-0-387-35563-4_2" xlink:type="simple">https://doi.org/10.1007/978-0-387-35563-4_2</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Van Deursen, C. Hofmeister, R. Koschke, L. Moonen, and C. Riva, “Symphony: View-driven software architecture reconstruction,” in 4th Working IEEE/IFIP Conf. on Software Architecturen(WICSA 2004). IEEE, 2004, pp. 122–132.</text:p>
          </table:table-cell>
          <table:table-cell table:style-name="ce4"/>
          <table:table-cell table:style-name="ce5" office:value-type="string" calcext:value-type="string">
            <text:p><text:a xlink:href="https://doi.org/10.1109/WICSA.2004.1310696" xlink:type="simple">https://doi.org/10.1109/WICSA.2004.1310696</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Haitzer and U. Zdun, “Semi-automated architectural abstraction specifications for supporting software evolution,” Science of Computer Programming, vol. 90, pp. 135–160, 2014.</text:p>
          </table:table-cell>
          <table:table-cell table:style-name="ce4"/>
          <table:table-cell table:style-name="ce5" office:value-type="string" calcext:value-type="string">
            <text:p><text:a xlink:href="https://doi.org/10.1016/j.scico.2013.10.004" xlink:type="simple">https://doi.org/10.1016/j.scico.2013.10.004</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4" office:value-type="string" calcext:value-type="string">
            <text:p><text:a xlink:href="https://cloud.google.com/docs/authentication/api-keys" xlink:type="simple">https://cloud.google.com/docs/authentication/api-keys</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Corbin and A. L. Strauss, “Grounded theory research: Procedures, canons, and evaluative criteria,” Qualitative Sociology, vol. 13, pp. 3–20, 1990.</text:p>
          </table:table-cell>
          <table:table-cell table:style-name="ce4"/>
          <table:table-cell table:style-name="ce5" office:value-type="string" calcext:value-type="string">
            <text:p><text:a xlink:href="https://doi.org/10.1007/BF00988593" xlink:type="simple">https://doi.org/10.1007/BF00988593</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4"/>
          <table:table-cell table:style-name="ce5" office:value-type="string" calcext:value-type="string">
            <text:p><text:a xlink:href="https://doi.org/10.1007/s11948-017-0010-4" xlink:type="simple">https://doi.org/10.1007/s11948-017-0010-4</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3" office:value-type="string" calcext:value-type="string">
            <text:p>J. Frank E. Harrell, Regression Modeling Strategies: With Applications to Linear Models, Logistic and Ordinal Regression, and Survival Analysis, 2nd ed. Springer, 2015.</text:p>
          </table:table-cell>
          <table:table-cell table:style-name="ce1"/>
          <table:table-cell table:style-name="ce5" office:value-type="string" calcext:value-type="string">
            <text:p><text:a xlink:href="https://doi.org/10.1007/978-3-319-19425-7" xlink:type="simple">https://doi.org/10.1007/978-3-319-19425-7</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3" office:value-type="string" calcext:value-type="string">
            <text:p>U. Zdun, E. Navarro, and F. Leymann, “Ensuring and assessing architecture conformance to microservice decomposition patterns,” in Service-Oriented Computing, M. Maximilien, A. Vallecillo, J. Wang, and M. Oriol, Eds. Cham : Springer International Publishing, 2017, pp. 411–429.</text:p>
          </table:table-cell>
          <table:table-cell table:style-name="ce1"/>
          <table:table-cell table:style-name="ce5" office:value-type="string" calcext:value-type="string">
            <text:p><text:a xlink:href="https://doi.org/10.1007/978-3-319-69035-3_29" xlink:type="simple">https://doi.org/10.1007/978-3-319-69035-3_29</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5" office:value-type="string" calcext:value-type="string">
            <text:p><text:a xlink:href="https://auth0.com/docs/authenticate/single-sign-on" xlink:type="simple">https://auth0.com/docs/authenticate/single-sign-on</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table:table-cell table:style-name="ce5" office:value-type="string" calcext:value-type="string">
            <text:p><text:a xlink:href="https://doi.org/10.1145/3691630" xlink:type="simple">https://doi.org/10.1145/3691630</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table:number-columns-repeated="20"/>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number-columns-repeated="21"/>
          <table:table-cell table:number-columns-repeated="999"/>
        </table:table-row>
        <table:table-row table:style-name="ro1">
          <table:table-cell table:style-name="ce1"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table:number-columns-repeated="22"/>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917">
          <table:table-cell table:style-name="ce1" table:number-columns-repeated="25"/>
          <table:table-cell table:number-columns-repeated="999"/>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1" meta:object-count="0"/>
    <meta:generator>LibreOfficeDev/6.0.5.2$Linux_X86_64 LibreOffice_project/</meta:generator>
  </office:meta>
</office:document-meta>
</file>