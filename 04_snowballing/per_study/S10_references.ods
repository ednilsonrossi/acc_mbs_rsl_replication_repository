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hahin M, Zahedi M, Babar MA, Zhu L (2018) An empirical study of architecting for continuous delivery and deployment. Empir Softw Eng 24:1–48.</text:p>
          </table:table-cell>
          <table:table-cell table:style-name="ce4"/>
          <table:table-cell table:style-name="ce2" office:value-type="string" calcext:value-type="string">
            <text:p><text:a xlink:href="https://doi.org/10.1007/s10664-018-9651-4" xlink:type="simple">https://doi.org/10.1007/s10664-018-9651-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ewis J, Fowle M (2014) Microservices - a definition of this new architectural term. http://martinfowler.com/articles/microservices.html. Accessed 01 Nov 2018.</text:p>
          </table:table-cell>
          <table:table-cell table:style-name="ce5" office:value-type="string" calcext:value-type="string">
            <text:p><text:a xlink:href="http://martinfowler.com/articles/microservices.html" xlink:type="simple">http://martinfowler.com/articles/microservices.html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ogner J, Fritzsch J, Wagner S, Zimmermann A (2018) Limiting technical debt with maintainability assurance – an industry survey on used techniques and differences with service- and microservice-based systems In: 2018 IEEE/ACM International Conference on Technical Debt (TechDebt), 125–133.. Association for Computing Machinery, New York.</text:p>
          </table:table-cell>
          <table:table-cell table:style-name="ce4"/>
          <table:table-cell table:style-name="ce6" office:value-type="string" calcext:value-type="string">
            <text:p><text:a xlink:href="https://doi.org/10.1145/3194164.3194166" xlink:type="simple">https://doi.org/10.1145/3194164.319416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e Silva L, Balasubramaniam D (2012) Controlling software architecture erosion: a survey. J Syst Softw 85(1):132–151.</text:p>
          </table:table-cell>
          <table:table-cell table:style-name="ce4"/>
          <table:table-cell table:style-name="ce6" office:value-type="string" calcext:value-type="string">
            <text:p><text:a xlink:href="https://doi.org/10.1016/j.jss.2011.07.036" xlink:type="simple">https://doi.org/10.1016/j.jss.2011.07.03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hen L (2018) Microservices: architecting for continuous delivery and devops In: 2018 IEEE International Conference on Software Architecture (ICSA), 39–397.. IEEE Computer Society, Los Alamitos.</text:p>
          </table:table-cell>
          <table:table-cell table:style-name="ce4"/>
          <table:table-cell table:style-name="ce2" office:value-type="string" calcext:value-type="string">
            <text:p><text:a xlink:href="https://doi.org/10.1109/ICSA.2018.00013" xlink:type="simple">https://doi.org/10.1109/ICSA.2018.0001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ragoni N, Giallorenzo S, Lafuente, AL, Mazzara M, Montesi F, Mustafin R, Safina L (2017) Microservices: yesterday, today, and tomorrow In: Present and Ulterior Software Engineering, 195–216.. Springer International Publishing, Cham.</text:p>
          </table:table-cell>
          <table:table-cell table:style-name="ce4"/>
          <table:table-cell table:style-name="ce6" office:value-type="string" calcext:value-type="string">
            <text:p><text:a xlink:href="https://doi.org/10.1007/978-3-319-67425-4_12" xlink:type="simple">https://doi.org/10.1007/978-3-319-67425-4_1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Engel T, Langermeier M, Bauer B, Hofmann A (2018) Evaluation of microservice architectures: a metric and tool-based approach In: International Conference on Advanced Information Systems Engineering, 74–89.. Springer International Publishing, Cham.</text:p>
          </table:table-cell>
          <table:table-cell table:style-name="ce4"/>
          <table:table-cell table:style-name="ce6" office:value-type="string" calcext:value-type="string">
            <text:p><text:a xlink:href="https://doi.org/10.1007/978-3-319-92901-9_8" xlink:type="simple">https://doi.org/10.1007/978-3-319-92901-9_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amshidi P, Pahl C, Mendonca NC, Lewis J, Tilkov S (2018) Microservices: the journey so far and challenges ahead. IEEE Softw 35(3):24–35.</text:p>
          </table:table-cell>
          <table:table-cell table:style-name="ce1"/>
          <table:table-cell table:style-name="ce6" office:value-type="string" calcext:value-type="string">
            <text:p><text:a xlink:href="https://doi.org/10.1109/MS.2018.2141039" xlink:type="simple">https://doi.org/10.1109/MS.2018.214103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145/3425269.3425273." xlink:type="simple">Apolinário DRDF, de França BBN (2020) Towards a method for monitoring the coupling evolution of microservice-based architectures In: Proceedings of the 14th Brazilian Symposium on Software Components, Architectures, and Reuse (SBCARS ’20).. ACM. https://doi.org/10.1145/3425269.3425273.</text:a></text:p>
          </table:table-cell>
          <table:table-cell table:style-name="ce4"/>
          <table:table-cell table:style-name="ce2" office:value-type="string" calcext:value-type="string">
            <text:p><text:a xlink:href="https://doi.org/10.1145/3425269.3425273" xlink:type="simple">https://doi.org/10.1145/3425269.342527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iaz M, Sulayman M, Naqvi H (2009) Architectural decay during continuous software evolution and impact of ‘design for change’ on software architecture In: International Conference on Advanced Software Engineering and Its Applications, 119–126.. Springer, Berlin.</text:p>
          </table:table-cell>
          <table:table-cell table:style-name="ce4"/>
          <table:table-cell table:style-name="ce2" office:value-type="string" calcext:value-type="string">
            <text:p><text:a xlink:href="https://doi.org/10.1007/978-3-642-10619-4_15" xlink:type="simple">https://doi.org/10.1007/978-3-642-10619-4_1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inkley AB, Schach SR (1998) Validation of the coupling dependency metric as a predictor of run-time failures and maintenance measures In: Proceedings of the 20th International Conference on Software Engineering, 452–455.. IEEE Computer Society, Los Alamitos.</text:p>
          </table:table-cell>
          <table:table-cell table:style-name="ce1"/>
          <table:table-cell table:style-name="ce6" office:value-type="string" calcext:value-type="string">
            <text:p><text:a xlink:href="https://doi.org/10.1109/ICSE.1998.671604" xlink:type="simple">https://doi.org/10.1109/ICSE.1998.67160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indvall M, Tesoriero R, Costa P (2002) Avoiding architectural degeneration: an evaluation process for software architecture In: Proceedings Eighth IEEE Symposium on Software Metrics, 77–86.. IEEE Computer Society, Los Alamitos.</text:p>
          </table:table-cell>
          <table:table-cell table:style-name="ce4"/>
          <table:table-cell table:style-name="ce6" office:value-type="string" calcext:value-type="string">
            <text:p><text:a xlink:href="https://doi.org/10.1109/METRIC.2002.1011327" xlink:type="simple">https://doi.org/10.1109/METRIC.2002.101132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ogner J, Wagner S, Zimmermann A (2017) Towards a practical maintainability quality model for service-and microservice-based systems In: Proceedings of the 11th European Conference on Software Architecture: Companion Proceedings, 195–198.. ACM, New York.</text:p>
          </table:table-cell>
          <table:table-cell table:style-name="ce1"/>
          <table:table-cell table:style-name="ce6" office:value-type="string" calcext:value-type="string">
            <text:p><text:a xlink:href="https://doi.org/10.1145/3129790.3129816" xlink:type="simple">https://doi.org/10.1145/3129790.312981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lshuqayran N, Ali N, Evans R (2018) Towards micro service architecture recovery: an empirical study In: 2018 IEEE International Conference on Software Architecture (ICSA), 47–4709.. IEEE Computer Society, Los Alamitos.</text:p>
          </table:table-cell>
          <table:table-cell table:style-name="ce4"/>
          <table:table-cell table:style-name="ce6" office:value-type="string" calcext:value-type="string">
            <text:p><text:a xlink:href="https://doi.org/10.1109/ICSA.2018.00014" xlink:type="simple">https://doi.org/10.1109/ICSA.2018.0001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erepletchikov M, Ryan C, Frampton K (2005) Comparing the impact of service-oriented and object-oriented paradigms on the structural properties of software In: OTM Confederated International Conferences “On the Move to Meaningful Internet Systems”, 431–441.. Springer, Berlin.</text:p>
          </table:table-cell>
          <table:table-cell table:style-name="ce4"/>
          <table:table-cell table:style-name="ce6" office:value-type="string" calcext:value-type="string">
            <text:p><text:a xlink:href="https://doi.org/10.1007/11575863_63" xlink:type="simple">https://doi.org/10.1007/11575863_6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erepletchikov M, Ryan C, Frampton K, Tari Z (2007) Coupling metrics for predicting maintainability in service-oriented designs In: 2007 Australian Software Engineering Conference (ASWEC’07), 329–340.. IEEE Computer Society, Los Alamitos.</text:p>
          </table:table-cell>
          <table:table-cell table:style-name="ce1"/>
          <table:table-cell table:style-name="ce4" office:value-type="string" calcext:value-type="string">
            <text:p><text:a xlink:href="https://doi.org/10.1109/ASWEC.2007.17" xlink:type="simple">https://doi.org/10.1109/ASWEC.2007.1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ogner J, Wagner S, Zimmermann A (2017) Automatically measuring the maintainability of service- and microservice-based systems: a literature review In: Proc. of the 27th Int. Workshop on Software Measurement, 107–115.. ACM, New York.</text:p>
          </table:table-cell>
          <table:table-cell table:style-name="ce4"/>
          <table:table-cell table:style-name="ce6" office:value-type="string" calcext:value-type="string">
            <text:p><text:a xlink:href="https://doi.org/10.1145/3143434.3143443" xlink:type="simple">https://doi.org/10.1145/3143434.314344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ousa BL, Bigonha MAS, Ferreira KAM (2019) Analysis of coupling evolution on open source systems In: Proceedings of the XIII Brazilian Symposium on Software Components, Architectures, and Reuse (SBCARS ’19), 23–32.. Association for Computing Machinery, New York.</text:p>
          </table:table-cell>
          <table:table-cell table:style-name="ce4"/>
          <table:table-cell table:style-name="ce2" office:value-type="string" calcext:value-type="string">
            <text:p><text:a xlink:href="https://doi.org/10.1145/3357141.3357147" xlink:type="simple">https://doi.org/10.1145/3357141.335714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16/j.jss.2021.110968." xlink:type="simple">de Toledo SS, Martini A, Sjøberg DIK (2021) Identifying architectural technical debt, principal, and interest in microservices: a multiple-case study. J Syst Softw 177:110968. https://doi.org/10.1016/j.jss.2021.110968.</text:a></text:p>
          </table:table-cell>
          <table:table-cell table:style-name="ce4"/>
          <table:table-cell table:style-name="ce6" office:value-type="string" calcext:value-type="string">
            <text:p><text:a xlink:href="https://doi.org/10.1016/j.jss.2021.110968" xlink:type="simple">https://doi.org/10.1016/j.jss.2021.11096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ampaio AR (2017) Supporting microservice evolution,” proc. - 2017. IEEE Int Conf Softw Maint Evol ICSME 2017:539–543.</text:p>
          </table:table-cell>
          <table:table-cell table:style-name="ce4"/>
          <table:table-cell table:style-name="ce6" office:value-type="string" calcext:value-type="string">
            <text:p><text:a xlink:href="https://doi.org/10.1109/ICSME.2017.63" xlink:type="simple">https://doi.org/10.1109/ICSME.2017.6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ayer B, Weinreich R (2018) An approach to extract the architecture of microservice-based software systems In: 2018 IEEE Symposium on Service-Oriented System Engineering (SOSE), 21–30.. IEEE Computer Society, Los Alamitos.</text:p>
          </table:table-cell>
          <table:table-cell table:style-name="ce4"/>
          <table:table-cell table:style-name="ce5" office:value-type="string" calcext:value-type="string">
            <text:p><text:a xlink:href="https://doi.org/10.1109/SOSE.2018.00012" xlink:type="simple">https://doi.org/10.1109/SOSE.2018.0001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Kitajima S, Matsuoka N (2017) Inferring calling relationship based on external observation for microservice architecture In: Intl. Conf. on Service-Oriented Computing, 229–237.. Springer International Publishing, Cham.</text:p>
          </table:table-cell>
          <table:table-cell table:style-name="ce4"/>
          <table:table-cell table:style-name="ce5" office:value-type="string" calcext:value-type="string">
            <text:p><text:a xlink:href="https://doi.org/10.1007/978-3-319-69035-3_16" xlink:type="simple">https://doi.org/10.1007/978-3-319-69035-3_1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into AF, Terra R, Guerra E, São Sabbas F (2017) Introducing an architectural conformance process in continuous integration. J Univ Comput Sci 23(8):769–805.</text:p>
          </table:table-cell>
          <table:table-cell table:style-name="ce4" office:value-type="string" calcext:value-type="string">
            <text:p><text:a xlink:href="https://professores.dcc.ufla.br/~terra/publications_files/2017_jucs.pdf" xlink:type="simple">https://professores.dcc.ufla.br/~terra/publications_files/2017_jucs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tentos E, Zdun U, Plakidas K, Meixner S, Geiger S (2020) Assessing architecture conformance to coupling-related patterns and practices in microservices In: European Conference on Software Architecture, 3–20.. Springer International Publishing, Cham.</text:p>
          </table:table-cell>
          <table:table-cell table:style-name="ce4"/>
          <table:table-cell table:style-name="ce5" office:value-type="string" calcext:value-type="string">
            <text:p><text:a xlink:href="https://doi.org/10.1007/978-3-030-58923-3_1" xlink:type="simple">https://doi.org/10.1007/978-3-030-58923-3_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enkins S, Kirk SR (2007) Software architecture graphs as complex networks: a novel partitioning scheme to measure stability and evolution. Inf Sci 177(12):2587–2601.</text:p>
          </table:table-cell>
          <table:table-cell table:style-name="ce4"/>
          <table:table-cell table:style-name="ce5" office:value-type="string" calcext:value-type="string">
            <text:p><text:a xlink:href="https://doi.org/10.1016/j.ins.2007.01.021" xlink:type="simple">https://doi.org/10.1016/j.ins.2007.01.02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a S-P, Fan C-Y, Chuang Y, Lee W-T, Lee S-J, Hsueh N-L (2018) Using service dependency graph to analyze and test microservices In: 2018 IEEE 42nd Annual Computer Software and Applications Conference (COMPSAC), vol. 2, 81–86.. IEEE Computer Society, Los Alamitos.</text:p>
          </table:table-cell>
          <table:table-cell table:style-name="ce4"/>
          <table:table-cell table:style-name="ce5" office:value-type="string" calcext:value-type="string">
            <text:p><text:a xlink:href="https://doi.org/10.1109/COMPSAC.2018.10207" xlink:type="simple">https://doi.org/10.1109/COMPSAC.2018.1020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Zhou X, Peng X, Xie T, Sun J, Xu C, Ji C, Zhao W (2018) Benchmarking microservice systems for software engineering research In: Proceedings of the 40th International Conference on Software Engineering: Companion Proceeedings (ICSE ’18), 323–324.. Association for Computing Machinery, New York.</text:p>
          </table:table-cell>
          <table:table-cell table:style-name="ce4"/>
          <table:table-cell table:style-name="ce5" office:value-type="string" calcext:value-type="string">
            <text:p><text:a xlink:href="https://doi.org/10.1145/3183440.3194991" xlink:type="simple">https://doi.org/10.1145/3183440.319499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ahman DMI (2019) Taibi: a curated dataset of microservices-based systems In: Joint Proceedings of the Summer School on Software Maintenance and Evolution.. CEUR-WS, Tampere.</text:p>
          </table:table-cell>
          <table:table-cell table:style-name="ce4" office:value-type="string" calcext:value-type="string">
            <text:p><text:a xlink:href="https://researchportal.tuni.fi/en/publications/a-curated-dataset-of-microservices-based-systems/" xlink:type="simple">https://researchportal.tuni.fi/en/publications/a-curated-dataset-of-microservices-based-systems/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Vasa R, Lumpe M, Branch P, Nierstrasz O (2009) Comparative analysis of evolving software systems using the gini coefficient In: 2009 IEEE International Conference on Software Maintenance, 179–188.. IEEE Computer Society, Los Alamitos.</text:p>
          </table:table-cell>
          <table:table-cell table:style-name="ce4"/>
          <table:table-cell table:style-name="ce5" office:value-type="string" calcext:value-type="string">
            <text:p><text:a xlink:href="https://doi.org/10.1109/ICSM.2009.5306322" xlink:type="simple">https://doi.org/10.1109/ICSM.2009.530632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3" office:value-type="string" calcext:value-type="string">
            <text:p>Adnan SD (2019) Software evolution on azureus bit torrent software: a study on growth and change analysis. J Eng Sci Technol 14:430–447.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3" office:value-type="string" calcext:value-type="string">
            <text:p>Xu K (2003) How has the literature on gini’s index evolved in the past 80 years?. Dalhousie University, Economics Working Paper, Halifax.</text:p>
          </table:table-cell>
          <table:table-cell table:style-name="ce1"/>
          <table:table-cell table:style-name="ce5" office:value-type="string" calcext:value-type="string">
            <text:p><text:a xlink:href="https://dx.doi.org/10.2139/ssrn.423200" xlink:type="simple">https://dx.doi.org/10.2139/ssrn.42320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icroservices Graph Generation tool and experiment results. https://github.com/daniel-apolinario/microservices-graph. Accessed 02 Mar 2021.</text:p>
          </table:table-cell>
          <table:table-cell table:style-name="ce5" office:value-type="string" calcext:value-type="string">
            <text:p><text:a xlink:href="https://github.com/daniel-apolinario/microservices-graph" xlink:type="simple">https://github.com/daniel-apolinario/microservices-graph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arabási A-L, Albert R (1999) Emergence of scaling in random networks. Science 286(5439):509–512.</text:p>
          </table:table-cell>
          <table:table-cell table:style-name="ce1"/>
          <table:table-cell table:style-name="ce5" office:value-type="string" calcext:value-type="string">
            <text:p><text:a xlink:href="https://doi.org/10.1126/science.286.5439.509" xlink:type="simple">https://doi.org/10.1126/science.286.5439.50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Wheeldon R, Counsell S (2003) Power law distributions in class relationships In: Proceedings Third IEEE International Workshop on Source Code Analysis and Manipulation, 45–54.. IEEE Computer Society, Los Alamitos.</text:p>
          </table:table-cell>
          <table:table-cell table:style-name="ce1"/>
          <table:table-cell table:style-name="ce5" office:value-type="string" calcext:value-type="string">
            <text:p><text:a xlink:href="https://doi.org/10.1109/SCAM.2003.1238030" xlink:type="simple">https://doi.org/10.1109/SCAM.2003.123803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otanin A, Noble J, Frean M, Biddle R (2005) Scale-free geometry in OO programs. Commun ACM 48(5):99–103.</text:p>
          </table:table-cell>
          <table:table-cell table:style-name="ce1"/>
          <table:table-cell table:style-name="ce5" office:value-type="string" calcext:value-type="string">
            <text:p><text:a xlink:href="https://doi.org/10.1145/1060710.1060716" xlink:type="simple">https://doi.org/10.1145/1060710.106071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Wen L, Dromey RG, Kirk D (2009) IEEE Trans Syst Man Cybern B (Cyberne) 39(4):845–854.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Šubelj L, Bajec M (2012) Software systems through complex networks science: review, analysis and applications In: Proceedings of the First International Workshop on Software Mining, 9–16.. Association for Computing Machinery, New York.</text:p>
          </table:table-cell>
          <table:table-cell table:style-name="ce1"/>
          <table:table-cell table:style-name="ce5" office:value-type="string" calcext:value-type="string">
            <text:p><text:a xlink:href="https://doi.org/10.1145/2384416.2384418" xlink:type="simple">https://doi.org/10.1145/2384416.238441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ing L, Keqing H, Yutao M, Rong P (2006) Scale free in software metrics In: 30th Annual International Computer Software and Applications Conference (COMPSAC’06), vol. 1, 229–235.. IEEE.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zadi U, Arcelli Fontana F, Taibi D (2019) Architectural smells detected by tools: a catalogue proposal In: 2019 IEEE/ACM International Conference on Technical Debt (TechDebt), 88–97.. IEEE Computer Society, Los Alamitos.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Taibi D, Lenarduzzi V, Pahl C (2020) Microservices anti-patterns: a taxonomy In: Microservices, 111–128.. Springer International Publishing, Cham.</text:p>
          </table:table-cell>
          <table:table-cell table:style-name="ce1"/>
          <table:table-cell table:style-name="ce5" office:value-type="string" calcext:value-type="string">
            <text:p><text:a xlink:href="https://doi.org/10.1007/978-3-030-31646-4_5" xlink:type="simple">https://doi.org/10.1007/978-3-030-31646-4_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ogner J, Boceck T, Popp M, Tschechlov D, Wagner S, Zimmermann A (2019) Towards a collaborative repository for the documentation of service-based antipatterns and bad smells In: 2019 IEEE International Conference on Software Architecture Companion (ICSA-C), 95–101.. IEEE Computer Society, Los Alamitos.</text:p>
          </table:table-cell>
          <table:table-cell table:style-name="ce1"/>
          <table:table-cell table:style-name="ce5" office:value-type="string" calcext:value-type="string">
            <text:p><text:a xlink:href="https://doi.org/10.1109/ICSA-C.2019.00025" xlink:type="simple">https://doi.org/10.1109/ICSA-C.2019.0002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e Freitas Apolinário DR, de França BBNMicroservices dependencies graph generation tool. https://doi.org/10.5281/zenodo.5101943.</text:p>
          </table:table-cell>
          <table:table-cell table:style-name="ce1"/>
          <table:table-cell table:style-name="ce5" office:value-type="string" calcext:value-type="string">
            <text:p><text:a xlink:href="https://doi.org/10.5281/zenodo.5101943" xlink:type="simple">https://doi.org/10.5281/zenodo.510194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ichardson CMicroservices.io website. https://microservices.io/. Accessed 15 Feb 2020.</text:p>
          </table:table-cell>
          <table:table-cell table:style-name="ce5" office:value-type="string" calcext:value-type="string">
            <text:p><text:a xlink:href="https://microservices.io/" xlink:type="simple">https://microservices.io/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aw AM, Kelton WD, Kelton WD (2013) Simulation modeling and analysis, vol. 5. McGraw-Hill Education, New York.</text:p>
          </table:table-cell>
          <table:table-cell table:style-name="ce5" office:value-type="string" calcext:value-type="string">
            <text:p><text:a xlink:href="https://sisis.rz.htw-berlin.de/inh2007/12355751.pdf" xlink:type="simple">https://sisis.rz.htw-berlin.de/inh2007/12355751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uild and deploy Java Spring Boot microservices on Kubernetes. https://github.com/IBM/spring-boot-microservices-on-kubernetes. Accessed 02 Mar 2021.</text:p>
          </table:table-cell>
          <table:table-cell table:style-name="ce5" office:value-type="string" calcext:value-type="string">
            <text:p><text:a xlink:href="https://github.com/IBM/spring-boot-microservices-on-kubernetes" xlink:type="simple">https://github.com/IBM/spring-boot-microservices-on-kubernetes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raphviz - dot language site. https://www.graphviz.org/doc/info/lang.html. Accessed 19 Mar 2020.</text:p>
          </table:table-cell>
          <table:table-cell table:style-name="ce5" office:value-type="string" calcext:value-type="string">
            <text:p><text:a xlink:href="https://www.graphviz.org/doc/info/lang.html" xlink:type="simple">https://www.graphviz.org/doc/info/lang.html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deraldo CM, Mendonça NC, Pahl C, Jamshidi P (2017) Benchmark requirements for microservices architecture research In: 2017 IEEE/ACM 1st International Workshop on Establishing the Community-Wide Infrastructure for Architecture-Based Software Engineering (ECASE), 8–13. https://doi.org/10.1109/ECASE.2017.4.</text:p>
          </table:table-cell>
          <table:table-cell table:style-name="ce1"/>
          <table:table-cell table:style-name="ce5" office:value-type="string" calcext:value-type="string">
            <text:p><text:a xlink:href="https://doi.org/10.1109/ECASE.2017.4" xlink:type="simple">https://doi.org/10.1109/ECASE.2017.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árquez G, Astudillo H (2018) Actual use of architectural patterns in microservices-based open source projects In: 2018 25th Asia-Pacific Software Engineering Conference (APSEC), 31–40. https://doi.org/10.1109/APSEC.2018.00017.</text:p>
          </table:table-cell>
          <table:table-cell table:style-name="ce1"/>
          <table:table-cell table:style-name="ce5" office:value-type="string" calcext:value-type="string">
            <text:p><text:a xlink:href="https://doi.org/10.1109/APSEC.2018.00017" xlink:type="simple">https://doi.org/10.1109/APSEC.2018.0001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pinnaker website. https://spinnaker.io/. Accessed 25 Oct 2020.</text:p>
          </table:table-cell>
          <table:table-cell table:style-name="ce5" office:value-type="string" calcext:value-type="string">
            <text:p><text:a xlink:href="https://spinnaker.io/" xlink:type="simple">https://spinnaker.io/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ymbiote public repository. https://github.com/daniel-apolinario/symbiote. Accessed 02 Mar 2021.</text:p>
          </table:table-cell>
          <table:table-cell table:style-name="ce5" office:value-type="string" calcext:value-type="string">
            <text:p><text:a xlink:href="https://github.com/daniel-apolinario/symbiote" xlink:type="simple">https://github.com/daniel-apolinario/symbiote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ELOVIC, Luka et al. Change impact analysis in microservice systems: A systematic literature review. Journal of Systems and Software, v. 219, p. 112241, 2025.</text:p>
          </table:table-cell>
          <table:table-cell table:style-name="ce1"/>
          <table:table-cell table:style-name="ce5" office:value-type="string" calcext:value-type="string">
            <text:p><text:a xlink:href="https://doi.org/10.1016/j.jss.2024.112241" xlink:type="simple">https://doi.org/10.1016/j.jss.2024.11224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ABDELFATTAH, Amr S.; CERNY, Tomas. Roadmap to reasoning in microservice systems: a rapid review. Applied Sciences, v. 13, n. 3, p. 1838, 2023.</text:p>
          </table:table-cell>
          <table:table-cell table:style-name="ce1"/>
          <table:table-cell table:style-name="ce5" office:value-type="string" calcext:value-type="string">
            <text:p><text:a xlink:href="https://doi.org/10.3390/app13031838" xlink:type="simple">https://doi.org/10.3390/app1303183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GORTNEY, Mia E. et al. Visualizing microservice architecture in the dynamic perspective: A systematic mapping study. IEEE Access, v. 10, p. 119999-120012, 2022.</text:p>
          </table:table-cell>
          <table:table-cell table:style-name="ce1"/>
          <table:table-cell table:style-name="ce5" office:value-type="string" calcext:value-type="string">
            <text:p><text:a xlink:href="https://doi.org/10.1109/ACCESS.2022.3221130" xlink:type="simple">https://doi.org/10.1109/ACCESS.2022.322113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ABDELFATTAH, Amr S. et al. Multivocal study on microservice dependencies. Journal of Systems and Software, v. 222, p. 112334, 2025.</text:p>
          </table:table-cell>
          <table:table-cell table:style-name="ce1"/>
          <table:table-cell table:style-name="ce5" office:value-type="string" calcext:value-type="string">
            <text:p><text:a xlink:href="https://doi.org/10.1016/j.jss.2025.112334" xlink:type="simple">https://doi.org/10.1016/j.jss.2025.11233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ZHANG, Jin Yu; ZHANG, Yuting. Quantitative DevSecOps metrics for cloud-based web microservices. IEEE Access, v. 12, p. 160317-160342, 2024.</text:p>
          </table:table-cell>
          <table:table-cell table:style-name="ce1"/>
          <table:table-cell table:style-name="ce5" office:value-type="string" calcext:value-type="string">
            <text:p><text:a xlink:href="https://doi.org/10.1109/ACCESS.2024.3486314" xlink:type="simple">https://doi.org/10.1109/ACCESS.2024.348631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ABDELFATTAH, Amr S.; CERNY, Tomas. The microservice dependency matrix. In: European Conference on Service-Oriented and Cloud Computing. Cham: Springer Nature Switzerland, 2023. p. 276-288.</text:p>
          </table:table-cell>
          <table:table-cell table:style-name="ce1"/>
          <table:table-cell table:style-name="ce5" office:value-type="string" calcext:value-type="string">
            <text:p><text:a xlink:href="https://doi.org/10.1007/978-3-031-46235-1_19" xlink:type="simple">https://doi.org/10.1007/978-3-031-46235-1_1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MOREIRA, Mateus Gabi; DE FRANÇA, Breno Bernard Nicolau. Analysis of microservice evolution using cohesion metrics. In: Proceedings of the 16th Brazilian Symposium on Software Components, Architectures, and Reuse. 2022. p. 40-49.</text:p>
          </table:table-cell>
          <table:table-cell table:style-name="ce1"/>
          <table:table-cell table:style-name="ce5" office:value-type="string" calcext:value-type="string">
            <text:p><text:a xlink:href="https://doi.org/10.1145/3559712.3559716" xlink:type="simple">https://doi.org/10.1145/3559712.355971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ABDELFATTAH, Amr S. et al. Semantic dependency in microservice architecture. In: 2025 IEEE/ACM 22nd International Conference on Software and Systems Reuse (ICSR). IEEE, 2025. p. 44-54.</text:p>
          </table:table-cell>
          <table:table-cell table:style-name="ce1"/>
          <table:table-cell table:style-name="ce5" office:value-type="string" calcext:value-type="string">
            <text:p><text:a xlink:href="https://doi.org/10.1109/ICSR66718.2025.00011" xlink:type="simple">https://doi.org/10.1109/ICSR66718.2025.000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ABDELFATTAH, Amr S. et al. Semantic Dependency in Microservice Architecture: A Framework for Definition and Detection. arXiv preprint arXiv:2501.11787, 2025.</text:p>
          </table:table-cell>
          <table:table-cell table:style-name="ce1"/>
          <table:table-cell table:style-name="ce5" office:value-type="string" calcext:value-type="string">
            <text:p><text:a xlink:href="https://doi.org/10.48550/arXiv.2501.11787" xlink:type="simple">https://doi.org/10.48550/arXiv.2501.1178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AGGARWAL, Alok; SINGH, Vinay. Migration aspects from monolith to distributed systems using software code build and deployment time and latency perspective. TELKOMNIKA (Telecommunication Computing Electronics and Control), v. 22, n. 4, p. 854-860, 2024.</text:p>
          </table:table-cell>
          <table:table-cell table:style-name="ce1"/>
          <table:table-cell table:style-name="ce5" office:value-type="string" calcext:value-type="string">
            <text:p><text:a xlink:href="http://doi.org/10.12928/telkomnika.v22i4.25655" xlink:type="simple">http://doi.org/10.12928/telkomnika.v22i4.2565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HUSSEIN, Saad; LAHAMI, Mariam; TORJMEN, Mouna. Assessing the quality of microservice and monolithic-based architectures: A systematic literature review. Operational Research in Engineering Sciences: Theory and Applications, v. 7, n. 2, 2024.</text:p>
          </table:table-cell>
          <table:table-cell table:style-name="ce5" office:value-type="string" calcext:value-type="string">
            <text:p><text:a xlink:href="https://oresta.org/menu-script/index.php/oresta/article/view/780" xlink:type="simple">https://oresta.org/menu-script/index.php/oresta/article/view/780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DRIESSEN, Famke et al. A quantitative assessment method for microservices granularity to improve maintainability. In: International Conference on Enterprise Design, Operations, and Computing. Cham: Springer Nature Switzerland, 2023. p. 211-226.</text:p>
          </table:table-cell>
          <table:table-cell table:style-name="ce1"/>
          <table:table-cell table:style-name="ce5" office:value-type="string" calcext:value-type="string">
            <text:p><text:a xlink:href="https://doi.org/10.1007/978-3-031-54712-6_13" xlink:type="simple">https://doi.org/10.1007/978-3-031-54712-6_1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HUSSEIN, Saad; LAHAMI, Mariam; TORJMEN, Mouna. Assessing the quality of microservice and monolithic architectures: Systematic literature review. 2023.</text:p>
          </table:table-cell>
          <table:table-cell table:style-name="ce1"/>
          <table:table-cell table:style-name="ce5" office:value-type="string" calcext:value-type="string">
            <text:p><text:a xlink:href="https://doi.org/10.21203/rs.3.rs-3497708/v1" xlink:type="simple">https://doi.org/10.21203/rs.3.rs-3497708/v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KAUSHIK, Neha; KUMAR, Harish; RAJ, Vinay. Maintainability improvement of microservices based applications using micro frontend. International Journal of Computers and Applications, v. 47, n. 2, p. 188-196, 2025.</text:p>
          </table:table-cell>
          <table:table-cell table:style-name="ce1"/>
          <table:table-cell table:style-name="ce5" office:value-type="string" calcext:value-type="string">
            <text:p><text:a xlink:href="https://doi.org/10.1080/1206212X.2025.2450250" xlink:type="simple">https://doi.org/10.1080/1206212X.2025.245025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PAUDEL, Bhuwan; GONZALEZ-HUERTA, Javier; ZABARDAST, Ehsan. Temporal Evolution of Architectural Complexity and Technical Debt in Microservices: An Exploratory Case Study. In: International Conference on Product-Focused Software Process Improvement. Cham: Springer Nature Switzerland, 2025. p. 285-302.</text:p>
          </table:table-cell>
          <table:table-cell table:style-name="ce1"/>
          <table:table-cell table:style-name="ce5" office:value-type="string" calcext:value-type="string">
            <text:p><text:a xlink:href="https://doi.org/10.1007/978-3-032-12089-2_18" xlink:type="simple">https://doi.org/10.1007/978-3-032-12089-2_1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VANIYAWALA, Nidhi; PANDEY, Kamlendu Kumar. A Bird’s Eye View of Microservice Architecture from the Lens of Cloud Computing. In: International Conference on Advancements in Smart Computing and Information Security. Cham: Springer Nature Switzerland, 2023. p. 65-97.</text:p>
          </table:table-cell>
          <table:table-cell table:style-name="ce1"/>
          <table:table-cell table:style-name="ce5" office:value-type="string" calcext:value-type="string">
            <text:p><text:a xlink:href="https://doi.org/10.1007/978-3-031-59107-5_6" xlink:type="simple">https://doi.org/10.1007/978-3-031-59107-5_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HERYADI, Yaya et al. Yolos-mci: Automating microservices coupling index calculation using vision transformers. Procedia Computer Science, v. 245, p. 924-933, 2024.</text:p>
          </table:table-cell>
          <table:table-cell table:style-name="ce1"/>
          <table:table-cell table:style-name="ce5" office:value-type="string" calcext:value-type="string">
            <text:p><text:a xlink:href="https://doi.org/10.1016/j.procs.2024.10.320" xlink:type="simple">https://doi.org/10.1016/j.procs.2024.10.32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GINTORO, Gintoro; NUGROHO, Eko Cahyo. Evaluating maintainability metrics in microservices-based student registration systems. Bulletin of Electrical Engineering and Informatics, v. 14, n. 6, p. 4701-4712, 2025.</text:p>
          </table:table-cell>
          <table:table-cell table:style-name="ce1"/>
          <table:table-cell table:style-name="ce5" office:value-type="string" calcext:value-type="string">
            <text:p><text:a xlink:href="https://doi.org/10.11591/eei.v14i6.10457" xlink:type="simple">https://doi.org/10.11591/eei.v14i6.1045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CERNY, Tomas et al. On Dependencies in Microservices: Dependency Management and Maintainability. In: International Conference on Cloud Computing and Services Science. Cham: Springer Nature Switzerland, 2024. p. 29-52.</text:p>
          </table:table-cell>
          <table:table-cell table:style-name="ce1"/>
          <table:table-cell table:style-name="ce5" office:value-type="string" calcext:value-type="string">
            <text:p><text:a xlink:href="https://doi.org/10.1007/978-3-032-17286-0_2" xlink:type="simple">https://doi.org/10.1007/978-3-032-17286-0_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GINTORO, Gintoro; SUNARDI, Sunardi. Strategies, characteristics, and research gaps for improving microservices coupling design. Bulletin of Electrical Engineering and Informatics, v. 14, n. 3, p. 2429-2437, 2025.</text:p>
          </table:table-cell>
          <table:table-cell table:style-name="ce1"/>
          <table:table-cell table:style-name="ce5" office:value-type="string" calcext:value-type="string">
            <text:p><text:a xlink:href="https://doi.org/10.11591/eei.v14i3.9099" xlink:type="simple">https://doi.org/10.11591/eei.v14i3.909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PAUDELL, Bhuwan; GONZALEZ-HUERTA¹, Javier; ZABARDAST, Ehsan. Temporal Evolution of Architectural Complexity and Technical Debt in Microservices: An Exploratory Case. In: Product-Focused Software Process Improvement: 26th International Conference, PROFES 2025, Salerno, Italy, December 1–3, 2025, Proceedings. Springer Nature, 2025. p. 285.</text:p>
          </table:table-cell>
          <table:table-cell table:style-name="ce1"/>
          <table:table-cell table:style-name="ce5" office:value-type="string" calcext:value-type="string">
            <text:p><text:a xlink:href="https://doi.org/10.1007/978-3-032-12089-2_18" xlink:type="simple">https://doi.org/10.1007/978-3-032-12089-2_1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ANDIM, Lauriana Patricia Tavares. Monitoring and Detection of Anomaly in Microservices Environments. 2023. Dissertação de Mestrado. Instituto Politecnico de Castelo Branco (Portugal).</text:p>
          </table:table-cell>
          <table:table-cell table:style-name="ce5" office:value-type="string" calcext:value-type="string">
            <text:p><text:a xlink:href="https://www.proquest.com/openview/d7d5fec936baf282546084bd45280a67/1?pq-origsite=gscholar&amp;cbl=2026366&amp;diss=y" xlink:type="simple">https://www.proquest.com/openview/d7d5fec936baf282546084bd45280a67/1?pq-origsite=gscholar&amp;cbl=2026366&amp;diss=y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КИСЕЛЕВИЧ, В. В. et al. Мікросервісна архітектура: переваги та недоліки її практичного застосування. Information Technology: Computer Science, Software Engineering and Cyber Security, n. 2, p. 50-59, 2024.</text:p>
          </table:table-cell>
          <table:table-cell table:style-name="ce1"/>
          <table:table-cell table:style-name="ce5" office:value-type="string" calcext:value-type="string">
            <text:p><text:a xlink:href="https://doi.org/10.32782/IT/2024-2-7" xlink:type="simple">https://doi.org/10.32782/IT/2024-2-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YILMAZ, Rahime. Measuring and evaluating the maintainability of microservices. 2024.</text:p>
          </table:table-cell>
          <table:table-cell table:style-name="ce5" office:value-type="string" calcext:value-type="string">
            <text:p><text:a xlink:href="https://polen.itu.edu.tr/server/api/core/bitstreams/1da45164-1f69-4c91-9bdf-6f0c59ddf263/content" xlink:type="simple">https://polen.itu.edu.tr/server/api/core/bitstreams/1da45164-1f69-4c91-9bdf-6f0c59ddf263/content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RAMIREZ MENDEZ, Francisco Miguel. Static analysis learning of annotations in microservices. 2024. Tese de Doutorado. University of Birmingham.</text:p>
          </table:table-cell>
          <table:table-cell table:style-name="ce5" office:value-type="string" calcext:value-type="string">
            <text:p><text:a xlink:href="https://etheses.bham.ac.uk/id/eprint/15347/" xlink:type="simple">https://etheses.bham.ac.uk/id/eprint/15347/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ZHANG, Jin Yu. A Quantitative DevSecOps Assessment Framework for Cloud-Based Web Microservices. 2024. Dissertação de Mestrado. Boston University.</text:p>
          </table:table-cell>
          <table:table-cell table:style-name="ce5" office:value-type="string" calcext:value-type="string">
            <text:p><text:a xlink:href="https://www.proquest.com/openview/0da942d980b35cc6e5e421a32d71ba5d/1?pq-origsite=gscholar&amp;cbl=18750&amp;diss=y" xlink:type="simple">https://www.proquest.com/openview/0da942d980b35cc6e5e421a32d71ba5d/1?pq-origsite=gscholar&amp;cbl=18750&amp;diss=y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BIN ABDULLAH, Amirul. Refining Distributed System Efficiency with Microservices: Advanced Strategies for Enhancing Performance, Scalability, and Resilience in Complex Architectural Environments.</text:p>
          </table:table-cell>
          <table:table-cell table:style-name="ce5" office:value-type="string" calcext:value-type="string">
            <text:p><text:a xlink:href="https://www.researchgate.net/profile/Amirul-Bin-Abdullah/publication/386189128_Refining_Distributed_System_Efficiency_with_Microservices_Advanced_Strategies_for_Enhancing_Performance_Scalability_and_Resilience_in_Complex_Architectural_Environments/links/6748253bf309a268c011d74b/Refining-Distributed-System-Efficiency-with-Microservices-Advanced-Strategies-for-Enhancing-Performance-Scalability-and-Resilience-in-Complex-Architectural-Environments.pdf" xlink:type="simple">https://www.researchgate.net/profile/Amirul-Bin-Abdullah/publication/386189128_Refining_Distributed_System_Efficiency_with_Microservices_Advanced_Strategies_for_Enhancing_Performance_Scalability_and_Resilience_in_Complex_Architectural_Environments/links/6748253bf309a268c011d74b/Refining-Distributed-System-Efficiency-with-Microservices-Advanced-Strategies-for-Enhancing-Performance-Scalability-and-Resilience-in-Complex-Architectural-Environments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I, Ming et al. Dual-architecture application parallel and traffic switching solution. In: 2022 IEEE 10th Joint International Information Technology and Artificial Intelligence Conference (ITAIC). IEEE, 2022. p. 1281-1285.</text:p>
          </table:table-cell>
          <table:table-cell table:style-name="ce1"/>
          <table:table-cell table:style-name="ce5" office:value-type="string" calcext:value-type="string">
            <text:p><text:a xlink:href="https://doi.org/10.1109/ITAIC54216.2022.9836599" xlink:type="simple">https://doi.org/10.1109/ITAIC54216.2022.983659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PRIMADANI, Claudia Cahya; LEE, Seonah. Measuring Modularity in JavaScript-Based Microservices from Software Architectural Perspectives. In: ISE@ APSEC. 2023.</text:p>
          </table:table-cell>
          <table:table-cell table:style-name="ce5" office:value-type="string" calcext:value-type="string">
            <text:p><text:a xlink:href="https://ceur-ws.org/Vol-3655/ISE2023_06_Primadani_Measuring_Modularity.pdf" xlink:type="simple">https://ceur-ws.org/Vol-3655/ISE2023_06_Primadani_Measuring_Modularity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МОСКАЛИК, Д. О.; АНТОНЮК, Д. С. МОДЕЛЮВАННЯ ЗВ’ЯЗНОСТІ ШЛЯХОМ ІМОВІРНІСНОГО РОЗПОДІЛУ ЧАСТОТ ВНЕСЕННЯ ЗМІН ДО ПРОГРАМНИХ МОДУЛІВ ПРИ СИМУЛЯЦІЇ ПРОЦЕСУ РОЗРОБКИ ПРОГРАМНОГО ЗАБЕЗПЕЧЕННЯ. Вісник Херсонського національного технічного університету, v. 2, n. 2 (93), p. 238-245, 2025.</text:p>
          </table:table-cell>
          <table:table-cell table:style-name="ce1"/>
          <table:table-cell table:style-name="ce5" office:value-type="string" calcext:value-type="string">
            <text:p><text:a xlink:href="https://doi.org/10.35546/kntu2078-4481.2025.2.2.28" xlink:type="simple">https://doi.org/10.35546/kntu2078-4481.2025.2.2.2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МОСКАЛИК, Д. О. МОДЕЛЮВАННЯ ЗВ’ЯЗНОСТІ ВИХІДНОГО КОДУ В СИМУЛЯЦІЯХ ПРОЦЕСУ РОЗРОБКИ ПРОГРАМНОГО ЗАБЕЗПЕЧЕННЯ. Редакційна колегія: ОМ Помазун, к. е. н., доцент, доцент кафедри інформаційних систем в економіці КНЕУ імені Вадима Гетьмана, БО Тішков, к. е. н., доцент, завідувач кафедри інформаційних систем в економіці КНЕУ імені Вадима Гетьмана, ЮМ Лозовик, к. е. н., доцент, доцент кафедри інформаційних систем в економіці КНЕУ імені Вадима Гетьмана, АП Волошин, асистент, p. 314.</text:p>
          </table:table-cell>
          <table:table-cell table:style-name="ce5" office:value-type="string" calcext:value-type="string">
            <text:p><text:a xlink:href="https://ir.kneu.edu.ua/server/api/core/bitstreams/bf2a8015-76c2-4e47-8bfa-72806991e6ac/content" xlink:type="simple">https://ir.kneu.edu.ua/server/api/core/bitstreams/bf2a8015-76c2-4e47-8bfa-72806991e6ac/content</text:a></text:p>
          </table:table-cell>
          <table:table-cell table:style-name="ce1" table:number-columns-repeated="21"/>
          <table:table-cell table:number-columns-repeated="999"/>
        </table:table-row>
        <table:table-row table:style-name="ro1" table:number-rows-repeated="917">
          <table:table-cell table:style-name="ce1" table:number-columns-repeated="25"/>
          <table:table-cell table:number-columns-repeated="99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5" meta:object-count="0"/>
    <meta:generator>LibreOfficeDev/6.0.5.2$Linux_X86_64 LibreOffice_project/</meta:generator>
  </office:meta>
</office:document-meta>
</file>