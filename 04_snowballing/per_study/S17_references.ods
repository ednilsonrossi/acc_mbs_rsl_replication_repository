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143.0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office:value-type="string" calcext:value-type="string">
            <text:p>Origin 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External Link</text:p>
          </table:table-cell>
          <table:table-cell table:style-name="ce1" office:value-type="string" calcext:value-type="string">
            <text:p>DOI</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M. Nygard, Release It! Design and Deploy Production-Ready Software. Pragmatic Bookshelf, 2007.</text:p>
          </table:table-cell>
          <table:table-cell table:style-name="ce4" office:value-type="string" calcext:value-type="string">
            <text:p><text:a xlink:href="https://www.torrossa.com/it/resources/an/5241265" xlink:type="simple">https://www.torrossa.com/it/resources/an/5241265</text:a></text:p>
          </table:table-cell>
          <table:table-cell table:style-name="ce1" table:number-columns-repeated="21"/>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Morris, Infrastructure as Code: Dynamic Systems for the Cloud. O'Reilly, 2020, vol. 2.</text:p>
          </table:table-cell>
          <table:table-cell table:style-name="ce5" office:value-type="string" calcext:value-type="string">
            <text:p><text:a xlink:href="https://books.google.com.br/books?hl=en&amp;lr=&amp;id=RVlOEQAAQBAJ&amp;oi=fnd&amp;pg=PP1&amp;ots=X9PHQgMePm&amp;sig=6k-dp06jKNwqEKfq94B7WJ2QyN8&amp;redir_esc=y#v=onepage&amp;q&amp;f=false" xlink:type="simple">https://books.google.com.br/books?hl=en&amp;lr=&amp;id=RVlOEQAAQBAJ&amp;oi=fnd&amp;pg=PP1&amp;ots=X9PHQgMePm&amp;sig=6k-dp06jKNwqEKfq94B7WJ2QyN8&amp;redir_esc=y#v=onepage&amp;q&amp;f=false</text:a></text:p>
          </table:table-cell>
          <table:table-cell table:style-name="ce1" table:number-columns-repeated="21"/>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M. Artac, T. Borovssak, E. Di Nitto, M. Guerriero, and D. A. Tamburri, “Devops: Introducing infrastructure-as-code,” in 2017 IEEE/ACM 39th International Conference on Software Engineering Companion (ICSE-C), 2017, pp. 497–498.</text:p>
          </table:table-cell>
          <table:table-cell table:style-name="ce4"/>
          <table:table-cell table:style-name="ce6" office:value-type="string" calcext:value-type="string">
            <text:p><text:a xlink:href="https://doi.org/10.1109/ICSE-C.2017.162" xlink:type="simple">https://doi.org/10.1109/ICSE-C.2017.162</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C. Richardson, “Apattern language for microservices,” http://1microservices.io/patterns/index.html, 2017.</text:p>
          </table:table-cell>
          <table:table-cell table:style-name="ce2" office:value-type="string" calcext:value-type="string">
            <text:p><text:a xlink:href="http://1microservices.io/patterns/index.html" xlink:type="simple">http://1microservices.io/patterns/index.html</text:a></text:p>
          </table:table-cell>
          <table:table-cell table:style-name="ce3"/>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O. Zimmermann, M. Stocker, U. Zdun, D. Luebke, and C. Pautasso, “Microservice API patterns,” https://microservice-api-patterns.org, 2019.</text:p>
          </table:table-cell>
          <table:table-cell table:style-name="ce2" office:value-type="string" calcext:value-type="string">
            <text:p><text:a xlink:href="https://microservice-api-patterns.org/" xlink:type="simple">https://microservice-api-patterns.org</text:a></text:p>
          </table:table-cell>
          <table:table-cell table:style-name="ce1" table:number-columns-repeated="21"/>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Skowronski, “Best practices for event-driven microservice architecture,” https:hackernoon.com/best-practices-for-event-driven-microservice-architecture=e034p211k2019.</text:p>
          </table:table-cell>
          <table:table-cell table:style-name="ce4" office:value-type="string" calcext:value-type="string">
            <text:p>https:hackernoon.com/best-practices-for-event-driven-microservice-architecture=e034p211k2019</text:p>
          </table:table-cell>
          <table:table-cell table:style-name="ce3"/>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Garcia, D. Popescu, G. Edwards, and N. Medvidovic, “Identifying architectural bad smells,” in 2009 13th European Conference on Software Maintenance and Reengineering, 2009, pp. 255–258.</text:p>
          </table:table-cell>
          <table:table-cell table:style-name="ce4"/>
          <table:table-cell table:style-name="ce6" office:value-type="string" calcext:value-type="string">
            <text:p><text:a xlink:href="https://doi.org/10.1109/CSMR.2009.59" xlink:type="simple">https://doi.org/10.1109/CSMR.2009.59</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2" office:value-type="string" calcext:value-type="string">
            <text:p><text:a xlink:href="http://eprints.cs.univie.ac.at/73387/" xlink:type="simple">E. Ntentos, U. Zdun, J. Soldani, and A. Brogi, “Assessing architecture conformance to coupling-related infrastructure-as-code best practices: Metrics and case studies,” in 16th European Conference on Software Architecture, ser. Software Architecture - 16th European Conference, ECSA 2022, Prague, Czech Republic, September 19?23, 2022, Proceedings, September 2022, pp. 101–116. [Online]. Available: http://eprints.cs.univie.ac.at/73387/.</text:a></text:p>
          </table:table-cell>
          <table:table-cell table:style-name="ce1"/>
          <table:table-cell table:style-name="ce6" office:value-type="string" calcext:value-type="string">
            <text:p><text:a xlink:href="https://doi.org/10.1007/978-3-031-16697-6_7" xlink:type="simple">https://doi.org/10.1007/978-3-031-16697-6_7</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T. Sharma, M. Fragkoulis, and D. Spinellis, “Does your configuration code smell? ” in Proceedings of the 13th International Conference on Mining Software Repositories, ser. MSR '16. New York, NY, USA : Association for Computing Machinery, 2016, p. 189–200.</text:p>
          </table:table-cell>
          <table:table-cell table:style-name="ce2" office:value-type="string" calcext:value-type="string">
            <text:p><text:a xlink:href="https://ieeexplore.ieee.org/document/7832899" xlink:type="simple">https://ieeexplore.ieee.org/document/7832899</text:a></text:p>
          </table:table-cell>
          <table:table-cell table:style-name="ce1" table:number-columns-repeated="21"/>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I. Kumara, M. Garriga, A. U. Romeu, D. Di Nucci, F. Palomba, D. A. Tamburri, and W.-J. Van Den Heuvel, “The do's and don'ts of infrastructure code: A systematic gray literature review,” Information and Software Technology, vol. 137, p. 106593, 2021.</text:p>
          </table:table-cell>
          <table:table-cell table:style-name="ce4"/>
          <table:table-cell table:style-name="ce2" office:value-type="string" calcext:value-type="string">
            <text:p><text:a xlink:href="https://doi.org/10.1016/j.infsof.2021.106593" xlink:type="simple">https://doi.org/10.1016/j.infsof.2021.106593</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Schwarz, A. Steffens, and H. Lichter, “Code smells in infrastructure as code,” in 2018 11th International Conference on the Quality of Information and Communications Technology (QUATIC), 2018, pp. 220–228.</text:p>
          </table:table-cell>
          <table:table-cell table:style-name="ce1"/>
          <table:table-cell table:style-name="ce6" office:value-type="string" calcext:value-type="string">
            <text:p><text:a xlink:href="https://doi.org/10.1109/QUATIC.2018.00040" xlink:type="simple">https://doi.org/10.1109/QUATIC.2018.00040</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I. Kumara, Z. Vasileiou, G. Meditskos, D. A. Tamburri, W.-J. Van Den Heuvel, A. Karakostas, S. Vrochidis, and I. Kompatsiaris, “Towards semantic detection of smells in cloud infrastructure code,” in Proceedings of the 10th International Conference on Web Intelligence, Mining and Semantics, ser. WIMS 2020. New York, NY, USA : Association for Computing Machinery, 2020, p. 63–67.</text:p>
          </table:table-cell>
          <table:table-cell table:style-name="ce1"/>
          <table:table-cell table:style-name="ce6" office:value-type="string" calcext:value-type="string">
            <text:p><text:a xlink:href="https://doi.org/10.1145/3405962.3405979" xlink:type="simple">https://doi.org/10.1145/3405962.3405979</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T. Sotiropoulos, D. Mitropoulos, and D. Spinellis, “Practical fault detection in puppet programs,” in Proceedings of the ACM/IEEE 42nd International Conference on Software Engineering, ser. ICSE '20. New York, NY, USA : Association for Computing Machinery, 2020, p. 26–37.</text:p>
          </table:table-cell>
          <table:table-cell table:style-name="ce2" office:value-type="string" calcext:value-type="string">
            <text:p><text:a xlink:href="https://ieeexplore.ieee.org/document/9284083" xlink:type="simple">https://ieeexplore.ieee.org/document/9284083</text:a></text:p>
          </table:table-cell>
          <table:table-cell table:style-name="ce3"/>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E. Van Der Bent, J. Hage, J. Visser, and G. Gousios, “How good is your puppet? an empirically defined and validated quality model for puppet,” in 2018 IEEE 25th International Conference on Software Analysis, Evolution and Reengineering (SANER), 2018, pp. 164–174.</text:p>
          </table:table-cell>
          <table:table-cell table:style-name="ce1"/>
          <table:table-cell table:style-name="ce6" office:value-type="string" calcext:value-type="string">
            <text:p><text:a xlink:href="https://doi.org/10.1109/SANER.2018.8330206" xlink:type="simple">https://doi.org/10.1109/SANER.2018.8330206</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O. Kopp, and F. Leymann, “An approach to automatically detect problems in restructured deployment models based on formalizing architecture and design patterns,” SICS Softw-Inensiv. Cyber-Phys. Syst. 34, p. 85–97, 2019.</text:p>
          </table:table-cell>
          <table:table-cell table:style-name="ce4"/>
          <table:table-cell table:style-name="ce6" office:value-type="string" calcext:value-type="string">
            <text:p><text:a xlink:href="https://doi.org/10.1007/s00450-019-00397-7" xlink:type="simple">https://doi.org/10.1007/s00450-019-00397-7</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M. Falkenthal, L. Harzenetter, and F. Leymann, “An approach to determine &amp; apply solutions to solve detected problems in restructured deployment models using first-order logic,” in International Conference on Cloud Computing and Services Science, 2019.</text:p>
          </table:table-cell>
          <table:table-cell table:style-name="ce1"/>
          <table:table-cell table:style-name="ce2" office:value-type="string" calcext:value-type="string">
            <text:p><text:a xlink:href="http://doi.org/10.5220/0007763204950506" xlink:type="simple">http://doi.org/10.5220/0007763204950506</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O. Kopp, and F. Leymann, “Application scenarios for automated problem detection in tosca topologies by for-malized patterns,” in Papers From the 12th Advanced Summer School on Service-Oriented Computing (SummerSOC'18). IBM Research Division, 2018, pp. 43–53.</text:p>
          </table:table-cell>
          <table:table-cell table:style-name="ce2" office:value-type="string" calcext:value-type="string">
            <text:p><text:a xlink:href="https://www.iaas.uni-stuttgart.de/publications/INPROC-2018-33-Application-Scenarios-for-Automated-Problem-Detection-in-TOSCA-Topologies-by-Formalized-Patterns.pdf" xlink:type="simple">https://www.iaas.uni-stuttgart.de/publications/INPROC-2018-33-Application-Scenarios-for-Automated-Problem-Detection-in-TOSCA-Topologies-by-Formalized-Patterns.pdf</text:a></text:p>
          </table:table-cell>
          <table:table-cell table:style-name="ce3"/>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M. P. Fischer, U. Breitenbücher, K. Képes, and F. Leymann, “Towards an approach for automatically checking compliance rules in deployment models,” in Proceedings of The Eleventh International Conference on Emerging Security Information, Systems and Technologies (SECUR-WARE). Xpert Publishing Services (XPS), 2017, pp. 150–153.</text:p>
          </table:table-cell>
          <table:table-cell table:style-name="ce4" office:value-type="string" calcext:value-type="string">
            <text:p><text:a xlink:href="https://www.iaas.uni-stuttgart.de/publications/INPROC-2017-47-Towards-an-Approach-for-Automatically-Checking-Compliance-Rules-in-Deployment-Models.pdf" xlink:type="simple">https://www.iaas.uni-stuttgart.de/publications/INPROC-2017-47-Towards-an-Approach-for-Automatically-Checking-Compliance-Rules-in-Deployment-Models.pdf</text:a></text:p>
          </table:table-cell>
          <table:table-cell table:style-name="ce1" table:number-columns-repeated="21"/>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C. Krieger, U. Breitenbücher, K. Képes, and F. Leymann, “An Approach to Automatically Check the Compliance of Declarative Deployment Models,” in Papers from the 12th Advanced Summer School on Service-Oriented Computing (SummerSoC 2018). IBM Research Division, Oktober 2018, Konferenz-Beitrag, pp. 76–89.</text:p>
          </table:table-cell>
          <table:table-cell table:style-name="ce2" office:value-type="string" calcext:value-type="string">
            <text:p><text:a xlink:href="https://www.iaas.uni-stuttgart.de/publications/INPROC-2018-42-An-Approach-to-Automatically-Check-the-Compliance-of-Declarative-Deployment-Models.pdf" xlink:type="simple">https://www.iaas.uni-stuttgart.de/publications/INPROC-2018-42-An-Approach-to-Automatically-Check-the-Compliance-of-Declarative-Deployment-Models.pdf</text:a></text:p>
          </table:table-cell>
          <table:table-cell table:style-name="ce3"/>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M. Weller, U. Breitenbücher, S. Speth, and S. Becker, “The deployment model abstraction framework. ”.</text:p>
          </table:table-cell>
          <table:table-cell table:style-name="ce4"/>
          <table:table-cell table:style-name="ce6" office:value-type="string" calcext:value-type="string">
            <text:p><text:a xlink:href="https://doi.org/10.1007/978-3-031-26886-1_19" xlink:type="simple">https://doi.org/10.1007/978-3-031-26886-1_19</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Garcia, D. Popescu, G. Edwards, and N. Medvidovic, “Identifying architectural bad smells,” in 2009 13th European Conference on Software Maintenance and Reengineering, 2009, pp. 255–258.</text:p>
          </table:table-cell>
          <table:table-cell table:style-name="ce1"/>
          <table:table-cell table:style-name="ce5" office:value-type="string" calcext:value-type="string">
            <text:p><text:a xlink:href="https://doi.org/10.1109/CSMR.2009.59" xlink:type="simple">https://doi.org/10.1109/CSMR.2009.59</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Garcia, D. Popescu, G. Edwards, and N. Medvidovic, “Toward a catalogue of architectural bad smells,” in Architectures for Adaptive Software Systems, R. Mirandola, I. Gorton, and C. Hofmeister, Eds. Berlin, Heidelberg : Springer Berlin Heidelberg, 2009, pp. 146–162.</text:p>
          </table:table-cell>
          <table:table-cell table:style-name="ce1"/>
          <table:table-cell table:style-name="ce5" office:value-type="string" calcext:value-type="string">
            <text:p><text:a xlink:href="https://doi.org/10.1007/978-3-642-02351-4_10" xlink:type="simple">https://doi.org/10.1007/978-3-642-02351-4_10</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D. M. Le, D. Link, A. Shahbazian, and N. Medvidovic, “An empirical study of architectural decay in open-source software,” in 2018 IEEE International Conference on Software Architecture (ICSA), 2018, pp. 176–17609.</text:p>
          </table:table-cell>
          <table:table-cell table:style-name="ce4"/>
          <table:table-cell table:style-name="ce5" office:value-type="string" calcext:value-type="string">
            <text:p><text:a xlink:href="https://doi.org/10.1109/ICSA.2018.00027" xlink:type="simple">https://doi.org/10.1109/ICSA.2018.00027</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R. Marinescu, “Detection strategies: metrics-based rules for detecting design flaws,” in 20th IEEE International Conference on Software Maintenance, 2004. Proceedings., 2004, pp. 350–359.</text:p>
          </table:table-cell>
          <table:table-cell table:style-name="ce4"/>
          <table:table-cell table:style-name="ce5" office:value-type="string" calcext:value-type="string">
            <text:p><text:a xlink:href="https://doi.org/10.1109/ICSM.2004.1357820" xlink:type="simple">https://doi.org/10.1109/ICSM.2004.1357820</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Garcia, D. Popescu, C. Mattmann, N. Medvidovic, and Yuanfang Cai, “Enhancing architectural recovery using concerns,” in 2011 26th IEEE/ACM International Conference on Automated Software Engineering (ASE 2011), 2011, pp. 552–555.</text:p>
          </table:table-cell>
          <table:table-cell table:style-name="ce4"/>
          <table:table-cell table:style-name="ce5" office:value-type="string" calcext:value-type="string">
            <text:p><text:a xlink:href="https://doi.org/10.1109/ASE.2011.6100123" xlink:type="simple">https://doi.org/10.1109/ASE.2011.6100123</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U. Zdun, E. Navarro, and F. Leymann, “Ensuring and assessing ar-chitecture conformance to micro service decomposition patterns,” in Service-Oriented Computing, M. Maximilien, A. Vallecillo, J. Wang, and M. Oriol, Eds. Cham : Springer International Publishing, 2017, pp. 411–429.</text:p>
          </table:table-cell>
          <table:table-cell table:style-name="ce4"/>
          <table:table-cell table:style-name="ce5" office:value-type="string" calcext:value-type="string">
            <text:p><text:a xlink:href="https://doi.org/10.1007/978-3-319-69035-3_29" xlink:type="simple">https://doi.org/10.1007/978-3-319-69035-3_29</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VERDET, Alexandre et al. Assessing the adoption of security policies by developers in terraform across different cloud providers. Empirical Software Engineering, v. 30, n. 3, p. 74, 2025.</text:p>
          </table:table-cell>
          <table:table-cell table:style-name="ce4"/>
          <table:table-cell table:style-name="ce5" office:value-type="string" calcext:value-type="string">
            <text:p><text:a xlink:href="https://doi.org/10.1007/s10664-024-10610-0" xlink:type="simple">https://doi.org/10.1007/s10664-024-10610-0</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OPDEBEECK, Ruben. Static analysis for quality assurance of Ansible infrastructure-as-code artefacts. 2024.</text:p>
          </table:table-cell>
          <table:table-cell table:style-name="ce2" office:value-type="string" calcext:value-type="string">
            <text:p><text:a xlink:href="https://www.researchgate.net/profile/Ruben_Opdebeeck/publication/385966036_Static_Analysis_for_Quality_Assurance_of_Ansible_Infrastructure-as-Code_Artefacts/links/673dad3988177c79e83b91c2/Static-Analysis-for-Quality-Assurance-of-Ansible-Infrastructure-as-Code-Artefacts.pdf" xlink:type="simple">https://www.researchgate.net/profile/Ruben_Opdebeeck/publication/385966036_Static_Analysis_for_Quality_Assurance_of_Ansible_Infrastructure-as-Code_Artefacts/links/673dad3988177c79e83b91c2/Static-Analysis-for-Quality-Assurance-of-Ansible-Infrastructure-as-Code-Artefacts.pdf</text:a></text:p>
          </table:table-cell>
          <table:table-cell table:style-name="ce1" table:number-columns-repeated="21"/>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Forward</text:p>
          </table:table-cell>
          <table:table-cell table:style-name="ce3" office:value-type="string" calcext:value-type="string">
            <text:p>FALAZI, Ghareeb. Service-oriented integration of blockchain smart contracts. 2025. Tese de Doutorado. Dissertation, Stuttgart, Universität Stuttgart, 2025.</text:p>
          </table:table-cell>
          <table:table-cell table:style-name="ce5" office:value-type="string" calcext:value-type="string">
            <text:p><text:a xlink:href="https://elib.uni-stuttgart.de/server/api/core/bitstreams/4ab51bc8-4c6a-4478-bd6f-17e8ddacfad2/content" xlink:type="simple">https://elib.uni-stuttgart.de/server/api/core/bitstreams/4ab51bc8-4c6a-4478-bd6f-17e8ddacfad2/content</text:a></text:p>
          </table:table-cell>
          <table:table-cell table:style-name="ce1" table:number-columns-repeated="21"/>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Forward</text:p>
          </table:table-cell>
          <table:table-cell table:style-name="ce3" office:value-type="string" calcext:value-type="string">
            <text:p>GRAHAM, Lucas; DZIELSKI, Dale; ALSHEHRI, Yasser. Architecture Technical Debt Management and Prioritization: A Systematic Mapping Study. In: International Conference on Computational Science and Computational Intelligence. Cham: Springer Nature Switzerland, 2024. p. 263-281.</text:p>
          </table:table-cell>
          <table:table-cell table:style-name="ce1"/>
          <table:table-cell table:style-name="ce5" office:value-type="string" calcext:value-type="string">
            <text:p><text:a xlink:href="https://doi.org/10.1007/978-3-031-95127-5_20" xlink:type="simple">https://doi.org/10.1007/978-3-031-95127-5_20</text:a></text:p>
          </table:table-cell>
          <table:table-cell table:style-name="ce1" table:number-columns-repeated="20"/>
          <table:table-cell table:number-columns-repeated="999"/>
        </table:table-row>
        <table:table-row table:style-name="ro1">
          <table:table-cell table:style-name="ce1"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BOLHUIS, Koen. Catching Cost Issues in Infrastructure as Code Artifacts using Linters. 2024. Tese de Doutorado.</text:p>
          </table:table-cell>
          <table:table-cell table:style-name="ce1" table:number-columns-repeated="22"/>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8">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4">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917">
          <table:table-cell table:style-name="ce1" table:number-columns-repeated="25"/>
          <table:table-cell table:number-columns-repeated="999"/>
        </table:table-row>
        <table:table-row table:style-name="ro2" table:number-rows-repeated="104757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8" meta:object-count="0"/>
    <meta:generator>LibreOfficeDev/6.0.5.2$Linux_X86_64 LibreOffice_project/</meta:generator>
  </office:meta>
</office:document-meta>
</file>