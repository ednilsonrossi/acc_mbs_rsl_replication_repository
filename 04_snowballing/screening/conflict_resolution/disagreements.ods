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84.05pt"/>
    </style:style>
    <style:style style:name="co4" style:family="table-column">
      <style:table-column-properties fo:break-before="auto" style:column-width="22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2" style:apply-style-name="ConditionalStyle_5f_1" style:base-cell-address="Página1.P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2" style:apply-style-name="ConditionalStyle_5f_1" style:base-cell-address="Página1.P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office:value-type="string" calcext:value-type="string">
            <text:p>Status</text:p>
          </table:table-cell>
          <table:table-cell table:style-name="ce1" office:value-type="string" calcext:value-type="string">
            <text:p>selection_criteria</text:p>
          </table:table-cell>
          <table:table-cell table:style-name="ce1" office:value-type="string" calcext:value-type="string">
            <text:p>claude_decision</text:p>
          </table:table-cell>
          <table:table-cell table:style-name="ce1" office:value-type="string" calcext:value-type="string">
            <text:p>claude_exclusion_criterion</text:p>
          </table:table-cell>
          <table:table-cell table:style-name="ce1" office:value-type="string" calcext:value-type="string">
            <text:p>claude_justification</text:p>
          </table:table-cell>
          <table:table-cell table:style-name="ce1" office:value-type="string" calcext:value-type="string">
            <text:p>gemini_decision</text:p>
          </table:table-cell>
          <table:table-cell table:style-name="ce1" office:value-type="string" calcext:value-type="string">
            <text:p>gemini_exclusion_criterion</text:p>
          </table:table-cell>
          <table:table-cell table:style-name="ce1" office:value-type="string" calcext:value-type="string">
            <text:p>gemini_justification</text:p>
          </table:table-cell>
          <table:table-cell table:style-name="ce4" office:value-type="string" calcext:value-type="string">
            <text:p>score</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3" office:value-type="string" calcext:value-type="string">
            <text:p><text:a xlink:href="https://doi.org/10.1007/978-3-030-86044-8_15" xlink:type="simple">https://doi.org/10.1007/978-3-030-86044-8_1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detecting cyclic dependencies in microservice APIs rather than conformance checking against an intended architecture.</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2]=&quot;Rejected&quot;;2;0) + IF([.J2]=&quot;REJECTED&quot;;1;0) + IF([.M2]=&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3" office:value-type="string" calcext:value-type="string">
            <text:p><text:a xlink:href="https://doi.org/10.1109/IPCCC59175.2023.10253880" xlink:type="simple">https://doi.org/10.1109/IPCCC59175.2023.1025388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valuates microservice decomposition results using fuzzy hierarchy analysis, not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3]=&quot;Rejected&quot;;2;0) + IF([.J3]=&quot;REJECTED&quot;;1;0) + IF([.M3]=&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3" office:value-type="string" calcext:value-type="string">
            <text:p><text:a xlink:href="https://doi.org/10.1109/MS.2017.24" xlink:type="simple">https://doi.org/10.1109/MS.2017.24</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is a practitioner discussion on microservice design experiences and prediction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4]=&quot;Rejected&quot;;2;0) + IF([.J4]=&quot;REJECTED&quot;;1;0) + IF([.M4]=&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3" office:value-type="string" calcext:value-type="string">
            <text:p><text:a xlink:href="http://doi.org/10.5220/0012851200003753" xlink:type="simple">http://doi.org/10.5220/0012851200003753</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organizational smells in DevOps team assignments for microservic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5]=&quot;Rejected&quot;;2;0) + IF([.J5]=&quot;REJECTED&quot;;1;0) + IF([.M5]=&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3" office:value-type="string" calcext:value-type="string">
            <text:p><text:a xlink:href="https://doi.org/10.1109/FiCloud57274.2022.00042" xlink:type="simple">https://doi.org/10.1109/FiCloud57274.2022.00042</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graph-based approach to resolve cyclic dependencies in microservices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6]=&quot;Rejected&quot;;2;0) + IF([.J6]=&quot;REJECTED&quot;;1;0) + IF([.M6]=&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3" office:value-type="string" calcext:value-type="string">
            <text:p><text:a xlink:href="https://doi.org/10.1109/SOSE55356.2022.00009" xlink:type="simple">https://doi.org/10.1109/SOSE55356.2022.0000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the impact of API rate limiting on microservice reliability properti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7]=&quot;Rejected&quot;;2;0) + IF([.J7]=&quot;REJECTED&quot;;1;0) + IF([.M7]=&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3" office:value-type="string" calcext:value-type="string">
            <text:p><text:a xlink:href="https://doi.org/10.5753/sbcars.2008.46220" xlink:type="simple">https://doi.org/10.5753/sbcars.2008.4622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The abstract is written in Portuguese, not English.</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8]=&quot;Rejected&quot;;2;0) + IF([.J8]=&quot;REJECTED&quot;;1;0) + IF([.M8]=&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3" office:value-type="string" calcext:value-type="string">
            <text:p><text:a xlink:href="https://doi.org/10.1109/COMPSAC.2018.10207" xlink:type="simple">https://doi.org/10.1109/COMPSAC.2018.1020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ervice dependency graph generation for testing microservice architectur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9]=&quot;Rejected&quot;;2;0) + IF([.J9]=&quot;REJECTED&quot;;1;0) + IF([.M9]=&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3" office:value-type="string" calcext:value-type="string">
            <text:p><text:a xlink:href="https://doi.org/10.1007/978-3-031-70797-1_9" xlink:type="simple">https://doi.org/10.1007/978-3-031-70797-1_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evaluating microservice design for performance prediction rather tha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0]=&quot;Rejected&quot;;2;0) + IF([.J10]=&quot;REJECTED&quot;;1;0) + IF([.M10]=&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3" office:value-type="string" calcext:value-type="string">
            <text:p><text:a xlink:href="https://doi.org/10.1109/ICSA.2018.00027" xlink:type="simple">https://doi.org/10.1109/ICSA.2018.0002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tudying architectural smells and decay trends empirically, not on conformance checking between intended and implemented architectures.</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1]=&quot;Rejected&quot;;2;0) + IF([.J11]=&quot;REJECTED&quot;;1;0) + IF([.M11]=&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3" office:value-type="string" calcext:value-type="string">
            <text:p><text:a xlink:href="https://doi.org/10.1109/ICSM.2004.1357820" xlink:type="simple">https://doi.org/10.1109/ICSM.2004.135782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metrics-based detection strategies for OO design flaws without addressing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2]=&quot;Rejected&quot;;2;0) + IF([.J12]=&quot;REJECTED&quot;;1;0) + IF([.M12]=&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3" office:value-type="string" calcext:value-type="string">
            <text:p><text:a xlink:href="https://doi.org/10.1109/WICSA.2016.15" xlink:type="simple">https://doi.org/10.1109/WICSA.2016.1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xplores the relationship between architectural decay and system sustainability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3]=&quot;Rejected&quot;;2;0) + IF([.J13]=&quot;REJECTED&quot;;1;0) + IF([.M13]=&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3" office:value-type="string" calcext:value-type="string">
            <text:p><text:a xlink:href="https://doi.org/10.1007/978-3-031-46235-1_19" xlink:type="simple">https://doi.org/10.1007/978-3-031-46235-1_1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dependency matrix for tracking microservice dependencies without addressing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4]=&quot;Rejected&quot;;2;0) + IF([.J14]=&quot;REJECTED&quot;;1;0) + IF([.M14]=&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3" office:value-type="string" calcext:value-type="string">
            <text:p><text:a xlink:href="https://ceur-ws.org/Vol-3655/ISE2023_06_Primadani_Measuring_Modularity.pdf" xlink:type="simple">https://ceur-ws.org/Vol-3655/ISE2023_06_Primadani_Measuring_Modularity.pdf</text:a></text:p>
          </table:table-cell>
          <table:table-cell table:style-name="ce1"/>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coupling and cohesion metrics for JavaScript-based microservices, not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5]=&quot;Rejected&quot;;2;0) + IF([.J15]=&quot;REJECTED&quot;;1;0) + IF([.M15]=&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3" office:value-type="string" calcext:value-type="string">
            <text:p><text:a xlink:href="https://doi.org/10.1007/978-3-319-73897-0_10" xlink:type="simple">https://doi.org/10.1007/978-3-319-73897-0_1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provides a general overview of software architecture past, present and future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6]=&quot;Rejected&quot;;2;0) + IF([.J16]=&quot;REJECTED&quot;;1;0) + IF([.M16]=&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3" office:value-type="string" calcext:value-type="string">
            <text:p><text:a xlink:href="https://doi.org/10.1016/j.jss.2009.01.039" xlink:type="simple">https://doi.org/10.1016/j.jss.2009.01.03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formal models for managing architectural decision dependencies, not for conformance checking.</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5" table:formula="of:=IF([.H17]=&quot;Rejected&quot;;2;0) + IF([.J17]=&quot;REJECTED&quot;;1;0) + IF([.M17]=&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3" office:value-type="string" calcext:value-type="string">
            <text:p><text:a xlink:href="https://doi.org/10.1109/SOSE55356.2022.00011" xlink:type="simple">https://doi.org/10.1109/SOSE55356.2022.00011</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review of microservice architecture reconstruction and visualization techniques.</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8]=&quot;Rejected&quot;;2;0) + IF([.J18]=&quot;REJECTED&quot;;1;0) + IF([.M18]=&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3" office:value-type="string" calcext:value-type="string">
            <text:p><text:a xlink:href="https://doi.org/10.1109/APSEC48747.2019.00031" xlink:type="simple">https://doi.org/10.1109/APSEC48747.2019.00031</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version-based monitoring and visualization of microservice dependency graph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9]=&quot;Rejected&quot;;2;0) + IF([.J19]=&quot;REJECTED&quot;;1;0) + IF([.M19]=&quot;REJECTED&quot;;1;0)" office:value-type="float" office:value="2" calcext:value-type="float">
            <text:p>2</text:p>
          </table:table-cell>
          <table:table-cell table:style-name="ce1" table:number-columns-repeated="12"/>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3" office:value-type="string" calcext:value-type="string">
            <text:p><text:a xlink:href="https://doi.org/10.1145/3368089.3417066" xlink:type="simple">https://doi.org/10.1145/3368089.3417066</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trace analysis for understanding microservice architectures and diagnosing runtime problems, not for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20]=&quot;Rejected&quot;;2;0) + IF([.J20]=&quot;REJECTED&quot;;1;0) + IF([.M20]=&quot;REJECTED&quot;;1;0)" office:value-type="float" office:value="2" calcext:value-type="float">
            <text:p>2</text:p>
          </table:table-cell>
          <table:table-cell table:style-name="ce1" table:number-columns-repeated="12"/>
          <table:table-cell table:number-columns-repeated="996"/>
        </table:table-row>
        <table:table-row table:style-name="ro1" table:number-rows-repeated="36">
          <table:table-cell table:style-name="ce1" table:number-columns-repeated="15"/>
          <table:table-cell table:style-name="ce5"/>
          <table:table-cell table:style-name="ce1" table:number-columns-repeated="12"/>
          <table:table-cell table:number-columns-repeated="996"/>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AB$56"/>
        </table:named-expressions>
        <calcext:conditional-formats>
          <calcext:conditional-format calcext:target-range-address="Página1.P1:Página1.P56">
            <calcext:condition calcext:apply-style-name="ConditionalStyle_1" calcext:value="&lt;=2" calcext:base-cell-address="Página1.P1"/>
          </calcext:conditional-format>
        </calcext:conditional-formats>
      </table:table>
      <table:named-expressions/>
      <table:database-ranges>
        <table:database-range table:name="__Anonymous_Sheet_DB__0" table:target-range-address="Página1.A1:Página1.AB5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ce8b2"/>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82" meta:object-count="0"/>
    <meta:generator>LibreOfficeDev/6.0.5.2$Linux_X86_64 LibreOffice_project/</meta:generator>
  </office:meta>
</office:document-meta>
</file>