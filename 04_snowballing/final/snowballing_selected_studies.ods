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202.11pt"/>
    </style:style>
    <style:style style:name="co4" style:family="table-column">
      <style:table-column-properties fo:break-before="auto" style:column-width="137.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Página1.H1"/>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cepted&quot;" style:apply-style-name="ConditionalStyle_5f_1" style:base-cell-address="Página1.H1"/>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Title</text:p>
          </table:table-cell>
          <table:table-cell table:style-name="ce1" office:value-type="string" calcext:value-type="string">
            <text:p>Abstract</text:p>
          </table:table-cell>
          <table:table-cell table:style-name="ce1" office:value-type="string" calcext:value-type="string">
            <text:p>External Link</text:p>
          </table:table-cell>
          <table:table-cell table:style-name="ce1" office:value-type="string" calcext:value-type="string">
            <text:p>DOI</text:p>
          </table:table-cell>
          <table:table-cell table:style-name="ce5" office:value-type="string" calcext:value-type="string">
            <text:p>Status</text:p>
          </table:table-cell>
          <table:table-cell table:style-name="ce1" office:value-type="string" calcext:value-type="string">
            <text:p>selection_criteria</text:p>
          </table:table-cell>
          <table:table-cell table:style-name="ce1" table:number-columns-repeated="10"/>
          <table:table-cell table:number-columns-repeated="1005"/>
        </table:table-row>
        <table:table-row table:style-name="ro1">
          <table:table-cell table:style-name="ce1" office:value-type="float" office:value="1" calcext:value-type="float">
            <text:p>1</text:p>
          </table:table-cell>
          <table:table-cell table:style-name="ce1" office:value-type="string" calcext:value-type="string">
            <text:p>Forward</text:p>
          </table:table-cell>
          <table:table-cell table:style-name="ce1" office:value-type="string" calcext:value-type="string">
            <text:p>KONERSMANN, Marco. Towards a semantically useful definition of conformance with a reference model. 2023.</text:p>
          </table:table-cell>
          <table:table-cell table:style-name="ce1" office:value-type="string" calcext:value-type="string">
            <text:p>Towards a semantically useful definition of conformance with a reference model</text:p>
          </table:table-cell>
          <table:table-cell table:style-name="ce1" office:value-type="string" calcext:value-type="string">
            <text:p>In software engineering, reference models are used as guidance for implementing potential solutions to recurring problems, such as reference architecture models or reference data models. Despite their broad use in practice, there is no clear definition for what it means for a concrete model to conform to a reference model, hindering the development of automated tools for conformance checking. This paper provides a semantically useful definition of conformance of concrete models to reference models. It presents concepts and tools for automated conformance checks for class diagrams, feature diagrams, and state charts, developed based on this definition. The paper discusses the commonalities and differences of the presented automated conformance checks and general design considerations for developing reference model conformance checkers in the context of model-driven engineering. Key findings include that reference models should use the same language as their concrete models, conformance checks require conformance mappings between reference and concrete model elements, and conformance rules must be based on formally defined language semantics.</text:p>
          </table:table-cell>
          <table:table-cell table:style-name="ce1"/>
          <table:table-cell table:style-name="ce3" office:value-type="string" calcext:value-type="string">
            <text:p><text:a xlink:href="http://dx.doi.org/10.5381/jot.2024.23.3.a5" xlink:type="simple">http://dx.doi.org/10.5381/jot.2024.23.3.a5</text:a></text:p>
          </table:table-cell>
          <table:table-cell table:style-name="ce6" office:value-type="string" calcext:value-type="string">
            <text:p>Accepted</text:p>
          </table:table-cell>
          <table:table-cell table:style-name="ce1" office:value-type="string" calcext:value-type="string">
            <text:p>Studies that propose, analyze, or evaluate methods, techniques, approaches, tools, or frameworks for ACC.</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ENGEL, Thomas et al. Evaluation of microservice architectures: A metric and tool-based approach. In: International Conference on Advanced Information Systems Engineering. Cham: Springer International Publishing, 2018. p. 74-89.</text:p>
          </table:table-cell>
          <table:table-cell table:style-name="ce1" office:value-type="string" calcext:value-type="string">
            <text:p>Evaluation of microservice architectures: A metric and tool-based approach</text:p>
          </table:table-cell>
          <table:table-cell table:style-name="ce1" office:value-type="string" calcext:value-type="string">
            <text:p>Microservices are an architectural style that decomposes the functionality of an application system into several small functional units. The services are implemented and managed independently from each other. Breaking up monolithic structures into a microservice architecture increases the number of single components massively. Thus, effective management of the dependencies between them is required. This task can be supported with the creation and evaluation of architectural models. In this work, we propose an evaluation approach for microservice architectures based on identified architecture principles from research and practice like a small size of the services, a domain-driven design or loose coupling. Based on a study showing the challenges in current microservice architectures, we derived principles and metrics for the evaluation of the architectural design. The required architecture data is captured with a reverse engineering approach from traces of communication data. The developed tool is finally evaluated within a case study.</text:p>
          </table:table-cell>
          <table:table-cell table:style-name="ce1"/>
          <table:table-cell table:style-name="ce4" office:value-type="string" calcext:value-type="string">
            <text:p><text:a xlink:href="https://doi.org/10.1007/978-3-319-92901-9_8" xlink:type="simple">https://doi.org/10.1007/978-3-319-92901-9_8</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2" calcext:value-type="float">
            <text:p>2</text:p>
          </table:table-cell>
          <table:table-cell table:style-name="ce1" office:value-type="string" calcext:value-type="string">
            <text:p>Forward</text:p>
          </table:table-cell>
          <table:table-cell table:style-name="ce1" office:value-type="string" calcext:value-type="string">
            <text:p>GIALLORENZO, Saverio et al. A Toolchain for Checking Domain-and Model-Driven Properties of Jolie Microservices. In: International Conference on Service-Oriented Computing. Singapore: Springer Nature Singapore, 2024. p. 161-175.</text:p>
          </table:table-cell>
          <table:table-cell table:style-name="ce1" office:value-type="string" calcext:value-type="string">
            <text:p>A Toolchain for Checking Domain-and Model-Driven Properties of Jolie Microservices</text:p>
          </table:table-cell>
          <table:table-cell table:style-name="ce1" office:value-type="string" calcext:value-type="string">
            <text:p>We present Jolie Checker Toolchain (JCT), a plugin-based toolchain for model-code consistency and compliance analysis aimed at helping developers ensure that evolving implementations of Jolie microservices remain aligned with their intended architectural design—specified with domain- and model-driven engineering approaches like LEMMA and MDSL. One of JCT’s strengths lies in providing a uniform surface for plugin development, based on the analysis of abstract syntax trees, that leverages existing code generation tools, framing checks as correspondence relations between the expected and actual programs. We present two JCT plugins to respectively check the consistency of domain-driven design annotations on Jolie APIs and verify Jolie code conformity to a given LEMMA data model. We illustrate both plugins via a use case drawn from the Lakeside Mutual architecture.</text:p>
          </table:table-cell>
          <table:table-cell table:style-name="ce1"/>
          <table:table-cell table:style-name="ce4" office:value-type="string" calcext:value-type="string">
            <text:p><text:a xlink:href="https://doi.org/10.1007/978-981-96-0808-9_13" xlink:type="simple">https://doi.org/10.1007/978-981-96-0808-9_13</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FARSI, Hassan et al. A graph-based solution to deal with cyclic dependencies in microservices architecture. In: 2022 9th International Conference on Future Internet of Things and Cloud (FiCloud). IEEE, 2022. p. 254-259.</text:p>
          </table:table-cell>
          <table:table-cell table:style-name="ce1" office:value-type="string" calcext:value-type="string">
            <text:p>A graph-based solution to deal with cyclic dependencies in microservices architecture</text:p>
          </table:table-cell>
          <table:table-cell table:style-name="ce1" office:value-type="string" calcext:value-type="string">
            <text:p>Microservices represents the most suitable architectural style to create cloud-native applications. Microservices is implemented by distributing the development to many small independent teams. Each team can make progress more independently of the others. That is what gives big organizations the ability to properly scale development in order to ensure the very demanding needs of their customers. However, it is actually quite difficult to achieve this desired “decoupled independence” of services since many anti-patterns can lead to opposite results. One of these classical anti-patterns is called “Cyclic Dependencies”. In this paper, we provide a graph-based proposal that focuses on laying the foundations for solutions aiming to assist architects at design time to automatically detect the Cyclic Dependencies anti-pattern in microservices.</text:p>
          </table:table-cell>
          <table:table-cell table:style-name="ce1"/>
          <table:table-cell table:style-name="ce4" office:value-type="string" calcext:value-type="string">
            <text:p><text:a xlink:href="https://doi.org/10.1109/FiCloud57274.2022.00042" xlink:type="simple">https://doi.org/10.1109/FiCloud57274.2022.00042</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3" calcext:value-type="float">
            <text:p>3</text:p>
          </table:table-cell>
          <table:table-cell table:style-name="ce1" office:value-type="string" calcext:value-type="string">
            <text:p>Forward</text:p>
          </table:table-cell>
          <table:table-cell table:style-name="ce1" office:value-type="string" calcext:value-type="string">
            <text:p>SUN, Chang-Ai et al. Detecting inconsistencies in microservice-based systems: An annotation-assisted scenario-oriented approach. IEEE Transactions on Services Computing, v. 17, n. 5, p. 2194-2209, 2024.</text:p>
          </table:table-cell>
          <table:table-cell table:style-name="ce1" office:value-type="string" calcext:value-type="string">
            <text:p>Detecting inconsistencies in microservice-based systems: An annotation-assisted scenario-oriented approach</text:p>
          </table:table-cell>
          <table:table-cell table:style-name="ce1" office:value-type="string" calcext:value-type="string">
            <text:p>Microservice architecture (MSA) has been widely adopted to develop various large-scale distributed systems. Microservice-based systems (MBSs) comprise a number of independently deployed microservices fulfilling the specific functionalities. Unique characteristics of microservices, such as independent and parallel development, rapid iteration, and distributed deployment, result in low observability and reliability of MBSs. A typical solution is to regulate system behavior in specifications of MBSs, and then develop and test MBSs based on these specifications. However, current microservice specifications focus on describing the APIs of microservices without describing the behavior expectation for an MBS. In this article, we propose an annotation-assisted and scenario-oriented approach, called MSA_Sighter, to detect behavior inconsistencies in MBSs. In MSA_Sighter, the details of an MBS are captured in a description model (MSDM), which can be extracted automatically from the functional services through annotation-assisted runtime component instance analysis and static program analysis. Given a specific business scenario, inconsistency detection is conducted by analyzing the actual behavior's conformance to the expected behavior, where the former is collected through distributed tracing while the latter is derived from the MSDM. We have developed a supporting tool called ConsChecker and evaluated MSA_Sighter's effectiveness on three open-source MBSs in GitHub. The experimental results have shown that MSA_Sighter can effectively detect inconsistencies in MBSs during system development and evolution.</text:p>
          </table:table-cell>
          <table:table-cell table:style-name="ce1"/>
          <table:table-cell table:style-name="ce4" office:value-type="string" calcext:value-type="string">
            <text:p><text:a xlink:href="https://doi.org/10.1109/TSC.2024.3399652" xlink:type="simple">https://doi.org/10.1109/TSC.2024.3399652</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DAMS, Lauren et al. Evolution and anti-patterns visualized: Microprospect in microservice architecture. In: European Conference on Software Architecture. Cham: Springer Nature Switzerland, 2023. p. 309-325.</text:p>
          </table:table-cell>
          <table:table-cell table:style-name="ce1" office:value-type="string" calcext:value-type="string">
            <text:p>Evolution and anti-patterns visualized: Microprospect in microservice architecture</text:p>
          </table:table-cell>
          <table:table-cell table:style-name="ce1" office:value-type="string" calcext:value-type="string">
            <text:p>A microservice architecture has become the dominant direction for designing the building blocks of large-scale, distributed software systems. However, the dynamic and changing microservices within decentralized systems in contrast to available static tracing tools presents challenges for comprehending its impact on the overall architecture. Existing tracing tools uncover service call graphs but have limitations in visualizing historical changes; moreover, they are not meant to aid with architecture assessment where developers seek potential design anomalies. With the ever-growing system complexity, developers likely resort to focusing on specific subsets of the system, especially given the lack of tools to analyze the impacts of system evolution. To address these challenges, we introduce the MicroProspect tool that provides a high-level, holistic visual perspective on the system’s service view, tracks its structural changes throughout system evolution, and detects and visualizes anti-patterns that could lead to architectural degradation.</text:p>
          </table:table-cell>
          <table:table-cell table:style-name="ce1"/>
          <table:table-cell table:style-name="ce4" office:value-type="string" calcext:value-type="string">
            <text:p><text:a xlink:href="https://doi.org/10.1007/978-3-031-66326-0_19" xlink:type="simple">https://doi.org/10.1007/978-3-031-66326-0_19</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6" calcext:value-type="float">
            <text:p>6</text:p>
          </table:table-cell>
          <table:table-cell table:style-name="ce1" office:value-type="string" calcext:value-type="string">
            <text:p>Forward</text:p>
          </table:table-cell>
          <table:table-cell table:style-name="ce1" office:value-type="string" calcext:value-type="string">
            <text:p>ABDELFATTAH, Amr S. et al. Assessing evolution of microservices using static analysis. Applied Sciences, v. 14, n. 22, p. 10725, 2024.</text:p>
          </table:table-cell>
          <table:table-cell table:style-name="ce1" office:value-type="string" calcext:value-type="string">
            <text:p>Assessing evolution of microservices using static analysis.</text:p>
          </table:table-cell>
          <table:table-cell table:style-name="ce1" office:value-type="string" calcext:value-type="string">
            <text:p>Microservices have gained widespread adoption in enterprise software systems because they encapsulate the expertise of specific organizational subunits. This approach offers valuable insights into internal processes and communication channels. The advantage of microservices lies in their self-contained nature, streamlining management and deployment. However, this decentralized approach scatters knowledge across microservices, making it challenging to grasp the holistic system. As these systems continually evolve, substantial changes may affect not only individual microservices but the entire system. This dynamic environment increases the complexity of system maintenance, emphasizing the need for centralized assessment methods to analyze these changes. This paper derives and introduces quantification metrics to serve as indicators for investigating system architecture evolution across different system versions. It focuses on two holistic viewpoints of inter-service interaction and data perspectives derived through static analysis of the system’s source code. The approach is demonstrated with a case study using established microservice system benchmarks.</text:p>
          </table:table-cell>
          <table:table-cell table:style-name="ce1"/>
          <table:table-cell table:style-name="ce4" office:value-type="string" calcext:value-type="string">
            <text:p><text:a xlink:href="https://doi.org/10.3390/app142210725" xlink:type="simple">https://doi.org/10.3390/app142210725</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8" calcext:value-type="float">
            <text:p>8</text:p>
          </table:table-cell>
          <table:table-cell table:style-name="ce1" office:value-type="string" calcext:value-type="string">
            <text:p>Backward</text:p>
          </table:table-cell>
          <table:table-cell table:style-name="ce1" office:value-type="string" calcext:value-type="string">
            <text:p><text:span text:style-name="T1">Brogi, A., Neri, D., Soldani, J., et al.: Freshening the air in microservices: resolving architectural smells via refactoring. In: Yangui, S. (ed.) ICSOC 2019. LNCS, vol. 12019, pp. 17–29. Springer, Cham (2020). https://doi.org/10.1007/978-3-030-45989-5_2</text:span></text:p>
          </table:table-cell>
          <table:table-cell table:style-name="ce1" office:value-type="string" calcext:value-type="string">
            <text:p>Freshening the air in microservices: resolving architectural smells via refactoring.</text:p>
          </table:table-cell>
          <table:table-cell table:style-name="ce1" office:value-type="string" calcext:value-type="string">
            <text:p>The adoption of microservice-based architectures is becoming common practice for enterprise applications. Checking whether an application adheres to the main design principles of microservices, and —if not— understanding how to refactor it, are two key issues in that context. In this paper, we present a methodology to systematically identify the architectural smells that possibly violate the main design principles of microservices, and to select suitable architectural refactorings to resolve them. We also present a prototype implementing the methodology, based on a novel representation of microservices in TOSCA.</text:p>
          </table:table-cell>
          <table:table-cell table:style-name="ce1"/>
          <table:table-cell table:style-name="ce4" office:value-type="string" calcext:value-type="string">
            <text:p><text:a xlink:href="https://doi.org/10.1007/978-3-030-45989-5_2" xlink:type="simple">https://doi.org/10.1007/978-3-030-45989-5_2</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8" calcext:value-type="float">
            <text:p>8</text:p>
          </table:table-cell>
          <table:table-cell table:style-name="ce1" office:value-type="string" calcext:value-type="string">
            <text:p>Forward</text:p>
          </table:table-cell>
          <table:table-cell table:style-name="ce1" office:value-type="string" calcext:value-type="string">
            <text:p>DANIEL, João et al. Towards the detection of microservice patterns based on metrics. In: 2023 49th Euromicro Conference on Software Engineering and Advanced Applications (SEAA). IEEE, 2023. p. 132-139.</text:p>
          </table:table-cell>
          <table:table-cell table:style-name="ce1" office:value-type="string" calcext:value-type="string">
            <text:p>Towards the detection of microservice patterns based on metrics.</text:p>
          </table:table-cell>
          <table:table-cell table:style-name="ce1" office:value-type="string" calcext:value-type="string">
            <text:p>Microservices is a popular architectural approach for complex systems in companies, despite its nature of decentralization. There is a comprehensive set of microservices architectural patterns that guides implementations and helps developers to overcome issues. However, the community still scarcely adopts these patterns and only has a theoretical understanding of them. In this work, in order to increase awareness of such patterns and provide aid to developers to better understand an architecture based on microservices, we propose a detection approach based on metrics for microservices patterns. We focused on structural or architectural patterns, and implemented detection for five of them. We conducted two case studies with real-world applications and evaluated the accuracy and applicability of our approach with the developers of those applications.</text:p>
          </table:table-cell>
          <table:table-cell table:style-name="ce1"/>
          <table:table-cell table:style-name="ce4" office:value-type="string" calcext:value-type="string">
            <text:p><text:a xlink:href="https://doi.org/10.1109/SEAA60479.2023.00029" xlink:type="simple">https://doi.org/10.1109/SEAA60479.2023.00029</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10" calcext:value-type="float">
            <text:p>10</text:p>
          </table:table-cell>
          <table:table-cell table:style-name="ce1" office:value-type="string" calcext:value-type="string">
            <text:p>Forward</text:p>
          </table:table-cell>
          <table:table-cell table:style-name="ce1" office:value-type="string" calcext:value-type="string">
            <text:p>ABDELFATTAH, Amr S. et al. Semantic dependency in microservice architecture. In: 2025 IEEE/ACM 22nd International Conference on Software and Systems Reuse (ICSR). IEEE, 2025. p. 44-54.</text:p>
          </table:table-cell>
          <table:table-cell table:style-name="ce1" office:value-type="string" calcext:value-type="string">
            <text:p>Semantic dependency in microservice architecture.</text:p>
          </table:table-cell>
          <table:table-cell table:style-name="ce1" office:value-type="string" calcext:value-type="string">
            <text:p>Microservices have been a key architectural approach for over a decade, transforming system design by promoting decentralization and allowing development teams to work independently on specific microservices. While loosely coupled microservices are ideal, dependencies between them are inevitable. Often, these dependencies go unnoticed by development teams. Although syntactic dependencies can be identified, tracking semantic dependencies — when multiple microservices share similar logic — poses a greater challenge. As systems evolve, changes made to one microservice can trigger ripple effects, jeopardizing system consistency and requiring updates to dependent services, which increases maintenance and operational complexity. Effectively tracking different types of dependencies across microservices is essential for anticipating the impact of such changes. This paper introduces the Semantic Dependency Matrix as an instrument to address these challenges from a semantic perspective. We propose an automated approach to extract and represent these dependencies and demonstrate its effectiveness through a case study. This paper takes a step further by demonstrating the significance of semantic dependencies, even in cases where there are no direct dependencies between microservices. It shows that these hidden dependencies can exist independently of endpoint or data dependencies, revealing critical connections that might otherwise be overlooked.</text:p>
          </table:table-cell>
          <table:table-cell table:style-name="ce1"/>
          <table:table-cell table:style-name="ce4" office:value-type="string" calcext:value-type="string">
            <text:p><text:a xlink:href="https://doi.org/10.1109/ICSR66718.2025.00011" xlink:type="simple">https://doi.org/10.1109/ICSR66718.2025.00011</text:a></text:p>
          </table:table-cell>
          <table:table-cell table:style-name="ce6" office:value-type="string" calcext:value-type="string">
            <text:p>Accepted</text:p>
          </table:table-cell>
          <table:table-cell table:style-name="ce1" office:value-type="string" calcext:value-type="string">
            <text:p>Studies addressing ACC in microservice-based systems, including cloud-native and event-driven distributed architectures explicitly aligned with the microservices paradigm.</text:p>
          </table:table-cell>
          <table:table-cell table:style-name="ce1" table:number-columns-repeated="10"/>
          <table:table-cell table:number-columns-repeated="1005"/>
        </table:table-row>
        <table:table-row table:style-name="ro1">
          <table:table-cell table:style-name="ce2" office:value-type="float" office:value="21" calcext:value-type="float">
            <text:p>21</text:p>
          </table:table-cell>
          <table:table-cell table:style-name="ce1" office:value-type="string" calcext:value-type="string">
            <text:p>Backward</text:p>
          </table:table-cell>
          <table:table-cell table:style-name="ce1" office:value-type="string" calcext:value-type="string">
            <text:p>Jacopo Soldani, Giuseppe Muntoni, Davide Neri, and Antonio Brogi. 2021. The mTOSCA toolchain: Mining, analyzing, and refactoring microservice-based architectures. Software: Practice and Experience 51, 7 (2021), 1591--1621.</text:p>
          </table:table-cell>
          <table:table-cell table:style-name="ce1" office:value-type="string" calcext:value-type="string">
            <text:p>The mTOSCA toolchain: Mining, analyzing, and refactoring microservice-based architectures.</text:p>
          </table:table-cell>
          <table:table-cell table:style-name="ce1" office:value-type="string" calcext:value-type="string">
            <text:p>Exploiting microservices to architect enterprise applications is becoming commonplace. This makes it crucial to provide some support for designing and analyzing microservice-based applications, for example, for understanding whether a microservice-based application adheres to the main design principles of microservices and for choosing how to refactor it when this is not the case. To provide such support, in this article we present the urn:x-wiley:spe:media:spe2974:spe2974-math-0001TOSCA toolchain. More precisely, we first introduce the urn:x-wiley:spe:media:spe2974:spe2974-math-0002TOSCA model to represent the architecture of microservice-based applications with the OASIS standard TOSCA. We then describe a technique to automatically mine the architecture of a microservice-based application and represent it with urn:x-wiley:spe:media:spe2974:spe2974-math-0003TOSCA, given the Kubernetes deployment of the application. We also present a methodology to analyze the urn:x-wiley:spe:media:spe2974:spe2974-math-0004TOSCA representation of a microservice-based architecture to systematically identify the architectural smells potentially affecting the corresponding application and to resolve them. Finally, we present two prototype tools, urn:x-wiley:spe:media:spe2974:spe2974-math-0005Miner and urn:x-wiley:spe:media:spe2974:spe2974-math-0006Freshener, implementing our mining solution and the support for identifying and resolving architectural smells in microservice-based applications, respectively. We then assess —by discussing some case studies— how effectively urn:x-wiley:spe:media:spe2974:spe2974-math-0007Miner, urn:x-wiley:spe:media:spe2974:spe2974-math-0008Freshener, and the urn:x-wiley:spe:media:spe2974:spe2974-math-0009TOSCA toolchain can support researchers and practitioners working with microservices.</text:p>
          </table:table-cell>
          <table:table-cell table:style-name="ce1"/>
          <table:table-cell table:style-name="ce4" office:value-type="string" calcext:value-type="string">
            <text:p><text:a xlink:href="https://doi.org/10.1002/spe.2974" xlink:type="simple">https://doi.org/10.1002/spe.2974</text:a></text:p>
          </table:table-cell>
          <table:table-cell table:style-name="ce6" office:value-type="string" calcext:value-type="string">
            <text:p>Accepted</text:p>
          </table:table-cell>
          <table:table-cell table:style-name="ce1" office:value-type="string" calcext:value-type="string">
            <text:p>Studies that propose, analyze, or evaluate methods, techniques, approaches, tools, or frameworks for ACC.</text:p>
          </table:table-cell>
          <table:table-cell table:style-name="ce1" table:number-columns-repeated="10"/>
          <table:table-cell table:number-columns-repeated="1005"/>
        </table:table-row>
        <table:table-row table:style-name="ro1" table:number-rows-repeated="36">
          <table:table-cell table:style-name="ce1" table:number-columns-repeated="7"/>
          <table:table-cell table:style-name="ce6"/>
          <table:table-cell table:style-name="ce1" table:number-columns-repeated="11"/>
          <table:table-cell table:number-columns-repeated="1005"/>
        </table:table-row>
        <table:table-row table:style-name="ro2" table:number-rows-repeated="1048527">
          <table:table-cell table:number-columns-repeated="1024"/>
        </table:table-row>
        <table:table-row table:style-name="ro2">
          <table:table-cell table:number-columns-repeated="1024"/>
        </table:table-row>
        <table:named-expressions>
          <table:named-range table:name="_xlnm._FilterDatabase" table:base-cell-address="$Página1.$A$1" table:cell-range-address="$Página1.$A$1:.$S$48"/>
        </table:named-expressions>
        <calcext:conditional-formats>
          <calcext:conditional-format calcext:target-range-address="Página1.H1:Página1.H48">
            <calcext:condition calcext:apply-style-name="ConditionalStyle_1" calcext:value="=&quot;Accepted&quot;" calcext:base-cell-address="Página1.H1"/>
          </calcext:conditional-format>
          <calcext:conditional-format calcext:target-range-address="Página1.H1:Página1.H48">
            <calcext:condition calcext:apply-style-name="ConditionalStyle_2" calcext:value="=&quot;Maybe&quot;" calcext:base-cell-address="Página1.H1"/>
          </calcext:conditional-format>
        </calcext:conditional-formats>
      </table:table>
      <table:named-expressions/>
      <table:database-ranges>
        <table:database-range table:name="__Anonymous_Sheet_DB__0" table:target-range-address="Página1.A1:Página1.S4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ce8b2"/>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97" meta:object-count="0"/>
    <meta:generator>LibreOfficeDev/6.0.5.2$Linux_X86_64 LibreOffice_project/</meta:generator>
  </office:meta>
</office:document-meta>
</file>