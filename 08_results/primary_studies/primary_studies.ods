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4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5.84pt"/>
    </style:style>
    <style:style style:name="co4" style:family="table-column">
      <style:table-column-properties fo:break-before="auto" style:column-width="104.91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#id</text:p>
          </table:table-cell>
          <table:table-cell table:style-name="ce1" office:value-type="string" calcext:value-type="string">
            <text:p>source_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utomatic reference architecture conformance checking for SOA - Based software systems</text:p>
          </table:table-cell>
          <table:table-cell table:style-name="ce3" office:value-type="string" calcext:value-type="string">
            <text:p>Weinreich, Rainer and Buchgeher, Georg</text:p>
          </table:table-cell>
          <table:table-cell table:style-name="ce2" office:value-type="float" office:value="2014" calcext:value-type="float">
            <text:p>2014</text:p>
          </table:table-cell>
          <table:table-cell table:style-name="ce3" office:value-type="string" calcext:value-type="string">
            <text:p>10.1109/WICSA.2014.22</text:p>
          </table:table-cell>
          <table:table-cell table:style-name="ce3" office:value-type="string" calcext:value-type="string">
            <text:p>https://www.scopus.com/inward/record.uri?eid=2-s2.0-84903699771&amp;doi=10.1109%2FWICSA.2014.22&amp;partnerID=40&amp;md5=96fd4bda5bf10a64931ef66740c659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2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Ensuring and assessing architecture conformance to microservice decomposition patterns</text:p>
          </table:table-cell>
          <table:table-cell table:style-name="ce3" office:value-type="string" calcext:value-type="string">
            <text:p>Zdun, Uwe and Navarro, Elena M. and Leymann, Frank</text:p>
          </table:table-cell>
          <table:table-cell table:style-name="ce2" office:value-type="float" office:value="2017" calcext:value-type="float">
            <text:p>2017</text:p>
          </table:table-cell>
          <table:table-cell table:style-name="ce3" office:value-type="string" calcext:value-type="string">
            <text:p>10.1007/978-3-319-69035-3_29</text:p>
          </table:table-cell>
          <table:table-cell table:style-name="ce3" office:value-type="string" calcext:value-type="string">
            <text:p>https://www.scopus.com/inward/record.uri?eid=2-s2.0-85034118349&amp;doi=10.1007%2F978-3-319-69035-3_29&amp;partnerID=40&amp;md5=09028be9a2824f32498a3cc9a1e061c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3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Evaluation of microservice architectures: A metric and tool-based approach</text:p>
          </table:table-cell>
          <table:table-cell table:style-name="ce3" office:value-type="string" calcext:value-type="string">
            <text:p>ENGEL, Thomas et al. </text:p>
          </table:table-cell>
          <table:table-cell table:style-name="ce2" office:value-type="float" office:value="2018" calcext:value-type="float">
            <text:p>2018</text:p>
          </table:table-cell>
          <table:table-cell table:style-name="ce3" office:value-type="string" calcext:value-type="string">
            <text:p>10.1007/978-3-319-92901-9_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04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Freshening the air in microservices: resolving architectural smells via refactoring.</text:p>
          </table:table-cell>
          <table:table-cell table:style-name="ce3" office:value-type="string" calcext:value-type="string">
            <text:p>Brogi, A., Neri, D., Soldani, J., et al.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007/978-3-030-45989-5_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05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ssessing architecture conformance to coupling-related patterns and practices in microservices</text:p>
          </table:table-cell>
          <table:table-cell table:style-name="ce3" office:value-type="string" calcext:value-type="string">
            <text:p>Ntentos, Evangelos and Zdun, Uwe and Plakidas, Konstantinos and Meixner, Sebastian and Geiger, Sebastian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007/978-3-030-58923-3_1</text:p>
          </table:table-cell>
          <table:table-cell table:style-name="ce3" office:value-type="string" calcext:value-type="string">
            <text:p>https://www.scopus.com/inward/record.uri?eid=2-s2.0-85091491521&amp;doi=10.1007%2F978-3-030-58923-3_1&amp;partnerID=40&amp;md5=40ac2ec320983cc02b5585a7b76de0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6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Metrics for assessing architecture conformance to microservice architecture patterns and practices</text:p>
          </table:table-cell>
          <table:table-cell table:style-name="ce3" office:value-type="string" calcext:value-type="string">
            <text:p>Ntentos, Evangelos and Zdun, Uwe and Plakidas, Konstantinos and Meixner, Sebastian and Geiger, Sebastian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007/978-3-030-65310-1_42</text:p>
          </table:table-cell>
          <table:table-cell table:style-name="ce3" office:value-type="string" calcext:value-type="string">
            <text:p>https://www.scopus.com/inward/record.uri?eid=2-s2.0-85098257999&amp;doi=10.1007%2F978-3-030-65310-1_42&amp;partnerID=40&amp;md5=3aa4617740e9ab7d0afe4515c2f397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7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pplying a multi-platform architectural conformance solution in a real-world microservice-based system</text:p>
          </table:table-cell>
          <table:table-cell table:style-name="ce3" office:value-type="string" calcext:value-type="string">
            <text:p>Araujo, Elena A. and Espíndola, Álvaro M. and Garcia, Vinícius Cardoso and Terra, Ricardo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145/3425269.3425270</text:p>
          </table:table-cell>
          <table:table-cell table:style-name="ce3" office:value-type="string" calcext:value-type="string">
            <text:p>https://www.scopus.com/inward/record.uri?eid=2-s2.0-85095810870&amp;doi=10.1145%2F3425269.3425270&amp;partnerID=40&amp;md5=e7e0a97f76bf857656bc9c0a149ea44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8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Towards a method for monitoring the coupling evolution of microservice-based architectures</text:p>
          </table:table-cell>
          <table:table-cell table:style-name="ce3" office:value-type="string" calcext:value-type="string">
            <text:p>de Freitas Apolinário, Daniel Rodrigo and de França, Breno Bernard Nicolau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10.1145/3425269.3425273</text:p>
          </table:table-cell>
          <table:table-cell table:style-name="ce3" office:value-type="string" calcext:value-type="string">
            <text:p>https://www.scopus.com/inward/record.uri?eid=2-s2.0-85095820890&amp;doi=10.1145%2F3425269.3425273&amp;partnerID=40&amp;md5=add7766e1e8a85bb98d13c462bb4a90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09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Monitoring Behavioral Compliance with Architectural Patterns Based on Complex Event Processing</text:p>
          </table:table-cell>
          <table:table-cell table:style-name="ce3" office:value-type="string" calcext:value-type="string">
            <text:p>Krieger, Christoph and Breitenb\"{u}cher, Uwe and Falkenthal, Michael and Leymann, Frank and Yussupov, Vladimir and Zdun, Uwe</text:p>
          </table:table-cell>
          <table:table-cell table:style-name="ce2" office:value-type="float" office:value="2020" calcext:value-type="float">
            <text:p>2020</text:p>
          </table:table-cell>
          <table:table-cell table:number-columns-repeated="2" table:style-name="ce3" office:value-type="string" calcext:value-type="string">
            <text:p>10.1007/978-3-030-44769-4_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0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The mTOSCA toolchain: Mining, analyzing, and refactoring microservice-based architectures.</text:p>
          </table:table-cell>
          <table:table-cell table:style-name="ce3" office:value-type="string" calcext:value-type="string">
            <text:p>Jacopo Soldani, Giuseppe Muntoni, Davide Neri, and Antonio Brogi. 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10.1002/spe.29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11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Evaluating and Improving Microservice Architecture Conformance to Architectural Design Decisions</text:p>
          </table:table-cell>
          <table:table-cell table:style-name="ce3" office:value-type="string" calcext:value-type="string">
            <text:p>Ntentos, Evangelos and Zdun, Uwe and Plakidas, Konstantinos and Geiger, Sebastian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10.1007/978-3-030-91431-8_12</text:p>
          </table:table-cell>
          <table:table-cell table:style-name="ce3" office:value-type="string" calcext:value-type="string">
            <text:p>https://www.scopus.com/inward/record.uri?eid=2-s2.0-85120524117&amp;doi=10.1007%2F978-3-030-91431-8_12&amp;partnerID=40&amp;md5=7c0a3ca83ce0ea7e29e48e83a98d33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2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Semi-automatic Feedback for Improving Architecture Conformance to Microservice Patterns and Practices</text:p>
          </table:table-cell>
          <table:table-cell table:style-name="ce3" office:value-type="string" calcext:value-type="string">
            <text:p>Ntentos, Evangelos and Zdun, Uwe and Plakidas, Konstantinos and Geiger, Sebastian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10.1109/ICSA51549.2021.00012</text:p>
          </table:table-cell>
          <table:table-cell table:style-name="ce3" office:value-type="string" calcext:value-type="string">
            <text:p>https://www.scopus.com/inward/record.uri?eid=2-s2.0-85106981120&amp;doi=10.1109%2FICSA51549.2021.00012&amp;partnerID=40&amp;md5=21f3e272b00832b218635553f530d18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3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 method for monitoring the coupling evolution of microservice-based architectures</text:p>
          </table:table-cell>
          <table:table-cell table:style-name="ce3" office:value-type="string" calcext:value-type="string">
            <text:p>Apolinário, Daniel R.F. and de França, Breno Bernard Nicolau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10.1186/s13173-021-00120-y</text:p>
          </table:table-cell>
          <table:table-cell table:style-name="ce3" office:value-type="string" calcext:value-type="string">
            <text:p>https://www.scopus.com/inward/record.uri?eid=2-s2.0-85120964084&amp;doi=10.1186%2Fs13173-021-00120-y&amp;partnerID=40&amp;md5=cbc0e8df254457768b1cae8caeaf6e2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4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A graph-based solution to deal with cyclic dependencies in microservices architecture</text:p>
          </table:table-cell>
          <table:table-cell table:style-name="ce3" office:value-type="string" calcext:value-type="string">
            <text:p>FARSI, Hassan et al. 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109/FiCloud57274.2022.000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15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Conformance Assessment of Architectural Design Decisions on the Mapping of Domain Model Elements to APIs and API Endpoints</text:p>
          </table:table-cell>
          <table:table-cell table:style-name="ce3" office:value-type="string" calcext:value-type="string">
            <text:p>Singjai, Apitchaka and Zdun, Uwe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109/ICSA-C54293.2022.00058</text:p>
          </table:table-cell>
          <table:table-cell table:style-name="ce3" office:value-type="string" calcext:value-type="string">
            <text:p>https://www.scopus.com/inward/record.uri?eid=2-s2.0-85132156777&amp;doi=10.1109%2FICSA-C54293.2022.00058&amp;partnerID=40&amp;md5=3e2aa421b5fd4b24cafd09c2a033ac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6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ssessing Architecture Conformance to Security-Related Practices in Infrastructure as Code Based Deployments</text:p>
          </table:table-cell>
          <table:table-cell table:style-name="ce3" office:value-type="string" calcext:value-type="string">
            <text:p>Ntentos, Evangelos and Zdun, Uwe and Falazi, Ghareeb and Breitenbücher, Uwe and Leymann, Frank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109/SCC55611.2022.00029</text:p>
          </table:table-cell>
          <table:table-cell table:style-name="ce3" office:value-type="string" calcext:value-type="string">
            <text:p>https://www.scopus.com/inward/record.uri?eid=2-s2.0-85138037280&amp;doi=10.1109%2FSCC55611.2022.00029&amp;partnerID=40&amp;md5=8426e3bbce08ccc97b9609781c1c9c9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7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ssessing Architecture Conformance to Coupling-Related Infrastructure-as-Code Best Practices: Metrics and Case Studies</text:p>
          </table:table-cell>
          <table:table-cell table:style-name="ce3" office:value-type="string" calcext:value-type="string">
            <text:p>Ntentos, Evangelos and Zdun, Uwe and Soldani, Jacopo and Brogi, A.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007/978-3-031-16697-6_7</text:p>
          </table:table-cell>
          <table:table-cell table:style-name="ce3" office:value-type="string" calcext:value-type="string">
            <text:p>https://www.scopus.com/inward/record.uri?eid=2-s2.0-85139055698&amp;doi=10.1007%2F978-3-031-16697-6_7&amp;partnerID=40&amp;md5=92a48b524ba0d45d201490a08b8edce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8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API Description-Based Conformance Assessment of Architectural Design Decision</text:p>
          </table:table-cell>
          <table:table-cell table:style-name="ce3" office:value-type="string" calcext:value-type="string">
            <text:p>Singjai, Apitchaka and Zdun, Uwe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109/SOSE55356.2022.00013</text:p>
          </table:table-cell>
          <table:table-cell table:style-name="ce3" office:value-type="string" calcext:value-type="string">
            <text:p>https://www.scopus.com/inward/record.uri?eid=2-s2.0-85141357694&amp;doi=10.1109%2FSOSE55356.2022.00013&amp;partnerID=40&amp;md5=2ad201d4c891488ae0242aec28663d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9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Conformance assessment of Architectural Design Decisions on API endpoint designs derived from domain models</text:p>
          </table:table-cell>
          <table:table-cell table:style-name="ce3" office:value-type="string" calcext:value-type="string">
            <text:p>Singjai, Apitchaka and Zdun, Uwe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10.1016/j.jss.2022.111433</text:p>
          </table:table-cell>
          <table:table-cell table:style-name="ce3" office:value-type="string" calcext:value-type="string">
            <text:p>https://www.scopus.com/inward/record.uri?eid=2-s2.0-85135305434&amp;doi=10.1016%2Fj.jss.2022.111433&amp;partnerID=40&amp;md5=32dd3c4553ebddce3f7b2a8dc625d20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0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Evolution and anti-patterns visualized: Microprospect in microservice architecture</text:p>
          </table:table-cell>
          <table:table-cell table:style-name="ce3" office:value-type="string" calcext:value-type="string">
            <text:p>ADAMS, Lauren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3" office:value-type="string" calcext:value-type="string">
            <text:p>10.1007/978-3-031-66326-0_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1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Towards the detection of microservice patterns based on metrics.</text:p>
          </table:table-cell>
          <table:table-cell table:style-name="ce3" office:value-type="string" calcext:value-type="string">
            <text:p>DANIEL, João et al. </text:p>
          </table:table-cell>
          <table:table-cell table:style-name="ce2" office:value-type="float" office:value="2023" calcext:value-type="float">
            <text:p>2023</text:p>
          </table:table-cell>
          <table:table-cell table:style-name="ce3" office:value-type="string" calcext:value-type="string">
            <text:p>10.1109/SEAA60479.2023.000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2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Detecting and Resolving Coupling-Related Infrastructure as Code Based Architecture Smells in Microservice Deployments</text:p>
          </table:table-cell>
          <table:table-cell table:style-name="ce3" office:value-type="string" calcext:value-type="string">
            <text:p>Ntentos, Evangelos and Zdun, Uwe and Falazi, Ghareeb and Breitenbücher, Uwe and Leymann, Frank</text:p>
          </table:table-cell>
          <table:table-cell table:style-name="ce2" office:value-type="float" office:value="2023" calcext:value-type="float">
            <text:p>2023</text:p>
          </table:table-cell>
          <table:table-cell table:style-name="ce3" office:value-type="string" calcext:value-type="string">
            <text:p>10.1109/CLOUD60044.2023.00031</text:p>
          </table:table-cell>
          <table:table-cell table:style-name="ce3" office:value-type="string" calcext:value-type="string">
            <text:p>https://www.scopus.com/inward/record.uri?eid=2-s2.0-85174302755&amp;doi=10.1109%2FCLOUD60044.2023.00031&amp;partnerID=40&amp;md5=c14bcce16ca5f1ab642cef5a884580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3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A Toolchain for Checking Domain-and Model-Driven Properties of Jolie Microservices</text:p>
          </table:table-cell>
          <table:table-cell table:style-name="ce3" office:value-type="string" calcext:value-type="string">
            <text:p>GIALLORENZO, Saverio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007/978-981-96-0808-9_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4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Detecting inconsistencies in microservice-based systems: An annotation-assisted scenario-oriented approach</text:p>
          </table:table-cell>
          <table:table-cell table:style-name="ce3" office:value-type="string" calcext:value-type="string">
            <text:p>SUN, Chang-Ai et al. 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109/TSC.2024.33996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25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DOMICO: Checking conformance between domain models and implementations</text:p>
          </table:table-cell>
          <table:table-cell table:style-name="ce3" office:value-type="string" calcext:value-type="string">
            <text:p>Zhong, Chenxing and Zhang, He and Huang, Huang and Chen, Zhikun and Li, Chao and Liu, Xiaodong and Li, Shanshan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002/spe.3272</text:p>
          </table:table-cell>
          <table:table-cell table:style-name="ce3" office:value-type="string" calcext:value-type="string">
            <text:p>https://www.scopus.com/inward/record.uri?eid=2-s2.0-85174190323&amp;doi=10.1002%2Fspe.3272&amp;partnerID=40&amp;md5=77117fcaf4d7e21b10d8ffbc4c176c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6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Detection Strategies for Microservice Security Tactics</text:p>
          </table:table-cell>
          <table:table-cell table:style-name="ce3" office:value-type="string" calcext:value-type="string">
            <text:p>Zdun, Uwe and Queval, Pierre Jean and Simhandl, Georg and Scandariato, Riccardo and Chakravarty, Somik and Jelić, Marjan and Jovanović, A. S.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109/TDSC.2023.3276487</text:p>
          </table:table-cell>
          <table:table-cell table:style-name="ce3" office:value-type="string" calcext:value-type="string">
            <text:p>https://www.scopus.com/inward/record.uri?eid=2-s2.0-85160216527&amp;doi=10.1109%2FTDSC.2023.3276487&amp;partnerID=40&amp;md5=9c14d9de24c27f20d68ba619a574a65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7</text:p>
          </table:table-cell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CATMA: Conformance Analysis Tool for Microservice Applications</text:p>
          </table:table-cell>
          <table:table-cell table:style-name="ce3" office:value-type="string" calcext:value-type="string">
            <text:p>Cao, Clinton and Schneider, Simon and Díaz Ferreyra, Nicolás E. and Verwer, Sicco E. and Panichella, Annibale and Scandariato, Riccardo</text:p>
          </table:table-cell>
          <table:table-cell table:style-name="ce2" office:value-type="float" office:value="2024" calcext:value-type="float">
            <text:p>2024</text:p>
          </table:table-cell>
          <table:table-cell table:style-name="ce3" office:value-type="string" calcext:value-type="string">
            <text:p>10.1145/3639478.3640022</text:p>
          </table:table-cell>
          <table:table-cell table:style-name="ce3" office:value-type="string" calcext:value-type="string">
            <text:p>https://www.scopus.com/inward/record.uri?eid=2-s2.0-85188258629&amp;doi=10.1145%2F3639478.3640022&amp;partnerID=40&amp;md5=1f4f18ceba149d26d74bb010a0657fb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8</text:p>
          </table:table-cell>
          <table:table-cell table:style-name="ce3" office:value-type="string" calcext:value-type="string">
            <text:p>snowballing</text:p>
          </table:table-cell>
          <table:table-cell table:style-name="ce3" office:value-type="string" calcext:value-type="string">
            <text:p>Semantic dependency in microservice architecture.</text:p>
          </table:table-cell>
          <table:table-cell table:style-name="ce3" office:value-type="string" calcext:value-type="string">
            <text:p>ABDELFATTAH, Amr S. et al.</text:p>
          </table:table-cell>
          <table:table-cell table:style-name="ce2" office:value-type="float" office:value="2025" calcext:value-type="float">
            <text:p>2025</text:p>
          </table:table-cell>
          <table:table-cell table:style-name="ce3" office:value-type="string" calcext:value-type="string">
            <text:p>10.1109/ICSR66718.2025.00011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" meta:object-count="0"/>
    <meta:generator>LibreOfficeDev/6.0.5.2$Linux_X86_64 LibreOffice_project/</meta:generator>
  </office:meta>
</office:document-meta>
</file>