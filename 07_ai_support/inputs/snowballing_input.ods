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Seed_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table:number-columns-repeated="19"/>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number-columns-repeated="2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22"/>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table:number-columns-repeated="19"/>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number-columns-repeated="20"/>
          <table:table-cell table:number-columns-repeated="998"/>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table:number-columns-repeated="19"/>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number-columns-repeated="20"/>
          <table:table-cell table:number-columns-repeated="998"/>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table:number-columns-repeated="19"/>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number-columns-repeated="20"/>
          <table:table-cell table:number-columns-repeated="998"/>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table:number-columns-repeated="19"/>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number-columns-repeated="20"/>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22"/>
          <table:table-cell table:number-columns-repeated="998"/>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22"/>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table:number-columns-repeated="19"/>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number-columns-repeated="20"/>
          <table:table-cell table:number-columns-repeated="998"/>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table:number-columns-repeated="19"/>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number-columns-repeated="20"/>
          <table:table-cell table:number-columns-repeated="998"/>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table:number-columns-repeated="19"/>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number-columns-repeated="20"/>
          <table:table-cell table:number-columns-repeated="998"/>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table:number-columns-repeated="19"/>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number-columns-repeated="20"/>
          <table:table-cell table:number-columns-repeated="998"/>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22"/>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table:number-columns-repeated="19"/>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number-columns-repeated="20"/>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1"/>
          <table:table-cell table:number-columns-repeated="998"/>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22"/>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number-columns-repeated="20"/>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22"/>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1"/>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table:number-columns-repeated="19"/>
          <table:table-cell table:number-columns-repeated="998"/>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table:number-columns-repeated="19"/>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number-columns-repeated="20"/>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22"/>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22"/>
          <table:table-cell table:number-columns-repeated="998"/>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1"/>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table:number-columns-repeated="19"/>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0"/>
          <table:table-cell table:number-columns-repeated="998"/>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22"/>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table:number-columns-repeated="19"/>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number-columns-repeated="20"/>
          <table:table-cell table:number-columns-repeated="998"/>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table:number-columns-repeated="19"/>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number-columns-repeated="20"/>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1"/>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22"/>
          <table:table-cell table:number-columns-repeated="998"/>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22"/>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table:number-columns-repeated="19"/>
          <table:table-cell table:number-columns-repeated="998"/>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table:number-columns-repeated="19"/>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number-columns-repeated="20"/>
          <table:table-cell table:number-columns-repeated="998"/>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22"/>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table:number-columns-repeated="19"/>
          <table:table-cell table:number-columns-repeated="998"/>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table:number-columns-repeated="19"/>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number-columns-repeated="20"/>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22"/>
          <table:table-cell table:number-columns-repeated="998"/>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22"/>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table:number-columns-repeated="19"/>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number-columns-repeated="20"/>
          <table:table-cell table:number-columns-repeated="998"/>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22"/>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table:number-columns-repeated="19"/>
          <table:table-cell table:number-columns-repeated="998"/>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table:number-columns-repeated="19"/>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number-columns-repeated="20"/>
          <table:table-cell table:number-columns-repeated="998"/>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22"/>
          <table:table-cell table:number-columns-repeated="998"/>
        </table:table-row>
        <table:table-row table:style-name="ro1" table:number-rows-repeated="36">
          <table:table-cell table:style-name="ce1" table:number-columns-repeated="26"/>
          <table:table-cell table:number-columns-repeated="998"/>
        </table:table-row>
        <table:table-row table:style-name="ro2" table:number-rows-repeated="1047931">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G$644"/>
        </table:named-expressions>
      </table:table>
      <table:named-expressions/>
      <table:database-ranges>
        <table:database-range table:name="__Anonymous_Sheet_DB__0" table:target-range-address="Página1.A1:Página1.G6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559" meta:object-count="0"/>
    <meta:generator>LibreOfficeDev/6.0.5.2$Linux_X86_64 LibreOffice_project/</meta:generator>
  </office:meta>
</office:document-meta>
</file>