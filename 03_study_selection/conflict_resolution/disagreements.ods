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74pt"/>
    </style:style>
    <style:style style:name="co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lt;=2" style:apply-style-name="ConditionalStyle_5f_1" style:base-cell-address="Articles.AA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Articles.AA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number-columns-repeated="29" table:default-cell-style-name="Default"/>
        <table:table-column table:style-name="co2" table:number-columns-repeated="995" table:default-cell-style-name="Default"/>
        <table:table-row table:style-name="ro1">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_human_1</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style-name="ce5" office:value-type="string" calcext:value-type="string">
            <text:p>score</text:p>
          </table:table-cell>
          <table:table-cell table:style-name="ce5" office:value-type="string" calcext:value-type="string">
            <text:p>status_human_2</text:p>
          </table:table-cell>
          <table:table-cell table:style-name="ce5" office:value-type="string" calcext:value-type="string">
            <text:p>status_final</text:p>
          </table:table-cell>
          <table:table-cell table:number-columns-repeated="995"/>
        </table:table-row>
        <table:table-row table:style-name="ro1">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quot;RejectED&quot;;2;0) + IF([.U2]=&quot;REJECTED&quot;;1;0) + IF([.X2]=&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3]=&quot;RejectED&quot;;2;0) + IF([.U3]=&quot;REJECTED&quot;;1;0) + IF([.X3]=&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4]=&quot;RejectED&quot;;2;0) + IF([.U4]=&quot;REJECTED&quot;;1;0) + IF([.X4]=&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5]=&quot;RejectED&quot;;2;0) + IF([.U5]=&quot;REJECTED&quot;;1;0) + IF([.X5]=&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6]=&quot;RejectED&quot;;2;0) + IF([.U6]=&quot;REJECTED&quot;;1;0) + IF([.X6]=&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7]=&quot;RejectED&quot;;2;0) + IF([.U7]=&quot;REJECTED&quot;;1;0) + IF([.X7]=&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8]=&quot;RejectED&quot;;2;0) + IF([.U8]=&quot;REJECTED&quot;;1;0) + IF([.X8]=&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9]=&quot;RejectED&quot;;2;0) + IF([.U9]=&quot;REJECTED&quot;;1;0) + IF([.X9]=&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0]=&quot;RejectED&quot;;2;0) + IF([.U10]=&quot;REJECTED&quot;;1;0) + IF([.X10]=&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1]=&quot;RejectED&quot;;2;0) + IF([.U11]=&quot;REJECTED&quot;;1;0) + IF([.X11]=&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2]=&quot;RejectED&quot;;2;0) + IF([.U12]=&quot;REJECTED&quot;;1;0) + IF([.X12]=&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3"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style-name="ce6" table:formula="of:=IF([.T13]=&quot;RejectED&quot;;2;0) + IF([.U13]=&quot;REJECTED&quot;;1;0) + IF([.X13]=&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3"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Study does not address Architectural Conformance Checking as a central topic.</text:p>
          </table:table-cell>
          <table:table-cell table:style-name="ce4" office:value-type="string" calcext:value-type="string">
            <text:p>REJECTED</text:p>
          </table:table-cell>
          <table:table-cell table:style-name="ce4" office:value-type="string" calcext:value-type="string">
            <text:p>EC1</text:p>
          </table:table-cell>
          <table:table-cell table:style-name="ce4" office:value-type="string" calcext:value-type="string">
            <text:p>The study does not address Architectural Conformance Checking as a central topic.</text:p>
          </table:table-cell>
          <table:table-cell table:style-name="ce6" table:formula="of:=IF([.T14]=&quot;RejectED&quot;;2;0) + IF([.U14]=&quot;REJECTED&quot;;1;0) + IF([.X14]=&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2"/>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5]=&quot;RejectED&quot;;2;0) + IF([.U15]=&quot;REJECTED&quot;;1;0) + IF([.X15]=&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4"/>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6]=&quot;RejectED&quot;;2;0) + IF([.U16]=&quot;REJECTED&quot;;1;0) + IF([.X16]=&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7]=&quot;RejectED&quot;;2;0) + IF([.U17]=&quot;REJECTED&quot;;1;0) + IF([.X17]=&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8]=&quot;RejectED&quot;;2;0) + IF([.U18]=&quot;REJECTED&quot;;1;0) + IF([.X18]=&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3"/>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19]=&quot;RejectED&quot;;2;0) + IF([.U19]=&quot;REJECTED&quot;;1;0) + IF([.X19]=&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0]=&quot;RejectED&quot;;2;0) + IF([.U20]=&quot;REJECTED&quot;;1;0) + IF([.X20]=&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office:value-type="string" calcext:value-type="string">
            <text:p>Theses, dissertations, monographs, or books.</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1]=&quot;RejectED&quot;;2;0) + IF([.U21]=&quot;REJECTED&quot;;1;0) + IF([.X21]=&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2"/>
          <table:table-cell table:style-name="ce2" office:value-type="string" calcext:value-type="string">
            <text:p>Non–peer-reviewed publications, including white papers, technical reports, position papers, posters, or extended abstracts.</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2]=&quot;RejectED&quot;;2;0) + IF([.U22]=&quot;REJECTED&quot;;1;0) + IF([.X22]=&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3]=&quot;RejectED&quot;;2;0) + IF([.U23]=&quot;REJECTED&quot;;1;0) + IF([.X23]=&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4]=&quot;RejectED&quot;;2;0) + IF([.U24]=&quot;REJECTED&quot;;1;0) + IF([.X24]=&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5]=&quot;RejectED&quot;;2;0) + IF([.U25]=&quot;REJECTED&quot;;1;0) + IF([.X25]=&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3"/>
          <table:table-cell table:style-name="ce2" office:value-type="string" calcext:value-type="string">
            <text:p>Studies that discuss software architecture in general without addressing conformance, compliance, or consistency.</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6]=&quot;RejectED&quot;;2;0) + IF([.U26]=&quot;REJECTED&quot;;1;0) + IF([.X26]=&quot;REJECTED&quot;;1;0)" office:value-type="float" office:value="2" calcext:value-type="float">
            <text:p>2</text:p>
          </table:table-cell>
          <table:table-cell table:style-name="ce6" table:number-columns-repeated="2"/>
          <table:table-cell table:number-columns-repeated="995"/>
        </table:table-row>
        <table:table-row table:style-name="ro1">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office:value-type="string" calcext:value-type="string">
            <text:p>Studies that do not address Architectural Conformance Checking as a central topic.</text:p>
          </table:table-cell>
          <table:table-cell table:style-name="ce2" office:value-type="string" calcext:value-type="string">
            <text:p>Rejected</text:p>
          </table:table-cell>
          <table:table-cell table:style-name="ce4" office:value-type="string" calcext:value-type="string">
            <text:p>UNCLASSIFIED</text:p>
          </table:table-cell>
          <table:table-cell table:style-name="ce4" table:number-columns-repeated="2"/>
          <table:table-cell table:style-name="ce4" office:value-type="string" calcext:value-type="string">
            <text:p>UNCLASSIFIED</text:p>
          </table:table-cell>
          <table:table-cell table:style-name="ce4" table:number-columns-repeated="2"/>
          <table:table-cell table:style-name="ce6" table:formula="of:=IF([.T27]=&quot;RejectED&quot;;2;0) + IF([.U27]=&quot;REJECTED&quot;;1;0) + IF([.X27]=&quot;REJECTED&quot;;1;0)" office:value-type="float" office:value="2" calcext:value-type="float">
            <text:p>2</text:p>
          </table:table-cell>
          <table:table-cell table:style-name="ce6" table:number-columns-repeated="2"/>
          <table:table-cell table:number-columns-repeated="995"/>
        </table:table-row>
        <table:table-row table:style-name="ro2" table:number-rows-repeated="781">
          <table:table-cell table:number-columns-repeated="20"/>
          <table:table-cell table:style-name="ce4" table:number-columns-repeated="6"/>
          <table:table-cell table:style-name="ce6" table:number-columns-repeated="3"/>
          <table:table-cell table:number-columns-repeated="995"/>
        </table:table-row>
        <table:table-row table:style-name="ro3" table:number-rows-repeated="1047767">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AC$27"/>
        </table:named-expressions>
        <calcext:conditional-formats>
          <calcext:conditional-format calcext:target-range-address="Articles.AA1:Articles.AC808">
            <calcext:condition calcext:apply-style-name="ConditionalStyle_1" calcext:value="&lt;=2" calcext:base-cell-address="Articles.AA1"/>
          </calcext:conditional-format>
        </calcext:conditional-formats>
      </table:table>
      <table:named-expressions/>
      <table:database-ranges>
        <table:database-range table:name="__Anonymous_Sheet_DB__0" table:target-range-address="Articles.A1:Articles.AC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4" meta:object-count="0"/>
    <meta:generator>LibreOfficeDev/6.0.5.2$Linux_X86_64 LibreOffice_project/</meta:generator>
  </office:meta>
</office:document-meta>
</file>