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3.74pt"/>
    </style:style>
    <style:style style:name="co2"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rticl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ticles" table:style-name="ta1">
        <office:forms form:automatic-focus="false" form:apply-design-mode="false"/>
        <table:table-column table:style-name="co1" table:number-columns-repeated="26" table:default-cell-style-name="Default"/>
        <table:table-column table:style-name="co2" table:number-columns-repeated="998" table:default-cell-style-name="Default"/>
        <table:table-row table:style-name="ro1">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1" office:value-type="string" calcext:value-type="string">
            <text:p>selection_criteria</text:p>
          </table:table-cell>
          <table:table-cell table:style-name="ce1" office:value-type="string" calcext:value-type="string">
            <text:p>status_human_1</text:p>
          </table:table-cell>
          <table:table-cell table:style-name="ce1" office:value-type="string" calcext:value-type="string">
            <text:p>claude_decision</text:p>
          </table:table-cell>
          <table:table-cell table:style-name="ce1" office:value-type="string" calcext:value-type="string">
            <text:p>claude_exclusion_criterion</text:p>
          </table:table-cell>
          <table:table-cell table:style-name="ce1" office:value-type="string" calcext:value-type="string">
            <text:p>claude_justification</text:p>
          </table:table-cell>
          <table:table-cell table:style-name="ce1" office:value-type="string" calcext:value-type="string">
            <text:p>gemini_decision</text:p>
          </table:table-cell>
          <table:table-cell table:style-name="ce1" office:value-type="string" calcext:value-type="string">
            <text:p>gemini_exclusion_criterion</text:p>
          </table:table-cell>
          <table:table-cell table:style-name="ce1" office:value-type="string" calcext:value-type="string">
            <text:p>gemini_justification</text:p>
          </table:table-cell>
          <table:table-cell table:number-columns-repeated="998"/>
        </table:table-row>
        <table:table-row table:style-name="ro1">
          <table:table-cell table:style-name="ce2" office:value-type="string" calcext:value-type="string">
            <text:p>Service Mining: Using Process Mining to Discover, Check, and Improve Service Behavior</text:p>
          </table:table-cell>
          <table:table-cell table:style-name="ce2" office:value-type="string" calcext:value-type="string">
            <text:p>Aalst, Wil van der</text:p>
          </table:table-cell>
          <table:table-cell table:style-name="ce2" office:value-type="string" calcext:value-type="string">
            <text:p>IEEE Transactions on Services Computing</text:p>
          </table:table-cell>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525-535</text:p>
          </table:table-cell>
          <table:table-cell table:style-name="ce2" office:value-type="string" calcext:value-type="string">
            <text:p>6</text:p>
          </table:table-cell>
          <table:table-cell table:style-name="ce2" office:value-type="string" calcext:value-type="string">
            <text:p>Web services are an emerging technology to implement and integrate business processes within and across enterprises. Service orientation can be used to decompose complex systems into loosely coupled software components that may run remotely. However, the distributed nature of services complicates the design and analysis of service-oriented systems that support end-to-end business processes. Fortunately, services leave trails in so-called event logs and recent breakthroughs in process mining research make it possible to discover, analyze, and improve business processes based on such logs. Recently, the task force on process mining released the process mining manifesto. This manifesto is supported by 53 organizations and 77 process mining experts contributed to it. The active participation from end-users, tool vendors, consultants, analysts, and researchers illustrate the growing significance of process mining as a bridge between data mining and business process modeling. In this paper, we focus on the opportunities and challenges for service mining, i.e., applying process mining techniques to services. We discuss the guiding principles and challenges listed in the process mining manifesto and also highlight challenges specific for service-orientated systems.</text:p>
          </table:table-cell>
          <table:table-cell table:style-name="ce2"/>
          <table:table-cell table:style-name="ce2" office:value-type="string" calcext:value-type="string">
            <text:p>10.1109/TSC.2012.25</text:p>
          </table:table-cell>
          <table:table-cell table:style-name="ce2" table:number-columns-repeated="3"/>
          <table:table-cell table:style-name="ce2" office:value-type="string" calcext:value-type="string">
            <text:p>Data mining;Web services;Computational modeling;Context;Analytical models;Customer services;Process mining;business process management;service discovery;conformance checking</text:p>
          </table:table-cell>
          <table:table-cell table:style-name="ce2"/>
          <table:table-cell table:style-name="ce2" office:value-type="string" calcext:value-type="string">
            <text:p>1939-1374</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9</text:p>
          </table:table-cell>
          <table:table-cell table:style-name="ce4" office:value-type="string" calcext:value-type="string">
            <text:p>Study focuses on business process conformance rather than architectural conform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n architectural style for scalable choreography-based microservice-oriented distributed systems</text:p>
          </table:table-cell>
          <table:table-cell table:style-name="ce2" office:value-type="string" calcext:value-type="string">
            <text:p>Filippone, Gianluca and Pompilio, Claudio and Autili, Marco and Tivoli, Massimo</text:p>
          </table:table-cell>
          <table:table-cell table:style-name="ce2" office:value-type="string" calcext:value-type="string">
            <text:p>Computing</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1933 - 1956</text:p>
          </table:table-cell>
          <table:table-cell table:style-name="ce2" office:value-type="string" calcext:value-type="string">
            <text:p>105</text:p>
          </table:table-cell>
          <table:table-cell table:style-name="ce2"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 © 2022, The Author(s), under exclusive licence to Springer-Verlag GmbH Austria, part of Springer Nature.</text:p>
          </table:table-cell>
          <table:table-cell table:style-name="ce2" office:value-type="string" calcext:value-type="string">
            <text:p>Article</text:p>
          </table:table-cell>
          <table:table-cell table:style-name="ce2" office:value-type="string" calcext:value-type="string">
            <text:p>10.1007/s00607-022-01139-5</text:p>
          </table:table-cell>
          <table:table-cell table:style-name="ce2" office:value-type="string" calcext:value-type="string">
            <text:p>https://www.scopus.com/inward/record.uri?eid=2-s2.0-85143627065&amp;doi=10.1007%2Fs00607-022-01139-5&amp;partnerID=40&amp;md5=99268a3d9dd57170a99d75632836bdea</text:p>
          </table:table-cell>
          <table:table-cell table:style-name="ce2"/>
          <table:table-cell table:style-name="ce2" office:value-type="string" calcext:value-type="string">
            <text:p>Distributed systems; Load balancing; Microservices; Scalability</text:p>
          </table:table-cell>
          <table:table-cell table:style-name="ce2" office:value-type="string" calcext:value-type="string">
            <text:p>Architecture; Architectural style; Building services; Distributed coordination; Distributed systems; Load-Balancing; Microservice; Perceived performance; Property; Service choreographies; Service-based distributed systems; Scalability</text:p>
          </table:table-cell>
          <table:table-cell table:style-name="ce2" table:number-columns-repeated="3"/>
          <table:table-cell table:style-name="ce2" office:value-type="string" calcext:value-type="string">
            <text:p>Cited by: 2</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n EFSM-based test generation for validation of SDL specifications</text:p>
          </table:table-cell>
          <table:table-cell table:style-name="ce2" office:value-type="string" calcext:value-type="string">
            <text:p>Wong, W. Eric and Restrepo, Andy and Qi, Yu and Choi, Byoungju</text:p>
          </table:table-cell>
          <table:table-cell table:style-name="ce2"/>
          <table:table-cell table:style-name="ce2" office:value-type="string" calcext:value-type="string">
            <text:p>2008</text:p>
          </table:table-cell>
          <table:table-cell table:style-name="ce2" office:value-type="string" calcext:value-type="string">
            <text:p>ACM Digital Library</text:p>
          </table:table-cell>
          <table:table-cell table:style-name="ce2" office:value-type="string" calcext:value-type="string">
            <text:p>25–32</text:p>
          </table:table-cell>
          <table:table-cell table:style-name="ce2"/>
          <table:table-cell table:style-name="ce2" office:value-type="string" calcext:value-type="string">
            <text:p>Existing technique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framework that can accomplish conformance verification as well as coverage criteria-driven white box testing of the specification itself. This approach builds on earlier work which established how to translate SDL processes into standard EFSMs and identify "hot spots" - nodes or edges in the EFSM which should be prioritized during testing to effectively increase coverage. Our technique generates test sequences intended to cover selected hot spots; we address the possible infeasibility of such a test sequence by allowing for its rejection decided by a constraint solver and re-generation of an alternate test sequence to the hot spot. In this paper, we present our EFSM translation and test generation tool and provide a case study demonstrating the effectiveness of our coverage-based test sequence selection.</text:p>
          </table:table-cell>
          <table:table-cell table:style-name="ce2"/>
          <table:table-cell table:style-name="ce2" office:value-type="string" calcext:value-type="string">
            <text:p>10.1145/1370042.1370049</text:p>
          </table:table-cell>
          <table:table-cell table:style-name="ce2" office:value-type="string" calcext:value-type="string">
            <text:p>https://doi.org/10.1145/1370042.1370049</text:p>
          </table:table-cell>
          <table:table-cell table:style-name="ce2" table:number-columns-repeated="2"/>
          <table:table-cell table:style-name="ce2" office:value-type="string" calcext:value-type="string">
            <text:p>EFSM (extended finite state machine), SDL, coverage testing</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Reliable Monitoring for Runtime Validation of Choreographies</text:p>
          </table:table-cell>
          <table:table-cell table:style-name="ce2" office:value-type="string" calcext:value-type="string">
            <text:p>von Riegen, Michael and Ritter, Norbert</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10-315</text:p>
          </table:table-cell>
          <table:table-cell table:style-name="ce2"/>
          <table:table-cell table:style-name="ce2" office:value-type="string" calcext:value-type="string">
            <text:p>Cross-organizational business processes gain more and more attention in the scientific community. For modeling these processes, choreographies are an adequate solution to describe the observable behavior for each business participant and the corresponding protocols between them. Nevertheless, current approaches mainly focus on modeling and conformance checking before runtime. In contrast, this contribution concentrates on the runtime validation of choreographies and will thus propose a monitoring infrastructure that supports this validation. We will sketch the requirements for a monitoring infrastructure as well as the solutions in order to meet these requirements. Without such a reliable monitoring framework, a runtime validation framework simply would not be able to correctly validate the interactions.</text:p>
          </table:table-cell>
          <table:table-cell table:style-name="ce2"/>
          <table:table-cell table:style-name="ce2" office:value-type="string" calcext:value-type="string">
            <text:p>10.1109/ICIW.2009.52</text:p>
          </table:table-cell>
          <table:table-cell table:style-name="ce2" table:number-columns-repeated="3"/>
          <table:table-cell table:style-name="ce2" office:value-type="string" calcext:value-type="string">
            <text:p>Monitoring;Runtime;Web services;Service oriented architecture;Instruments;Transport protocols;Collaboration;Web and internet services;Information systems;Business communication;service-oriented architectures;cross-organizational business processes;choreographies;monitoring;validation;interactions</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Multimedia Content Provisioning Using Service Oriented Architectures</text:p>
          </table:table-cell>
          <table:table-cell table:style-name="ce2" office:value-type="string" calcext:value-type="string">
            <text:p>Brunkhorst, Ingo and Tönnies, Sascha and Balke, Wolf-Tilo</text:p>
          </table:table-cell>
          <table:table-cell table:style-name="ce2"/>
          <table:table-cell table:style-name="ce2" office:value-type="string" calcext:value-type="string">
            <text:p>2008</text:p>
          </table:table-cell>
          <table:table-cell table:style-name="ce2" office:value-type="string" calcext:value-type="string">
            <text:p>IEEE Digital Library</text:p>
          </table:table-cell>
          <table:table-cell table:style-name="ce2" office:value-type="string" calcext:value-type="string">
            <text:p>262-269</text:p>
          </table:table-cell>
          <table:table-cell table:style-name="ce2"/>
          <table:table-cell table:style-name="ce2" office:value-type="string" calcext:value-type="string">
            <text:p>Today, multimedia system are still widely realized as monolithic systems. But building such applications using Service-Oriented Architectures — especially for the Processing and Delivery of continous Multimedia data streams— has been a controversial topic since years. As a result, applications in the multimedia domain cannot yet benefit from Web service architectures. Thus, building and maintaining large-scale multimedia applications remains a difficult, costly, time-consuming and challenging problem. In this paper we present our approach for building large scale multimedia systems and compare it with the current state of the art, concentrating on the selection and validation of multimedia service composition.</text:p>
          </table:table-cell>
          <table:table-cell table:style-name="ce2"/>
          <table:table-cell table:style-name="ce2" office:value-type="string" calcext:value-type="string">
            <text:p>10.1109/ICWS.2008.37</text:p>
          </table:table-cell>
          <table:table-cell table:style-name="ce2" table:number-columns-repeated="3"/>
          <table:table-cell table:style-name="ce2" office:value-type="string" calcext:value-type="string">
            <text:p>Service oriented architecture;Streaming media;Multimedia systems;Web services;Buildings;Large-scale systems;Protocols;TV;Prototypes;IPTV;Multimedia Workflows;Conformance Verification;Validation</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Software Architecture in Practice: Challenges and Opportunities</text:p>
          </table:table-cell>
          <table:table-cell table:style-name="ce2" office:value-type="string" calcext:value-type="string">
            <text:p>Wan, Zhiyuan and Zhang, Yun and Xia, Xin and Jiang, Yi and Lo, David</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457–1469</text:p>
          </table:table-cell>
          <table:table-cell table:style-name="ce2"/>
          <table:table-cell table:style-name="ce2" office:value-type="string" calcext:value-type="string">
            <text:p>Software architecture has been an active research field for nearly four decades, in which previous studies make significant progress such as creating methods and techniques and building tools to support software architecture practice. Despite past efforts, we have little understanding of how practitioners perform software architecture related activities, and what challenges they face. Through interviews with 32 practitioners from 21 organizations across three continents, we identified challenges that practitioners face in software architecture practice during software development and maintenance. We reported on common software architecture activities at software requirements, design, construction and testing, and maintenance stages, as well as corresponding challenges. Our study uncovers that most of these challenges center around management, documentation, tooling and process, and collects recommendations to address these challenges.</text:p>
          </table:table-cell>
          <table:table-cell table:style-name="ce2"/>
          <table:table-cell table:style-name="ce2" office:value-type="string" calcext:value-type="string">
            <text:p>10.1145/3611643.3616367</text:p>
          </table:table-cell>
          <table:table-cell table:style-name="ce2" office:value-type="string" calcext:value-type="string">
            <text:p>https://doi.org/10.1145/3611643.3616367</text:p>
          </table:table-cell>
          <table:table-cell table:style-name="ce2" table:number-columns-repeated="2"/>
          <table:table-cell table:style-name="ce2" office:value-type="string" calcext:value-type="string">
            <text:p>Grounded Theory, Practice, Software Architecture, Software Development and Maintenance</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econdary studies, such as Systematic Literature Reviews (SLRs), Mapping Studies (SMS), Multivocal Reviews (MLRs), or surveys.</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The study discusses software architecture in general without addressing conformance or compliance.</text:p>
          </table:table-cell>
          <table:table-cell table:number-columns-repeated="998"/>
        </table:table-row>
        <table:table-row table:style-name="ro1">
          <table:table-cell table:style-name="ce2" office:value-type="string" calcext:value-type="string">
            <text:p>Process mining for healthcare decision analytics with micro-costing estimations</text:p>
          </table:table-cell>
          <table:table-cell table:style-name="ce2" office:value-type="string" calcext:value-type="string">
            <text:p>Leemans, Sander J.J. and Partington, Andrew and Karnon, Jonathan and Wynn, Moe T.</text:p>
          </table:table-cell>
          <table:table-cell table:style-name="ce2" office:value-type="string" calcext:value-type="string">
            <text:p>Artif. Intell. Med.</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135</text:p>
          </table:table-cell>
          <table:table-cell table:style-name="ce2" office:value-type="string" calcext:value-type="string">
            <text:p>Managing constrained healthcare resources is an important and inescapable role of healthcare decision makers. Allocative decisions are based on downstream consequences of changes to care processes: judging whether the costs involved are offset by the magnitude of the consequences, and therefore whether the change represents value for money. Process mining techniques can inform such decisions by quantitatively discovering, comparing and detailing care processes using recorded data, however the scope of techniques typically excludes anything ‘after-the-process’ i.e., their accumulated costs and resulting consequences. Cost considerations are increasingly incorporated into process mining techniques, but the majority of healthcare costs for service and overhead components are commonly apportioned and recorded at the patient (trace) level, hiding event level detail. Within decision-analysis, event-driven and individual-level simulation models are sometimes used to forecast the expected downstream consequences of process changes, but are expensive to manually operationalise. In this paper, we address both of these gaps within and between process mining and decision analytics, by better linking them together. In particular, we introduce a new type of process model containing trace data that can be used in individual-level or cohort-level decision-analytical model building. Furthermore, we enhance these models with process-based micro-costing estimations. The approach was evaluated with health economics and decision modelling experts, with discussion centred on how the outputs could be used, and how similar information would otherwise be compiled.</text:p>
          </table:table-cell>
          <table:table-cell table:style-name="ce2"/>
          <table:table-cell table:style-name="ce2" office:value-type="string" calcext:value-type="string">
            <text:p>10.1016/j.artmed.2022.102473</text:p>
          </table:table-cell>
          <table:table-cell table:style-name="ce2" office:value-type="string" calcext:value-type="string">
            <text:p>https://doi.org/10.1016/j.artmed.2022.102473</text:p>
          </table:table-cell>
          <table:table-cell table:style-name="ce2" table:number-columns-repeated="2"/>
          <table:table-cell table:style-name="ce2" office:value-type="string" calcext:value-type="string">
            <text:p>Process mining, Decision analytics, Healthcare economics</text:p>
          </table:table-cell>
          <table:table-cell table:style-name="ce2" office:value-type="string" calcext:value-type="string">
            <text:p>Elsevier Science Publishers Ltd.</text:p>
          </table:table-cell>
          <table:table-cell table:style-name="ce2" office:value-type="string" calcext:value-type="string">
            <text:p>0933-3657</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Gradual Drift Detection in Process Models Using Conformance Metrics</text:p>
          </table:table-cell>
          <table:table-cell table:style-name="ce2" office:value-type="string" calcext:value-type="string">
            <text:p>Gallego-Fontenla, V\'{\i}ctor and Gamallo-Fernandez, Pedro and Vidal, Juan C. and Lama, Manuel</text:p>
          </table:table-cell>
          <table:table-cell table:style-name="ce2" office:value-type="string" calcext:value-type="string">
            <text:p>ACM Trans. Knowl. Discov. Data</text:p>
          </table:table-cell>
          <table:table-cell table:style-name="ce2" office:value-type="string" calcext:value-type="string">
            <text:p>2025</text:p>
          </table:table-cell>
          <table:table-cell table:style-name="ce2" office:value-type="string" calcext:value-type="string">
            <text:p>ACM Digital Library</text:p>
          </table:table-cell>
          <table:table-cell table:style-name="ce2"/>
          <table:table-cell table:style-name="ce2" office:value-type="string" calcext:value-type="string">
            <text:p>19</text:p>
          </table:table-cell>
          <table:table-cell table:style-name="ce2" office:value-type="string" calcext:value-type="string">
            <text:p>Changes, planned or unexpected, are common during the execution of real-life processes. Detecting these changes is a must for optimizing the performance of organizations running such processes. Most of the algorithms present in the state-of-the-art focus on the detection of sudden changes, leaving aside other types of changes. In this article, we will focus on the automatic detection of gradual drifts, a special type of change, in which the cases of two models overlap during a period of time. The proposed algorithm relies on conformance checking metrics to carry out the automatic detection of the changes, performing also a fully automatic classification of these changes into sudden or gradual. The approach has been validated with a synthetic dataset consisting of 120 logs with different distributions of changes, getting better results in terms of detection and classification accuracy, delay, and change region overlapping than the main state-of-the-art algorithms.</text:p>
          </table:table-cell>
          <table:table-cell table:style-name="ce2"/>
          <table:table-cell table:style-name="ce2" office:value-type="string" calcext:value-type="string">
            <text:p>10.1145/3716169</text:p>
          </table:table-cell>
          <table:table-cell table:style-name="ce2" office:value-type="string" calcext:value-type="string">
            <text:p>https://doi.org/10.1145/3716169</text:p>
          </table:table-cell>
          <table:table-cell table:style-name="ce2" table:number-columns-repeated="2"/>
          <table:table-cell table:style-name="ce2" office:value-type="string" calcext:value-type="string">
            <text:p>Business Processes, Concept drift, Gradual drift, Process mining, Conformance checking</text:p>
          </table:table-cell>
          <table:table-cell table:style-name="ce2" office:value-type="string" calcext:value-type="string">
            <text:p>Association for Computing Machinery</text:p>
          </table:table-cell>
          <table:table-cell table:style-name="ce2" office:value-type="string" calcext:value-type="string">
            <text:p>1556-4681</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3</text:p>
          </table:table-cell>
          <table:table-cell table:style-name="ce4" office:value-type="string" calcext:value-type="string">
            <text:p>Study is a secondary study (SLR, SMS, survey).</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Leveraging Petri Nets for&amp;nbsp;Workflow Anomaly Detection in&amp;nbsp;Microservice Architectures</text:p>
          </table:table-cell>
          <table:table-cell table:style-name="ce2" office:value-type="string" calcext:value-type="string">
            <text:p>Kamboj, Priyanka and Artho, Cyrille and Guanciale, Roberto and Jabbarvand, Reyhaneh and Godfrey, Brighten</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219–241</text:p>
          </table:table-cell>
          <table:table-cell table:style-name="ce2"/>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text:p>
          </table:table-cell>
          <table:table-cell table:style-name="ce2"/>
          <table:table-cell table:style-name="ce2" office:value-type="string" calcext:value-type="string">
            <text:p>10.1007/978-3-031-94634-9_11</text:p>
          </table:table-cell>
          <table:table-cell table:style-name="ce2" office:value-type="string" calcext:value-type="string">
            <text:p>https://doi.org/10.1007/978-3-031-94634-9_11</text:p>
          </table:table-cell>
          <table:table-cell table:style-name="ce2" table:number-columns-repeated="2"/>
          <table:table-cell table:style-name="ce2" office:value-type="string" calcext:value-type="string">
            <text:p>Alignments, Cost function, Delay, Microservices, Process mining, Process discovery, Conformance Check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Efficiently Computing Alignments: Using the Extended Marking Equation</text:p>
          </table:table-cell>
          <table:table-cell table:style-name="ce2" office:value-type="string" calcext:value-type="string">
            <text:p>van Dongen, Boudewijn F.</text:p>
          </table:table-cell>
          <table:table-cell table:style-name="ce2"/>
          <table:table-cell table:style-name="ce2" office:value-type="string" calcext:value-type="string">
            <text:p>2018</text:p>
          </table:table-cell>
          <table:table-cell table:style-name="ce2" office:value-type="string" calcext:value-type="string">
            <text:p>ACM Digital Library</text:p>
          </table:table-cell>
          <table:table-cell table:style-name="ce2" office:value-type="string" calcext:value-type="string">
            <text:p>197–214</text:p>
          </table:table-cell>
          <table:table-cell table:style-name="ce2"/>
          <table:table-cell table:style-name="ce2" office:value-type="string" calcext:value-type="string">
            <text:p>Conformance checking is considered to be anything where observed behaviour needs to be related to already modelled behaviour. Fundamental to conformance checking are alignments which provide a precise relation between a sequence of activities observed in an event log and a execution sequence of a model. However, computing alignments is a complex task, both in time and memory, especially when models contain large amounts of parallelism.When computing alignments for Petri nets, (Integer) Linear Programming problems based on the marking equation are typically used to guide the search. Solving such problems is the main driver for the time complexity of alignments. In this paper, we adopt existing work in such a way that (a) the extended marking equation is used rather than the marking equation and (b) the number of linear problems that is solved is kept at a minimum.To do so, we exploit fundamental properties of the Petri nets and we show that we are able to compute optimal alignments for models for which this was previously infeasible. Furthermore, using a large collection of benchmark models, we empirically show that we improve on the state-of-the-art in terms of time and memory complexity.</text:p>
          </table:table-cell>
          <table:table-cell table:style-name="ce2"/>
          <table:table-cell table:style-name="ce2" office:value-type="string" calcext:value-type="string">
            <text:p>10.1007/978-3-319-98648-7_12</text:p>
          </table:table-cell>
          <table:table-cell table:style-name="ce2" office:value-type="string" calcext:value-type="string">
            <text:p>https://doi.org/10.1007/978-3-319-98648-7_12</text:p>
          </table:table-cell>
          <table:table-cell table:style-name="ce2" table:number-columns-repeated="2"/>
          <table:table-cell table:style-name="ce2" office:value-type="string" calcext:value-type="string">
            <text:p>Alignments, Conformance checking, Process Min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Quality-Informed Process Mining: A Case for Standardised Data Quality Annotations</text:p>
          </table:table-cell>
          <table:table-cell table:style-name="ce2" office:value-type="string" calcext:value-type="string">
            <text:p>Goel, Kanika and Leemans, Sander J. J. and Martin, Niels and Wynn, Moe T.</text:p>
          </table:table-cell>
          <table:table-cell table:style-name="ce2" office:value-type="string" calcext:value-type="string">
            <text:p>ACM Trans. Knowl. Discov. Data</text:p>
          </table:table-cell>
          <table:table-cell table:style-name="ce2" office:value-type="string" calcext:value-type="string">
            <text:p>2022</text:p>
          </table:table-cell>
          <table:table-cell table:style-name="ce2" office:value-type="string" calcext:value-type="string">
            <text:p>ACM Digital Library</text:p>
          </table:table-cell>
          <table:table-cell table:style-name="ce2"/>
          <table:table-cell table:style-name="ce2" office:value-type="string" calcext:value-type="string">
            <text:p>16</text:p>
          </table:table-cell>
          <table:table-cell table:style-name="ce2" office:value-type="string" calcext:value-type="string">
            <text:p>Real-life event logs, reflecting the actual executions of complex business processes, are faced with numerous data quality issues. Extensive data sanity checks and pre-processing are usually needed before historical data can be used as input to obtain reliable data-driven insights. However, most of the existing algorithms in process mining, a field focusing on data-driven process analysis, do not take any data quality issues or the potential effects of data pre-processing into account explicitly. This can result in erroneous process mining results, leading to inaccurate, or misleading conclusions about the process under investigation. To address this gap, we propose data quality annotations for event logs, which can be used by process mining algorithms to generate quality-informed insights. Using a design science approach, requirements are formulated, which are leveraged to propose data quality annotations. Moreover, we present the “Quality-Informed visual Miner” plug-in to demonstrate the potential utility and impact of data quality annotations. Our experimental results, utilising both synthetic and real-life event logs, show how the use of data quality annotations by process mining techniques can assist in increasing the reliability of performance analysis results.</text:p>
          </table:table-cell>
          <table:table-cell table:style-name="ce2"/>
          <table:table-cell table:style-name="ce2" office:value-type="string" calcext:value-type="string">
            <text:p>10.1145/3511707</text:p>
          </table:table-cell>
          <table:table-cell table:style-name="ce2" office:value-type="string" calcext:value-type="string">
            <text:p>https://doi.org/10.1145/3511707</text:p>
          </table:table-cell>
          <table:table-cell table:style-name="ce2" table:number-columns-repeated="2"/>
          <table:table-cell table:style-name="ce2" office:value-type="string" calcext:value-type="string">
            <text:p>Process mining, data quality, annotations, metadata, quality-informed performance analysis, quality-informed conformance checking</text:p>
          </table:table-cell>
          <table:table-cell table:style-name="ce2" office:value-type="string" calcext:value-type="string">
            <text:p>Association for Computing Machinery</text:p>
          </table:table-cell>
          <table:table-cell table:style-name="ce2" office:value-type="string" calcext:value-type="string">
            <text:p>1556-4681</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9</text:p>
          </table:table-cell>
          <table:table-cell table:style-name="ce4" office:value-type="string" calcext:value-type="string">
            <text:p>Study focuses on business process conformance rather than architectural conform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Enhanced Transformation of&amp;nbsp;BPMN Models with&amp;nbsp;Cancellation Features</text:p>
          </table:table-cell>
          <table:table-cell table:style-name="ce2" office:value-type="string" calcext:value-type="string">
            <text:p>Lomidze, Giorgi and Schuster, Daniel and Li, Chiao-Yun and van Zelst, Sebastiaan J.</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28–144</text:p>
          </table:table-cell>
          <table:table-cell table:style-name="ce2"/>
          <table:table-cell table:style-name="ce2" office:value-type="string" calcext:value-type="string">
            <text:p>Canceling ongoing process instances is a natural phenomenon in practice. As such, modeling cancellation behavior is supported in the Business Process Model and Notation (BPMN) via exception events. Event-data-driven analysis techniques using such process models, e.g., conformance checking, require converting the BPMN model into a formal process modeling representation, i.e., Petri nets. However, the existing transformation of BPMN models with exception events renders a classical Petri net, with various additional modeling constructs to mimic the exception behavior. Using such a model in a subsequent analysis renders an infeasible computational complexity. Hence, this paper presents a novel conversion of BPMN models with exception events into reset nets, significantly reducing the number of required invisible transitions in the corresponding transformation. Our results show that the enhanced conversion reduces the computational effort of using the converted models for conformance checking.</text:p>
          </table:table-cell>
          <table:table-cell table:style-name="ce2"/>
          <table:table-cell table:style-name="ce2" office:value-type="string" calcext:value-type="string">
            <text:p>10.1007/978-3-031-17604-3_8</text:p>
          </table:table-cell>
          <table:table-cell table:style-name="ce2" office:value-type="string" calcext:value-type="string">
            <text:p>https://doi.org/10.1007/978-3-031-17604-3_8</text:p>
          </table:table-cell>
          <table:table-cell table:style-name="ce2" table:number-columns-repeated="2"/>
          <table:table-cell table:style-name="ce2" office:value-type="string" calcext:value-type="string">
            <text:p>Business process management, Business process modeling, BPMN, Petri nets</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rtifact-Driven Process Monitoring: A Viable Solution to Continuously and Autonomously Monitor Business Processes</text:p>
          </table:table-cell>
          <table:table-cell table:style-name="ce2" office:value-type="string" calcext:value-type="string">
            <text:p>Meroni, Giovanni</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37–43</text:p>
          </table:table-cell>
          <table:table-cell table:style-name="ce2"/>
          <table:table-cell table:style-name="ce2" office:value-type="string" calcext:value-type="string">
            <text:p>Business process monitoring aims at identifying how well running processes are performing with respect to performance measures and objectives. By observing the execution of a process, process monitoring is also responsible for creating process traces, which can be subsequently used by process mining algorithms to gain further insights on the process.Among the various monitoring solutions, artifact-driven monitoring has been proposed as a viable solution to continuously and autonomously monitor business processes. By monitoring the changes in the physical and virtual objects (i.e., artifacts) participating in the process, artifact-driven monitoring can autonomously generate traces that include events related to semi-automatic and manual tasks. Also, by relying on a declarative representation of the process to monitor, artifact-driven monitoring can detecting violations in the execution flow as soon as they occur. In addition, artifact-driven monitoring can identify the process elements affected by a violation, and it can continue monitoring the process without human intervention.This tutorial paper will firstly provide an introduction to process monitoring, and the recent advancements in this field. Then, an overview on how artifact-driven monitoring works will be provided.</text:p>
          </table:table-cell>
          <table:table-cell table:style-name="ce2"/>
          <table:table-cell table:style-name="ce2" office:value-type="string" calcext:value-type="string">
            <text:p>10.1007/978-3-030-85469-0_5</text:p>
          </table:table-cell>
          <table:table-cell table:style-name="ce2" office:value-type="string" calcext:value-type="string">
            <text:p>https://doi.org/10.1007/978-3-030-85469-0_5</text:p>
          </table:table-cell>
          <table:table-cell table:style-name="ce2" table:number-columns-repeated="2"/>
          <table:table-cell table:style-name="ce2" office:value-type="string" calcext:value-type="string">
            <text:p>Business process monitoring, Artifact-driven, Conformance check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Reinforcement Learning-Based Streaming Process Discovery Under Concept Drift</text:p>
          </table:table-cell>
          <table:table-cell table:style-name="ce2" office:value-type="string" calcext:value-type="string">
            <text:p>Cai, Rujian and Zheng, Chao and Wang, Jian and Li, Duantengchuan and Wang, Chong and Li, Bing</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55–70</text:p>
          </table:table-cell>
          <table:table-cell table:style-name="ce2"/>
          <table:table-cell table:style-name="ce2" office:value-type="string" calcext:value-type="string">
            <text:p>Streaming process discovery aims to discover a process model that may change over time, coping with the challenges of concept drift in business processes. Existing studies update process models with fixed strategies, neglecting the highly dynamic nature of trace streams. Consequently, they fail to accurately reveal the process evolution caused by concept drift. This paper proposes RLSPD (Reinforcement Learning-based Streaming Process Discovery), a dynamic process discovery approach for constructing an online process model on a trace stream. RLSPD leverages conformance-checking information to characterize trace distribution and employs a reinforcement learning policy to capture fluctuations in the trace stream. Based on the dynamic parameters provided by reinforcement learning, we extract representative trace variants within a memory window using frequency-based sampling and perform concept drift detection. Upon detecting concept drift, the process model is updated by process discovery. Experimental results on real-life event logs demonstrate that our approach effectively adapts to the high dynamics of trace streams, improving the conformance of constructed process models to upcoming traces and reducing erroneous model updates. Additionally, the results highlight the significance of the pre-trained policy in dealing with unknown environments.</text:p>
          </table:table-cell>
          <table:table-cell table:style-name="ce2"/>
          <table:table-cell table:style-name="ce2" office:value-type="string" calcext:value-type="string">
            <text:p>10.1007/978-3-031-61057-8_4</text:p>
          </table:table-cell>
          <table:table-cell table:style-name="ce2" office:value-type="string" calcext:value-type="string">
            <text:p>https://doi.org/10.1007/978-3-031-61057-8_4</text:p>
          </table:table-cell>
          <table:table-cell table:style-name="ce2" table:number-columns-repeated="2"/>
          <table:table-cell table:style-name="ce2" office:value-type="string" calcext:value-type="string">
            <text:p>Process discovery, Concept drift, Trace stream, Reinforcement learn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rchitectural Technical Debt - A Systematic Mapping Study</text:p>
          </table:table-cell>
          <table:table-cell table:style-name="ce2" office:value-type="string" calcext:value-type="string">
            <text:p>Sousa, Armando and Rocha, Lincoln and Britto, Ricardo</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96–205</text:p>
          </table:table-cell>
          <table:table-cell table:style-name="ce2"/>
          <table:table-cell table:style-name="ce2" office:value-type="string" calcext:value-type="string">
            <text:p>Architectural Technical Debt (ATD) is one of the leading Technical Debt (TD) that causes more impact in maintaining and evolving complex software systems. We conduct a Systematic Mapping Study (SMS) to discover the main aspects of identifying and monitoring ATD items to help determine what the community has been studying about it in the last ten years. We evaluated 70 studies dating from 2012 to 2022. We find out the main types of ATD, how to measure and monitor ATD, which techniques and methods stand out in this area, the most used tools, and directions on how to calculate the cost of paying for ATD items. The results of this mapping study can help identify points that still require investigations on identifying, monitoring, and calculating the effort to fix ATD items. Furthermore, we have proposed a roadmap to aid managing Architectural Technical Debt, which provides guidance for identifying and monitoring ATD items in software systems.</text:p>
          </table:table-cell>
          <table:table-cell table:style-name="ce2"/>
          <table:table-cell table:style-name="ce2" office:value-type="string" calcext:value-type="string">
            <text:p>10.1145/3613372.3613399</text:p>
          </table:table-cell>
          <table:table-cell table:style-name="ce2" office:value-type="string" calcext:value-type="string">
            <text:p>https://doi.org/10.1145/3613372.3613399</text:p>
          </table:table-cell>
          <table:table-cell table:style-name="ce2" table:number-columns-repeated="2"/>
          <table:table-cell table:style-name="ce2" office:value-type="string" calcext:value-type="string">
            <text:p>Architectural Technical Debt, Large-scale Software Systems, Software Maintenance and Evolution</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econdary studies, such as Systematic Literature Reviews (SLRs), Mapping Studies (SMS), Multivocal Reviews (MLRs), or surveys.</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3</text:p>
          </table:table-cell>
          <table:table-cell table:style-name="ce4" office:value-type="string" calcext:value-type="string">
            <text:p>Study is a secondary study (SLR, SMS, survey).</text:p>
          </table:table-cell>
          <table:table-cell table:style-name="ce4" office:value-type="string" calcext:value-type="string">
            <text:p>REJECTED</text:p>
          </table:table-cell>
          <table:table-cell table:style-name="ce4" office:value-type="string" calcext:value-type="string">
            <text:p>EC3</text:p>
          </table:table-cell>
          <table:table-cell table:style-name="ce4" office:value-type="string" calcext:value-type="string">
            <text:p>The study is a secondary study (review or survey).</text:p>
          </table:table-cell>
          <table:table-cell table:number-columns-repeated="998"/>
        </table:table-row>
        <table:table-row table:style-name="ro1">
          <table:table-cell table:style-name="ce2" office:value-type="string" calcext:value-type="string">
            <text:p>Machine learning approaches for the discovery of clinical pathways from patient data: A systematic review</text:p>
          </table:table-cell>
          <table:table-cell table:style-name="ce2" office:value-type="string" calcext:value-type="string">
            <text:p>Muyama, Lillian and Neuraz, Antoine and Coulet, Adrien</text:p>
          </table:table-cell>
          <table:table-cell table:style-name="ce2" office:value-type="string" calcext:value-type="string">
            <text:p>J. of Biomedical Informatics</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160</text:p>
          </table:table-cell>
          <table:table-cell table:style-name="ce2" office:value-type="string" calcext:value-type="string">
            <text:p>Background:</text:p>
            <text:p>Clinical pathways are sequences of events followed during the clinical care of a group of patients who meet pre-defined criteria. They have many applications ranging from healthcare evaluation and optimization to clinical decision support. These pathways can be discovered from existing healthcare data, in particular with machine learning which is a family of methods used to learn patterns from data. This review provides a comprehensive overview of the literature concerning the use of machine learning methods for clinical pathway discovery from patient data.</text:p>
            <text:p>Methods:</text:p>
            <text:p>Guided by the Preferred Reporting Items for Systematic Reviews and Meta-Analyses (PRISMA) method , we conducted a systematic review of the existing literature. We searched 6 databases, i.e., ACM Digital Library, ScienceDirect, Web of Science, PubMed, IEEE Xplore, and Scopus spanning from January 2004 to December 2023 using search terms pertinent to clinical pathways and their development. Subsequently, the retrieved papers were analyzed to assess their relevance to the scope of this study.</text:p>
            <text:p>Results:</text:p>
            <text:p>In total, 131 papers that met the specified inclusion criteria were identified. These papers expressed diverse motivations behind data-driven clinical pathway discovery ranging from knowledge discovery to conformance checking with established clinical guidelines (derived from existing literature and clinical experts). Notably, the predominant methods employed (67.2%, </text:p>
            <text:p>=88) involved unsupervised machine learning techniques, such as clustering and process mining.</text:p>
            <text:p>Conclusions:</text:p>
            <text:p>Relevant clinical pathways can be discovered from patient data using machine learning methods, with the desirable potential to aid clinical decision-making in healthcare. However, to reach this objective, the methods used to discover pathways should be reproducible, and rigorous performance evaluation by clinical experts needs to be conducted for validation.</text:p>
          </table:table-cell>
          <table:table-cell table:style-name="ce2"/>
          <table:table-cell table:style-name="ce2" office:value-type="string" calcext:value-type="string">
            <text:p>10.1016/j.jbi.2024.104746</text:p>
          </table:table-cell>
          <table:table-cell table:style-name="ce2" office:value-type="string" calcext:value-type="string">
            <text:p>https://doi.org/10.1016/j.jbi.2024.104746</text:p>
          </table:table-cell>
          <table:table-cell table:style-name="ce2" table:number-columns-repeated="2"/>
          <table:table-cell table:style-name="ce2" office:value-type="string" calcext:value-type="string">
            <text:p>Clinical pathway, Machine learning, Data-driven approach, Patient data</text:p>
          </table:table-cell>
          <table:table-cell table:style-name="ce2" office:value-type="string" calcext:value-type="string">
            <text:p>Elsevier Science</text:p>
          </table:table-cell>
          <table:table-cell table:style-name="ce2" office:value-type="string" calcext:value-type="string">
            <text:p>1532-0464</text:p>
          </table:table-cell>
          <table:table-cell table:style-name="ce2" table:number-columns-repeated="2"/>
          <table:table-cell table:style-name="ce2" office:value-type="string" calcext:value-type="string">
            <text:p>Secondary studies, such as Systematic Literature Reviews (SLRs), Mapping Studies (SMS), Multivocal Reviews (MLRs), or surveys.</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3</text:p>
          </table:table-cell>
          <table:table-cell table:style-name="ce4" office:value-type="string" calcext:value-type="string">
            <text:p>Study is a secondary study (SLR, SMS, survey).</text:p>
          </table:table-cell>
          <table:table-cell table:style-name="ce4" office:value-type="string" calcext:value-type="string">
            <text:p>REJECTED</text:p>
          </table:table-cell>
          <table:table-cell table:style-name="ce4" office:value-type="string" calcext:value-type="string">
            <text:p>EC3</text:p>
          </table:table-cell>
          <table:table-cell table:style-name="ce4" office:value-type="string" calcext:value-type="string">
            <text:p>The study is a secondary study (review or survey).</text:p>
          </table:table-cell>
          <table:table-cell table:number-columns-repeated="998"/>
        </table:table-row>
        <table:table-row table:style-name="ro1">
          <table:table-cell table:style-name="ce2" office:value-type="string" calcext:value-type="string">
            <text:p>Real-World Streaming Process Discovery from&amp;nbsp;Low-Level Event Data</text:p>
          </table:table-cell>
          <table:table-cell table:style-name="ce2" office:value-type="string" calcext:value-type="string">
            <text:p>Lefebure, Franck and Thuault, Cecile and Cholet, Stephane</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50–164</text:p>
          </table:table-cell>
          <table:table-cell table:style-name="ce2"/>
          <table:table-cell table:style-name="ce2" office:value-type="string" calcext:value-type="string">
            <text:p>New perspectives on monitoring and optimising business processes have emerged from advances in process mining research, as well as techniques for their discovery, conformance checking and enhancement. Many identify process discovery as the most challenging task, as it is the first in line, and as the methods deployed could impact the effectiveness of subsequent analysis. More and more companies are ready to use process mining products, but not at any cost. They require them to be highly reliable, fast and to introduce a limited overload on their resources (including human). In a real-word setting, specific business constraints add to common issues, such as high data frequency and asynchrony. This also adds to the complexity of real-world processes and of process mining itself. Mainstream studies propose to use a finite set of high-level and business-oriented event logs, where key attributes (i.e., case, activity and timestamp) are known, and apply unscaled discovery techniques to produce control-flow process models. In this research, we propose an original approach we have designed and deployed to mine processes of businesses. It features fully streamed and real-time techniques to mine low-level technical event data, where key attributes do not exist and have to be forged. We will focus on the scope of process discovery, and expose our adoption of an organizational perspective, driven by (semi-) unsupervised discovery, streaming and scaling features.</text:p>
          </table:table-cell>
          <table:table-cell table:style-name="ce2"/>
          <table:table-cell table:style-name="ce2" office:value-type="string" calcext:value-type="string">
            <text:p>10.1007/978-3-031-44505-7_11</text:p>
          </table:table-cell>
          <table:table-cell table:style-name="ce2" office:value-type="string" calcext:value-type="string">
            <text:p>https://doi.org/10.1007/978-3-031-44505-7_11</text:p>
          </table:table-cell>
          <table:table-cell table:style-name="ce2" table:number-columns-repeated="2"/>
          <table:table-cell table:style-name="ce2" office:value-type="string" calcext:value-type="string">
            <text:p>Streaming process mining, Unsupervised process discovery, Real time, Scaling process mining, Organizational perspective</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9</text:p>
          </table:table-cell>
          <table:table-cell table:style-name="ce4" office:value-type="string" calcext:value-type="string">
            <text:p>Study focuses on business process conformance rather than architectural conform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Decision Mining versus Process Mining: a Comparison of Mining Methods</text:p>
          </table:table-cell>
          <table:table-cell table:style-name="ce2" office:value-type="string" calcext:value-type="string">
            <text:p>de Jong, Robin and Leewis, Sam and Berkhout, Matthijs</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28–32</text:p>
          </table:table-cell>
          <table:table-cell table:style-name="ce2"/>
          <table:table-cell table:style-name="ce2" office:value-type="string" calcext:value-type="string">
            <text:p>Since the advent of digitization and automation there has been a greater need for analysis of business processes and decisions. Data lies at the foundation for this. In this study the mining of decisions is further defined using Process mining as a reference. These two mining methods have some overlap but there are significant differences. These overlap and differences have come to light through the use of a conceptual model. By using the conceptual model with a fictional event log for Process mining and a fictional decision log for Decision mining, the differences and similarities could be explained. Results show that decision mining has an overlap with Process mining, but the differences together make the gap between Decision mining and Process mining too large to be considered as one field. Further research is needed to for the utilization of real life scenario's, compared to the fictional data used in this study, to ensure a clear overview of the difference and similarities between the two mining methods.</text:p>
          </table:table-cell>
          <table:table-cell table:style-name="ce2"/>
          <table:table-cell table:style-name="ce2" office:value-type="string" calcext:value-type="string">
            <text:p>10.1145/3507485.3507490</text:p>
          </table:table-cell>
          <table:table-cell table:style-name="ce2" office:value-type="string" calcext:value-type="string">
            <text:p>https://doi.org/10.1145/3507485.3507490</text:p>
          </table:table-cell>
          <table:table-cell table:style-name="ce2" table:number-columns-repeated="2"/>
          <table:table-cell table:style-name="ce2" office:value-type="string" calcext:value-type="string">
            <text:p>Data mining, Decision mining, Process mining</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Research on Enterprise Business Architecture Design Method Based on Domain-Driven Design</text:p>
          </table:table-cell>
          <table:table-cell table:style-name="ce2" office:value-type="string" calcext:value-type="string">
            <text:p>Deng, Huiwen and Zhao, Yan</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1056–1061</text:p>
          </table:table-cell>
          <table:table-cell table:style-name="ce2"/>
          <table:table-cell table:style-name="ce2" office:value-type="string" calcext:value-type="string">
            <text:p>In the transition to the "digital" era, many large enterprises have adopted enterprise architecture methodologies for top-level design, business architecture as the core content of enterprise architecture, its uniqueness lies in helping enterprises to complete the profound "digital" transformation, so that enterprises through information technology will be strategy, business and IT profoundly connected, become efficient "digital" enterprises. This paper focuses on the relationship between enterprise business architecture and IT architecture, and tries to introduce the Domain-Driven Design idea in software design into the business model modeling process, so as to optimize business combing, process management and data modeling, build strategy-capability business architecture, and guide the construction of enterprise digital information system. The research results have guiding significance for promoting the top-level design of enterprise business, the construction of reusable enterprise capabilities, and the development and implementation of information systems.</text:p>
          </table:table-cell>
          <table:table-cell table:style-name="ce2"/>
          <table:table-cell table:style-name="ce2" office:value-type="string" calcext:value-type="string">
            <text:p>10.1145/3708036.3708210</text:p>
          </table:table-cell>
          <table:table-cell table:style-name="ce2" office:value-type="string" calcext:value-type="string">
            <text:p>https://doi.org/10.1145/3708036.3708210</text:p>
          </table:table-cell>
          <table:table-cell table:style-name="ce2" table:number-columns-repeated="2"/>
          <table:table-cell table:style-name="ce2" office:value-type="string" calcext:value-type="string">
            <text:p>Digital transformation, Domain-Driven Design, Enterprise business architecture, Meta-model</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The study discusses software architecture in general without addressing conformance or compliance.</text:p>
          </table:table-cell>
          <table:table-cell table:number-columns-repeated="998"/>
        </table:table-row>
        <table:table-row table:style-name="ro1">
          <table:table-cell table:style-name="ce2" office:value-type="string" calcext:value-type="string">
            <text:p>Validation of SDL specifications using EFSM-based test generation</text:p>
          </table:table-cell>
          <table:table-cell table:style-name="ce2" office:value-type="string" calcext:value-type="string">
            <text:p>Wong, W. Eric and Restrepo, Andy and Choi, Byoungju</text:p>
          </table:table-cell>
          <table:table-cell table:style-name="ce2" office:value-type="string" calcext:value-type="string">
            <text:p>Inf. Softw. Technol.</text:p>
          </table:table-cell>
          <table:table-cell table:style-name="ce2" office:value-type="string" calcext:value-type="string">
            <text:p>2009</text:p>
          </table:table-cell>
          <table:table-cell table:style-name="ce2" office:value-type="string" calcext:value-type="string">
            <text:p>ACM Digital Library</text:p>
          </table:table-cell>
          <table:table-cell table:style-name="ce2" office:value-type="string" calcext:value-type="string">
            <text:p>1505–1519</text:p>
          </table:table-cell>
          <table:table-cell table:style-name="ce2" office:value-type="string" calcext:value-type="string">
            <text:p>51</text:p>
          </table:table-cell>
          <table:table-cell table:style-name="ce2" office:value-type="string" calcext:value-type="string">
            <text:p>Existing method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method that can accomplish conformance verification as well as coverage criteria-driven white box testing of the specification itself. We first reformat a set of EFSMs equivalent to the processes in an SDL specification and identify ''hot spots'' - nodes or edges in the EFSM which should be prioritized during testing to effectively increase coverage. Then, we generate test sequences intended to cover selected hot spots; we address the possible infeasibility of such a test sequence by allowing for its rejection decided by a constraint solver and re-generation of an alternate test sequence to the hot spot. In this paper, we present our test generation method and tool, and provide case studies on five SDL processes demonstrating the effectiveness of our coverage-based test sequence selection.</text:p>
          </table:table-cell>
          <table:table-cell table:style-name="ce2"/>
          <table:table-cell table:style-name="ce2" office:value-type="string" calcext:value-type="string">
            <text:p>10.1016/j.infsof.2009.06.005</text:p>
          </table:table-cell>
          <table:table-cell table:style-name="ce2" office:value-type="string" calcext:value-type="string">
            <text:p>https://doi.org/10.1016/j.infsof.2009.06.005</text:p>
          </table:table-cell>
          <table:table-cell table:style-name="ce2" table:number-columns-repeated="2"/>
          <table:table-cell table:style-name="ce2" office:value-type="string" calcext:value-type="string">
            <text:p>Constraint solver, Coverage testing, Dominator analysis, EFSM (Extended Finite State Machine), Hot spot, SDL</text:p>
          </table:table-cell>
          <table:table-cell table:style-name="ce2" office:value-type="string" calcext:value-type="string">
            <text:p>Butterworth-Heinemann</text:p>
          </table:table-cell>
          <table:table-cell table:style-name="ce2" office:value-type="string" calcext:value-type="string">
            <text:p>0950-5849</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 Symmetric Petri Net Model of Generic Publish-Subscribe Systems for Verification and Business Process Conformance Checking</text:p>
          </table:table-cell>
          <table:table-cell table:style-name="ce2" office:value-type="string" calcext:value-type="string">
            <text:p>Meyer, Tom</text:p>
          </table:table-cell>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88 - 109</text:p>
          </table:table-cell>
          <table:table-cell table:style-name="ce2" office:value-type="string" calcext:value-type="string">
            <text:p>3430</text:p>
          </table:table-cell>
          <table:table-cell table:style-name="ce2" office:value-type="string" calcext:value-type="string">
            <text:p>The highly decoupled nature of distributed systems can greatly simplify modular development. However, it is easy to lose track of component interactions and emerging system behavior. To inspect the behavior of the aggregated system, an abstract model and analysis tools can be of great help. In this paper, we present such a model that follows the Event-Driven Architecture paradigm. We argue that a Petri net model that captures the event flow, without modeling event data, is a useful abstraction to give insight into a system composed of distributed components. We present a symmetric Petri net model with publish-subscribe middleware and a generic abstraction of components. The model was designed with the intention to produce a finite P/T net to be compatible with current Petri net model checking tools. To build such a model, information about component behavior is necessary. We show that this information is encoded in the system implementation, and we describe potential means for automatic extraction. With the formal Petri net model, we enable the use of established verification methods. We discuss ideas from business process conformance checking and other verification properties that may deepen the system understanding. The proposed methods can be used either for static analysis during design time or to automatically signal issues at runtime. © 2023 Copyright for this paper by its authors. Use permitted under Creative Commons License Attribution 4.0 International (CC BY 4.0).</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66003230&amp;partnerID=40&amp;md5=ad17cf37b861564cb633ca803ac7775f</text:p>
          </table:table-cell>
          <table:table-cell table:style-name="ce2"/>
          <table:table-cell table:style-name="ce2" office:value-type="string" calcext:value-type="string">
            <text:p>Conformance Checking; Distributed System; Event-Driven Architecture; Petri Net Model; Publish-Subscribe; Verification</text:p>
          </table:table-cell>
          <table:table-cell table:style-name="ce2" office:value-type="string" calcext:value-type="string">
            <text:p>Message passing; Middleware; Model checking; Petri nets; Static analysis; Business Process; Conformance checking; Distributed systems; Event-driven architectures; Modular development; Petri net models; Publish/subscribe; Publish/Subscribe system; Symmetrics; Verification process; Abstracting</text:p>
          </table:table-cell>
          <table:table-cell table:style-name="ce2" table:number-columns-repeated="3"/>
          <table:table-cell table:style-name="ce2" office:value-type="string" calcext:value-type="string">
            <text:p>Cited by: 5</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Multi-perspective Conformance Checking for&amp;nbsp;Email-Driven Processes</text:p>
          </table:table-cell>
          <table:table-cell table:style-name="ce2" office:value-type="string" calcext:value-type="string">
            <text:p>Bou Nader, Ralph and Garfatta, Ikram and Elleuch, Marwa and Gaaloul, Walid and Taher, Yehia</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441–457</text:p>
          </table:table-cell>
          <table:table-cell table:style-name="ce2"/>
          <table:table-cell table:style-name="ce2" office:value-type="string" calcext:value-type="string">
            <text:p>Business process conformance checking determines whether the execution of a process instance aligns with a predefined model that specifies its expected behaviour. Existing approaches are usually tailored for business processes modelled and executed through traditional business process management systems and therefore fall short when the business processes to be checked are described or partially supported by rather unorthodox systems. Such is the case for email-driven processes which are generally business process fragments executed using emailing systems. In fact, one of the main limitations exhibited by existing conformance checking techniques is that they mostly only consider the behavioral, functional, and structural perspectives of a process. In the case of email-driven processes, however, it is crucial to also take into account the contextual perspective of the events obtained from the email bodies and threads. In this paper, we propose an approach for multi-perspective conformance checking of email-driven processes, taking into account both their sequential as well as their contextual perspectives.</text:p>
          </table:table-cell>
          <table:table-cell table:style-name="ce2"/>
          <table:table-cell table:style-name="ce2" office:value-type="string" calcext:value-type="string">
            <text:p>10.1007/978-981-96-0576-7_32</text:p>
          </table:table-cell>
          <table:table-cell table:style-name="ce2" office:value-type="string" calcext:value-type="string">
            <text:p>https://doi.org/10.1007/978-981-96-0576-7_32</text:p>
          </table:table-cell>
          <table:table-cell table:style-name="ce2" table:number-columns-repeated="2"/>
          <table:table-cell table:style-name="ce2" office:value-type="string" calcext:value-type="string">
            <text:p>Process mining, Conformance checking, Event logs, Email-driven process</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 Decomposition and Metric-Based Evaluation Framework for Microservices</text:p>
          </table:table-cell>
          <table:table-cell table:style-name="ce2" office:value-type="string" calcext:value-type="string">
            <text:p>Taibi, Davide and Systä, Kari</text:p>
          </table:table-cell>
          <table:table-cell table:style-name="ce2" office:value-type="string" calcext:value-type="string">
            <text:p>Communications in Computer and Information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133 - 149</text:p>
          </table:table-cell>
          <table:table-cell table:style-name="ce2" office:value-type="string" calcext:value-type="string">
            <text:p>1218 CCIS</text:p>
          </table:table-cell>
          <table:table-cell table:style-name="ce2" office:value-type="string" calcext:value-type="string">
            <text:p>Migrating from monolithic systems into microservice is a very complex task. Companies are commonly decomposing the monolithic system manually, analyzing dependencies of the monolith and then assessing different decomposition options. The goal of our work is two-folded: 1) we provide a microservice measurement framework to objectively evaluate and compare the quality of microservices-based systems; 2) we propose a decomposition system based on business process mining. The microservice measurement framework can be applied independently from the decomposition process adopted, but is also useful to continuously evaluate the architectural evolution of a system. Results show that the decomposition framework helps companies to easily identify the different decomposition options. The measurement framework can help to decrease the subjectivity of the decision between different decomposition options and to evaluate architectural erosion in existing systems. © 2020, Springer Nature Switzerland AG.</text:p>
          </table:table-cell>
          <table:table-cell table:style-name="ce2" office:value-type="string" calcext:value-type="string">
            <text:p>Conference paper</text:p>
          </table:table-cell>
          <table:table-cell table:style-name="ce2" office:value-type="string" calcext:value-type="string">
            <text:p>10.1007/978-3-030-49432-2_7</text:p>
          </table:table-cell>
          <table:table-cell table:style-name="ce2" office:value-type="string" calcext:value-type="string">
            <text:p>https://www.scopus.com/inward/record.uri?eid=2-s2.0-85086276785&amp;doi=10.1007%2F978-3-030-49432-2_7&amp;partnerID=40&amp;md5=7e30d56ffbf6a6e5162e9492e3cf2d47</text:p>
          </table:table-cell>
          <table:table-cell table:style-name="ce2"/>
          <table:table-cell table:style-name="ce2" office:value-type="string" calcext:value-type="string">
            <text:p>Cloud-native; Microservice decomposition; Microservice migration; Microservice slicing; Microservices</text:p>
          </table:table-cell>
          <table:table-cell table:style-name="ce2" office:value-type="string" calcext:value-type="string">
            <text:p>Cloud computing; Decomposition; Architectural evolution; Business process minings; Complex task; Decomposition process; Decomposition system; Evaluation framework; Existing systems; Monolithic systems; Quality control</text:p>
          </table:table-cell>
          <table:table-cell table:style-name="ce2" table:number-columns-repeated="3"/>
          <table:table-cell table:style-name="ce2" office:value-type="string" calcext:value-type="string">
            <text:p>Cited by: 21; All Open Access; Green Accepted Open Access; Green Open Access</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IntelliGOV - A semantic approach for compliance validation of service-oriented architectures</text:p>
          </table:table-cell>
          <table:table-cell table:style-name="ce2" office:value-type="string" calcext:value-type="string">
            <text:p>Filho, Haroldo Maria Teixeira and Azevedo, Leonardo Guerreiro and Siqueira, Sean Wolfgand Matsui</text:p>
          </table:table-cell>
          <table:table-cell table:style-name="ce2" office:value-type="string" calcext:value-type="string">
            <text:p>Journal of Universal Computer Science</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48 - 1071</text:p>
          </table:table-cell>
          <table:table-cell table:style-name="ce2" office:value-type="string" calcext:value-type="string">
            <text:p>22</text:p>
          </table:table-cell>
          <table:table-cell table:style-name="ce2" office:value-type="string" calcext:value-type="string">
            <text:p>Organizations are adopting Service-Oriented Architecture (SOA) to increase operation’s efficiency and flexibility. To accomplish these goals, it is necessary to ensure that the architecture and its evolution are compliant with business goals, best practices, legal and regulatory requirements. However, the diversity of domains and stakeholders involved in SOA solutions demands complex and expensive work to validate the architecture compliance. Hence, it can result in high costs and low quality assessment if the organization does not use an effective approach in this scenario. In addition, it would be important to consider standards and open solutions in order to promote interoperability and reuse of available tools, making it easier to spread throughout the organizations. We propose intelliGov, an architecture that aims to solve these problems by using ontologies, semantic rules and queries in order to simplify the compliance validation process. The architecture employs open standards-OWL, SWRL and SQWRL-in its implementation. A case study, executed in a global energy company that is currently adopting SOA, demonstrates gains in quality and costs of the compliance assessment process using the proposed architecture. © J.UCS.</text:p>
          </table:table-cell>
          <table:table-cell table:style-name="ce2" office:value-type="string" calcext:value-type="string">
            <text:p>Article</text:p>
          </table:table-cell>
          <table:table-cell table:style-name="ce2"/>
          <table:table-cell table:style-name="ce2" office:value-type="string" calcext:value-type="string">
            <text:p>https://www.scopus.com/inward/record.uri?eid=2-s2.0-84994593688&amp;partnerID=40&amp;md5=5f8f38522e7c65e70b800d18f66a8a00</text:p>
          </table:table-cell>
          <table:table-cell table:style-name="ce2"/>
          <table:table-cell table:style-name="ce2" office:value-type="string" calcext:value-type="string">
            <text:p>Governance; Ontology; Semantic queries; Semantic rules; Service-Oriented Architecture (SOA)</text:p>
          </table:table-cell>
          <table:table-cell table:style-name="ce2" table:number-columns-repeated="4"/>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Making the case for centralized software architecture management</text:p>
          </table:table-cell>
          <table:table-cell table:style-name="ce2" office:value-type="string" calcext:value-type="string">
            <text:p>Buchgeher, Georg and Weinreich, Rainer and Kriechbaum, Thomas</text:p>
          </table:table-cell>
          <table:table-cell table:style-name="ce2" office:value-type="string" calcext:value-type="string">
            <text:p>Lecture Notes in Business Information Processing</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9 - 121</text:p>
          </table:table-cell>
          <table:table-cell table:style-name="ce2" office:value-type="string" calcext:value-type="string">
            <text:p>238</text:p>
          </table:table-cell>
          <table:table-cell table:style-name="ce2"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 © Springer International Publishing Switzerland 2016.</text:p>
          </table:table-cell>
          <table:table-cell table:style-name="ce2" office:value-type="string" calcext:value-type="string">
            <text:p>Conference paper</text:p>
          </table:table-cell>
          <table:table-cell table:style-name="ce2" office:value-type="string" calcext:value-type="string">
            <text:p>10.1007/978-3-319-27033-3_8</text:p>
          </table:table-cell>
          <table:table-cell table:style-name="ce2" office:value-type="string" calcext:value-type="string">
            <text:p>https://www.scopus.com/inward/record.uri?eid=2-s2.0-84952684861&amp;doi=10.1007%2F978-3-319-27033-3_8&amp;partnerID=40&amp;md5=a4af8833cd4d31ab4b96504f136faa9c</text:p>
          </table:table-cell>
          <table:table-cell table:style-name="ce2"/>
          <table:table-cell table:style-name="ce2" office:value-type="string" calcext:value-type="string">
            <text:p>Software architecture as a service; Software architecture information repositories; Software architecture knowledge management; Software architecture management; Software architecture models; Software architecture use cases; Software architecture views</text:p>
          </table:table-cell>
          <table:table-cell table:style-name="ce2" office:value-type="string" calcext:value-type="string">
            <text:p>Computer software selection and evaluation; Distributed computer systems; Information management; Information services; Knowledge management; Quality control; Software architecture; Software design; Software engineering; Architectural knowledge; Architecture management; Architecture review; Dependency analysis; Enterprise services; Information repositories; Software architecture knowledge managements; Software architecture model; Service oriented architecture (SOA)</text:p>
          </table:table-cell>
          <table:table-cell table:style-name="ce2" table:number-columns-repeated="3"/>
          <table:table-cell table:style-name="ce2" office:value-type="string" calcext:value-type="string">
            <text:p>Cited by: 5</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Process Mining and Monitoring Processes and Services: Workshop Report</text:p>
          </table:table-cell>
          <table:table-cell table:style-name="ce2" office:value-type="string" calcext:value-type="string">
            <text:p>van der Aalst, Wil M.P.</text:p>
          </table:table-cell>
          <table:table-cell table:style-name="ce2" office:value-type="string" calcext:value-type="string">
            <text:p>Dagstuhl Seminar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6291</text:p>
          </table:table-cell>
          <table:table-cell table:style-name="ce2" office:value-type="string" calcext:value-type="string">
            <text:p>In a service-oriented architecture, but also in classical en-treprise systems, a variety of events (e.g., messages being sent and received) are being logged. This information can be used for process mining purposes, i.e., based on some event log it is possible to discover processes or to check conformance. The goal of process discovery is to build models without a-priori knowledge, i.e., based on sequences of events one can look for the presence or absence of certain patterns and deduce some process model from it. For conformance checking there has to be an initial model. One can think of this model as a “contract” or “specification” and it is interesting to see whether the parties involved stick to this model. Using conformance checking it is possible to quantify the fit (fewer deviations result in a better fit) and to locate “problem areas” where a lot of deviations take place. One of the four workshops organized within the context of the Dagstuhl seminar on The Role of Business Processes in Service Oriented Architectures (Seminar 06291, 16.07.2006-21.07.2006) was a Workshop on Process Mining and Monitoring Processes and Services. In this paper, we report on the results of the workshop. © 2006 Dagstuhl Seminar Proceedings. All rights reserved.</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74288086&amp;partnerID=40&amp;md5=048a151f07a074a04b510b6d2279deb9</text:p>
          </table:table-cell>
          <table:table-cell table:style-name="ce2" table:number-columns-repeated="2"/>
          <table:table-cell table:style-name="ce2" office:value-type="string" calcext:value-type="string">
            <text:p>Data mining; Service oriented architecture (SOA); Conformance checking; Event logs; Mining process; Monitoring process; Monitoring services; Priori knowledge; Process Discovery; Process mining; Service workshops; Soa (serviceoriented architecture); Information services</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9</text:p>
          </table:table-cell>
          <table:table-cell table:style-name="ce4" office:value-type="string" calcext:value-type="string">
            <text:p>Study focuses on business process conformance rather than architectural conformance.</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Choreography conformance analysis: Asynchronous communications and information alignment</text:p>
          </table:table-cell>
          <table:table-cell table:style-name="ce2" office:value-type="string" calcext:value-type="string">
            <text:p>Kazhamiakin, Raman and Pistore, Marco</text:p>
          </table:table-cell>
          <table:table-cell table:style-name="ce2" office:value-type="string" calcext:value-type="string">
            <text:p>Lecture Notes in Computer Science</text:p>
          </table:table-cell>
          <table:table-cell table:style-name="ce2" office:value-type="string" calcext:value-type="string">
            <text:p>2006</text:p>
          </table:table-cell>
          <table:table-cell table:style-name="ce2" office:value-type="string" calcext:value-type="string">
            <text:p>Scopus</text:p>
          </table:table-cell>
          <table:table-cell table:style-name="ce2" office:value-type="string" calcext:value-type="string">
            <text:p>227 - 241</text:p>
          </table:table-cell>
          <table:table-cell table:style-name="ce2" office:value-type="string" calcext:value-type="string">
            <text:p>4184 LNCS</text:p>
          </table:table-cell>
          <table:table-cell table:style-name="ce2" office:value-type="string" calcext:value-type="string">
            <text:p>Web service choreography languages provide a way to describe the collaboration protocol of multiple services that exchange information in order to achieve a common goal. This description may be seen as a specification that should be respected by the joint behavior of the set of services implementing the choreography. Such a conformance requires that (i) the observable behavior of the implementation corresponds to the behavior described by the protocol specification, and (ii) the business information is properly managed, guaranteeing that the participants have a shared knowledge about it, according to what is specified in the choreography. In this paper we present a choreography conformance analysis approach that addresses both the behavioral correspondence and the business information management. The key features of the approach are the capability to deal with asynchronous interactions and the ability to model and analyse the data managed and exchanged in the protocol, thus providing more accurate verification results. We also present symbolic techniques based on these formalizations that can be used for model checking of the choreography conformance. © Springer-Verlag Berlin Heidelberg 2006.</text:p>
          </table:table-cell>
          <table:table-cell table:style-name="ce2" office:value-type="string" calcext:value-type="string">
            <text:p>Conference paper</text:p>
          </table:table-cell>
          <table:table-cell table:style-name="ce2" office:value-type="string" calcext:value-type="string">
            <text:p>10.1007/11841197_15</text:p>
          </table:table-cell>
          <table:table-cell table:style-name="ce2" office:value-type="string" calcext:value-type="string">
            <text:p>https://www.scopus.com/inward/record.uri?eid=2-s2.0-33845220517&amp;doi=10.1007%2F11841197_15&amp;partnerID=40&amp;md5=9ce08b1c40da21b55f7ed59e0a23e002</text:p>
          </table:table-cell>
          <table:table-cell table:style-name="ce2" table:number-columns-repeated="2"/>
          <table:table-cell table:style-name="ce2" office:value-type="string" calcext:value-type="string">
            <text:p>Information services; Mathematical models; Network protocols; Telecommunication services; Asynchronous communications; Choreography conformance; Choreography languages; Web service; World Wide Web</text:p>
          </table:table-cell>
          <table:table-cell table:style-name="ce2" table:number-columns-repeated="3"/>
          <table:table-cell table:style-name="ce2" office:value-type="string" calcext:value-type="string">
            <text:p>Cited by: 26</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Interoperability in the ProM framework</text:p>
          </table:table-cell>
          <table:table-cell table:style-name="ce2" office:value-type="string" calcext:value-type="string">
            <text:p>Verbeek, H. M.W. and Van Dongen, Boudewijn F. and Mendling, Jan and van der Aalst, Wil M.P.</text:p>
          </table:table-cell>
          <table:table-cell table:style-name="ce2" office:value-type="string" calcext:value-type="string">
            <text:p>CEUR Workshop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200</text:p>
          </table:table-cell>
          <table:table-cell table:style-name="ce2" office:value-type="string" calcext:value-type="string">
            <text:p>Originally the ProM framework was developed as a design artifact for the process mining domain, i.e., extracting process models from event logs. However, in recent years the scope of the framework has become broader and now includes process verification, social network analysis, conformance checking, verification based on temporal logic, etc. Moreover, the framework supports a wide variety of process models, e.g., Petri nets, Event-driven Process Chains (EPCs), Heuristics nets, YAWL models, and is plug-able, i.e., people can add plug-ins without changing the framework itself. This makes the ProM framework an interesting environment for model interoperability. For example, people can take transaction log from IBM's WebSphere, discover a process model in terms of a heuristics net, convert the heuristics net to a Petri net for analysis, load an EPC defined using the ARIS toolset, verify the EPC and convert it to a Petri net, determine the fitness of the ARIS model given the transaction log from WebSphere, and finally convert both models to a YAWL specification that is exported. Such application scenarios are supported by ProM and demonstrate true model interoperability. In this paper, we present ProM's interoperability capabilities using a running example.</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4873562737&amp;partnerID=40&amp;md5=bc427407c008c0c47f58a5dbe2b68e51</text:p>
          </table:table-cell>
          <table:table-cell table:style-name="ce2" table:number-columns-repeated="2"/>
          <table:table-cell table:style-name="ce2" office:value-type="string" calcext:value-type="string">
            <text:p>Application scenario; Conformance checking; Design artifacts; Event driven process chain; Event logs; Model interoperability; Process mining; Process model; Process verifications; Social Network Analysis; Toolsets; Transaction log; Model checking; Petri nets; Social networking (online); Interoperability</text:p>
          </table:table-cell>
          <table:table-cell table:style-name="ce2" table:number-columns-repeated="3"/>
          <table:table-cell table:style-name="ce2" office:value-type="string" calcext:value-type="string">
            <text:p>Cited by: 1</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The Role of Business Processes in Service Oriented Architectures 2006</text:p>
          </table:table-cell>
          <table:table-cell table:style-name="ce2"/>
          <table:table-cell table:style-name="ce2" office:value-type="string" calcext:value-type="string">
            <text:p>Dagstuhl Seminar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6291</text:p>
          </table:table-cell>
          <table:table-cell table:style-name="ce2" office:value-type="string" calcext:value-type="string">
            <text:p>The proceedings contain 13 papers. The topics discussed include: a SOA-based architecture framework; AMFIBIA: a meta-model for the integration of business process modelling aspects; an algorithm for matching nondeterministic services with operating guidelines; approaches to compute workflow complexity; aspect-oriented techniques for web services: a model-driven approach; choreography conformance checking: an approach based on BPEL and Petri Nets; DecSerFlow: towards a truly declarative service flow language; model-driven and pattern-based integration of process-driven SOA models; pricing web services; towards a services-based process platform; and towards UML modelling extra-functional properties in web services and their clien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74303016&amp;partnerID=40&amp;md5=c95d37d7ae03b61bc4b95960efb22473</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Web service choreography conformance verification through the pi&lt;X-model</text:p>
          </table:table-cell>
          <table:table-cell table:style-name="ce2" office:value-type="string" calcext:value-type="string">
            <text:p>van Seghbroeck, Gregory and Volckaert, Bruno and de Turck, Filip D. and Dhoedt, Bart and Demeester, Piet M.A.</text:p>
          </table:table-cell>
          <table:table-cell table:style-name="ce2" office:value-type="string" calcext:value-type="string">
            <text:p>International Journal of Cooperative Information Systems</text:p>
          </table:table-cell>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1 - 30</text:p>
          </table:table-cell>
          <table:table-cell table:style-name="ce2" office:value-type="string" calcext:value-type="string">
            <text:p>19</text:p>
          </table:table-cell>
          <table:table-cell table:style-name="ce2" office:value-type="string" calcext:value-type="string">
            <text:p>As the adoption of the Service Oriented Architecture paradigm has dramatically increased over the past few years, proper coordination of loosely coupled services becomes an important issue when building state-of-the-art applications. This coordination is typically organized through orchestration (requiring a central coordinating entity) or through choreographies. While the latter approach allows for a fully distributed coordination, the need also arises for a distributed conformance check, ensuring that each participant of the choreography behaves according to the general choreography. In this paper, a formalism is presented to ensure this conformance at design time, with possible extensions to deploy time and to runtime conformance checking. This formalism is referred to as the piX-model and it will be shown that the approach taken is inherently less complex, both in time and space, than the conventional π-calculus-based approach, whilst offering the same conformance guarantees. This gain in performance allows for a small design turnaround time, and also opens the avenue to runtime conformance checking by resource constrained devices. © 2010 World Scientific Publishing Company.</text:p>
          </table:table-cell>
          <table:table-cell table:style-name="ce2" office:value-type="string" calcext:value-type="string">
            <text:p>Article</text:p>
          </table:table-cell>
          <table:table-cell table:style-name="ce2" office:value-type="string" calcext:value-type="string">
            <text:p>10.1142/S0218843010002097</text:p>
          </table:table-cell>
          <table:table-cell table:style-name="ce2" office:value-type="string" calcext:value-type="string">
            <text:p>https://www.scopus.com/inward/record.uri?eid=2-s2.0-77953822042&amp;doi=10.1142%2FS0218843010002097&amp;partnerID=40&amp;md5=59cb8e3b64c6aa0f7de30b851b9e31e4</text:p>
          </table:table-cell>
          <table:table-cell table:style-name="ce2"/>
          <table:table-cell table:style-name="ce2" office:value-type="string" calcext:value-type="string">
            <text:p>choreography; open bisimulation; Web services; WS-CDL</text:p>
          </table:table-cell>
          <table:table-cell table:style-name="ce2" table:number-columns-repeated="4"/>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4" office:value-type="string" calcext:value-type="string">
            <text:p>REJECTED</text:p>
          </table:table-cell>
          <table:table-cell table:style-name="ce4" office:value-type="string" calcext:value-type="string">
            <text:p>EC3</text:p>
          </table:table-cell>
          <table:table-cell table:style-name="ce4" office:value-type="string" calcext:value-type="string">
            <text:p>Study is a secondary study (SLR, SMS, survey).</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 formal and visual modeling approach to choreography based web services composition and conformance verification</text:p>
          </table:table-cell>
          <table:table-cell table:style-name="ce2" office:value-type="string" calcext:value-type="string">
            <text:p>Yeung, Wing Lok</text:p>
          </table:table-cell>
          <table:table-cell table:style-name="ce2" office:value-type="string" calcext:value-type="string">
            <text:p>Expert Systems with Applications</text:p>
          </table:table-cell>
          <table:table-cell table:style-name="ce2" office:value-type="string" calcext:value-type="string">
            <text:p>2011</text:p>
          </table:table-cell>
          <table:table-cell table:style-name="ce2" office:value-type="string" calcext:value-type="string">
            <text:p>Scopus</text:p>
          </table:table-cell>
          <table:table-cell table:style-name="ce2" office:value-type="string" calcext:value-type="string">
            <text:p>12772 - 12785</text:p>
          </table:table-cell>
          <table:table-cell table:style-name="ce2" office:value-type="string" calcext:value-type="string">
            <text:p>38</text:p>
          </table:table-cell>
          <table:table-cell table:style-name="ce2" office:value-type="string" calcext:value-type="string">
            <text:p>Web services have emerged as the building blocks of a service-oriented architecture that supports not only enterprise application integration (EAI) and business process management (BPM) within an organization but also B2B collaboration based on business process integration. The web services choreography approach to B2B process integration allows business partners to orchestrate their own web services privately, while conforming with an agreed specification of the common ordering conditions and constraints under which messages are exchanged among partners' web services. In this approach, choreography conformance is an essential requirement for the successful implementation of collaborative processes. A formal approach to web services composition and conformance verification based on WS-CDL and WS-BPEL is presented. This approach involves model checking as an automated means of verifying choreography conformance. The main contributions include a precise notion of choreography conformance on which verification is based as well as support for the complementary use of visual modeling (e.g. UML) and standard WS-* notations in composition. © 2010 Elsevier Ltd. All rights reserved.</text:p>
          </table:table-cell>
          <table:table-cell table:style-name="ce2" office:value-type="string" calcext:value-type="string">
            <text:p>Article</text:p>
          </table:table-cell>
          <table:table-cell table:style-name="ce2" office:value-type="string" calcext:value-type="string">
            <text:p>10.1016/j.eswa.2011.04.068</text:p>
          </table:table-cell>
          <table:table-cell table:style-name="ce2" office:value-type="string" calcext:value-type="string">
            <text:p>https://www.scopus.com/inward/record.uri?eid=2-s2.0-79957995532&amp;doi=10.1016%2Fj.eswa.2011.04.068&amp;partnerID=40&amp;md5=afe862255cad1bfca3badf60847427cb</text:p>
          </table:table-cell>
          <table:table-cell table:style-name="ce2"/>
          <table:table-cell table:style-name="ce2" office:value-type="string" calcext:value-type="string">
            <text:p>Choreography; Conformance verification; Contract negotiation; Model checking; Orchestration; Web services</text:p>
          </table:table-cell>
          <table:table-cell table:style-name="ce2" office:value-type="string" calcext:value-type="string">
            <text:p>B2B collaboration; Building blockes; Business partners; Business process integration; Business process management; Choreography; Collaborative process; Conformance verification; Contract negotiation; Enterprise application integration; Formal approach; Orchestration; Process integration; Service Oriented; Visual modeling; Web services composition; WS-BPEL; Enterprise resource management; Information services; Integration; Model checking; Service oriented architecture (SOA); User interfaces; Web </text:p>
          </table:table-cell>
          <table:table-cell table:style-name="ce2" table:number-columns-repeated="3"/>
          <table:table-cell table:style-name="ce2" office:value-type="string" calcext:value-type="string">
            <text:p>Cited by: 2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Engineering Secure Software and Systems - Third International Symposium, ESSoS 2011,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1</text:p>
          </table:table-cell>
          <table:table-cell table:style-name="ce2" office:value-type="string" calcext:value-type="string">
            <text:p>Scopus</text:p>
          </table:table-cell>
          <table:table-cell table:style-name="ce2"/>
          <table:table-cell table:style-name="ce2" office:value-type="string" calcext:value-type="string">
            <text:p>6542 LNCS</text:p>
          </table:table-cell>
          <table:table-cell table:style-name="ce2" office:value-type="string" calcext:value-type="string">
            <text:p>The proceedings contain 21 papers. The topics discussed include: model-based refinement of security policies in collaborative virtual organisations; automatic conformance checking of role-based access control policies via alloy; efficient symbolic execution for analysing cryptographic protocol implementations; SessionShield: lightweight protection against session hijacking; security sensitive data flow coverage criterion for automatic security testing of web applications; lightweight modeling and analysis of security concepts; an architecture-centric approach to detecting security patterns in software; evolution of security requirements tests for service-centric systems; after-life vulnerabilities: a study on Firefox evolution, its vulnerabilities, and fixes; scalable authorization middleware for service oriented architectures; and adaptable authentication model: exploring security with weaker attacker model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79551531399&amp;partnerID=40&amp;md5=2383dc51f13fd378825b30e4a5bcc1cd</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On the Move to Meaningful Internet Systems, OTM 2012 - Confederated International Conferences: CoopIS, DOA-SVI, and ODBASE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565 LNCS</text:p>
          </table:table-cell>
          <table:table-cell table:style-name="ce2" office:value-type="string" calcext:value-type="string">
            <text:p>The proceedings contain 60 papers. The topics discussed include: process and data: two sides of the same coin?; configurable declare: designing customizable flexible process models; efficacy-aware business process modeling; automated resource assignment in BPMN models using RACI matrices; hierarchical process verification in a semi-trusted environment; indexing process model flow dependencies for similarity search; a framework for cost-aware cloud data management; event-driven actors for supporting flexibility and scalability in service-based integration architecture; consistency in scalable systems; goal-oriented opportunistic sensor clouds; operations over lightweight ontologies; evaluating ontology matchers using arbitrary ontologies and human generated heterogeneities; making data meaningful: the business intelligence model and its formal semantics in description logics; and a non-intrusive movie recommendation system.</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72791572&amp;partnerID=40&amp;md5=07015934dd82482c77ef85174cfaa95a</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Business Process Management - 10th International Conference, BPM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481 LNCS</text:p>
          </table:table-cell>
          <table:table-cell table:style-name="ce2" office:value-type="string" calcext:value-type="string">
            <text:p>The proceedings contain 26 papers. The topics discussed include: a decade of business process management conferences: personal reflections on a developing discipline; from calls to events: architecting future BPM systems; tying process model quality to the modeling process: the impact of structuring, movement, and speed; business process architecture: use and correctness; aligning event logs and declarative process models for conformance checking; context-aware compliance checking; measuring privacy compliance using fitness metrics; event-driven manufacturing process management approach; process-based design and integration of wireless sensor network applications; modeling rewards and incentive mechanisms for social BPM; automatic information flow analysis of business process models; managing and tracing the traversal of process clouds with templates, agendas and artifacts; and a generic framework for service-based business process elasticity in the cloud.</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66401355&amp;partnerID=40&amp;md5=a4a9ca0345db56a8614d2a07f748042b</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Automatic reference architecture conformance checking for SOA - 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Scopus</text:p>
          </table:table-cell>
          <table:table-cell table:style-name="ce2" office:value-type="string" calcext:value-type="string">
            <text:p>95 - 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 © 2014 IEEE.</text:p>
          </table:table-cell>
          <table:table-cell table:style-name="ce2" office:value-type="string" calcext:value-type="string">
            <text:p>Conference paper</text:p>
          </table:table-cell>
          <table:table-cell table:style-name="ce2" office:value-type="string" calcext:value-type="string">
            <text:p>10.1109/WICSA.2014.22</text:p>
          </table:table-cell>
          <table:table-cell table:style-name="ce2" office:value-type="string" calcext:value-type="string">
            <text:p>https://www.scopus.com/inward/record.uri?eid=2-s2.0-84903699771&amp;doi=10.1109%2FWICSA.2014.22&amp;partnerID=40&amp;md5=96fd4bda5bf10a64931ef66740c65973</text:p>
          </table:table-cell>
          <table:table-cell table:style-name="ce2"/>
          <table:table-cell table:style-name="ce2" office:value-type="string" calcext:value-type="string">
            <text:p>conformance checking; reference architecture; service-oriented architecture (SOA); software architecture</text:p>
          </table:table-cell>
          <table:table-cell table:style-name="ce2" office:value-type="string" calcext:value-type="string">
            <text:p>Computer software; Information services; Mapping; Service oriented architecture (SOA); Software architecture; Standardization; Automatic approaches; Conformance checking; Reference architecture; Rule evaluation; Semi-automatics; Software systems; System implementation; Architecture</text:p>
          </table:table-cell>
          <table:table-cell table:style-name="ce2" table:number-columns-repeated="3"/>
          <table:table-cell table:style-name="ce2" office:value-type="string" calcext:value-type="string">
            <text:p>Cited by: 19</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 toolset for conformance testing against UML sequence diagrams based on event-driven colored Petri nets</text:p>
          </table:table-cell>
          <table:table-cell table:style-name="ce2" office:value-type="string" calcext:value-type="string">
            <text:p>Faria, João Pascoal and Paiva, Ana C.R.</text:p>
          </table:table-cell>
          <table:table-cell table:style-name="ce2" office:value-type="string" calcext:value-type="string">
            <text:p>International Journal on Software Tools for Technology Transfer</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285 - 304</text:p>
          </table:table-cell>
          <table:table-cell table:style-name="ce2" office:value-type="string" calcext:value-type="string">
            <text:p>18</text:p>
          </table:table-cell>
          <table:table-cell table:style-name="ce2"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 © 2014, Springer-Verlag Berlin Heidelberg.</text:p>
          </table:table-cell>
          <table:table-cell table:style-name="ce2" office:value-type="string" calcext:value-type="string">
            <text:p>Article</text:p>
          </table:table-cell>
          <table:table-cell table:style-name="ce2" office:value-type="string" calcext:value-type="string">
            <text:p>10.1007/s10009-014-0354-x</text:p>
          </table:table-cell>
          <table:table-cell table:style-name="ce2" office:value-type="string" calcext:value-type="string">
            <text:p>https://www.scopus.com/inward/record.uri?eid=2-s2.0-84916919978&amp;doi=10.1007%2Fs10009-014-0354-x&amp;partnerID=40&amp;md5=3e8d8d432ab1be0aab49b10fb25b96ec</text:p>
          </table:table-cell>
          <table:table-cell table:style-name="ce2"/>
          <table:table-cell table:style-name="ce2" office:value-type="string" calcext:value-type="string">
            <text:p>Conformance testing; Petri nets; Sequence diagrams</text:p>
          </table:table-cell>
          <table:table-cell table:style-name="ce2" office:value-type="string" calcext:value-type="string">
            <text:p>Application programs; Aspect oriented programming; Automatic test pattern generation; Codes (symbols); Graphic methods; Petri nets; Testing; Automatically generated; Client applications; Conformance checking; Conformance testing; Implementation under tests; Sequence diagrams; Software implementation; UML sequence diagrams; Software testing</text:p>
          </table:table-cell>
          <table:table-cell table:style-name="ce2" table:number-columns-repeated="3"/>
          <table:table-cell table:style-name="ce2" office:value-type="string" calcext:value-type="string">
            <text:p>Cited by: 12</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Frank de Boer on the Occasion of His 60th Birthday, 2016</text:p>
          </table:table-cell>
          <table:table-cell table:style-name="ce2"/>
          <table:table-cell table:style-name="ce2" office:value-type="string" calcext:value-type="string">
            <text:p>Lecture Notes in Computer Science</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 - 426</text:p>
          </table:table-cell>
          <table:table-cell table:style-name="ce2" office:value-type="string" calcext:value-type="string">
            <text:p>9660</text:p>
          </table:table-cell>
          <table:table-cell table:style-name="ce2" office:value-type="string" calcext:value-type="string">
            <text:p>The proceedings contain 27 papers. The special focus in this conference is on Theory and Practice of Formal Methods. The topics include: Conformance checking of real-time models; resource analysis of distributed systems; comparing trace expressions and linear temporal logic for runtime verification; proper protocol; a compositional approach to the verification of hybrid systems; array abstraction with symbolic pivots; modeling role-based systems with exogenous coordination; a safe, reactive storage abstraction; denotational and operational preciseness of subtyping; a sound and complete hoare logic for dynamically-typed, object-oriented programs; self-reconfiguring microservices; statically and dynamically verifiable SLA metrics; effectively eliminating auxiliaries; towards a proof method for paradigm; toward a formal foundation for time travel in stories and games; industrial application of formal models generated from domain specific languages; formal frameworks for verifying normative multi-agent systems; an exercise in coinductive reasoning in COQ; towards a kool future; on the expressiveness of synchronization in component deployment; characterization of simulation by probabilistic testing; on time actors; a small-step semantics of a concurrent calculus with goroutines and deferred functions and verifying alternative versions of quicksort.</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962563952&amp;partnerID=40&amp;md5=7535bb31cc6e6d4cdecf785ea6ffcd94</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15th International Conference on Service-Oriented Computing, ICSOC 2017</text:p>
          </table:table-cell>
          <table:table-cell table:style-name="ce2"/>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table:table-cell table:style-name="ce2" office:value-type="string" calcext:value-type="string">
            <text:p>10601 LNCS</text:p>
          </table:table-cell>
          <table:table-cell table:style-name="ce2" office:value-type="string" calcext:value-type="string">
            <text:p>The proceedings contain 53 papers. The special focus in this conference is on Service-Oriented Computing. The topics include: Confidence-aware reputation bootstrapping in composite service environments; compound trace clustering to generate accurate and simple sub-process models; an approach to modeling and discovering event correlation for service collaboration; energy efficient scheduling of application components via brownout and approximate markov decision process; predicting the available bandwidth on intra cloud network links for deadline constrained workflow scheduling in public clouds; inferring calling relationship based on external observation for microservice architecture; a QoS-aware resource allocation controller for function as a service (FaaS) platform; probabilistic qualitative preference matching in long-term IaaS composition; an embedding based factorization machine approach for web service QoS prediction; RISE: Resolution of identity through similarity establishment on unstructured job descriptions; a deep learning approach for long term QoS-compliant service composition; an artifact-driven approach to monitor business processes through real-world objects; benchFoundry: A benchmarking framework for cloud storage services; automated analysis of cloud offerings for optimal service provisioning; middleware for dynamic upgrade activation and compensations in multi-tenant SaaS; risk-based proactive process adaptation; a debt-aware learning approach for resource adaptations in cloud elasticity management; large-scale and adaptive service composition using deep reinforcement learning; ECHO: An adaptive orchestration platform for hybrid dataflows across cloud and edge; ensuring and assessing architecture conformance to microservice decomposition patterns; social-sensor cloud service for scene reconstruction; polly: A language-based approach for custom change detection of web service data; design and evaluation of a self-service delivery framework.</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4044606&amp;partnerID=40&amp;md5=7c48a56b229888e62d2f683faa0d5976</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M. and Leymann, Frank</text:p>
          </table:table-cell>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411 - 429</text:p>
          </table:table-cell>
          <table:table-cell table:style-name="ce2" office:value-type="string" calcext:value-type="string">
            <text:p>10601 LNCS</text:p>
          </table:table-cell>
          <table:table-cell table:style-name="ce2"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 © Springer International Publishing AG 2017.</text:p>
          </table:table-cell>
          <table:table-cell table:style-name="ce2" office:value-type="string" calcext:value-type="string">
            <text:p>Conference paper</text:p>
          </table:table-cell>
          <table:table-cell table:style-name="ce2" office:value-type="string" calcext:value-type="string">
            <text:p>10.1007/978-3-319-69035-3_29</text:p>
          </table:table-cell>
          <table:table-cell table:style-name="ce2" office:value-type="string" calcext:value-type="string">
            <text:p>https://www.scopus.com/inward/record.uri?eid=2-s2.0-85034118349&amp;doi=10.1007%2F978-3-319-69035-3_29&amp;partnerID=40&amp;md5=09028be9a2824f32498a3cc9a1e061cb</text:p>
          </table:table-cell>
          <table:table-cell table:style-name="ce2" table:number-columns-repeated="2"/>
          <table:table-cell table:style-name="ce2" office:value-type="string" calcext:value-type="string">
            <text:p>Artificial intelligence; Computer science; Computers; Architecture designs; Best practices; Connector architectures; Expert judgment; Relative performance; Software architecture design; Software Evolution; Distributed computer systems</text:p>
          </table:table-cell>
          <table:table-cell table:style-name="ce2" table:number-columns-repeated="3"/>
          <table:table-cell table:style-name="ce2" office:value-type="string" calcext:value-type="string">
            <text:p>Cited by: 40; All Open Access; Green Accepted Open Access; Green Open Access</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3 - 20</text:p>
          </table:table-cell>
          <table:table-cell table:style-name="ce2" office:value-type="string" calcext:value-type="string">
            <text:p>12292 LNCS</text:p>
          </table:table-cell>
          <table:table-cell table:style-name="ce2"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58923-3_1</text:p>
          </table:table-cell>
          <table:table-cell table:style-name="ce2" office:value-type="string" calcext:value-type="string">
            <text:p>https://www.scopus.com/inward/record.uri?eid=2-s2.0-85091491521&amp;doi=10.1007%2F978-3-030-58923-3_1&amp;partnerID=40&amp;md5=40ac2ec320983cc02b5585a7b76de071</text:p>
          </table:table-cell>
          <table:table-cell table:style-name="ce2" table:number-columns-repeated="2"/>
          <table:table-cell table:style-name="ce2" office:value-type="string" calcext:value-type="string">
            <text:p>Software architecture; Architectural style; Automated approach; Building applications; High scalabilities; Loose couplings; Model-based OPC; Real-world system; Technology independent; Large scale systems</text:p>
          </table:table-cell>
          <table:table-cell table:style-name="ce2" table:number-columns-repeated="3"/>
          <table:table-cell table:style-name="ce2" office:value-type="string" calcext:value-type="string">
            <text:p>Cited by: 14</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580 - 596</text:p>
          </table:table-cell>
          <table:table-cell table:style-name="ce2" office:value-type="string" calcext:value-type="string">
            <text:p>12571 LNCS</text:p>
          </table:table-cell>
          <table:table-cell table:style-name="ce2"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65310-1_42</text:p>
          </table:table-cell>
          <table:table-cell table:style-name="ce2" office:value-type="string" calcext:value-type="string">
            <text:p>https://www.scopus.com/inward/record.uri?eid=2-s2.0-85098257999&amp;doi=10.1007%2F978-3-030-65310-1_42&amp;partnerID=40&amp;md5=3aa4617740e9ab7d0afe4515c2f39740</text:p>
          </table:table-cell>
          <table:table-cell table:style-name="ce2" table:number-columns-repeated="2"/>
          <table:table-cell table:style-name="ce2" office:value-type="string" calcext:value-type="string">
            <text:p>Economic and social effects; Architectural decision; Architectural design decisions; Architecture patterns; Evolving systems; Model based approach; Service-based systems; Technology independent; Technology support; Architecture</text:p>
          </table:table-cell>
          <table:table-cell table:style-name="ce2" table:number-columns-repeated="3"/>
          <table:table-cell table:style-name="ce2" office:value-type="string" calcext:value-type="string">
            <text:p>Cited by: 9</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índola, Álvaro M. and Garcia, Vinícius Cardoso and Terra, Ricardo</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41 - 50</text:p>
          </table:table-cell>
          <table:table-cell table:style-name="ce2"/>
          <table:table-cell table:style-name="ce2"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 - -such as Kubernetes, Terraform, and Docker Compose - -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 - -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 © 2020 ACM.</text:p>
          </table:table-cell>
          <table:table-cell table:style-name="ce2" office:value-type="string" calcext:value-type="string">
            <text:p>Conference paper</text:p>
          </table:table-cell>
          <table:table-cell table:style-name="ce2" office:value-type="string" calcext:value-type="string">
            <text:p>10.1145/3425269.3425270</text:p>
          </table:table-cell>
          <table:table-cell table:style-name="ce2" office:value-type="string" calcext:value-type="string">
            <text:p>https://www.scopus.com/inward/record.uri?eid=2-s2.0-85095810870&amp;doi=10.1145%2F3425269.3425270&amp;partnerID=40&amp;md5=e7e0a97f76bf857656bc9c0a149ea44a</text:p>
          </table:table-cell>
          <table:table-cell table:style-name="ce2" table:number-columns-repeated="2"/>
          <table:table-cell table:style-name="ce2" office:value-type="string" calcext:value-type="string">
            <text:p>Computer software reusability; Structural design; Architectural constraints; Architectural projects; Basic mechanism; Dependency constraints; Industrial solutions; Management technologies; State of the art; Verification process; Information management</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4" office:value-type="string" calcext:value-type="string">
            <text:p>REJECTED</text:p>
          </table:table-cell>
          <table:table-cell table:style-name="ce4" office:value-type="string" calcext:value-type="string">
            <text:p>EC3</text:p>
          </table:table-cell>
          <table:table-cell table:style-name="ce4" office:value-type="string" calcext:value-type="string">
            <text:p>Study is a secondary study (SLR, SMS, survey).</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Proceedings - 14th Brazilian Symposium on Software Components, Architectures, and Reuse, SBCARS 2020</text:p>
          </table:table-cell>
          <table:table-cell table:style-name="ce2"/>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classifying feature models maintainability based on machine learning algorithms; supporting user preferences in search-based product line architecture design using machine learning; investigating non-usually employed features in the identification of architectural smells: a machine learning-based approach; architectural feature re-modularization for software product line evolution; applying a multi-platform architectural conformance solution in a real-world microservice-based system; the impact of microservices on the evolution of a software product line; microservice architecture: a tertiary study; towards a method for monitoring the coupling evolution of microservice-based architectures; and test-case-based code navigation in dynamically typed programming languag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23040650&amp;partnerID=40&amp;md5=6f1019ea014396d9edec26062a12ac8d</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ário, Daniel Rodrigo and de França, Breno Bernard Nicolau</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71 - 80</text:p>
          </table:table-cell>
          <table:table-cell table:style-name="ce2"/>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 © 2020 ACM.</text:p>
          </table:table-cell>
          <table:table-cell table:style-name="ce2" office:value-type="string" calcext:value-type="string">
            <text:p>Conference paper</text:p>
          </table:table-cell>
          <table:table-cell table:style-name="ce2" office:value-type="string" calcext:value-type="string">
            <text:p>10.1145/3425269.3425273</text:p>
          </table:table-cell>
          <table:table-cell table:style-name="ce2" office:value-type="string" calcext:value-type="string">
            <text:p>https://www.scopus.com/inward/record.uri?eid=2-s2.0-85095820890&amp;doi=10.1145%2F3425269.3425273&amp;partnerID=40&amp;md5=add7766e1e8a85bb98d13c462bb4a90c</text:p>
          </table:table-cell>
          <table:table-cell table:style-name="ce2"/>
          <table:table-cell table:style-name="ce2" office:value-type="string" calcext:value-type="string">
            <text:p>Coupling metrics; Maintainability; Microservices; Software Evolution</text:p>
          </table:table-cell>
          <table:table-cell table:style-name="ce2" office:value-type="string" calcext:value-type="string">
            <text:p>Application programs; Computer software reusability; Erosion; Architecture styles; Coupling evolution; Design Principles; Experimental analysis; Longitudinal analysis; Operational complexity; Production environments; Software Evolution; Software design</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188 - 203</text:p>
          </table:table-cell>
          <table:table-cell table:style-name="ce2" office:value-type="string" calcext:value-type="string">
            <text:p>13121 LNCS</text:p>
          </table:table-cell>
          <table:table-cell table:style-name="ce2"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 © 2021, Springer Nature Switzerland AG.</text:p>
          </table:table-cell>
          <table:table-cell table:style-name="ce2" office:value-type="string" calcext:value-type="string">
            <text:p>Conference paper</text:p>
          </table:table-cell>
          <table:table-cell table:style-name="ce2" office:value-type="string" calcext:value-type="string">
            <text:p>10.1007/978-3-030-91431-8_12</text:p>
          </table:table-cell>
          <table:table-cell table:style-name="ce2" office:value-type="string" calcext:value-type="string">
            <text:p>https://www.scopus.com/inward/record.uri?eid=2-s2.0-85120524117&amp;doi=10.1007%2F978-3-030-91431-8_12&amp;partnerID=40&amp;md5=7c0a3ca83ce0ea7e29e48e83a98d3392</text:p>
          </table:table-cell>
          <table:table-cell table:style-name="ce2" table:number-columns-repeated="2"/>
          <table:table-cell table:style-name="ce2" office:value-type="string" calcext:value-type="string">
            <text:p>Architectural design decisions; Architectural style; Architecture patterns; Best practices; Industrial scale systems; Rapid release; Real-world system; Release strategies; Small-scale systems; Violation detections; Software architecture</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Proceedings - IEEE 19th International Conference on Software Architecture, ICSA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architectural attack propagation analysis for identifying confidentiality issues; using gossip enabled distributed circuit breaking for improving resiliency of distributed systems; using gossip enabled distributed circuit breaking for improving resiliency of distributed systems; symptoms of architecture erosion in code reviews: a study of two OpenStack projects; a study on the software architecture documentation practices and maturity in open-source software development; how do developers search for architectural information? an industrial survey; designing microservice systems using patterns: an empirical study on quality trade-offs; and effort estimation for architectural refactoring of data tier softwar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2033293&amp;partnerID=40&amp;md5=a78de98b086991d0b5246534e23a898c</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36 - 46</text:p>
          </table:table-cell>
          <table:table-cell table:style-name="ce2"/>
          <table:table-cell table:style-name="ce2"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 © 2021 IEEE.</text:p>
          </table:table-cell>
          <table:table-cell table:style-name="ce2" office:value-type="string" calcext:value-type="string">
            <text:p>Conference paper</text:p>
          </table:table-cell>
          <table:table-cell table:style-name="ce2" office:value-type="string" calcext:value-type="string">
            <text:p>10.1109/ICSA51549.2021.00012</text:p>
          </table:table-cell>
          <table:table-cell table:style-name="ce2" office:value-type="string" calcext:value-type="string">
            <text:p>https://www.scopus.com/inward/record.uri?eid=2-s2.0-85106981120&amp;doi=10.1109%2FICSA51549.2021.00012&amp;partnerID=40&amp;md5=21f3e272b00832b218635553f530d18f</text:p>
          </table:table-cell>
          <table:table-cell table:style-name="ce2"/>
          <table:table-cell table:style-name="ce2" office:value-type="string" calcext:value-type="string">
            <text:p>best practices; continuous architecture improvement; feedback loop; Microservices; patterns</text:p>
          </table:table-cell>
          <table:table-cell table:style-name="ce2" office:value-type="string" calcext:value-type="string">
            <text:p>Software architecture; Architectural style; Architecture reconstruction; Automated approach; Automated support; Best practices; Distributed applications; Feed-back loop; Semi-automatics; Automation</text:p>
          </table:table-cell>
          <table:table-cell table:style-name="ce2" table:number-columns-repeated="3"/>
          <table:table-cell table:style-name="ce2" office:value-type="string" calcext:value-type="string">
            <text:p>Cited by: 17</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 method for monitoring the coupling evolution of microservice-based architectures</text:p>
          </table:table-cell>
          <table:table-cell table:style-name="ce2" office:value-type="string" calcext:value-type="string">
            <text:p>Apolinário, Daniel R.F. and de França, Breno Bernard Nicolau</text:p>
          </table:table-cell>
          <table:table-cell table:style-name="ce2" office:value-type="string" calcext:value-type="string">
            <text:p>Journal of the Brazilian Computer Society</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27</text:p>
          </table:table-cell>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represent signs of architectural degradation. To develop the proposed method, we performed an experimental analysis of the coupling metrics behavior using artificially generated data. The results of these experiment revealed the metrics behavior in different scenarios, providing insights to develop the analysis method for the identification of architectural degradation. We evaluated the SYMBIOTE method in a real-case open source project called Spinnaker. The results obtained in this evaluation show the relationship between architectural changes and upward trends in coupling metrics for most of the analyzed release intervals. Therefore, the first version of SYMBIOTE has shown potential to detect signs of architectural degradation during the evolution of microservice-based architectures. © 2021, The Author(s).</text:p>
          </table:table-cell>
          <table:table-cell table:style-name="ce2" office:value-type="string" calcext:value-type="string">
            <text:p>Article</text:p>
          </table:table-cell>
          <table:table-cell table:style-name="ce2" office:value-type="string" calcext:value-type="string">
            <text:p>10.1186/s13173-021-00120-y</text:p>
          </table:table-cell>
          <table:table-cell table:style-name="ce2" office:value-type="string" calcext:value-type="string">
            <text:p>https://www.scopus.com/inward/record.uri?eid=2-s2.0-85120964084&amp;doi=10.1186%2Fs13173-021-00120-y&amp;partnerID=40&amp;md5=cbc0e8df254457768b1cae8caeaf6e2b</text:p>
          </table:table-cell>
          <table:table-cell table:style-name="ce2"/>
          <table:table-cell table:style-name="ce2" office:value-type="string" calcext:value-type="string">
            <text:p>Coupling metrics; Maintainability; Microservices; Software architecture; Software engineering; Software evolution</text:p>
          </table:table-cell>
          <table:table-cell table:style-name="ce2" office:value-type="string" calcext:value-type="string">
            <text:p>Application programs; Open source software; Software architecture; Software design; Architecture styles; Condition; Coupling evolution; Coupling metric; Design Principles; Microservice; Operational complexity; Runtimes; Software Evolution; Upward trend; Maintainability</text:p>
          </table:table-cell>
          <table:table-cell table:style-name="ce2" table:number-columns-repeated="3"/>
          <table:table-cell table:style-name="ce2" office:value-type="string" calcext:value-type="string">
            <text:p>Cited by: 20; All Open Access; Gold Open Access</text:p>
          </table:table-cell>
          <table:table-cell table:style-name="ce2"/>
          <table:table-cell table:style-name="ce2" office:value-type="string" calcext:value-type="string">
            <text:p>Unclassifi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76 - 83</text:p>
          </table:table-cell>
          <table:table-cell table:style-name="ce2"/>
          <table:table-cell table:style-name="ce2"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 © 2022 IEEE.</text:p>
          </table:table-cell>
          <table:table-cell table:style-name="ce2" office:value-type="string" calcext:value-type="string">
            <text:p>Conference paper</text:p>
          </table:table-cell>
          <table:table-cell table:style-name="ce2" office:value-type="string" calcext:value-type="string">
            <text:p>10.1109/ICSA-C54293.2022.00058</text:p>
          </table:table-cell>
          <table:table-cell table:style-name="ce2" office:value-type="string" calcext:value-type="string">
            <text:p>https://www.scopus.com/inward/record.uri?eid=2-s2.0-85132156777&amp;doi=10.1109%2FICSA-C54293.2022.00058&amp;partnerID=40&amp;md5=3e2aa421b5fd4b24cafd09c2a033ac48</text:p>
          </table:table-cell>
          <table:table-cell table:style-name="ce2"/>
          <table:table-cell table:style-name="ce2" office:value-type="string" calcext:value-type="string">
            <text:p>API Design; Architectural Design Decision; Conformance Assessment; DDD; Microservice Architecture</text:p>
          </table:table-cell>
          <table:table-cell table:style-name="ce2" office:value-type="string" calcext:value-type="string">
            <text:p>Architectural design; Software architecture; API design; Architectural design decisions; Automated detectors; Conformance assessment; Continuous analysis; Domain model; Domain-driven designs; Ground truth; Microservice architecture; Model elements; Mapping</text:p>
          </table:table-cell>
          <table:table-cell table:style-name="ce2" table:number-columns-repeated="3"/>
          <table:table-cell table:style-name="ce2" office:value-type="string" calcext:value-type="string">
            <text:p>Cited by: 1</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Proceedings - 2022 IEEE International Conference on Services Computing, SCC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47 papers. The topics discussed include: inventory pooling using deep reinforcement learning; CPGCN: collaborative property-aware graph convolutional networks for service recommendation; CPGCN: collaborative property-aware graph convolutional networks for service recommendation; discussing microservices: definitions, pitfalls, and their relations; a lightweight general adaptive optimization tool for relational DBMSS under HTAP workloads; mats: a multi-aspect and adaptive trust-based situation-aware access control framework for federated data-as-a-service systems; probabilistic analysis of context caching in internet of things applications; a general KPI anomaly detection using attention models; and assessing architecture conformance to security-related practices in infrastructure as code based deploymen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8057848&amp;partnerID=40&amp;md5=fb04b3f4e80d34ad02dd0a81af03c438</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 © 2022 IEEE.</text:p>
          </table:table-cell>
          <table:table-cell table:style-name="ce2" office:value-type="string" calcext:value-type="string">
            <text:p>Conference paper</text:p>
          </table:table-cell>
          <table:table-cell table:style-name="ce2" office:value-type="string" calcext:value-type="string">
            <text:p>10.1109/NOMS54207.2022.9789804</text:p>
          </table:table-cell>
          <table:table-cell table:style-name="ce2" office:value-type="string" calcext:value-type="string">
            <text:p>https://www.scopus.com/inward/record.uri?eid=2-s2.0-85133197228&amp;doi=10.1109%2FNOMS54207.2022.9789804&amp;partnerID=40&amp;md5=6bb94303cc22ddc54037170a9b0245fd</text:p>
          </table:table-cell>
          <table:table-cell table:style-name="ce2"/>
          <table:table-cell table:style-name="ce2" office:value-type="string" calcext:value-type="string">
            <text:p>Conformance Checking; Distributed Tracing; Petri nets; Process Mining; Process Model</text:p>
          </table:table-cell>
          <table:table-cell table:style-name="ce2" office:value-type="string" calcext:value-type="string">
            <text:p>Conformance checking; Distributed tracing; Event logs; Model-based OPC; Petri net models; Process Discovery; Process mining; Process-models; Service process; Trace data; Petri nets</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23 - 133</text:p>
          </table:table-cell>
          <table:table-cell table:style-name="ce2"/>
          <table:table-cell table:style-name="ce2"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 © 2022 IEEE.</text:p>
          </table:table-cell>
          <table:table-cell table:style-name="ce2" office:value-type="string" calcext:value-type="string">
            <text:p>Conference paper</text:p>
          </table:table-cell>
          <table:table-cell table:style-name="ce2" office:value-type="string" calcext:value-type="string">
            <text:p>10.1109/SCC55611.2022.00029</text:p>
          </table:table-cell>
          <table:table-cell table:style-name="ce2" office:value-type="string" calcext:value-type="string">
            <text:p>https://www.scopus.com/inward/record.uri?eid=2-s2.0-85138037280&amp;doi=10.1109%2FSCC55611.2022.00029&amp;partnerID=40&amp;md5=8426e3bbce08ccc97b9609781c1c9c9c</text:p>
          </table:table-cell>
          <table:table-cell table:style-name="ce2"/>
          <table:table-cell table:style-name="ce2" office:value-type="string" calcext:value-type="string">
            <text:p>best practices; Infrastructure as code; metrics; modeling; software architecture</text:p>
          </table:table-cell>
          <table:table-cell table:style-name="ce2" office:value-type="string" calcext:value-type="string">
            <text:p>Regression analysis; Software architecture; Traffic control; Best practices; Cloud-based; Generic technology; Grey literature; Infrastructure as code; IT infrastructures; Metric; Model based approach; Modeling; Public repositories; Access control</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Proceedings - 16th IEEE International Conference on Service-Oriented System Engineering, SOSE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22 papers. The topics discussed include: monolith to microservices: VAE-based GNN approach with duplication consideration; migrating monoliths to microservices based on the analysis of database access requests; using microservice telemetry data for system dynamic analysis; microservice architecture reconstruction and visualization techniques: a review; Microvision: static analysis-based approach to visualizing microservices in augmented reality; API description-based conformance assessment of architectural design decision; a cloud native management and orchestration framework for 5G end-to-end network slicing; automatic test case generation for serverless applications; serverless: from bad practices to good solutions; cargo-cult containerization: a critical view of containers in modern software development; and a conceptual model supporting systematic design of service governance system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41359579&amp;partnerID=40&amp;md5=d5e5e17d4cb126bea1f52c273efbfcd9</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Assessing Architecture Conformance to Coupling-Related Infrastructure-as-Code Best Practices: Metrics and Case Studies</text:p>
          </table:table-cell>
          <table:table-cell table:style-name="ce2" office:value-type="string" calcext:value-type="string">
            <text:p>Ntentos, Evangelos and Zdun, Uwe and Soldani, Jacopo and Brogi, A.</text:p>
          </table:table-cell>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01 - 116</text:p>
          </table:table-cell>
          <table:table-cell table:style-name="ce2" office:value-type="string" calcext:value-type="string">
            <text:p>13444 LNCS</text:p>
          </table:table-cell>
          <table:table-cell table:style-name="ce2"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 © 2022,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16697-6_7</text:p>
          </table:table-cell>
          <table:table-cell table:style-name="ce2" office:value-type="string" calcext:value-type="string">
            <text:p>https://www.scopus.com/inward/record.uri?eid=2-s2.0-85139055698&amp;doi=10.1007%2F978-3-031-16697-6_7&amp;partnerID=40&amp;md5=92a48b524ba0d45d201490a08b8edce9</text:p>
          </table:table-cell>
          <table:table-cell table:style-name="ce2"/>
          <table:table-cell table:style-name="ce2" office:value-type="string" calcext:value-type="string">
            <text:p>architecture conformance; IaC best practices; Infrastructure as Code; metrics; software architecture</text:p>
          </table:table-cell>
          <table:table-cell table:style-name="ce2" office:value-type="string" calcext:value-type="string">
            <text:p>Software architecture; Architecture conformance; Best practices; Case-studies; Code deployment; Deployment strategy; Grey literature; Infrastructure as code; Infrastructure as code best practice; Loose couplings; Metric; Open source software</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59 - 68</text:p>
          </table:table-cell>
          <table:table-cell table:style-name="ce2"/>
          <table:table-cell table:style-name="ce2"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 © 2022 IEEE.</text:p>
          </table:table-cell>
          <table:table-cell table:style-name="ce2" office:value-type="string" calcext:value-type="string">
            <text:p>Conference paper</text:p>
          </table:table-cell>
          <table:table-cell table:style-name="ce2" office:value-type="string" calcext:value-type="string">
            <text:p>10.1109/SOSE55356.2022.00013</text:p>
          </table:table-cell>
          <table:table-cell table:style-name="ce2" office:value-type="string" calcext:value-type="string">
            <text:p>https://www.scopus.com/inward/record.uri?eid=2-s2.0-85141357694&amp;doi=10.1109%2FSOSE55356.2022.00013&amp;partnerID=40&amp;md5=2ad201d4c891488ae0242aec28663d21</text:p>
          </table:table-cell>
          <table:table-cell table:style-name="ce2"/>
          <table:table-cell table:style-name="ce2" office:value-type="string" calcext:value-type="string">
            <text:p>ADD; API Design; Architecture Conformance Assessment; DDD; Microservice Architecture</text:p>
          </table:table-cell>
          <table:table-cell table:style-name="ce2" office:value-type="string" calcext:value-type="string">
            <text:p>ADD; API design; Architectural design decisions; Architecture conformance assessment; Conformance assessment; DDD; Design decisions; Design models; Domain-driven designs; Microservice architecture; Application programming interfaces (API)</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2" office:value-type="string" calcext:value-type="string">
            <text:p>Journal of Systems and Softwar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93</text:p>
          </table:table-cell>
          <table:table-cell table:style-name="ce2" office:value-type="string" calcext:value-type="string">
            <text:p>Context: Domain-driven design (DDD) is commonly used to design microservices. A crucial aspect of microservice design is API design, which includes the design of API endpoints. Objective: Our objective is to automate the assessment of conformance to Architectural Design Decisions (ADDs) on the interrelation of DDD and APIs. In particular, we studied link mapping, API operation design, and resource segregation as API endpoint design issues that are linked to domain model design. We particularly aim to address conformance checking in the context of frequent release practices, as frequent manual conformance checking is difficult or infeasible. Methods: We suggest a new approach for the automated assessment of conformance to ADD options. The approach suggests automated detectors to detect ADD options selected in a given API endpoint design, as well as an assessment scoring scheme based on empirical results. For the evaluation of our approach, we first manually created a ground truth for 12 cases in a multi-case study, and then compared the results of our automated detectors to the ground truth for each of those cases. Results: With our approach, all ADD options in our multi-case study possibly can be automatically detected. Without further improvements, our approach identifies 83% of the decision points in the multi-case study correctly. A statistical analysis of our data shows only a negligible effect size for differences to the ground truth. Conclusion: Our new approach provides a pragmatic method for automated detection of conformance to ADDs on the interrelation of DDD and APIs. The approach can support the continuous analysis of API endpoint designs. © 2022 The Authors</text:p>
          </table:table-cell>
          <table:table-cell table:style-name="ce2" office:value-type="string" calcext:value-type="string">
            <text:p>Article</text:p>
          </table:table-cell>
          <table:table-cell table:style-name="ce2" office:value-type="string" calcext:value-type="string">
            <text:p>10.1016/j.jss.2022.111433</text:p>
          </table:table-cell>
          <table:table-cell table:style-name="ce2" office:value-type="string" calcext:value-type="string">
            <text:p>https://www.scopus.com/inward/record.uri?eid=2-s2.0-85135305434&amp;doi=10.1016%2Fj.jss.2022.111433&amp;partnerID=40&amp;md5=32dd3c4553ebddce3f7b2a8dc625d20d</text:p>
          </table:table-cell>
          <table:table-cell table:style-name="ce2"/>
          <table:table-cell table:style-name="ce2" office:value-type="string" calcext:value-type="string">
            <text:p>API design; Architecture conformance assessment; Domain driven design; Microservice architecture</text:p>
          </table:table-cell>
          <table:table-cell table:style-name="ce2" office:value-type="string" calcext:value-type="string">
            <text:p>Application programming interfaces (API); Architectural design; API design; Architectural design decisions; Architecture conformance assessment; Case-studies; Conformance assessment; Conformance checking; Domain model; Domain-driven designs; Ground truth; Microservice architecture; Automation</text:p>
          </table:table-cell>
          <table:table-cell table:style-name="ce2" table:number-columns-repeated="3"/>
          <table:table-cell table:style-name="ce2" office:value-type="string" calcext:value-type="string">
            <text:p>Cited by: 5; All Open Access; Hybrid Gold Open Access</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Extracting the Architecture of Microservices: An Approach for Explainability and Traceability</text:p>
          </table:table-cell>
          <table:table-cell table:style-name="ce2" office:value-type="string" calcext:value-type="string">
            <text:p>Queval, Pierre Jean and Zdun, Uwe</text:p>
          </table:table-cell>
          <table:table-cell table:style-name="ce2" office:value-type="string" calcext:value-type="string">
            <text:p>Lecture Notes in Computer Science</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346 - 353</text:p>
          </table:table-cell>
          <table:table-cell table:style-name="ce2" office:value-type="string" calcext:value-type="string">
            <text:p>14212 LNCS</text:p>
          </table:table-cell>
          <table:table-cell table:style-name="ce2"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 © 2023,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42592-9_24</text:p>
          </table:table-cell>
          <table:table-cell table:style-name="ce2" office:value-type="string" calcext:value-type="string">
            <text:p>https://www.scopus.com/inward/record.uri?eid=2-s2.0-85172069966&amp;doi=10.1007%2F978-3-031-42592-9_24&amp;partnerID=40&amp;md5=0a4509fefe26e4240984deaa4b0a70d1</text:p>
          </table:table-cell>
          <table:table-cell table:style-name="ce2"/>
          <table:table-cell table:style-name="ce2" office:value-type="string" calcext:value-type="string">
            <text:p>Architecture; Explainability; Microservices; Polyglot</text:p>
          </table:table-cell>
          <table:table-cell table:style-name="ce2" office:value-type="string" calcext:value-type="string">
            <text:p>Air navigation; Codes (symbols); Software architecture; Architecture modeling; Architecture recovery; Code navigation; Explainability; High reliability; Microservice; Polyglot; Security analysis; Source codes; Tree structures; Trees (mathematics)</text:p>
          </table:table-cell>
          <table:table-cell table:style-name="ce2" table:number-columns-repeated="3"/>
          <table:table-cell table:style-name="ce2" office:value-type="string" calcext:value-type="string">
            <text:p>Cited by: 6</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I Will Survive: An Event-driven Conformance Checking Approach Over Process Streams</text:p>
          </table:table-cell>
          <table:table-cell table:style-name="ce2" office:value-type="string" calcext:value-type="string">
            <text:p>Raun, Kristo and Tommasini, Riccardo and Awad, Ahmed</text:p>
          </table:table-cell>
          <table:table-cell table:style-name="ce2"/>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49 - 60</text:p>
          </table:table-cell>
          <table:table-cell table:style-name="ce2"/>
          <table:table-cell table:style-name="ce2" office:value-type="string" calcext:value-type="string">
            <text:p>Online conformance checking deals with finding discrepancies between real-life and modeled behavior on data streams. The current state-of-the-art output of online conformance checking is a prefix-alignment, which is used for pinpointing the exact deviations in terms of the trace and the model while accommodating a trace's unknown termination in an online setting. Current methods for producing prefix-alignments are computationally expensive and hinder the applicability in real-life settings.This paper introduces a new approximate algorithm - I Will Survive (IWS). The algorithm utilizes the trie data structure to improve the calculation speed, while remaining memory-efficient. Comparative analysis on real-life and synthetic datasets shows that the IWS algorithm can achieve an order of magnitude faster execution time while having a smaller error cost, compared to the current state of the art. In extreme cases, the IWS finds prefix-alignments roughly three orders of magnitude faster than previous approximate methods. The IWS algorithm includes a discounted decay time setting for more efficient memory usage and a look-ahead limit for improving computation time. Finally, the algorithm is stress tested for performance using a simulation of high-traffic event streams. © 2023 ACM.</text:p>
          </table:table-cell>
          <table:table-cell table:style-name="ce2" office:value-type="string" calcext:value-type="string">
            <text:p>Conference paper</text:p>
          </table:table-cell>
          <table:table-cell table:style-name="ce2" office:value-type="string" calcext:value-type="string">
            <text:p>10.1145/3583678.3596887</text:p>
          </table:table-cell>
          <table:table-cell table:style-name="ce2" office:value-type="string" calcext:value-type="string">
            <text:p>https://www.scopus.com/inward/record.uri?eid=2-s2.0-85170086139&amp;doi=10.1145%2F3583678.3596887&amp;partnerID=40&amp;md5=f2a719cdf5382b5f5bd0795c932fcd9e</text:p>
          </table:table-cell>
          <table:table-cell table:style-name="ce2"/>
          <table:table-cell table:style-name="ce2" office:value-type="string" calcext:value-type="string">
            <text:p>data streams; event-based business process management; online conformance checking; prefix-alignments</text:p>
          </table:table-cell>
          <table:table-cell table:style-name="ce2" office:value-type="string" calcext:value-type="string">
            <text:p>Administrative data processing; Computational efficiency; Enterprise resource management; Information management; 'current; Business Process; Conformance checking; Data stream; Event-based; Event-based business process management; Online conformance checking; Prefix-alignment; Process management; State of the art; Alignment</text:p>
          </table:table-cell>
          <table:table-cell table:style-name="ce2" table:number-columns-repeated="3"/>
          <table:table-cell table:style-name="ce2" office:value-type="string" calcext:value-type="string">
            <text:p>Cited by: 4; All Open Access; Green Accepted Open Access; Green Open Access</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3</text:p>
          </table:table-cell>
          <table:table-cell table:style-name="ce4" office:value-type="string" calcext:value-type="string">
            <text:p>Study is a secondary study (SLR, SMS, survey).</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2" office:value-type="string" calcext:value-type="string">
            <text:p>IEEE International Conference on Cloud Computing, CLOUD</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201 - 211</text:p>
          </table:table-cell>
          <table:table-cell table:style-name="ce2" office:value-type="string" calcext:value-type="string">
            <text:p>2023-July</text:p>
          </table:table-cell>
          <table:table-cell table:style-name="ce2"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 © 2023 IEEE.</text:p>
          </table:table-cell>
          <table:table-cell table:style-name="ce2" office:value-type="string" calcext:value-type="string">
            <text:p>Conference paper</text:p>
          </table:table-cell>
          <table:table-cell table:style-name="ce2" office:value-type="string" calcext:value-type="string">
            <text:p>10.1109/CLOUD60044.2023.00031</text:p>
          </table:table-cell>
          <table:table-cell table:style-name="ce2" office:value-type="string" calcext:value-type="string">
            <text:p>https://www.scopus.com/inward/record.uri?eid=2-s2.0-85174302755&amp;doi=10.1109%2FCLOUD60044.2023.00031&amp;partnerID=40&amp;md5=c14bcce16ca5f1ab642cef5a88458038</text:p>
          </table:table-cell>
          <table:table-cell table:style-name="ce2"/>
          <table:table-cell table:style-name="ce2" office:value-type="string" calcext:value-type="string">
            <text:p>architecture smells; best practices; Infrastructure as code; metrics; modeling</text:p>
          </table:table-cell>
          <table:table-cell table:style-name="ce2" office:value-type="string" calcext:value-type="string">
            <text:p>Codes (symbols); Open source software; Architecture smell; Automatic method; Best practices; Infrastructure as code; IT infrastructures; Loose couplings; Metric; Modeling; Refactoring methods; Software resources; Odors</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Correct-By-Construction Microservices with Model-Driven Engineering</text:p>
          </table:table-cell>
          <table:table-cell table:style-name="ce2" office:value-type="string" calcext:value-type="string">
            <text:p>Rademacher, Florian</text:p>
          </table:table-cell>
          <table:table-cell table:style-name="ce2" office:value-type="string" calcext:value-type="string">
            <text:p>OpenAccess Series in Informatic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111</text:p>
          </table:table-cell>
          <table:table-cell table:style-name="ce2" office:value-type="string" calcext:value-type="string">
            <text:p>Patterns are a common metaphor in software engineering that denotes reusable solutions for recurring software engineering problems. Architectural patterns focus on the interplay or organization of two or more components of a software system, and are particularly helpful in the design of complex software architectures such as those produced by Microservice Architecture (MSA). This paper presents an approach for the language-based reification of architectural MSA patterns. To this end, we introduce a method to flexibly retrofit LEMMA (Language Ecosystem for Modeling Microservices) with support for modeling and implementing architectural MSA patterns. The method relies on the (i) specification of aspects to reify pattern applications in MSA models; (ii) validation of pattern applications; and (iii) code generation from correct pattern applications. Consequently, it contributes to correct-by-construction microservices by abstracting from the complexity of pattern implementations, yet still enabling their automated production with Model-Driven Engineering. We validate our method with the popular Domain Event and Command Query Responsibility Segregation patterns, and assess its applicability for 28 additional patterns. Our results show that LEMMA’s expressivity covers the model-based expression of complex architectural MSA patterns and that its model processing facilities support pattern-specific extensions such that conformance checking and pattern-conform code generation can be modularized into reusable model processors. © 2023 Schloss Dagstuhl- Leibniz-Zentrum fur Informatik GmbH, Dagstuhl Publishing. All rights reserved.</text:p>
          </table:table-cell>
          <table:table-cell table:style-name="ce2" office:value-type="string" calcext:value-type="string">
            <text:p>Conference paper</text:p>
          </table:table-cell>
          <table:table-cell table:style-name="ce2" office:value-type="string" calcext:value-type="string">
            <text:p>10.4230/OASIcs.Microservices.2020-2022.8</text:p>
          </table:table-cell>
          <table:table-cell table:style-name="ce2" office:value-type="string" calcext:value-type="string">
            <text:p>https://www.scopus.com/inward/record.uri?eid=2-s2.0-85181985621&amp;doi=10.4230%2FOASIcs.Microservices.2020-2022.8&amp;partnerID=40&amp;md5=64696f33c95f674399485b0285aff4f8</text:p>
          </table:table-cell>
          <table:table-cell table:style-name="ce2"/>
          <table:table-cell table:style-name="ce2" office:value-type="string" calcext:value-type="string">
            <text:p>Architectural Pattern Conformance Checking; Architectural Patterns; Code Generation; Microservice Architecture; Model Validation; Model-Driven Engineering; Static Model Analysis</text:p>
          </table:table-cell>
          <table:table-cell table:style-name="ce2" office:value-type="string" calcext:value-type="string">
            <text:p>Model checking; Modeling languages; Query processing; Software architecture; Architectural pattern; Architectural pattern conformance checking; Codegeneration; Conformance checking; Microservice architecture; Model validation; Model-driven Engineering; Modeling analyzes; Static model analyse; Static modelling; Computer software reusability</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Exploring Architectural Evolution in Microservice Systems Using Repository Mining Techniques and Static Code Analysis</text:p>
          </table:table-cell>
          <table:table-cell table:style-name="ce2" office:value-type="string" calcext:value-type="string">
            <text:p>Genfer, Patric and Zdun, Uwe</text:p>
          </table:table-cell>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57 - 173</text:p>
          </table:table-cell>
          <table:table-cell table:style-name="ce2" office:value-type="string" calcext:value-type="string">
            <text:p>14889 LNCS</text:p>
          </table:table-cell>
          <table:table-cell table:style-name="ce2"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 © The Author(s), under exclusive license to Springer Nature Switzerland AG 2024.</text:p>
          </table:table-cell>
          <table:table-cell table:style-name="ce2" office:value-type="string" calcext:value-type="string">
            <text:p>Conference paper</text:p>
          </table:table-cell>
          <table:table-cell table:style-name="ce2" office:value-type="string" calcext:value-type="string">
            <text:p>10.1007/978-3-031-70797-1_10</text:p>
          </table:table-cell>
          <table:table-cell table:style-name="ce2" office:value-type="string" calcext:value-type="string">
            <text:p>https://www.scopus.com/inward/record.uri?eid=2-s2.0-85203600424&amp;doi=10.1007%2F978-3-031-70797-1_10&amp;partnerID=40&amp;md5=7a0d70dcf9868757ca1f21ec1cf1b792</text:p>
          </table:table-cell>
          <table:table-cell table:style-name="ce2"/>
          <table:table-cell table:style-name="ce2" office:value-type="string" calcext:value-type="string">
            <text:p>evolution; metrics; Microservice API; source code detectors; source code repository mining</text:p>
          </table:table-cell>
          <table:table-cell table:style-name="ce2" office:value-type="string" calcext:value-type="string">
            <text:p>Problem oriented languages; Program debugging; Architectural evolution; Evolution; Metric; Microservice API; Mining techniques; Repository mining; Source code detector; Source code repositories; Source code repository mining; Source codes; Open source software</text:p>
          </table:table-cell>
          <table:table-cell table:style-name="ce2" table:number-columns-repeated="3"/>
          <table:table-cell table:style-name="ce2" office:value-type="string" calcext:value-type="string">
            <text:p>Cited by: 4</text:p>
          </table:table-cell>
          <table:table-cell table:style-name="ce2"/>
          <table:table-cell table:style-name="ce2" office:value-type="string" calcext:value-type="string">
            <text:p>Unclassifi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 Chao and Liu, Xiaodong and Li, Shanshan</text:p>
          </table:table-cell>
          <table:table-cell table:style-name="ce2" office:value-type="string" calcext:value-type="string">
            <text:p>Software - Practice and Exper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5 - 616</text:p>
          </table:table-cell>
          <table:table-cell table:style-name="ce2" office:value-type="string" calcext:value-type="string">
            <text:p>54</text:p>
          </table:table-cell>
          <table:table-cell table:style-name="ce2" office:value-type="string" calcext:value-type="string">
            <text:p>As a predominant design method for microsservices architecture (MSA), domain-driven design (DDD) utilizes a series of standard patterns in both models and implementations to effectively support the design of architectural elements. However, an implementation may deviate from its original domain model that uses certain patterns. The deviation between a domain model and its implementation is a type of architectural drift, which needs to be detected promptly. This paper proposes an approach, namely DOMICO, to check the conformance between the domain model and its implementation, by which the conformance is formalized by defining eight common structural patterns of domain modeling and their representations in both models and the corresponding source code. Based on the formalization, our approach can not only identify the discrepancies (e.g., divergence, absence, and modification) with respect to pattern elements, but also detect possible violations of 24 compliance rules imposed by the patterns. To validate DOMICO, we performed a case study to investigate its use in a supply chain project and its performance. The results show that DOMICO can accurately identify 100% inconsistency issues in the cases examined. As the first conformance checking approach for DDD, DOMICO can be integrated into the regular domain modeling process and help ensure the conformity of microservice implementations to models. © 2023 John Wiley &amp; Sons, Ltd.</text:p>
          </table:table-cell>
          <table:table-cell table:style-name="ce2" office:value-type="string" calcext:value-type="string">
            <text:p>Article</text:p>
          </table:table-cell>
          <table:table-cell table:style-name="ce2" office:value-type="string" calcext:value-type="string">
            <text:p>10.1002/spe.3272</text:p>
          </table:table-cell>
          <table:table-cell table:style-name="ce2" office:value-type="string" calcext:value-type="string">
            <text:p>https://www.scopus.com/inward/record.uri?eid=2-s2.0-85174190323&amp;doi=10.1002%2Fspe.3272&amp;partnerID=40&amp;md5=77117fcaf4d7e21b10d8ffbc4c176c19</text:p>
          </table:table-cell>
          <table:table-cell table:style-name="ce2"/>
          <table:table-cell table:style-name="ce2" office:value-type="string" calcext:value-type="string">
            <text:p>architectural drift; architecture conformance checking; code implementation; domain model; domain-driven design; microservices architecture</text:p>
          </table:table-cell>
          <table:table-cell table:style-name="ce2" office:value-type="string" calcext:value-type="string">
            <text:p>Architectural design; Codes (symbols); Architectural drift; Architectural element; Architecture conformance checking; Code implementation; Conformance checking; Design method; Domain model; Domain-driven designs; Microservice architecture; Standard pattern; Supply chains</text:p>
          </table:table-cell>
          <table:table-cell table:style-name="ce2" table:number-columns-repeated="3"/>
          <table:table-cell table:style-name="ce2" office:value-type="string" calcext:value-type="string">
            <text:p>Cited by: 5; All Open Access; Bronze Open Access</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Detection Strategies for Microservice Security Tactics</text:p>
          </table:table-cell>
          <table:table-cell table:style-name="ce2" office:value-type="string" calcext:value-type="string">
            <text:p>Zdun, Uwe and Queval, Pierre Jean and Simhandl, Georg and Scandariato, Riccardo and Chakravarty, Somik and Jelić, Marjan and Jovanović, A. S.</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257 - 1273</text:p>
          </table:table-cell>
          <table:table-cell table:style-name="ce2" office:value-type="string" calcext:value-type="string">
            <text:p>21</text:p>
          </table:table-cell>
          <table:table-cell table:style-name="ce2"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 © 2004-2012 IEEE.</text:p>
          </table:table-cell>
          <table:table-cell table:style-name="ce2" office:value-type="string" calcext:value-type="string">
            <text:p>Article</text:p>
          </table:table-cell>
          <table:table-cell table:style-name="ce2" office:value-type="string" calcext:value-type="string">
            <text:p>10.1109/TDSC.2023.3276487</text:p>
          </table:table-cell>
          <table:table-cell table:style-name="ce2" office:value-type="string" calcext:value-type="string">
            <text:p>https://www.scopus.com/inward/record.uri?eid=2-s2.0-85160216527&amp;doi=10.1109%2FTDSC.2023.3276487&amp;partnerID=40&amp;md5=9c14d9de24c27f20d68ba619a574a65d</text:p>
          </table:table-cell>
          <table:table-cell table:style-name="ce2"/>
          <table:table-cell table:style-name="ce2" office:value-type="string" calcext:value-type="string">
            <text:p>Conformance checking; detection strategies; metrics; microservice architecture security; microservices</text:p>
          </table:table-cell>
          <table:table-cell table:style-name="ce2" office:value-type="string" calcext:value-type="string">
            <text:p>Authorization; Information management; Network security; Open systems; Sensitive data; Architectural design decisions; Code; Conformance checking; Detection strategy; Metric; Microservice; Microservice architecture; Microservice architecture security; Modeling data; Security; Computer architecture</text:p>
          </table:table-cell>
          <table:table-cell table:style-name="ce2" table:number-columns-repeated="3"/>
          <table:table-cell table:style-name="ce2" office:value-type="string" calcext:value-type="string">
            <text:p>Cited by: 3; All Open Access; Hybrid Gold Open Access</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Leveraging Petri Nets for Workflow Anomaly Detection in Microservice Architectures</text:p>
          </table:table-cell>
          <table:table-cell table:style-name="ce2" office:value-type="string" calcext:value-type="string">
            <text:p>Kamboj, Priyanka and Artho, Cyrille Valentin and Guanciale, Roberto and Jabbarvand, Reyhaneh and Godfrey, Philip Brighten</text:p>
          </table:table-cell>
          <table:table-cell table:style-name="ce2" office:value-type="string" calcext:value-type="string">
            <text:p>Lecture Notes in Computer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219 - 241</text:p>
          </table:table-cell>
          <table:table-cell table:style-name="ce2" office:value-type="string" calcext:value-type="string">
            <text:p>15714 LNCS</text:p>
          </table:table-cell>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94634-9_11</text:p>
          </table:table-cell>
          <table:table-cell table:style-name="ce2" office:value-type="string" calcext:value-type="string">
            <text:p>https://www.scopus.com/inward/record.uri?eid=2-s2.0-105008762714&amp;doi=10.1007%2F978-3-031-94634-9_11&amp;partnerID=40&amp;md5=7ce18bf00b36b36d0623423caff5fdb1</text:p>
          </table:table-cell>
          <table:table-cell table:style-name="ce2"/>
          <table:table-cell table:style-name="ce2" office:value-type="string" calcext:value-type="string">
            <text:p>Alignments; Conformance Checking; Cost function; Delay; Microservices; Process discovery; Process mining</text:p>
          </table:table-cell>
          <table:table-cell table:style-name="ce2" office:value-type="string" calcext:value-type="string">
            <text:p>Alignment; Anomaly detection; Architecture; Data mining; Distributed computer systems; Human computer interaction; Information use; Complex workflows; Conformance checking; Cost-function; Decentralised; Delay; Microservice; Process Discovery; Process mining; Work-flows; Petri nets</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E. and Panichella, Annibale and Scandariato, Riccardo</text:p>
          </table:table-cell>
          <table:table-cell table:style-name="ce2" office:value-type="string" calcext:value-type="string">
            <text:p>Proceedings - International Conference on Software Engineer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 - 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 nl/catma.github.io/, and a demonstration video is available at https://youtu.be/WKP1hG-TDKc. © 2024 IEEE Computer Society. All rights reserved.</text:p>
          </table:table-cell>
          <table:table-cell table:style-name="ce2" office:value-type="string" calcext:value-type="string">
            <text:p>Conference paper</text:p>
          </table:table-cell>
          <table:table-cell table:style-name="ce2" office:value-type="string" calcext:value-type="string">
            <text:p>10.1145/3639478.3640022</text:p>
          </table:table-cell>
          <table:table-cell table:style-name="ce2" office:value-type="string" calcext:value-type="string">
            <text:p>https://www.scopus.com/inward/record.uri?eid=2-s2.0-85188258629&amp;doi=10.1145%2F3639478.3640022&amp;partnerID=40&amp;md5=1f4f18ceba149d26d74bb010a0657fb2</text:p>
          </table:table-cell>
          <table:table-cell table:style-name="ce2"/>
          <table:table-cell table:style-name="ce2" office:value-type="string" calcext:value-type="string">
            <text:p>dynamic analysis; empirical software engineering; microservices; software testing; static analysis</text:p>
          </table:table-cell>
          <table:table-cell table:style-name="ce2" office:value-type="string" calcext:value-type="string">
            <text:p>Application programs; HTTP; Program debugging; Static analysis; Analysis tools; Architectural style; Automated tools; Core functionality; Dynamics analysis; Empirical Software Engineering; Microservice; Software testings; Software-systems; System deployment; Software testing</text:p>
          </table:table-cell>
          <table:table-cell table:style-name="ce2" table:number-columns-repeated="3"/>
          <table:table-cell table:style-name="ce2" office:value-type="string" calcext:value-type="string">
            <text:p>Cited by: 4; All Open Access; Gold Open Access; Green Open Access</text:p>
          </table:table-cell>
          <table:table-cell table:style-name="ce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dvanced manufacturing rules check (MRC) for fully-automated assessmentof complex reticle designs - Part II</text:p>
          </table:table-cell>
          <table:table-cell table:style-name="ce2" office:value-type="string" calcext:value-type="string">
            <text:p>Straub, J. A. and Aguilar, D. and Buck, P. D. and Dawkins, D. andGladhill, R. and Nolke, S. and Riddick, J.</text:p>
          </table:table-cell>
          <table:table-cell table:style-name="ce2"/>
          <table:table-cell table:style-name="ce2" office:value-type="string" calcext:value-type="string">
            <text:p>2006</text:p>
          </table:table-cell>
          <table:table-cell table:style-name="ce2" office:value-type="string" calcext:value-type="string">
            <text:p>ISI Web of Science</text:p>
          </table:table-cell>
          <table:table-cell table:style-name="ce2"/>
          <table:table-cell table:style-name="ce2" office:value-type="string" calcext:value-type="string">
            <text:p>6349</text:p>
          </table:table-cell>
          <table:table-cell table:style-name="ce2" office:value-type="string" calcext:value-type="string">
            <text:p>Advanced electronic design automation (EDA) tools, with their</text:p>
            <text:p>simulation, modeling, design rule checking, and optical proximity</text:p>
            <text:p>correction capabilities, have facilitated the improvement of first pass</text:p>
            <text:p>wafer yields. While the data produced by these tools may have been</text:p>
            <text:p>processed for optimal wafer manufacturing, it is possible for the same</text:p>
            <text:p>data to be far from ideal for photomask manufacturing, particularly at</text:p>
            <text:p>lithography and inspection stages, resulting in production delays and</text:p>
            <text:p>increased costs. The same EDA tools used to produce the data can be used</text:p>
            <text:p>to detect potential problems for photomask manufacturing in the data.</text:p>
            <text:p>In the previous paper(1), it was shown how photomask MRC is used to</text:p>
            <text:p>uncover data related problems prior to automated defect inspection. It</text:p>
            <text:p>was demonstrated how jobs which are likely to have problems at</text:p>
            <text:p>inspection could be identified and separated from those which are not.</text:p>
            <text:p>The use of photomask MRC in production was shown to reduce time lost to</text:p>
            <text:p>aborted runs and troubleshooting due to data issues.</text:p>
            <text:p>In this paper, the effectiveness of this photomask MRC program in a high</text:p>
            <text:p>volume photomask factory over the course of a year as applied to more</text:p>
            <text:p>than ten thousand jobs will be shown. Statistics on the results of the</text:p>
            <text:p>MRC runs will be presented along with the associated impact to the</text:p>
            <text:p>automated defect inspection process. Common design problems will be</text:p>
            <text:p>shown as well as their impact to mask manufacturing throughput and</text:p>
            <text:p>productivity. Finally, solutions to the most common and most severe</text:p>
            <text:p>problems will be offered and discussed.</text:p>
          </table:table-cell>
          <table:table-cell table:style-name="ce2" office:value-type="string" calcext:value-type="string">
            <text:p>Proceedings Paper</text:p>
          </table:table-cell>
          <table:table-cell table:style-name="ce2" office:value-type="string" calcext:value-type="string">
            <text:p>10.1117/12.686134</text:p>
          </table:table-cell>
          <table:table-cell table:style-name="ce2"/>
          <table:table-cell table:style-name="ce2" office:value-type="string" calcext:value-type="string">
            <text:p>Straub, JA (Corresponding Author), Toppan Photomasks Inc, 400 Texas Ave, Round Rock, TX 78664 USA.Straub, J. A.; Aguilar, D.; Dawkins, D.; Riddick, J., Toppan Photomasks Inc, 400 Texas Ave, Round Rock, TX 78664 USA.Buck, P. D.; Gladhill, R.; Nolke, S., Toppan Photomasks Inc, Gresham, OR 97030 USA.</text:p>
          </table:table-cell>
          <table:table-cell table:style-name="ce2"/>
          <table:table-cell table:style-name="ce2" office:value-type="string" calcext:value-type="string">
            <text:p>manufacturing rules check; MRC; mask data inspection; mask datapreparation; defect inspection; design for manufacturing</text:p>
          </table:table-cell>
          <table:table-cell table:style-name="ce2" office:value-type="string" calcext:value-type="string">
            <text:p>SPIE-INT SOC OPTICAL ENGINEERING</text:p>
          </table:table-cell>
          <table:table-cell table:style-name="ce2" office:value-type="string" calcext:value-type="string">
            <text:p>0277-786X</text:p>
          </table:table-cell>
          <table:table-cell table:style-name="ce2" office:value-type="string" calcext:value-type="string">
            <text:p>English</text:p>
          </table:table-cell>
          <table:table-cell table:style-name="ce2" office:value-type="string" calcext:value-type="string">
            <text:p>26th Annual BACUS Symposium on Photomask Technology, Monterey, CA, SEP19-22, 2006</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DRC Violation Prediction After Global Route Through Convolutional NeuralNetwork</text:p>
          </table:table-cell>
          <table:table-cell table:style-name="ce2" office:value-type="string" calcext:value-type="string">
            <text:p>Hung, Wei-Tse and Chen, Yu-Guang and Lin, Jhen-Gang and Yang, Yun-Weiand Tsai, Cheng-Hong and Chao, Mango Chia-Tso</text:p>
          </table:table-cell>
          <table:table-cell table:style-name="ce2" office:value-type="string" calcext:value-type="string">
            <text:p>IEEE TRANSACTIONS ON VERY LARGE SCALE INTEGRATION (VLSI) SYSTEMS</text:p>
          </table:table-cell>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1425-1438</text:p>
          </table:table-cell>
          <table:table-cell table:style-name="ce2" office:value-type="string" calcext:value-type="string">
            <text:p>31</text:p>
          </table:table-cell>
          <table:table-cell table:style-name="ce2" office:value-type="string" calcext:value-type="string">
            <text:p>Design rule checking (DRC) violation (DRV) prediction with early stage</text:p>
            <text:p>design information can help to reduce the iterations of design procedure</text:p>
            <text:p>and can speed up the physical-design closure. It is known that</text:p>
            <text:p>accurately predicting detailed routing-level DRV with information</text:p>
            <text:p>obtained at global route (GR) stage can significantly speed up the</text:p>
            <text:p>design closure. However, without sufficient prediction accuracy, the</text:p>
            <text:p>result may lead to suboptimal design or even longer design time.</text:p>
            <text:p>Therefore, in this article, we propose two machine-learning frameworks</text:p>
            <text:p>to predict the detailed routing-level DRV map of a given design. The</text:p>
            <text:p>first framework is based on the congestion report obtained at global</text:p>
            <text:p>routing stage, and the second framework considers both the placement</text:p>
            <text:p>information and the congestion report of global routing. We then compare</text:p>
            <text:p>the runtime and accuracy of the two models. The proposed frameworks</text:p>
            <text:p>utilize convolutional neural network as the core technique to train</text:p>
            <text:p>these prediction models. The training dataset is collected from 15</text:p>
            <text:p>industrial designs using a leading commercial automatic placement and</text:p>
            <text:p>routing (APR) tool, and the total number of collected training samples</text:p>
            <text:p>exceeds 26M. A specialized under-sampling technique is also proposed to</text:p>
            <text:p>select important training samples for learning, compensate for the</text:p>
            <text:p>inaccuracy misled by a highly imbalanced training dataset, and speed up</text:p>
            <text:p>the entire training process. The experimental results demonstrate that</text:p>
            <text:p>our both models can result in not only a significantly higher accuracy</text:p>
            <text:p>than previous related works, but also a DRV map visually matching the</text:p>
            <text:p>actual ones closely. The average runtime of using our learned model from</text:p>
            <text:p>the first framework to generate a DRV map is only 3\% of global routing,</text:p>
            <text:p>and the prediction accuracy of our learned model from the second</text:p>
            <text:p>framework can improve 7.6\% compared to the one from the first</text:p>
            <text:p>framework. Our proposed framework can be viewed as a simple add-on tool</text:p>
            <text:p>to a current commercial placement and global router that can efficiently</text:p>
            <text:p>and effectively generate a more realistic DRV map without really</text:p>
            <text:p>applying detailed routing.</text:p>
          </table:table-cell>
          <table:table-cell table:style-name="ce2" office:value-type="string" calcext:value-type="string">
            <text:p>Article</text:p>
          </table:table-cell>
          <table:table-cell table:style-name="ce2" office:value-type="string" calcext:value-type="string">
            <text:p>10.1109/TVLSI.2023.3271932</text:p>
          </table:table-cell>
          <table:table-cell table:style-name="ce2"/>
          <table:table-cell table:style-name="ce2" office:value-type="string" calcext:value-type="string">
            <text:p>Chen, YG (Corresponding Author), Natl Cent Univ, Dept Elect Engn, Taoyuan 32001, Taiwan.Hung, Wei-Tse; Lin, Jhen-Gang; Chao, Mango Chia-Tso, Natl Yang Ming Chiao Tung Univ, Inst Elect, Hsinchu 300, Taiwan.Chen, Yu-Guang; Yang, Yun-Wei, Natl Cent Univ, Dept Elect Engn, Taoyuan 32001, Taiwan.Tsai, Cheng-Hong, Global Unichip Corp, Hsinchu 300, Taiwan.</text:p>
          </table:table-cell>
          <table:table-cell table:style-name="ce2"/>
          <table:table-cell table:style-name="ce2" office:value-type="string" calcext:value-type="string">
            <text:p>Design rule checking (DRC); neural networks; physical design (EDA);physical verification; supervised learning by classification</text:p>
          </table:table-cell>
          <table:table-cell table:style-name="ce2" office:value-type="string" calcext:value-type="string">
            <text:p>IEEE-INST ELECTRICAL ELECTRONICS ENGINEERS INC</text:p>
          </table:table-cell>
          <table:table-cell table:style-name="ce2" office:value-type="string" calcext:value-type="string">
            <text:p>1063-8210</text:p>
          </table:table-cell>
          <table:table-cell table:style-name="ce2" office:value-type="string" calcext:value-type="string">
            <text:p>English</text:p>
          </table:table-cell>
          <table:table-cell table:style-name="ce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 complete design flow for silicon photonics</text:p>
          </table:table-cell>
          <table:table-cell table:style-name="ce2" office:value-type="string" calcext:value-type="string">
            <text:p>Pond, James and Cone, Chris and Chrostowski, Lukas and Klein, Jacksonand Flueckiger, Jonas and Liu, Amy and McGuire, Dylan and Wang, Xu</text:p>
          </table:table-cell>
          <table:table-cell table:style-name="ce2"/>
          <table:table-cell table:style-name="ce2" office:value-type="string" calcext:value-type="string">
            <text:p>2014</text:p>
          </table:table-cell>
          <table:table-cell table:style-name="ce2" office:value-type="string" calcext:value-type="string">
            <text:p>ISI Web of Science</text:p>
          </table:table-cell>
          <table:table-cell table:style-name="ce2"/>
          <table:table-cell table:style-name="ce2" office:value-type="string" calcext:value-type="string">
            <text:p>9133</text:p>
          </table:table-cell>
          <table:table-cell table:style-name="ce2" office:value-type="string" calcext:value-type="string">
            <text:p>Broad adoption of silicon photonics technology for photonic integrated</text:p>
            <text:p>circuits requires standardized design flows that are similar to what is</text:p>
            <text:p>available for analog and mixed signal electrical circuit design. We have</text:p>
            <text:p>developed a design flow that combines mature electronic design</text:p>
            <text:p>automation (EDA) software with optical simulation software.</text:p>
            <text:p>An essential component of any design flow, whether electrical or</text:p>
            <text:p>photonic, is the ability to accurately simulate large-scale circuits.</text:p>
            <text:p>This is particularly important when the behavior of the circuit is not</text:p>
            <text:p>trivially related to the individual component performance. While this is</text:p>
            <text:p>clearly the case for electronic circuits consisting of hundreds to</text:p>
            <text:p>billions of transistors, it is already becoming important in photonic</text:p>
            <text:p>circuits such as WDM transmitters, where signal cross talk needs to be</text:p>
            <text:p>considered, as well as optical cross-connect switches. In addition,</text:p>
            <text:p>optical routing to connect different components requires the</text:p>
            <text:p>introduction of additional waveguide sections, waveguide bends, and</text:p>
            <text:p>waveguide crossings, which affect the overall circuit performance.</text:p>
            <text:p>Manufacturing variability can also have dramatic circuit-level</text:p>
            <text:p>consequences that need to be simulated. Circuit simulations must rely on</text:p>
            <text:p>compact models that can accurately represent the behavior of each</text:p>
            <text:p>component, and the compact model parameters must be extracted from</text:p>
            <text:p>physical level simulation and experimental results.</text:p>
            <text:p>We show how large scale circuits can be simulated in both the time and</text:p>
            <text:p>frequency domains, including the effects of bidirectional and, where</text:p>
            <text:p>appropriate, multimode and multichannel photonic waveguides. We also</text:p>
            <text:p>show how active, passive and nonlinear individual components such as</text:p>
            <text:p>grating couplers, waveguides, splitters, filters, electro-optical</text:p>
            <text:p>modulators and detectors can be simulated using a combination of</text:p>
            <text:p>electrical and optical algorithms, and good agreement with experimental</text:p>
            <text:p>results can be obtained. We then show how parameters, with inclusion of</text:p>
            <text:p>fabrication process variations, can be extracted for use in the circuit</text:p>
            <text:p>level simulations. Ultimately, we show how a multi-channel WDM</text:p>
            <text:p>transceiver can be created, from schematic design to tapeout, using key</text:p>
            <text:p>features of EDA design flows such as schematic driven layout, design</text:p>
            <text:p>rule checking and layout versus schematic.</text:p>
          </table:table-cell>
          <table:table-cell table:style-name="ce2" office:value-type="string" calcext:value-type="string">
            <text:p>Proceedings Paper</text:p>
          </table:table-cell>
          <table:table-cell table:style-name="ce2" office:value-type="string" calcext:value-type="string">
            <text:p>10.1117/12.2052050</text:p>
          </table:table-cell>
          <table:table-cell table:style-name="ce2"/>
          <table:table-cell table:style-name="ce2" office:value-type="string" calcext:value-type="string">
            <text:p>Pond, J (Corresponding Author), Lumer Solut Inc, 535 Thurlow St, Vancouver, BC V6E 3L2, Canada.Pond, James; Klein, Jackson; Liu, Amy; McGuire, Dylan; Wang, Xu, Lumer Solut Inc, 535 Thurlow St, Vancouver, BC V6E 3L2, Canada.Cone, Chris, Mentor Graph Corp, Wilsonville, OR 97070 USA.Chrostowski, Lukas, Univ British Columbia, Electr \&amp; Comp Engn, Vancouver, BC V6T IZ4, Canada.</text:p>
          </table:table-cell>
          <table:table-cell table:style-name="ce2"/>
          <table:table-cell table:style-name="ce2" office:value-type="string" calcext:value-type="string">
            <text:p>photonics; simulation; silicon photonics; photonic integrated circuits;electronic design automation (EDA); design flow; process design kit(PDK); photonic circuit simulation</text:p>
          </table:table-cell>
          <table:table-cell table:style-name="ce2" office:value-type="string" calcext:value-type="string">
            <text:p>SPIE-INT SOC OPTICAL ENGINEERING</text:p>
          </table:table-cell>
          <table:table-cell table:style-name="ce2" office:value-type="string" calcext:value-type="string">
            <text:p>0277-786X</text:p>
          </table:table-cell>
          <table:table-cell table:style-name="ce2" office:value-type="string" calcext:value-type="string">
            <text:p>English</text:p>
          </table:table-cell>
          <table:table-cell table:style-name="ce2" office:value-type="string" calcext:value-type="string">
            <text:p>4th Conference on Silicon Photonics and Photonic Integrated Circuits,Brussels, BELGIUM, APR 14-17, 201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 Framework for the Generation of Monitor and Plant Model From EventLogs Using Process Mining for Formal Verification of Event-DrivenSystems</text:p>
          </table:table-cell>
          <table:table-cell table:style-name="ce2" office:value-type="string" calcext:value-type="string">
            <text:p>Xavier, Midhun and Dubinin, Victor and Patil, Sandeep and Vyatkin,Valeriy</text:p>
          </table:table-cell>
          <table:table-cell table:style-name="ce2" office:value-type="string" calcext:value-type="string">
            <text:p>IEEE OPEN JOURNAL OF THE INDUSTRIAL ELECTRONICS SOCIETY</text:p>
          </table:table-cell>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517-534</text:p>
          </table:table-cell>
          <table:table-cell table:style-name="ce2" office:value-type="string" calcext:value-type="string">
            <text:p>5</text:p>
          </table:table-cell>
          <table:table-cell table:style-name="ce2" office:value-type="string" calcext:value-type="string">
            <text:p>This article proposes a method for the automatic generation of a plant</text:p>
            <text:p>model and monitoring using process mining algorithms based on recorded</text:p>
            <text:p>event logs. The behavioral traces of the system are captured by</text:p>
            <text:p>recording event logs during plant operation in either manual control</text:p>
            <text:p>mode or with an automatic controller. Process discovery algorithms are</text:p>
            <text:p>then applied to extract the logic of the process behavior properties</text:p>
            <text:p>from the recorded event logs. The result is represented as a Petri net,</text:p>
            <text:p>which is used to construct the state machine of the plant model and</text:p>
            <text:p>monitor and is in accordance with the IEC 61499 Standard. The monitor is</text:p>
            <text:p>implemented as a function block and can be deployed in real time to</text:p>
            <text:p>trigger an error signal whenever there is a deviation from the actual</text:p>
            <text:p>process scenario. The plant model and controller are connected in a</text:p>
            <text:p>closed loop and are used for the formal verification of the system with</text:p>
            <text:p>the help of the ``fb2smv{''} converter and symbolic model checking tool</text:p>
            <text:p>NuSMV.</text:p>
          </table:table-cell>
          <table:table-cell table:style-name="ce2" office:value-type="string" calcext:value-type="string">
            <text:p>Article</text:p>
          </table:table-cell>
          <table:table-cell table:style-name="ce2" office:value-type="string" calcext:value-type="string">
            <text:p>10.1109/OJIES.2024.3406059</text:p>
          </table:table-cell>
          <table:table-cell table:style-name="ce2"/>
          <table:table-cell table:style-name="ce2" office:value-type="string" calcext:value-type="string">
            <text:p>Vyatkin, V (Corresponding Author), Aalto Univ, Helsinki 02150, Finland.Xavier, Midhun, Lulea Univ Technol, dependable Commun \&amp; computat Syst, Lulea, Sweden.Dubinin, Victor; Patil, Sandeep; Vyatkin, Valeriy, Lulea Univ Technol, Lulea, Sweden.Vyatkin, Valeriy, Aalto Univ, Helsinki 02150, Finland.</text:p>
          </table:table-cell>
          <table:table-cell table:style-name="ce2"/>
          <table:table-cell table:style-name="ce2" office:value-type="string" calcext:value-type="string">
            <text:p>IEC 61499; formal verification; plant model generation; process mining</text:p>
          </table:table-cell>
          <table:table-cell table:style-name="ce2" office:value-type="string" calcext:value-type="string">
            <text:p>IEEE-INST ELECTRICAL ELECTRONICS ENGINEERS INC</text:p>
          </table:table-cell>
          <table:table-cell table:style-name="ce2"/>
          <table:table-cell table:style-name="ce2" office:value-type="string" calcext:value-type="string">
            <text:p>English</text:p>
          </table:table-cell>
          <table:table-cell table:style-name="ce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Increased reliability in SOA environments through registry-based</text:p>
            <text:p>conformance testing of Web services</text:p>
          </table:table-cell>
          <table:table-cell table:style-name="ce2" office:value-type="string" calcext:value-type="string">
            <text:p>Kourtesis, D. and Ramollari, E. and Dranidis, D. and Paraskakis, I.</text:p>
          </table:table-cell>
          <table:table-cell table:style-name="ce2" office:value-type="string" calcext:value-type="string">
            <text:p>PRODUCTION PLANNING \&amp; CONTROL</text:p>
          </table:table-cell>
          <table:table-cell table:style-name="ce2" office:value-type="string" calcext:value-type="string">
            <text:p>2010</text:p>
          </table:table-cell>
          <table:table-cell table:style-name="ce2" office:value-type="string" calcext:value-type="string">
            <text:p>ISI Web of Science</text:p>
          </table:table-cell>
          <table:table-cell table:style-name="ce2" office:value-type="string" calcext:value-type="string">
            <text:p>130-144</text:p>
          </table:table-cell>
          <table:table-cell table:style-name="ce2" office:value-type="string" calcext:value-type="string">
            <text:p>21</text:p>
          </table:table-cell>
          <table:table-cell table:style-name="ce2" office:value-type="string" calcext:value-type="string">
            <text:p>Organisations wishing to engage in industrial collaborative networks</text:p>
            <text:p>will typically seek some guarantees concerning the reliability of their</text:p>
            <text:p>prospective partners before committing to cooperation. Evaluating</text:p>
            <text:p>reliability can encompass several aspects, but one of the most crucial</text:p>
            <text:p>things to consider from a cooperation perspective is whether the</text:p>
            <text:p>software systems that support the business processes of some</text:p>
            <text:p>collaborator actually behave as expected. For organisations that rely on</text:p>
            <text:p>a service-oriented computing infrastructure, this amounts to checking</text:p>
            <text:p>whether the functionality of the respective services is conformant to a</text:p>
            <text:p>given behavioural specification. Today's state of the art lacks</text:p>
            <text:p>standardised methods for creating behavioural specifications of Web</text:p>
            <text:p>services, and also lacks tools for automating the process of behavioural</text:p>
            <text:p>conformance checking through testing. This paper presents a concrete</text:p>
            <text:p>method for creating formal specifications of Web service behaviour and</text:p>
            <text:p>utilising them within service registries for automated testing of</text:p>
            <text:p>service implementations in order to verify and certify their</text:p>
            <text:p>conformance.</text:p>
          </table:table-cell>
          <table:table-cell table:style-name="ce2" office:value-type="string" calcext:value-type="string">
            <text:p>Article</text:p>
          </table:table-cell>
          <table:table-cell table:style-name="ce2" office:value-type="string" calcext:value-type="string">
            <text:p>10.1080/09537280903441922</text:p>
          </table:table-cell>
          <table:table-cell table:style-name="ce2"/>
          <table:table-cell table:style-name="ce2" office:value-type="string" calcext:value-type="string">
            <text:p>Kourtesis, D (Corresponding Author), Univ Sheffield, Res Ctr, SEERC, 24 Proxenou Koromila Str, Thessaloniki 54622, Greece.</text:p>
            <text:p>Kourtesis, D.; Ramollari, E.; Dranidis, D.; Paraskakis, I., Univ Sheffield, Res Ctr, SEERC, Thessaloniki 54622, Greece.</text:p>
            <text:p>Kourtesis, D.; Ramollari, E.; Dranidis, D.; Paraskakis, I., CITY Coll, Thessaloniki 54622, Greece.</text:p>
            <text:p>Dranidis, D., Univ Sheffield, Int Fac, Dept Comp Sci, CITY Coll, Thessaloniki 54626, Greece.</text:p>
          </table:table-cell>
          <table:table-cell table:style-name="ce2"/>
          <table:table-cell table:style-name="ce2" office:value-type="string" calcext:value-type="string">
            <text:p>Web services; registry; behavioural conformance; testing</text:p>
          </table:table-cell>
          <table:table-cell table:style-name="ce2" office:value-type="string" calcext:value-type="string">
            <text:p>TAYLOR \&amp; FRANCIS LTD</text:p>
          </table:table-cell>
          <table:table-cell table:style-name="ce2" office:value-type="string" calcext:value-type="string">
            <text:p>0953-7287</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Pre-Global Routing DRC Violation Prediction Using Unsupervised Learning</text:p>
          </table:table-cell>
          <table:table-cell table:style-name="ce2" office:value-type="string" calcext:value-type="string">
            <text:p>Islam, Riadul and Challagundla, Dhandeep</text:p>
          </table:table-cell>
          <table:table-cell table:style-name="ce2"/>
          <table:table-cell table:style-name="ce2" office:value-type="string" calcext:value-type="string">
            <text:p>2025</text:p>
          </table:table-cell>
          <table:table-cell table:style-name="ce2" office:value-type="string" calcext:value-type="string">
            <text:p>ISI Web of Science</text:p>
          </table:table-cell>
          <table:table-cell table:style-name="ce2" office:value-type="string" calcext:value-type="string">
            <text:p>450-454</text:p>
          </table:table-cell>
          <table:table-cell table:style-name="ce2"/>
          <table:table-cell table:style-name="ce2" office:value-type="string" calcext:value-type="string">
            <text:p>Leveraging artificial intelligence (AI)-driven electronic design and</text:p>
            <text:p>automation (EDA) tools, high-performance computing, and parallelized</text:p>
            <text:p>algorithms are essential for next-generation microprocessor innovation,</text:p>
            <text:p>ensuring continued progress in computing, AI, and semiconductor</text:p>
            <text:p>technology. Machine learning-based design rule checking (DRC) and</text:p>
            <text:p>lithography hotspot detection can improve first-pass silicon success.</text:p>
            <text:p>However, conventional ML and neural network (NN)-based models use</text:p>
            <text:p>supervised learning and require a large balanced dataset (in terms of</text:p>
            <text:p>positive and negative classes) and training time. This research</text:p>
            <text:p>addresses those key challenges by proposing the first-ever unsupervised</text:p>
            <text:p>DRC violation prediction methodology. The proposed model can be built</text:p>
            <text:p>using any unbalanced dataset using only one class and set a threshold</text:p>
            <text:p>for it, then fitting any new data querying if they are within the</text:p>
            <text:p>boundary of the model for classification. This research verified the</text:p>
            <text:p>proposed model by implementing different computational cores using CMOS</text:p>
            <text:p>28 nm technology and Synopsys Design Compiler and IC Compiler II tools.</text:p>
            <text:p>Then, layouts were divided into virtual grids to collect about 60k data</text:p>
            <text:p>for analysis and verification. The proposed method has 99.95\%</text:p>
            <text:p>prediction test accuracy, while the existing support vector machine</text:p>
            <text:p>(SVM) and neural network (NN) models have 85.44\% and 98.74\% accuracy,</text:p>
            <text:p>respectively. In addition, the proposed methodology has about 26.3x and</text:p>
            <text:p>up to 6003x lower training times compared to SVM and NN-models,</text:p>
            <text:p>respectively.</text:p>
          </table:table-cell>
          <table:table-cell table:style-name="ce2" office:value-type="string" calcext:value-type="string">
            <text:p>Proceedings Paper</text:p>
          </table:table-cell>
          <table:table-cell table:style-name="ce2" office:value-type="string" calcext:value-type="string">
            <text:p>10.1109/NEWCAS64648.2025.11107147</text:p>
          </table:table-cell>
          <table:table-cell table:style-name="ce2"/>
          <table:table-cell table:style-name="ce2" office:value-type="string" calcext:value-type="string">
            <text:p>Islam, R (Corresponding Author), Univ Maryland Baltimore Cty, Dept Comp Sci \&amp; Elect Engn, Baltimore, MD 21228 USA.Islam, Riadul; Challagundla, Dhandeep, Univ Maryland Baltimore Cty, Dept Comp Sci \&amp; Elect Engn, Baltimore, MD 21228 USA.</text:p>
          </table:table-cell>
          <table:table-cell table:style-name="ce2"/>
          <table:table-cell table:style-name="ce2" office:value-type="string" calcext:value-type="string">
            <text:p>Machine learning; Layout; Unsupervised learning; Physical design flow;Design Rule Checking (DRC); Neural networks</text:p>
          </table:table-cell>
          <table:table-cell table:style-name="ce2" office:value-type="string" calcext:value-type="string">
            <text:p>IEEE</text:p>
          </table:table-cell>
          <table:table-cell table:style-name="ce2" office:value-type="string" calcext:value-type="string">
            <text:p>2472-467X</text:p>
          </table:table-cell>
          <table:table-cell table:style-name="ce2" office:value-type="string" calcext:value-type="string">
            <text:p>English</text:p>
          </table:table-cell>
          <table:table-cell table:style-name="ce2" office:value-type="string" calcext:value-type="string">
            <text:p>23rd Interregional NEWCAS Conference-NEWCAS, FRANCE, JUN 22-25, 2025</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PROS 2.0: A Plug-In for Routability Optimization and Routed WirelengthEstimation Using Deep Learning</text:p>
          </table:table-cell>
          <table:table-cell table:style-name="ce2" office:value-type="string" calcext:value-type="string">
            <text:p>Chen, Jingsong and Kuang, Jian and Zhao, Guowei and Huang, Dennis J. -H.and Young, Evangeline F. Y.</text:p>
          </table:table-cell>
          <table:table-cell table:style-name="ce2" office:value-type="string" calcext:value-type="string">
            <text:p>IEEE TRANSACTIONS ON COMPUTER-AIDED DESIGN OF INTEGRATED CIRCUITS ANDSYSTEMS</text:p>
          </table:table-cell>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164-177</text:p>
          </table:table-cell>
          <table:table-cell table:style-name="ce2" office:value-type="string" calcext:value-type="string">
            <text:p>42</text:p>
          </table:table-cell>
          <table:table-cell table:style-name="ce2" office:value-type="string" calcext:value-type="string">
            <text:p>Recently, the topic of how to utilize prior knowledge obtained by</text:p>
            <text:p>machine-learning (ML) techniques during the EDA flow has been widely</text:p>
            <text:p>studied. In this article, we study this topic and propose a practical</text:p>
            <text:p>plug-in named PROS for both routability optimization and routed</text:p>
            <text:p>wirelength estimation which can be applied in the state-of-the-art</text:p>
            <text:p>commercial EDA tool or an academic EDA flow with negligible runtime</text:p>
            <text:p>overhead. PROS consists of three parts: 1) an effective fully</text:p>
            <text:p>convolutional network (FCN)-based predictor that only utilizes the data</text:p>
            <text:p>from placement result to forecast global routing (GR) congestion; 2) a</text:p>
            <text:p>parameter optimizer that can reasonably adjust GR cost parameters based</text:p>
            <text:p>on the prediction result to generate a better GR solution for detailed</text:p>
            <text:p>routing (DR); and 3) a convolutional neural network (CNN)-based</text:p>
            <text:p>wirelength estimator which can report accurate routed wirelength at the</text:p>
            <text:p>placement stage by using the predicted GR congestion. Experiments show</text:p>
            <text:p>that on the industrial benchmark suite in the advanced technology node,</text:p>
            <text:p>PROS can achieve high accuracy of GR congestion prediction and</text:p>
            <text:p>significantly reduce design rule checking (DRC) violations by 11.65\% on</text:p>
            <text:p>average, and on the DAC-2012 benchmark suite, PROS can achieve a very</text:p>
            <text:p>low error rate (1.82\%) for wirelength estimation which greatly</text:p>
            <text:p>outperforms that of FLUTE (21.52\%) by 19.70\%.</text:p>
          </table:table-cell>
          <table:table-cell table:style-name="ce2" office:value-type="string" calcext:value-type="string">
            <text:p>Article</text:p>
          </table:table-cell>
          <table:table-cell table:style-name="ce2" office:value-type="string" calcext:value-type="string">
            <text:p>10.1109/TCAD.2022.3168259</text:p>
          </table:table-cell>
          <table:table-cell table:style-name="ce2"/>
          <table:table-cell table:style-name="ce2" office:value-type="string" calcext:value-type="string">
            <text:p>Chen, JS (Corresponding Author), Chinese Univ Hong Kong, Dept Comp Sci \&amp; Engn, Hong Kong, Peoples R China.Chen, Jingsong; Young, Evangeline F. Y., Chinese Univ Hong Kong, Dept Comp Sci \&amp; Engn, Hong Kong, Peoples R China.Kuang, Jian; Zhao, Guowei; Huang, Dennis J. -H., Cadence Design Syst, Digital \&amp; Signoff Grp, San Jose, CA 95134 USA.</text:p>
          </table:table-cell>
          <table:table-cell table:style-name="ce2"/>
          <table:table-cell table:style-name="ce2" office:value-type="string" calcext:value-type="string">
            <text:p>Circuit optimization; design automation; deep learning; routing</text:p>
          </table:table-cell>
          <table:table-cell table:style-name="ce2" office:value-type="string" calcext:value-type="string">
            <text:p>IEEE-INST ELECTRICAL ELECTRONICS ENGINEERS INC</text:p>
          </table:table-cell>
          <table:table-cell table:style-name="ce2" office:value-type="string" calcext:value-type="string">
            <text:p>0278-0070</text:p>
          </table:table-cell>
          <table:table-cell table:style-name="ce2" office:value-type="string" calcext:value-type="string">
            <text:p>English</text:p>
          </table:table-cell>
          <table:table-cell table:style-name="ce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3</text:p>
          </table:table-cell>
          <table:table-cell table:style-name="ce4" office:value-type="string" calcext:value-type="string">
            <text:p>Study is a secondary study (SLR, SMS, survey).</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Enhancing extensibility of the design rule checker of an EDA tool byobject-oriented modeling</text:p>
          </table:table-cell>
          <table:table-cell table:style-name="ce2" office:value-type="string" calcext:value-type="string">
            <text:p>Khwaja, AA</text:p>
          </table:table-cell>
          <table:table-cell table:style-name="ce2"/>
          <table:table-cell table:style-name="ce2" office:value-type="string" calcext:value-type="string">
            <text:p>1997</text:p>
          </table:table-cell>
          <table:table-cell table:style-name="ce2" office:value-type="string" calcext:value-type="string">
            <text:p>ISI Web of Science</text:p>
          </table:table-cell>
          <table:table-cell table:style-name="ce2" office:value-type="string" calcext:value-type="string">
            <text:p>104-108</text:p>
          </table:table-cell>
          <table:table-cell table:style-name="ce2"/>
          <table:table-cell table:style-name="ce2" office:value-type="string" calcext:value-type="string">
            <text:p>Design rule checking systems are an integral part of electronic design</text:p>
            <text:p>automation toots. Rapid advances and continuous change in the</text:p>
            <text:p>semi-conductor technology requires that these DRC systems also change</text:p>
            <text:p>accordingly. This paper presents the architecture and mechanism of the</text:p>
            <text:p>DRC module of an IC package design toot. Design goals were identified</text:p>
            <text:p>far the module to allow easy addition, removal, and modification of</text:p>
            <text:p>rules and to minimize the effect of changes among others.</text:p>
            <text:p>Object-oriented modeling technique facilitates in the accomplishment of</text:p>
            <text:p>these goats by supporting concepts such as abstraction, encapsulation,</text:p>
            <text:p>inheritance, and dynamic binding. The paper puts these concepts in</text:p>
            <text:p>perspective within the context of the architecture and mechanism of the</text:p>
            <text:p>DRC module.</text:p>
          </table:table-cell>
          <table:table-cell table:style-name="ce2" office:value-type="string" calcext:value-type="string">
            <text:p>Proceedings Paper</text:p>
          </table:table-cell>
          <table:table-cell table:style-name="ce2" office:value-type="string" calcext:value-type="string">
            <text:p>10.1109/CMPSAC.1997.624771</text:p>
          </table:table-cell>
          <table:table-cell table:style-name="ce2"/>
          <table:table-cell table:style-name="ce2" office:value-type="string" calcext:value-type="string">
            <text:p>Khwaja, AA (Corresponding Author), INTEL CORP,5000 W CHANDLER BLVD,CHANDLER,AZ 85226, USA.</text:p>
          </table:table-cell>
          <table:table-cell table:style-name="ce2" table:number-columns-repeated="2"/>
          <table:table-cell table:style-name="ce2" office:value-type="string" calcext:value-type="string">
            <text:p>I E E E, COMPUTER SOC PRESS</text:p>
          </table:table-cell>
          <table:table-cell table:style-name="ce2" office:value-type="string" calcext:value-type="string">
            <text:p>0730-3157</text:p>
          </table:table-cell>
          <table:table-cell table:style-name="ce2" office:value-type="string" calcext:value-type="string">
            <text:p>English</text:p>
          </table:table-cell>
          <table:table-cell table:style-name="ce2" office:value-type="string" calcext:value-type="string">
            <text:p>21st Annual International Computer Software and Applications Conference(COMPSAC 97), WASHINGTON, DC, AUG 13-15, 1997</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Physical Verification at Advanced Technology Nodes and the Road Ahead</text:p>
          </table:table-cell>
          <table:table-cell table:style-name="ce2" office:value-type="string" calcext:value-type="string">
            <text:p>Rey, Juan C.</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office:value-type="string" calcext:value-type="string">
            <text:p>143</text:p>
          </table:table-cell>
          <table:table-cell table:style-name="ce2"/>
          <table:table-cell table:style-name="ce2" office:value-type="string" calcext:value-type="string">
            <text:p>In spite of ``doomsday{''} expectations, Moore's Law is alive and well.</text:p>
            <text:p>Semiconductor manufacturing and design companies, as well as the</text:p>
            <text:p>Electronic Design Automation (EDA) industry have been pushing ahead to</text:p>
            <text:p>bring more functionality to satisfy more aggressive</text:p>
            <text:p>space/power/performance requirements.</text:p>
            <text:p>Physical verification occupies a unique space in the ecosystem as one of</text:p>
            <text:p>the key bridges between design and manufacturing. As such, the</text:p>
            <text:p>traditional space of design rule checking (DRC) and layout versus</text:p>
            <text:p>schematic (LVS) have expanded into electrical verification and yield</text:p>
            <text:p>enabling technologies such as optical proximity correction, critical</text:p>
            <text:p>area analysis, multi-patterning decomposition and automated filling.</text:p>
            <text:p>To achieve the expected accuracy and performance demanded by the design</text:p>
            <text:p>and manufacturing community, it is necessary to consider the physical</text:p>
            <text:p>effects of the manufacturing processes and electronic devices and to use</text:p>
            <text:p>the most advanced software engineering technology and computational</text:p>
            <text:p>capabilities.</text:p>
          </table:table-cell>
          <table:table-cell table:style-name="ce2" office:value-type="string" calcext:value-type="string">
            <text:p>Proceedings Paper</text:p>
          </table:table-cell>
          <table:table-cell table:style-name="ce2" office:value-type="string" calcext:value-type="string">
            <text:p>10.1145/3372780.3378168</text:p>
          </table:table-cell>
          <table:table-cell table:style-name="ce2"/>
          <table:table-cell table:style-name="ce2" office:value-type="string" calcext:value-type="string">
            <text:p>Rey, JC (Corresponding Author), Mentor, Fremont, CA 94538 USA.Rey, Juan C., Mentor, Fremont, CA 94538 USA.</text:p>
          </table:table-cell>
          <table:table-cell table:style-name="ce2"/>
          <table:table-cell table:style-name="ce2" office:value-type="string" calcext:value-type="string">
            <text:p>Electronic Design Automation (EDA); Semiconductor Manufacturing Moore'sLaw; Layout Versus Schematics (LVS); Optical Proximity Correction (OPC)</text:p>
          </table:table-cell>
          <table:table-cell table:style-name="ce2" office:value-type="string" calcext:value-type="string">
            <text:p>ASSOC COMPUTING MACHINERY</text:p>
          </table:table-cell>
          <table:table-cell table:style-name="ce2"/>
          <table:table-cell table:style-name="ce2" office:value-type="string" calcext:value-type="string">
            <text:p>English</text:p>
          </table:table-cell>
          <table:table-cell table:style-name="ce2" office:value-type="string" calcext:value-type="string">
            <text:p>ACM International Symposium on Physical Design (ISPD), Taipei, TAIWAN,MAR 29-APR 01, 202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Enabling alternating phase shifted mask designs for a full logic gatelevel: Design rules and design rule checking</text:p>
          </table:table-cell>
          <table:table-cell table:style-name="ce2" office:value-type="string" calcext:value-type="string">
            <text:p>Liebmann, L and Lund, J and Heng, FL and Graur, I</text:p>
          </table:table-cell>
          <table:table-cell table:style-name="ce2"/>
          <table:table-cell table:style-name="ce2" office:value-type="string" calcext:value-type="string">
            <text:p>2001</text:p>
          </table:table-cell>
          <table:table-cell table:style-name="ce2" office:value-type="string" calcext:value-type="string">
            <text:p>ISI Web of Science</text:p>
          </table:table-cell>
          <table:table-cell table:style-name="ce2" office:value-type="string" calcext:value-type="string">
            <text:p>79-84</text:p>
          </table:table-cell>
          <table:table-cell table:style-name="ce2"/>
          <table:table-cell table:style-name="ce2" office:value-type="string" calcext:value-type="string">
            <text:p>The International Technology Roadmap for Semiconductors lists F2 (lambda</text:p>
            <text:p>= 157 mn) optical lithography and extreme ultraviolet next generation</text:p>
            <text:p>lithography as the two most feasible lithography solutions for the 70 mn</text:p>
            <text:p>technology node. It is likely that both of these solutions will be late,</text:p>
            <text:p>forcing ArF (lambda = 193 mn) lithography to operate at unprecedented</text:p>
            <text:p>resolution levels. Theoretically, alternating phase shifted masks</text:p>
            <text:p>({''}altPSM{''}) can achieve the resolution required to manufacture 70</text:p>
            <text:p>mn logic products with ArF lithography equipment, but technical and</text:p>
            <text:p>logistical challenges associated with the broad implementation of altPSM</text:p>
            <text:p>require novel and invasive EDA solutions which have caused the industry</text:p>
            <text:p>to shy away from altPSM in the past. One of the biggest such challenges</text:p>
            <text:p>is the creation of robust design rule checking (DRC) tools which can</text:p>
            <text:p>predict whether a given layout has a valid, manufacturable altPSM</text:p>
            <text:p>solution. This paper takes a detailed look at the technical and</text:p>
            <text:p>practical issues associated with altPSM design rules and DRC.</text:p>
          </table:table-cell>
          <table:table-cell table:style-name="ce2" office:value-type="string" calcext:value-type="string">
            <text:p>Proceedings Paper</text:p>
          </table:table-cell>
          <table:table-cell table:style-name="ce2" table:number-columns-repeated="2"/>
          <table:table-cell table:style-name="ce2" office:value-type="string" calcext:value-type="string">
            <text:p>Liebmann, L (Corresponding Author), IBM Corp, Microelect, Fishkill, NY USA.IBM Corp, Microelect, Fishkill, NY USA.</text:p>
          </table:table-cell>
          <table:table-cell table:style-name="ce2" table:number-columns-repeated="2"/>
          <table:table-cell table:style-name="ce2" office:value-type="string" calcext:value-type="string">
            <text:p>ASSOC COMPUTING MACHINERY</text:p>
          </table:table-cell>
          <table:table-cell table:style-name="ce2" office:value-type="string" calcext:value-type="string">
            <text:p>0738-100X</text:p>
          </table:table-cell>
          <table:table-cell table:style-name="ce2" office:value-type="string" calcext:value-type="string">
            <text:p>English</text:p>
          </table:table-cell>
          <table:table-cell table:style-name="ce2" office:value-type="string" calcext:value-type="string">
            <text:p>38th Design Automation Conference (DAC), LAS VEGAS, NV, JUN 18-22, 2001</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 Metamodel and Model-based Design Rule Checking DSL for Verificationand Validation of Electronic Circuit Designs</text:p>
          </table:table-cell>
          <table:table-cell table:style-name="ce2" office:value-type="string" calcext:value-type="string">
            <text:p>Rumpold, Adrian and Bauer, Bernhard</text:p>
          </table:table-cell>
          <table:table-cell table:style-name="ce2"/>
          <table:table-cell table:style-name="ce2" office:value-type="string" calcext:value-type="string">
            <text:p>2019</text:p>
          </table:table-cell>
          <table:table-cell table:style-name="ce2" office:value-type="string" calcext:value-type="string">
            <text:p>ISI Web of Science</text:p>
          </table:table-cell>
          <table:table-cell table:style-name="ce2" office:value-type="string" calcext:value-type="string">
            <text:p>315-322</text:p>
          </table:table-cell>
          <table:table-cell table:style-name="ce2"/>
          <table:table-cell table:style-name="ce2" office:value-type="string" calcext:value-type="string">
            <text:p>Development of embedded systems depends on both software and hardware</text:p>
            <text:p>design activities. Quality management of development artifacts is of</text:p>
            <text:p>crucial importance for the overall function and safety of the final</text:p>
            <text:p>product. This paper introduces a metamodel and model-based approach and</text:p>
            <text:p>accompanying domain-specific language for validation of electronic</text:p>
            <text:p>circuit designs. The solution does not depend on any particular</text:p>
            <text:p>electronic design automation (EDA) software, instead we propose a</text:p>
            <text:p>workflow that is integrated into a modular, general-purpose model</text:p>
            <text:p>analysis framework. The paper illustrates both the underlying concepts</text:p>
            <text:p>as well as possible application scenarios for the developed validation</text:p>
            <text:p>domain-specific language, MBDRC (Model-Based Design Rule Checking). It</text:p>
            <text:p>also discusses fields for further research and transfer of the initial</text:p>
            <text:p>results.</text:p>
          </table:table-cell>
          <table:table-cell table:style-name="ce2" office:value-type="string" calcext:value-type="string">
            <text:p>Proceedings Paper</text:p>
          </table:table-cell>
          <table:table-cell table:style-name="ce2" office:value-type="string" calcext:value-type="string">
            <text:p>10.5220/0007381303150322</text:p>
          </table:table-cell>
          <table:table-cell table:style-name="ce2"/>
          <table:table-cell table:style-name="ce2" office:value-type="string" calcext:value-type="string">
            <text:p>Rumpold, A (Corresponding Author), Univ Augsburg, Inst Comp Sci, Augsburg, Germany.Rumpold, Adrian; Bauer, Bernhard, Univ Augsburg, Inst Comp Sci, Augsburg, Germany.</text:p>
          </table:table-cell>
          <table:table-cell table:style-name="ce2"/>
          <table:table-cell table:style-name="ce2" office:value-type="string" calcext:value-type="string">
            <text:p>Domain-specific Modeling; Model-based Analysis; Model-based Testing andValidation; Systems Engineering; Electronic Design Automation; DesignRule Checking</text:p>
          </table:table-cell>
          <table:table-cell table:style-name="ce2" office:value-type="string" calcext:value-type="string">
            <text:p>SCITEPRESS</text:p>
          </table:table-cell>
          <table:table-cell table:style-name="ce2"/>
          <table:table-cell table:style-name="ce2" office:value-type="string" calcext:value-type="string">
            <text:p>English</text:p>
          </table:table-cell>
          <table:table-cell table:style-name="ce2" office:value-type="string" calcext:value-type="string">
            <text:p>7th International Conference on Model-Driven Engineering and SoftwareDevelopment (MODELSWARD), Prague, CZECH REPUBLIC, FEB 20-22, 2019</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 Lightweight Inception Boosted U-Net Neural Network for RoutabilityPrediction</text:p>
          </table:table-cell>
          <table:table-cell table:style-name="ce2" office:value-type="string" calcext:value-type="string">
            <text:p>Li, Hailiang and Huo, Yan and Wang, Yan and Yang, Xu and Hao, Miaohuiand Wang, Xiao</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648-653</text:p>
          </table:table-cell>
          <table:table-cell table:style-name="ce2"/>
          <table:table-cell table:style-name="ce2" office:value-type="string" calcext:value-type="string">
            <text:p>As the modern CPU, GPU, and NPU chip's design complexity and transistor</text:p>
            <text:p>counts keep increasing, and with the relentless shrinking of</text:p>
            <text:p>semiconductor technology node to nearly 1 nanometer, the placement and</text:p>
            <text:p>routing have gradually become the two most pivotal processes in modern</text:p>
            <text:p>very-large-scale-integrated (VLSI) circuit back-end design. How to</text:p>
            <text:p>evaluate routability efficiently and accurately in advance (at the</text:p>
            <text:p>placement and global routing stages) has grown into a crucial research</text:p>
            <text:p>area in the field of artificial intelligence (AI) assisted electronic</text:p>
            <text:p>design automation (EDA). In this paper, we propose a novel U-Net variant</text:p>
            <text:p>model boosted by an Inception embedded module to predict Routing</text:p>
            <text:p>Congestion (RC) and Design Rule Checking (DRC) hotspots. Experimental</text:p>
            <text:p>results on the recently published CircuitNet dataset benchmark show that</text:p>
            <text:p>our proposed method achieves up to 5\% (RC) and 20\% (DRC) rate</text:p>
            <text:p>reduction in terms of Avg-NRMSE (Average Normalized Root Mean Square</text:p>
            <text:p>Error) compared to the classic architecture. Furthermore, our approach</text:p>
            <text:p>consistently outperforms the prior model on the SSIM (Structural</text:p>
            <text:p>Similarity Index Measure) metric.</text:p>
          </table:table-cell>
          <table:table-cell table:style-name="ce2" office:value-type="string" calcext:value-type="string">
            <text:p>Proceedings Paper</text:p>
          </table:table-cell>
          <table:table-cell table:style-name="ce2" office:value-type="string" calcext:value-type="string">
            <text:p>10.1109/ISEDA62518.2024.10617987</text:p>
          </table:table-cell>
          <table:table-cell table:style-name="ce2"/>
          <table:table-cell table:style-name="ce2" office:value-type="string" calcext:value-type="string">
            <text:p>Li, HL (Corresponding Author), Hong Kong Appl Sci \&amp; Technol Res Inst Co Ltd ASTR, Adv Elect Components \&amp; Syst AECS Div, Integrated Circuit Enabling Technol ICET Grp, Hong Kong, Peoples R China.Li, Hailiang; Huo, Yan; Wang, Yan; Yang, Xu; Hao, Miaohui; Wang, Xiao, Hong Kong Appl Sci \&amp; Technol Res Inst Co Ltd ASTR, Adv Elect Components \&amp; Syst AECS Div, Integrated Circuit Enabling Technol ICET Grp, Hong Kong, Peoples R China.</text:p>
          </table:table-cell>
          <table:table-cell table:style-name="ce2"/>
          <table:table-cell table:style-name="ce2" office:value-type="string" calcext:value-type="string">
            <text:p>Routing Congestion Prediction; Design Rule Checking (DRC) HotspotPrediction; Artificial Intelligence for Electronic Design Automation(EDA); Deep Learning Model; Inception Module based Network</text:p>
          </table:table-cell>
          <table:table-cell table:style-name="ce2" office:value-type="string" calcext:value-type="string">
            <text:p>IEEE</text:p>
          </table:table-cell>
          <table:table-cell table:style-name="ce2"/>
          <table:table-cell table:style-name="ce2" office:value-type="string" calcext:value-type="string">
            <text:p>English</text:p>
          </table:table-cell>
          <table:table-cell table:style-name="ce2" office:value-type="string" calcext:value-type="string">
            <text:p>2nd International Symposium of Electronics Design Automation (ISEDA),Xian, PEOPLES R CHINA, MAY 10-13, 202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Dynamic checking improves MEMS design methodology.</text:p>
          </table:table-cell>
          <table:table-cell table:style-name="ce2" office:value-type="string" calcext:value-type="string">
            <text:p>Marín, X and Carrabina, J and Bausells, J</text:p>
          </table:table-cell>
          <table:table-cell table:style-name="ce2"/>
          <table:table-cell table:style-name="ce2" office:value-type="string" calcext:value-type="string">
            <text:p>2000</text:p>
          </table:table-cell>
          <table:table-cell table:style-name="ce2" office:value-type="string" calcext:value-type="string">
            <text:p>ISI Web of Science</text:p>
          </table:table-cell>
          <table:table-cell table:style-name="ce2" office:value-type="string" calcext:value-type="string">
            <text:p>266-271</text:p>
          </table:table-cell>
          <table:table-cell table:style-name="ce2" office:value-type="string" calcext:value-type="string">
            <text:p>4019</text:p>
          </table:table-cell>
          <table:table-cell table:style-name="ce2" office:value-type="string" calcext:value-type="string">
            <text:p>Design verification methodologies and tools such as DRC (Design rule</text:p>
            <text:p>checking) and ERC (Electrical Rule Checking) used on MEMS design have</text:p>
            <text:p>been inherited from the transistor based analog and digital full custom</text:p>
            <text:p>design flows. However the devices are defined on a 2D layout, they have</text:p>
            <text:p>a 3D structure. Thus, current tools do not have into account the new</text:p>
            <text:p>features that appear in MEMS design, especially those related with</text:p>
            <text:p>device micromachining. The main consequence on it is that it is</text:p>
            <text:p>necessary to include information of the vertical (the normal of the</text:p>
            <text:p>wafer plane) parameters on the DRC, what is not at all usual in</text:p>
            <text:p>classical design. We claim that the inclusion of such information</text:p>
            <text:p>together with the consequent improvement of tools for DRC, ERC and</text:p>
            <text:p>device parameter extraction, can reduce design and simulation efforts as</text:p>
            <text:p>well as improve the manufacturing yield.</text:p>
          </table:table-cell>
          <table:table-cell table:style-name="ce2" office:value-type="string" calcext:value-type="string">
            <text:p>Proceedings Paper</text:p>
          </table:table-cell>
          <table:table-cell table:style-name="ce2" office:value-type="string" calcext:value-type="string">
            <text:p>10.1117/12.382310</text:p>
          </table:table-cell>
          <table:table-cell table:style-name="ce2"/>
          <table:table-cell table:style-name="ce2" office:value-type="string" calcext:value-type="string">
            <text:p>Marín, X (Corresponding Author), CSIC, IMB, Ctr Nacl Microelect, Campus UAB, Bellaterra 08193, Spain.CSIC, IMB, Ctr Nacl Microelect, Bellaterra 08193, Spain.</text:p>
          </table:table-cell>
          <table:table-cell table:style-name="ce2"/>
          <table:table-cell table:style-name="ce2" office:value-type="string" calcext:value-type="string">
            <text:p>design verification; EDA tools for MEMS; design rule checking</text:p>
          </table:table-cell>
          <table:table-cell table:style-name="ce2" office:value-type="string" calcext:value-type="string">
            <text:p>SPIE-INT SOC OPTICAL ENGINEERING</text:p>
          </table:table-cell>
          <table:table-cell table:style-name="ce2" office:value-type="string" calcext:value-type="string">
            <text:p>0277-786X</text:p>
          </table:table-cell>
          <table:table-cell table:style-name="ce2" office:value-type="string" calcext:value-type="string">
            <text:p>English</text:p>
          </table:table-cell>
          <table:table-cell table:style-name="ce2" office:value-type="string" calcext:value-type="string">
            <text:p>Symposium on Design, Test, Integration, and Packaging of MEMS/MOEMS,PARIS, FRANCE, MAY 09-11, 200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utomata applications in chip-design software</text:p>
          </table:table-cell>
          <table:table-cell table:style-name="ce2" office:value-type="string" calcext:value-type="string">
            <text:p>Watson, Bruce W.</text:p>
          </table:table-cell>
          <table:table-cell table:style-name="ce2"/>
          <table:table-cell table:style-name="ce2" office:value-type="string" calcext:value-type="string">
            <text:p>2007</text:p>
          </table:table-cell>
          <table:table-cell table:style-name="ce2" office:value-type="string" calcext:value-type="string">
            <text:p>ISI Web of Science</text:p>
          </table:table-cell>
          <table:table-cell table:style-name="ce2" office:value-type="string" calcext:value-type="string">
            <text:p>24-26</text:p>
          </table:table-cell>
          <table:table-cell table:style-name="ce2" office:value-type="string" calcext:value-type="string">
            <text:p>4783</text:p>
          </table:table-cell>
          <table:table-cell table:style-name="ce2" office:value-type="string" calcext:value-type="string">
            <text:p>In this paper, I present several new automata applications in software</text:p>
            <text:p>for electronic design automation (EDA) - chip design. EDA software has</text:p>
            <text:p>typically been implemented by and for microelectronic engineers, and the</text:p>
            <text:p>associated algorithmics remains underdeveloped. In several cases, overly</text:p>
            <text:p>complex algorithms have been used whereas automata could have been</text:p>
            <text:p>applied after abstracting from the problem details.</text:p>
          </table:table-cell>
          <table:table-cell table:style-name="ce2" office:value-type="string" calcext:value-type="string">
            <text:p>Proceedings Paper</text:p>
          </table:table-cell>
          <table:table-cell table:style-name="ce2" table:number-columns-repeated="2"/>
          <table:table-cell table:style-name="ce2" office:value-type="string" calcext:value-type="string">
            <text:p>Watson, BW (Corresponding Author), Univ Pretoria, FASTAR, ZA-0002 Pretoria, South Africa.Watson, Bruce W., Univ Pretoria, FASTAR, ZA-0002 Pretoria, South Africa.</text:p>
          </table:table-cell>
          <table:table-cell table:style-name="ce2"/>
          <table:table-cell table:style-name="ce2" office:value-type="string" calcext:value-type="string">
            <text:p>EDA; integrated circuit layout; pattern matching; design rule checking;chip design</text:p>
          </table:table-cell>
          <table:table-cell table:style-name="ce2" office:value-type="string" calcext:value-type="string">
            <text:p>SPRINGER-VERLAG BERLIN</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2th International Conference on Implementation and Application ofAutomata, Czech Tech Univ, Prague, CZECH REPUBLIC, JUL 16-18, 2007</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D2D-GPT: Leveraging Incremental Learning GPT for Seamless Design RuleConversion Across EDA Tools</text:p>
          </table:table-cell>
          <table:table-cell table:style-name="ce2" office:value-type="string" calcext:value-type="string">
            <text:p>Wang, Chao and Zhang, Yunxiang and Lu, Wangzilu and Huang, Jiajie andZhang, Qing and Yin, Minghui and Zhang, Yuhang and Li, Zhiqiang and Li,Yongfu</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110-114</text:p>
          </table:table-cell>
          <table:table-cell table:style-name="ce2"/>
          <table:table-cell table:style-name="ce2" office:value-type="string" calcext:value-type="string">
            <text:p>This paper investigates the use of fine-tuned ChatGPT, in Electronic</text:p>
            <text:p>Design Automation (EDA) for Design Rule Checking (DRC). As integrated</text:p>
            <text:p>circuits grow in complexity, so do the design rules, exacerbated by the</text:p>
            <text:p>diversity of EDA tools with unique DRC specifications. We introduce</text:p>
            <text:p>D2D-GPT, a unified tool leveraging ChatGPT's language capabilities to</text:p>
            <text:p>translate DRC specifications across different EDA platforms. This</text:p>
            <text:p>research focuses on optimizing input datasets - native DRC rules - to</text:p>
            <text:p>improve ChatGPT's translation accuracy and efficiency. Our objective is</text:p>
            <text:p>to streamline the EDA workflow, bridge gaps between various tools, and</text:p>
            <text:p>pave the way for more cohesive design processes in the semiconductor</text:p>
            <text:p>industry.</text:p>
          </table:table-cell>
          <table:table-cell table:style-name="ce2" office:value-type="string" calcext:value-type="string">
            <text:p>Proceedings Paper</text:p>
          </table:table-cell>
          <table:table-cell table:style-name="ce2" office:value-type="string" calcext:value-type="string">
            <text:p>10.1109/APCCAS62602.2024.10808537</text:p>
          </table:table-cell>
          <table:table-cell table:style-name="ce2"/>
          <table:table-cell table:style-name="ce2" office:value-type="string" calcext:value-type="string">
            <text:p>Wang, C; Li, YF (Corresponding Author), Shanghai Jiao Tong Univ, Shanghai, Peoples R China.Li, ZQ (Corresponding Author), Chinese Acad Sci, Inst Microelect, Beijing, Peoples R China.Wang, Chao; Zhang, Yunxiang; Lu, Wangzilu; Huang, Jiajie; Zhang, Qing; Zhang, Yuhang; Li, Yongfu, Shanghai Jiao Tong Univ, Shanghai, Peoples R China.Yin, Minghui; Li, Zhiqiang, Chinese Acad Sci, Inst Microelect, Beijing, Peoples R China.</text:p>
          </table:table-cell>
          <table:table-cell table:style-name="ce2"/>
          <table:table-cell table:style-name="ce2" office:value-type="string" calcext:value-type="string">
            <text:p>Electronic Design Automation; Design Rule Checking; ChatGPT;Semiconductor Industry; Machine Learning</text:p>
          </table:table-cell>
          <table:table-cell table:style-name="ce2" office:value-type="string" calcext:value-type="string">
            <text:p>IEEE</text:p>
          </table:table-cell>
          <table:table-cell table:style-name="ce2" office:value-type="string" calcext:value-type="string">
            <text:p>2837-4576</text:p>
          </table:table-cell>
          <table:table-cell table:style-name="ce2" office:value-type="string" calcext:value-type="string">
            <text:p>English</text:p>
          </table:table-cell>
          <table:table-cell table:style-name="ce2" office:value-type="string" calcext:value-type="string">
            <text:p>20th Asia-Pacific Conference on Circuits and Systems, Taipei, TAIWAN,NOV 07-09, 202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Distributed Estimation of Power System Oscillation Modes Under Attacks on GPS Clocks</text:p>
          </table:table-cell>
          <table:table-cell table:style-name="ce2" office:value-type="string" calcext:value-type="string">
            <text:p>Wang, Yongqiang and Hespanha, João P.</text:p>
          </table:table-cell>
          <table:table-cell table:style-name="ce2" office:value-type="string" calcext:value-type="string">
            <text:p>IEEE Transactions on Instrumentation and Measurement</text:p>
          </table:table-cell>
          <table:table-cell table:style-name="ce2" office:value-type="string" calcext:value-type="string">
            <text:p>2018</text:p>
          </table:table-cell>
          <table:table-cell table:style-name="ce2" office:value-type="string" calcext:value-type="string">
            <text:p>IEEE Digital Library</text:p>
          </table:table-cell>
          <table:table-cell table:style-name="ce2" office:value-type="string" calcext:value-type="string">
            <text:p>1626-1637</text:p>
          </table:table-cell>
          <table:table-cell table:style-name="ce2" office:value-type="string" calcext:value-type="string">
            <text:p>67</text:p>
          </table:table-cell>
          <table:table-cell table:style-name="ce2" office:value-type="string" calcext:value-type="string">
            <text:p>Phasor measurement units (PMUs) are playing an increasingly important role in wide-area monitoring and the control of power systems. PMUs allow synchronous real-time measurements of voltage, phase angle, and frequency from multiple remote locations in the grid, enabled by their ability to align to global positioning system (GPS) clocks. Given that this ability is vulnerable to GPS spoofing attacks, which have been confirmed easy to launch, in this paper, we propose a distributed real-time wide-area oscillation estimation approach that is robust to GPS spoofing on PMUs and their associated phasor data concentrators. The approach employs the idea of checking update consistency with histories and across distributed nodes and can tolerate up to one third of compromised nodes. It can be implemented in a completely decentralized architecture and in a completely asynchronous way. The effectiveness of the approach is confirmed by numerical simulations of the IEEE 68-bus power system models.</text:p>
          </table:table-cell>
          <table:table-cell table:style-name="ce2"/>
          <table:table-cell table:style-name="ce2" office:value-type="string" calcext:value-type="string">
            <text:p>10.1109/TIM.2018.2801018</text:p>
          </table:table-cell>
          <table:table-cell table:style-name="ce2" table:number-columns-repeated="3"/>
          <table:table-cell table:style-name="ce2" office:value-type="string" calcext:value-type="string">
            <text:p>Global Positioning System;Phasor measurement units;Oscillators;Estimation;Power systems;Computer architecture;Mathematical model;Cyber attacks;distributed optimization;global position system (GPS) spoofing;synchrophasors;wide-area monitoring</text:p>
          </table:table-cell>
          <table:table-cell table:style-name="ce2"/>
          <table:table-cell table:style-name="ce2" office:value-type="string" calcext:value-type="string">
            <text:p>1557-9662</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 runtime monitoring and validation framework for Web service interactions</text:p>
          </table:table-cell>
          <table:table-cell table:style-name="ce2" office:value-type="string" calcext:value-type="string">
            <text:p>Li, Z. and Jin, Y. and Han, J.</text:p>
          </table:table-cell>
          <table:table-cell table:style-name="ce2"/>
          <table:table-cell table:style-name="ce2" office:value-type="string" calcext:value-type="string">
            <text:p>2006</text:p>
          </table:table-cell>
          <table:table-cell table:style-name="ce2" office:value-type="string" calcext:value-type="string">
            <text:p>IEEE Digital Library</text:p>
          </table:table-cell>
          <table:table-cell table:style-name="ce2" office:value-type="string" calcext:value-type="string">
            <text:p>10 pp.-79</text:p>
          </table:table-cell>
          <table:table-cell table:style-name="ce2"/>
          <table:table-cell table:style-name="ce2" office:value-type="string" calcext:value-type="string">
            <text:p>Web services are designed for composition and use by third parties through dynamic discovery. As such, the issue of interoperability between services is of great importance to ensure that the services can work together towards the overall application goals. In particular, the interaction protocols of a service need to be implemented and used properly so that the service composition can conduct itself in an orderly fashion. In our previous work, we have proposed a lightweight, pattern/constraint-based approach to specifying service interaction protocols. It has been incorporated into OWL-S for service developers to describe service interaction constraints. In this paper, we present a framework for monitoring the run-time interaction behaviour of Web services and validating the behaviour against their pre-defined interaction constraints. The framework involves interception of service interactions/messages, representation of interaction constraints using finite state automata, and conformance checking of service interactions against interaction constraints. As such, the framework provides a useful tool for validating the implementation and use of services regarding their interaction behaviour</text:p>
          </table:table-cell>
          <table:table-cell table:style-name="ce2"/>
          <table:table-cell table:style-name="ce2" office:value-type="string" calcext:value-type="string">
            <text:p>10.1109/ASWEC.2006.6</text:p>
          </table:table-cell>
          <table:table-cell table:style-name="ce2" table:number-columns-repeated="3"/>
          <table:table-cell table:style-name="ce2" office:value-type="string" calcext:value-type="string">
            <text:p>Runtime;Monitoring;Web services;Protocols;Australia;Automata;Contracts;Service oriented architecture;Bridges;Software engineering</text:p>
          </table:table-cell>
          <table:table-cell table:style-name="ce2"/>
          <table:table-cell table:style-name="ce2" office:value-type="string" calcext:value-type="string">
            <text:p>2377-5408</text:p>
          </table:table-cell>
          <table:table-cell table:style-name="ce2" table:number-columns-repeated="3"/>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Unifying domain ontology with agent-oriented modeling of services</text:p>
          </table:table-cell>
          <table:table-cell table:style-name="ce2" office:value-type="string" calcext:value-type="string">
            <text:p>Jin, Zhi and Zhu, Hong</text:p>
          </table:table-cell>
          <table:table-cell table:style-name="ce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31-42</text:p>
          </table:table-cell>
          <table:table-cell table:style-name="ce2"/>
          <table:table-cell table:style-name="ce2" office:value-type="string" calcext:value-type="string">
            <text:p>Modeling plays a crucial role in model-driven development of service-oriented systems. This paper proposes a framework for service-oriented modeling that combines an agent-oriented software development methodology with an ontology-based domain analysis technique. It aims at improving the dynamic composability of services at requirements and design stages through modeling. The framework consists of an architectural structure of service models and a process of modeling. The architecture combines agent-oriented models of software systems in which service providers and requesters are regarded as autonomous entities (and called agents), and domain ontology, which specifies the entities in the application domain and their dynamic behaviors. The domain ontology extends classic ontology by including causal and symbolic entities as well as autonomous entities. The approach is illustrated by an example of online auction service.</text:p>
          </table:table-cell>
          <table:table-cell table:style-name="ce2"/>
          <table:table-cell table:style-name="ce2" office:value-type="string" calcext:value-type="string">
            <text:p>10.1109/SOSE.2011.6139090</text:p>
          </table:table-cell>
          <table:table-cell table:style-name="ce2" table:number-columns-repeated="3"/>
          <table:table-cell table:style-name="ce2" office:value-type="string" calcext:value-type="string">
            <text:p>Ontologies;Analytical models;Collaboration;Object oriented modeling;Semantics;Unified modeling language;Software;Service-oriented computing;Software modeling;Service engineering;Software agents;Domain ontology</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The study discusses software architecture in general without addressing conformance or compliance.</text:p>
          </table:table-cell>
          <table:table-cell table:number-columns-repeated="998"/>
        </table:table-row>
        <table:table-row table:style-name="ro1">
          <table:table-cell table:style-name="ce2" office:value-type="string" calcext:value-type="string">
            <text:p>Network Management</text:p>
          </table:table-cell>
          <table:table-cell table:style-name="ce2" table:number-columns-repeated="2"/>
          <table:table-cell table:style-name="ce2" office:value-type="string" calcext:value-type="string">
            <text:p>2015</text:p>
          </table:table-cell>
          <table:table-cell table:style-name="ce2" office:value-type="string" calcext:value-type="string">
            <text:p>IEEE Digital Library</text:p>
          </table:table-cell>
          <table:table-cell table:style-name="ce2" office:value-type="string" calcext:value-type="string">
            <text:p>259-278</text:p>
          </table:table-cell>
          <table:table-cell table:style-name="ce2"/>
          <table:table-cell table:style-name="ce2" office:value-type="string" calcext:value-type="string">
            <text:p>This chapter looks more specifically at how the planning and optimization functions affect network management. Network management consists of element management systems (EMS) and actual network management systems (NMS). The NMS provides the following functionality: fault management, performance management, configuration management (CM), optimization and, lately, self&amp;#x2010;organizing network (SON). The chapter discusses these management areas. Fault management provides a mechanism for operation and maintenance (O&amp;amp;M) connection supervision in the form of a heartbeat signal. Combined radio and backhaul measurement reporting helps to locate bottlenecks and enables accurate and efficient optimization and planning cycles to be set up for the network. NMS provides multiple interfaces for integrating the NMS as part of the operator tool chain, and in the case of CM the most important interface is the network&amp;#x2010;planning interface. The planning of NMS is a part of the network operation and maintenance function and part of the whole mobile network planning.</text:p>
          </table:table-cell>
          <table:table-cell table:style-name="ce2"/>
          <table:table-cell table:style-name="ce2" office:value-type="string" calcext:value-type="string">
            <text:p>10.1002/9781118924655.ch7</text:p>
          </table:table-cell>
          <table:table-cell table:style-name="ce2" office:value-type="string" calcext:value-type="string">
            <text:p>https://ieeexplore-ieee-org.ez31.periodicos.capes.gov.br/document/8043716</text:p>
          </table:table-cell>
          <table:table-cell table:style-name="ce2" table:number-columns-repeated="2"/>
          <table:table-cell table:style-name="ce2" office:value-type="string" calcext:value-type="string">
            <text:p>Long Term Evolution;Mobile computing;Optimization;Planning;Tools;Land mobile radio</text:p>
          </table:table-cell>
          <table:table-cell table:style-name="ce2" office:value-type="string" calcext:value-type="string">
            <text:p>Wiley</text:p>
          </table:table-cell>
          <table:table-cell table:style-name="ce2" table:number-columns-repeated="3"/>
          <table:table-cell table:style-name="ce2" office:value-type="string" calcext:value-type="string">
            <text:p>Non–peer-reviewed publications, including white papers, technical reports, position papers, posters, or extended abstracts.</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3" office:value-type="string" calcext:value-type="string">
            <text:p>Mining and checking web services behavior</text:p>
          </table:table-cell>
          <table:table-cell table:style-name="ce2" office:value-type="string" calcext:value-type="string">
            <text:p>Wan, Xiaomin and Mao, Xiaoguang and Dai, Ziying</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1004-1009</text:p>
          </table:table-cell>
          <table:table-cell table:style-name="ce2"/>
          <table:table-cell table:style-name="ce2" office:value-type="string" calcext:value-type="string">
            <text:p>As an emerging paradigm for architecting, service-oriented computing plays a more and more important role in information technology. To ensure that web services are working according with the expectation, the research in service behavior about interactions between services is crucial to guarantee no deviation from specification. To detect these deviations, we propose a method to mine and check web service behavior. The method attempts to apply process mining to interactions between services in order to narrow the gap between service consumers and providers. By observing executions of services, we present three levels of abstraction on service behavior: internal behavior, external behavior and workflow behavior. Then we outline the approach to extract behavioral model that provides specification to the activity of service checking. Finally the framework of service behavior checking is presented.</text:p>
          </table:table-cell>
          <table:table-cell table:style-name="ce2"/>
          <table:table-cell table:style-name="ce2" office:value-type="string" calcext:value-type="string">
            <text:p>10.1109/INDIN.2012.6301239</text:p>
          </table:table-cell>
          <table:table-cell table:style-name="ce2" table:number-columns-repeated="3"/>
          <table:table-cell table:style-name="ce2" office:value-type="string" calcext:value-type="string">
            <text:p>Data mining;Customer services;Simple object access protocol;Automata;Computational modeling;web service mining;conformance checking;web services;behavioral model</text:p>
          </table:table-cell>
          <table:table-cell table:style-name="ce2"/>
          <table:table-cell table:style-name="ce2" office:value-type="string" calcext:value-type="string">
            <text:p>2378-363X</text:p>
          </table:table-cell>
          <table:table-cell table:style-name="ce2" table:number-columns-repeated="3"/>
          <table:table-cell table:style-name="ce2" office:value-type="string" calcext:value-type="string">
            <text:p>Unclassifi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Continuous Conformance of Software Architectures</text:p>
          </table:table-cell>
          <table:table-cell table:style-name="ce2" office:value-type="string" calcext:value-type="string">
            <text:p>Bucaioni, Alessio and Di Salle, Amleto and Iovino, Ludovico and Mariani, Leonardo and Pelliccione, Patrizio</text:p>
          </table:table-cell>
          <table:table-cell table:style-name="ce2"/>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112-122</text:p>
          </table:table-cell>
          <table:table-cell table:style-name="ce2"/>
          <table:table-cell table:style-name="ce2"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together with a process supporting it. Continuous conformance quantifies the degree to which a software architecture adheres to a designated reference architecture. The conformance concept enables multi-level, incremental, and non-blocking checking and restoration tasks and allows the check of partial architectures without obstructing the design process. We operationalize this process through an assistive modeling tool to architect an Internet of things-based system.</text:p>
          </table:table-cell>
          <table:table-cell table:style-name="ce2"/>
          <table:table-cell table:style-name="ce2" office:value-type="string" calcext:value-type="string">
            <text:p>10.1109/ICSA59870.2024.00019</text:p>
          </table:table-cell>
          <table:table-cell table:style-name="ce2" table:number-columns-repeated="3"/>
          <table:table-cell table:style-name="ce2" office:value-type="string" calcext:value-type="string">
            <text:p>Costs;Software architecture;Computer architecture;Software quality;Maintenance;Internet;Task analysis;Reference architecture;conformance;modeling assistant</text:p>
          </table:table-cell>
          <table:table-cell table:style-name="ce2"/>
          <table:table-cell table:style-name="ce2" office:value-type="string" calcext:value-type="string">
            <text:p>2835-7043</text:p>
          </table:table-cell>
          <table:table-cell table:style-name="ce2" table:number-columns-repeated="3"/>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Unifying Compliance Management in Adaptive Environments through Variability Descriptors (Short Paper)</text:p>
          </table:table-cell>
          <table:table-cell table:style-name="ce2" office:value-type="string" calcext:value-type="string">
            <text:p>Koetter, Falko and Kochanowski, Monika and Renner, Thomas and Fehling, Christoph and Leymann, Frank</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214-219</text:p>
          </table:table-cell>
          <table:table-cell table:style-name="ce2"/>
          <table:table-cell table:style-name="ce2" office:value-type="string" calcext:value-type="string">
            <text:p>When managing IT environments and designing business processes, compliance regulations add challenges. Especially considering adaptive environments in the context of a service-oriented architecture in combination with exploiting the advantages of cloud technologies, maintaining compliance is cumbersome. Measures have to be taken on many application levels - including business processes, IT architecture, and business management. Although a lot of work has been done on various approaches covering compliance on one or more of these levels, in large companies more than one approach is likely to be employed. However, a unified approach for supporting the compliance tasks - like introduction, maintenance, and especially adaptation - on different levels of business and IT is missing. This work introduces this unifying approach, which links compliance requirements to implementing technology using variable compliance descriptors in order to comprehensively support compliance tasks. The advantage of this approach is that the impact of compliance on these different levels is tracked, thus enabling change propagation from changes in compliance requirements to infrastructure and business process reconfiguration.</text:p>
          </table:table-cell>
          <table:table-cell table:style-name="ce2"/>
          <table:table-cell table:style-name="ce2" office:value-type="string" calcext:value-type="string">
            <text:p>10.1109/SOCA.2013.23</text:p>
          </table:table-cell>
          <table:table-cell table:style-name="ce2" table:number-columns-repeated="3"/>
          <table:table-cell table:style-name="ce2" office:value-type="string" calcext:value-type="string">
            <text:p>Monitoring;Runtime;Companies;Documentation;Computer architecture;Topology;Compliance;BPM;Adaptability;Variability</text:p>
          </table:table-cell>
          <table:table-cell table:style-name="ce2"/>
          <table:table-cell table:style-name="ce2" office:value-type="string" calcext:value-type="string">
            <text:p>2163-2871</text:p>
          </table:table-cell>
          <table:table-cell table:style-name="ce2" table:number-columns-repeated="2"/>
          <table:table-cell table:style-name="ce2" office:value-type="string" calcext:value-type="string">
            <text:p>Non–peer-reviewed publications, including white papers, technical reports, position papers, posters, or extended abstracts.</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5</text:p>
          </table:table-cell>
          <table:table-cell table:style-name="ce4" office:value-type="string" calcext:value-type="string">
            <text:p>Study is a short paper lacking sufficient methodological detail.</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Multilevel SLA-based QoS Support in Grids</text:p>
          </table:table-cell>
          <table:table-cell table:style-name="ce2" office:value-type="string" calcext:value-type="string">
            <text:p>Conejero, Javier and Tom's, Luis and Caminero, Blanca and Carrión, Carmen</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239-246</text:p>
          </table:table-cell>
          <table:table-cell table:style-name="ce2"/>
          <table:table-cell table:style-name="ce2" office:value-type="string" calcext:value-type="string">
            <text:p>The need of mechanisms to guarantee the Quality of Service (QoS) in Grid environments has empowered the interest on Service Level Agreements (SLAs), which represent the contract established by negotiation between users and service providers that must be accomplished. Consequently, the SLAs contain numerous terms related to the QoS expected. The aim of this paper is to address different QoS levels in Grid environments by using specific metrics on SLAs. These metrics represent the expected QoS by the user for the given service level terms. Hence, a characterization and classification of these terms, making a differentiation of QoS in levels, is needed in order to improve the number of fulfilled agreements. Our proposal is based on a WS-Agreement compliant architecture developed to provide support for SLAs in Grid environments, also providing a framework prepared for new terms and policy definitions. More precisely, the QoS expected by users is clearly defined in three levels. These levels are used to classify the compromise adquired by each SLA (depending on the expectations of the user that submitted it) and deal with the confidence that Grid resources provide. The evaluation on a real Grid testbed shows the efficiency of the proposal.</text:p>
          </table:table-cell>
          <table:table-cell table:style-name="ce2"/>
          <table:table-cell table:style-name="ce2" office:value-type="string" calcext:value-type="string">
            <text:p>10.1109/ISPA.2012.39</text:p>
          </table:table-cell>
          <table:table-cell table:style-name="ce2" table:number-columns-repeated="3"/>
          <table:table-cell table:style-name="ce2" office:value-type="string" calcext:value-type="string">
            <text:p>Quality of service;Computer architecture;Proposals;Protocols;Measurement;Availability;Service Level Agreements;WS-Agreement;Scheduling in Advance;Reservation;Grids</text:p>
          </table:table-cell>
          <table:table-cell table:style-name="ce2"/>
          <table:table-cell table:style-name="ce2" office:value-type="string" calcext:value-type="string">
            <text:p>2158-9208</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The study discusses software architecture in general without addressing conformance or compliance.</text:p>
          </table:table-cell>
          <table:table-cell table:number-columns-repeated="998"/>
        </table:table-row>
        <table:table-row table:style-name="ro1">
          <table:table-cell table:style-name="ce2" office:value-type="string" calcext:value-type="string">
            <text:p>Automatic Protocol Conformance Checking of Recursive and Parallel BPEL Systems</text:p>
          </table:table-cell>
          <table:table-cell table:style-name="ce2" office:value-type="string" calcext:value-type="string">
            <text:p>Both, Andreas and Zimmermann, Wolf</text:p>
          </table:table-cell>
          <table:table-cell table:style-name="ce2"/>
          <table:table-cell table:style-name="ce2" office:value-type="string" calcext:value-type="string">
            <text:p>2008</text:p>
          </table:table-cell>
          <table:table-cell table:style-name="ce2" office:value-type="string" calcext:value-type="string">
            <text:p>IEEE Digital Library</text:p>
          </table:table-cell>
          <table:table-cell table:style-name="ce2" office:value-type="string" calcext:value-type="string">
            <text:p>81-91</text:p>
          </table:table-cell>
          <table:table-cell table:style-name="ce2"/>
          <table:table-cell table:style-name="ce2" office:value-type="string" calcext:value-type="string">
            <text:p>Today model checking of Web Services formulated in BPEL is often reduced by transforming BPEL-processes to Petri nets. These can be model checked using traditional approaches. If recursion is present in the BPEL model this approach hides some possible violations of the wished behaviour. We present an approach which allows the Web Service developer to formulate more properties of the required usage of the Web Service and provide a tool that checks whether these requirements are satisfied in a Web Service based system. We use finite state machines to specify permitted sequences of receivable interactions and call them service protocols. In this paper we will show that it is possible to use BPEL representations and service protocols to check if a sequence of receivable interactions that violates a service protocol can occur. We achieve this result by translating BPEL to Process Algebra Nets (introduced by Mayr ) and applying the approach of Mayr for model checking Process Algebra Nets. Our approach computes counterexamples even for recursive and parallel programs including synchronization.</text:p>
          </table:table-cell>
          <table:table-cell table:style-name="ce2"/>
          <table:table-cell table:style-name="ce2" office:value-type="string" calcext:value-type="string">
            <text:p>10.1109/ECOWS.2008.11</text:p>
          </table:table-cell>
          <table:table-cell table:style-name="ce2" table:number-columns-repeated="3"/>
          <table:table-cell table:style-name="ce2" office:value-type="string" calcext:value-type="string">
            <text:p>Protocols;Web services;Algebra;Automata;Petri nets;Assembly systems;Yarn;Personal digital assistants;Computer science;Concurrent computing;Web Services;Protocol;Conformance Checking;Verification;BPEL</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3" office:value-type="string" calcext:value-type="string">
            <text:p>Runtime Monitoring of Web Service Conversations</text:p>
          </table:table-cell>
          <table:table-cell table:style-name="ce2" office:value-type="string" calcext:value-type="string">
            <text:p>Simmonds, Jocelyn and Gan, Yuan and Chechik, Marsha and Nejati, Shiva and O'Farrell, Bill and Litani, Elena and Waterhouse, Julie</text:p>
          </table:table-cell>
          <table:table-cell table:style-name="ce2" office:value-type="string" calcext:value-type="string">
            <text:p>IEEE Transactions on Services Computing</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223-244</text:p>
          </table:table-cell>
          <table:table-cell table:style-name="ce2" office:value-type="string" calcext:value-type="string">
            <text:p>2</text:p>
          </table:table-cell>
          <table:table-cell table:style-name="ce2" office:value-type="string" calcext:value-type="string">
            <text:p>For a system of distributed processes, correctness can be ensured by (statically) checking whether their composition satisfies properties of interest. However, Web services are distributed processes that dynamically discover properties of other Web services. Since the overall system may not be available statically and since each business process is supposed to be relatively simple, we propose to use runtime monitoring of conversations between partners as a means of checking behavioral correctness of the entire Web service system. Specifically, we identify a subset of UML 2.0 Sequence Diagrams as a property specification language and show that it is sufficiently expressive for capturing safety and liveness properties. By transforming these diagrams to automata, we enable conformance checking of finite execution traces against the specification. We show how our language can be used to specify the Specification Property System (SPS) [1]. We describe an implementation of our approach as part of an industrial system. Finally, we discuss our experience of specifying and monitoring a number of properties from three existing applications.</text:p>
          </table:table-cell>
          <table:table-cell table:style-name="ce2"/>
          <table:table-cell table:style-name="ce2" office:value-type="string" calcext:value-type="string">
            <text:p>10.1109/TSC.2009.16</text:p>
          </table:table-cell>
          <table:table-cell table:style-name="ce2" table:number-columns-repeated="3"/>
          <table:table-cell table:style-name="ce2" office:value-type="string" calcext:value-type="string">
            <text:p>Monitoring;Web services;Automata;Runtime;Unified modeling language;Data mining;Probability density function;Nondeterministic finite automata;runtime monitoring;sequence diagrams;temporal logic patterns;Web service conversations.</text:p>
          </table:table-cell>
          <table:table-cell table:style-name="ce2"/>
          <table:table-cell table:style-name="ce2" office:value-type="string" calcext:value-type="string">
            <text:p>1939-1374</text:p>
          </table:table-cell>
          <table:table-cell table:style-name="ce2" table:number-columns-repeated="3"/>
          <table:table-cell table:style-name="ce2" office:value-type="string" calcext:value-type="string">
            <text:p>Unclassifi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Verifying conformance between Web service choreography and implementation using learning and model checking</text:p>
          </table:table-cell>
          <table:table-cell table:style-name="ce2" office:value-type="string" calcext:value-type="string">
            <text:p>Pacharoen, Warawoot and Aoki, Toshiaki and Bhattarakosol, Pattarasinee and Surarerks, Athasit</text:p>
          </table:table-cell>
          <table:table-cell table:style-name="ce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375-381</text:p>
          </table:table-cell>
          <table:table-cell table:style-name="ce2" office:value-type="string" calcext:value-type="string">
            <text:p>2</text:p>
          </table:table-cell>
          <table:table-cell table:style-name="ce2" office:value-type="string" calcext:value-type="string">
            <text:p>A conformance problem between Web service choreography and orchestration has attracted much interest in the research field of Web service composition. A number of formal languages have been proposed for describing both choreography and orchestration. Moreover, various notions of conformance between them have been formally defined. In most of the earlier works, however, it is assumed that the internal structures of implemented orchestration are explicit. It may not always be the case, such as the Web services implemented in. NET or Java. In this paper, we have investigated an alternative approach for verifying a conformance between choreography and the implementation whose only external behavior can be observed. We use an adapted version of Angluin's algorithm to infer a Mealy machine from the implemented Web service. By transforming the Mealy machine to the modeling formalism LTS, the model checker LTSA can be used for checking the conformance criterion in our framework.</text:p>
          </table:table-cell>
          <table:table-cell table:style-name="ce2" table:number-columns-repeated="5"/>
          <table:table-cell table:style-name="ce2" office:value-type="string" calcext:value-type="string">
            <text:p>Analytical models;Business;Machine learning;Inference algorithms;Algorithm design and analysis;Service oriented architecture;Web service composition;Choreography;Conformance verification;Learning algorithm;Model checking</text:p>
          </table:table-cell>
          <table:table-cell table:style-name="ce2" table:number-columns-repeated="5"/>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Formalizing exception handling in WS-CDL and WS-BPEL for conformance verification</text:p>
          </table:table-cell>
          <table:table-cell table:style-name="ce2" office:value-type="string" calcext:value-type="string">
            <text:p>Yeung, W. L.</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1-8</text:p>
          </table:table-cell>
          <table:table-cell table:style-name="ce2"/>
          <table:table-cell table:style-name="ce2" office:value-type="string" calcext:value-type="string">
            <text:p>We have previously developed a formal approach to verifying conformance for Web services choreography based on the formalism of Communicating Sequential Processes (CSP). In this paper, we extend the approach to cover exception handling, which is commonly used in specifying the choreography as well as orchestration of Web services. In particular, we show how timeout exceptions and message events are handled in the formal approach and illustrate it using a document ordering and delivery process as an example.</text:p>
          </table:table-cell>
          <table:table-cell table:style-name="ce2"/>
          <table:table-cell table:style-name="ce2" office:value-type="string" calcext:value-type="string">
            <text:p>10.1109/SOCA.2009.5410265</text:p>
          </table:table-cell>
          <table:table-cell table:style-name="ce2" table:number-columns-repeated="3"/>
          <table:table-cell table:style-name="ce2" office:value-type="string" calcext:value-type="string">
            <text:p>Web services;Automata;Service oriented architecture;Information systems;Software libraries;Petri nets;Algebra;Document handling;Parallel programming;Unified modeling language;WS-CDL;WS-BPEL;exception handling;conformance</text:p>
          </table:table-cell>
          <table:table-cell table:style-name="ce2"/>
          <table:table-cell table:style-name="ce2" office:value-type="string" calcext:value-type="string">
            <text:p>2163-2871</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Conformance Checking and QoS Selection Based on CPN for Web Service Composition</text:p>
          </table:table-cell>
          <table:table-cell table:style-name="ce2" office:value-type="string" calcext:value-type="string">
            <text:p>Chen, Liping and Ha, Weitao</text:p>
          </table:table-cell>
          <table:table-cell table:style-name="ce2"/>
          <table:table-cell table:style-name="ce2" office:value-type="string" calcext:value-type="string">
            <text:p>2017</text:p>
          </table:table-cell>
          <table:table-cell table:style-name="ce2" office:value-type="string" calcext:value-type="string">
            <text:p>IEEE Digital Library</text:p>
          </table:table-cell>
          <table:table-cell table:style-name="ce2" office:value-type="string" calcext:value-type="string">
            <text:p>273-276</text:p>
          </table:table-cell>
          <table:table-cell table:style-name="ce2"/>
          <table:table-cell table:style-name="ce2" office:value-type="string" calcext:value-type="string">
            <text:p>The development of new services by composition of existing ones has gained considerable momentum as a means of integrating heterogeneous applications and realizing business collaborations. In this paper we use skyline computation to select services for composition efficiently, reducing the number of candidate services to be considered. Then a novel color Petri net model of Web service composition is presented that combines QoS-based optimal service selection and consistence verification. In the model we define aggregation functions, and use a Multiple Attribute Decision Making approach for the utility function to achieve optimal services selection of QoS properties. We also propose a consistence verification approach to identify potential logical inconsistence of the semantic Web service process before the deployment. Proofs are also presented. We evaluate our approach experimentally using both real and synthetically generated datasets.</text:p>
          </table:table-cell>
          <table:table-cell table:style-name="ce2"/>
          <table:table-cell table:style-name="ce2" office:value-type="string" calcext:value-type="string">
            <text:p>10.1109/CIS.2017.00066</text:p>
          </table:table-cell>
          <table:table-cell table:style-name="ce2" table:number-columns-repeated="3"/>
          <table:table-cell table:style-name="ce2" office:value-type="string" calcext:value-type="string">
            <text:p>Web services;Quality of service;Color;Databases;Petri nets;Reliability;Service Composition;Web Service Selection;Skyline;QoS Optimization;Web Service Consistence Verification</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Services-oriented dynamic reconfiguration framework for dependable distributed computing</text:p>
          </table:table-cell>
          <table:table-cell table:style-name="ce2" office:value-type="string" calcext:value-type="string">
            <text:p>Tsai, W.T. and Weiwei Song and Paul, R. and Zhibin Cao and Hai Huang</text:p>
          </table:table-cell>
          <table:table-cell table:style-name="ce2"/>
          <table:table-cell table:style-name="ce2" office:value-type="string" calcext:value-type="string">
            <text:p>2004</text:p>
          </table:table-cell>
          <table:table-cell table:style-name="ce2" office:value-type="string" calcext:value-type="string">
            <text:p>IEEE Digital Library</text:p>
          </table:table-cell>
          <table:table-cell table:style-name="ce2" office:value-type="string" calcext:value-type="string">
            <text:p>554-559 vol.1</text:p>
          </table:table-cell>
          <table:table-cell table:style-name="ce2"/>
          <table:table-cell table:style-name="ce2" office:value-type="string" calcext:value-type="string">
            <text:p>Recently service-oriented architecture (SOA) has received significant attention and one reason is that it is potentially survivable as services are located, bound, and executed at runtime over the Internet. However, this is not enough for dependable computing because the system must also be able to reconfigure once a system failure or overload is detected, and this reconfiguration must be done in real-time at runtime with minimum disruption to the current operation. This work presents reconfiguration requirements for building dependable SOA, and proposes a dynamic reconfiguration framework based on distributed monitoring, synchronization, and runtime verification with distributed agents.</text:p>
          </table:table-cell>
          <table:table-cell table:style-name="ce2"/>
          <table:table-cell table:style-name="ce2" office:value-type="string" calcext:value-type="string">
            <text:p>10.1109/CMPSAC.2004.1342894</text:p>
          </table:table-cell>
          <table:table-cell table:style-name="ce2" table:number-columns-repeated="3"/>
          <table:table-cell table:style-name="ce2" office:value-type="string" calcext:value-type="string">
            <text:p>Distributed computing;Computer applications;Application software</text:p>
          </table:table-cell>
          <table:table-cell table:style-name="ce2"/>
          <table:table-cell table:style-name="ce2" office:value-type="string" calcext:value-type="string">
            <text:p>0730-3157</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Understanding Architecture Erosion: The Practitioners’ Perceptive</text:p>
          </table:table-cell>
          <table:table-cell table:style-name="ce2" office:value-type="string" calcext:value-type="string">
            <text:p>Li, Ruiyin and Liang, Peng and Soliman, Mohamed and Avgeriou, Paris</text:p>
          </table:table-cell>
          <table:table-cell table:style-name="ce2"/>
          <table:table-cell table:style-name="ce2" office:value-type="string" calcext:value-type="string">
            <text:p>2021</text:p>
          </table:table-cell>
          <table:table-cell table:style-name="ce2" office:value-type="string" calcext:value-type="string">
            <text:p>IEEE Digital Library</text:p>
          </table:table-cell>
          <table:table-cell table:style-name="ce2" office:value-type="string" calcext:value-type="string">
            <text:p>311-322</text:p>
          </table:table-cell>
          <table:table-cell table:style-name="ce2"/>
          <table:table-cell table:style-name="ce2" office:value-type="string" calcext:value-type="string">
            <text:p>As software systems evolve, their architecture is meant to adapt accordingly by following the changes in requirements, the environment, and the implementation. However, in practice, the evolving system often deviates from the architecture, causing severe consequences to system maintenance and evolution. This phenomenon of architecture erosion has been studied extensively in research, but not yet been examined from the point of view of developers. In this exploratory study, we look into how developers perceive the notion of architecture erosion, its causes and consequences, as well as tools and practices to identify and control architecture erosion. To this end, we searched through several popular online developer communities for collecting data of discussions related to architecture erosion. Besides, we identified developers involved in these discussions and conducted a survey with 10 participants and held interviews with 4 participants. Our findings show that: (1) developers either focus on the structural manifestation of architecture erosion or on its effect on run-time qualities, maintenance and evolution; (2) alongside technical factors, architecture erosion is caused to a large extent by non-technical factors; (3) despite the lack of dedicated tools for detecting architecture erosion, developers usually identify erosion through a number of symptoms; and (4) there are effective measures that can help to alleviate the impact of architecture erosion.</text:p>
          </table:table-cell>
          <table:table-cell table:style-name="ce2"/>
          <table:table-cell table:style-name="ce2" office:value-type="string" calcext:value-type="string">
            <text:p>10.1109/ICPC52881.2021.00037</text:p>
          </table:table-cell>
          <table:table-cell table:style-name="ce2" table:number-columns-repeated="3"/>
          <table:table-cell table:style-name="ce2" office:value-type="string" calcext:value-type="string">
            <text:p>Computer architecture;Tools;Maintenance engineering;Software systems;Interviews;Architecture Erosion;Online Developer Communities;Survey;Interview;Empirical Study</text:p>
          </table:table-cell>
          <table:table-cell table:style-name="ce2"/>
          <table:table-cell table:style-name="ce2" office:value-type="string" calcext:value-type="string">
            <text:p>2643-7171</text:p>
          </table:table-cell>
          <table:table-cell table:style-name="ce2" table:number-columns-repeated="2"/>
          <table:table-cell table:style-name="ce2" office:value-type="string" calcext:value-type="string">
            <text:p>Secondary studies, such as Systematic Literature Reviews (SLRs), Mapping Studies (SMS), Multivocal Reviews (MLRs), or surveys.</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Conformance Checking and QoS Optimizing of Web Service Composition</text:p>
          </table:table-cell>
          <table:table-cell table:style-name="ce2" office:value-type="string" calcext:value-type="string">
            <text:p>Zhang, Guojun</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784-787</text:p>
          </table:table-cell>
          <table:table-cell table:style-name="ce2"/>
          <table:table-cell table:style-name="ce2" office:value-type="string" calcext:value-type="string">
            <text:p>Due to the inherent autonomy and heterogeneity of component Web services it is difficult to predict the behavior of the overall composite service. Besides, the performance of the composed application is determined by the performance of the involved component web services. Therefore, the behavior conformance and non-functional quality of service (QoS) properties are crucial for selecting the web services to take part in the composition. The behavior conformance of component services is the guarantee of the correctness of Web service composition, and QoS properties can identify the best candidate web services from a set of functionally-equivalent services. In this paper, two formal judgmental rules are presented, which check conformance of local behavior of every component service to global interaction. We also use skyline computation to select services for composition effectively and efficiently, reducing the number of candidate services to be considered. We also define aggregation functions, and use a Multiple Attribute Decision Making approach for the utility function to achieve Qos-based optimal service selection. We evaluate our approach experimentally using both real and synthetically generated datasets.</text:p>
          </table:table-cell>
          <table:table-cell table:style-name="ce2"/>
          <table:table-cell table:style-name="ce2" office:value-type="string" calcext:value-type="string">
            <text:p>10.1109/CIS.2013.171</text:p>
          </table:table-cell>
          <table:table-cell table:style-name="ce2" table:number-columns-repeated="3"/>
          <table:table-cell table:style-name="ce2" office:value-type="string" calcext:value-type="string">
            <text:p>Quality of service;Business;Semantics;Educational institutions;Service-oriented architecture;Grammar</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 conformance review strategy for regulating safety-critical software</text:p>
          </table:table-cell>
          <table:table-cell table:style-name="ce2" office:value-type="string" calcext:value-type="string">
            <text:p>Jetley, Raoul P.</text:p>
          </table:table-cell>
          <table:table-cell table:style-name="ce2"/>
          <table:table-cell table:style-name="ce2" office:value-type="string" calcext:value-type="string">
            <text:p>2006</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afety is an important concern for software used in life-critical systems such as air transport, nuclear power and medical devices. The critical nature of these systems necessitates that the software used therein be reliable and free of errors. It becomes imperative, therefore, to have a stringent review process in place to ascertain the correctness of the software and to ensure that it meets all requirements and standards. Regulatory agencies encourage the use of formal methods-based techniques in the development of safety critical software. However, most manufacturers are reluctant to use these techniques, citing them as too complex and time consuming. As a result, (potentially life-threatening) errors are often not discovered until the software is already on the market. When such an error is eventually discovered, it becomes essential to trace the failure to its exact source in the implementation and to assure that the error correction restores the overall safety and effectiveness of the device. In this dissertation, we present how efficient premarket and postmarket conformance reviews of designs and implementations can be carried out using formal methods-based techniques, to enable the process of reviewing software in safety-critical devices. To facilitate premarket conformance reviews, we introduce the notion of <text:s/>usage models, <text:s/>standardized formal models that serve as design templates. We present an approach to conformance checking of safety-critical software through formal verification and automated test case sequences derived from these usage models. To provide for efficient postmarket reviews, we establish a methodology based on integrating program slicing with model abstraction to trace software failures to their root cause. We formalize this methodology by presenting an iterative algorithm for <text:s/>abstraction-driven slicing, <text:s/>and realize this algorithm through the implementation of the CAdS---a forensic analysis tool for C programs. We provide case studies involving typical medical device software to illustrate the various concepts involved. We use results from these studies to establish the effectiveness of our proposed approach and compare it to conventional static analysis techniques such as program slicing. We demonstrate how our approach to premarket review is used to uncover safety errors in software implementations and show how abstraction-driven slicing can be used to improve the efficiency of postmarket reviews by up to 30%.</text:p>
          </table:table-cell>
          <table:table-cell table:style-name="ce2" table:number-columns-repeated="6"/>
          <table:table-cell table:style-name="ce2" office:value-type="string" calcext:value-type="string">
            <text:p>North Carolina State University</text:p>
          </table:table-cell>
          <table:table-cell table:style-name="ce2" table:number-columns-repeated="2"/>
          <table:table-cell table:style-name="ce2" office:value-type="string" calcext:value-type="string">
            <text:p>AAI3249688</text:p>
          </table:table-cell>
          <table:table-cell table:style-name="ce2" office:value-type="string" calcext:value-type="string">
            <text:p>Theses, dissertations, monographs, or books.</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Exercising control over the design of evolving software systems using an inverse application of reflexion modeling</text:p>
          </table:table-cell>
          <table:table-cell table:style-name="ce2" office:value-type="string" calcext:value-type="string">
            <text:p>Gear, Andrew Le and Buckley, Jim</text:p>
          </table:table-cell>
          <table:table-cell table:style-name="ce2"/>
          <table:table-cell table:style-name="ce2" office:value-type="string" calcext:value-type="string">
            <text:p>2006</text:p>
          </table:table-cell>
          <table:table-cell table:style-name="ce2" office:value-type="string" calcext:value-type="string">
            <text:p>ACM Digital Library</text:p>
          </table:table-cell>
          <table:table-cell table:style-name="ce2" office:value-type="string" calcext:value-type="string">
            <text:p>37–es</text:p>
          </table:table-cell>
          <table:table-cell table:style-name="ce2"/>
          <table:table-cell table:style-name="ce2" office:value-type="string" calcext:value-type="string">
            <text:p>A software designer often has little control over, or a means of checking, whether his design is being adhered to once implementation begins. This 'architectural drift,' where the original design and the design of the implemented system diverge can cause serious problems for evolution, maintenance and the comprehensibility of a system if it remains undocumented. The earlier such discrepancies can be identified the better. This paper proposes a process for design control based on an inverted use of a design recovery technique called Reflexion Modeling that allows the software designer to enforce his design decisions during the implementation phase of the software engineering process.A large industrial case study of the development of an IBM system called DAP is used to demonstrate the effectiveness of the process. Based on a comparison between the old implementation of DAP and the new version, our findings suggests that better design control is achievable using our inverse Reflexion Modeling approach. This is because, during the case study our process revealed violations in the design of DAP. These were captured early and marked for correction. The violations were present in spite of the fact that the architect and implementer of the system was the same person. This indicates that design violations are very easily introduced and often unintentional, particularly in larger team-development contexts.Another measure of the value of the approach is the uptake of the tool by others in the organization. This has been quite rapid, with up to 15 installations since this work began. The next step will be to monitor several more iterations of the design control process and report upon the results of this new data.</text:p>
          </table:table-cell>
          <table:table-cell table:style-name="ce2"/>
          <table:table-cell table:style-name="ce2" office:value-type="string" calcext:value-type="string">
            <text:p>10.1145/1188966.1189016</text:p>
          </table:table-cell>
          <table:table-cell table:style-name="ce2" office:value-type="string" calcext:value-type="string">
            <text:p>https://doi.org/10.1145/1188966.1189016</text:p>
          </table:table-cell>
          <table:table-cell table:style-name="ce2" table:number-columns-repeated="3"/>
          <table:table-cell table:style-name="ce2" office:value-type="string" calcext:value-type="string">
            <text:p>IBM Corp.</text:p>
          </table:table-cell>
          <table:table-cell table:style-name="ce2" table:number-columns-repeated="4"/>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Focus: A Light-Weight, Incremental Approach to Software Architecture Recovery and Evolution</text:p>
          </table:table-cell>
          <table:table-cell table:style-name="ce2" office:value-type="string" calcext:value-type="string">
            <text:p>Ding, Lei and Medvidovic, Nenad</text:p>
          </table:table-cell>
          <table:table-cell table:style-name="ce2"/>
          <table:table-cell table:style-name="ce2" office:value-type="string" calcext:value-type="string">
            <text:p>2001</text:p>
          </table:table-cell>
          <table:table-cell table:style-name="ce2" office:value-type="string" calcext:value-type="string">
            <text:p>ACM Digital Library</text:p>
          </table:table-cell>
          <table:table-cell table:style-name="ce2" office:value-type="string" calcext:value-type="string">
            <text:p>191</text:p>
          </table:table-cell>
          <table:table-cell table:style-name="ce2"/>
          <table:table-cell table:style-name="ce2" office:value-type="string" calcext:value-type="string">
            <text:p>During the past decade, object-orientation (OO) has become the dominant software development methodology, accompanied by a number of modeling notations, programming languages, and development environments. OO applications of today are increasingly complex and user-driven. They are also developed more rapidly and evolved more frequently than was the case with software systems of the past. All of these factors contribute to a plethora of potential problems when maintaining and evolving an OO application. These problems are caused by architectural erosion, where the initial architecture of an application is (arbitrarily) modified to the point where its key properties no longer hold. We propose an approach, called Focus, whose goal is to enable effective evolution of such an application with minimal effort, by recovering its architecture and using it as the basis of evolution. Focus allows engineers to direct their primary attention to the part of the system that is directly impacted by the desired change; subsequent changes will incrementally uncover additional parts of the system's architecture. We have applied Focus to four off-the-shelf applications to date. We discuss its key strengths and point out several open issues that will frame our future work.</text:p>
          </table:table-cell>
          <table:table-cell table:style-name="ce2"/>
          <table:table-cell table:style-name="ce2" office:value-type="string" calcext:value-type="string">
            <text:p>10.1109/WICSA.2001.948429</text:p>
          </table:table-cell>
          <table:table-cell table:style-name="ce2" office:value-type="string" calcext:value-type="string">
            <text:p>https://doi.org/10.1109/WICSA.2001.948429</text:p>
          </table:table-cell>
          <table:table-cell table:style-name="ce2" table:number-columns-repeated="2"/>
          <table:table-cell table:style-name="ce2" office:value-type="string" calcext:value-type="string">
            <text:p>GUI, OO, Software architecture, evolution, recovery</text:p>
          </table:table-cell>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TomTom for Business Process Management (TomTom4BPM)</text:p>
          </table:table-cell>
          <table:table-cell table:style-name="ce2" office:value-type="string" calcext:value-type="string">
            <text:p>Aalst, Wil M.</text:p>
          </table:table-cell>
          <table:table-cell table:style-name="ce2"/>
          <table:table-cell table:style-name="ce2" office:value-type="string" calcext:value-type="string">
            <text:p>2009</text:p>
          </table:table-cell>
          <table:table-cell table:style-name="ce2" office:value-type="string" calcext:value-type="string">
            <text:p>ACM Digital Library</text:p>
          </table:table-cell>
          <table:table-cell table:style-name="ce2" office:value-type="string" calcext:value-type="string">
            <text:p>2–5</text:p>
          </table:table-cell>
          <table:table-cell table:style-name="ce2"/>
          <table:table-cell table:style-name="ce2" office:value-type="string" calcext:value-type="string">
            <text:p>Navigation systems have proven to be quite useful for many drivers. People increasingly rely on the devices of TomTom and other vendors and find it useful to get directions to go from A to B, know the expected arrival time, learn about traffic jams on the planned route, and be able to view maps that can be customized in various ways (zoom-in/zoom-out, show fuel stations, speed limits, etc.). However, when looking at business processes, such information is typically lacking. Good and accurate "maps" of business process are often missing and, if they exist, they tend to be restrictive and provide little information. For example, very few business process management systems are able to predict when a case will complete. Therefore, we advocate more TomTom-like functionality for business process management (TomTom4BPM). Process mining will play an essential role in providing TomTom4BPM as it allows for process discovery (generating accurate maps), conformance checking (comparing the real processes with the modeled processes), and extension (augmenting process models with additional/dynamic information).</text:p>
          </table:table-cell>
          <table:table-cell table:style-name="ce2"/>
          <table:table-cell table:style-name="ce2" office:value-type="string" calcext:value-type="string">
            <text:p>10.1007/978-3-642-02144-2_2</text:p>
          </table:table-cell>
          <table:table-cell table:style-name="ce2" office:value-type="string" calcext:value-type="string">
            <text:p>https://doi.org/10.1007/978-3-642-02144-2_2</text:p>
          </table:table-cell>
          <table:table-cell table:style-name="ce2" table:number-columns-repeated="3"/>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Predicting Emergent Properties of Component Based System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41–50</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the System Architect could make necessary changes to ensure that the quality attributes dictated by the system requirements were satisfied before the actual system was deployed. In this paper we propose a model for predicting architectural styles, and hence the quality attributes, based on use cases that need to be satisfied by a system configuration. Our technique can be used to determine stylistic conformance and hence indicate the presence or absence of architectural drift.</text:p>
          </table:table-cell>
          <table:table-cell table:style-name="ce2"/>
          <table:table-cell table:style-name="ce2" office:value-type="string" calcext:value-type="string">
            <text:p>10.1109/ICCBSS.2007.25</text:p>
          </table:table-cell>
          <table:table-cell table:style-name="ce2" office:value-type="string" calcext:value-type="string">
            <text:p>https://doi.org/10.1109/ICCBSS.2007.25</text:p>
          </table:table-cell>
          <table:table-cell table:style-name="ce2" table:number-columns-repeated="3"/>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Model-Driven Evolution of Software Architectures</text:p>
          </table:table-cell>
          <table:table-cell table:style-name="ce2" office:value-type="string" calcext:value-type="string">
            <text:p>Graaf, Bas</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357–360</text:p>
          </table:table-cell>
          <table:table-cell table:style-name="ce2"/>
          <table:table-cell table:style-name="ce2" office:value-type="string" calcext:value-type="string">
            <text:p>This paper gives an overview of a Ph.D.-project that investigates approaches to support the evolution of software architectures. Particularly, we focus on the use of model-driven techniques in the context of software product-lines. We recognise four tasks related to software evolution: evaluation, conformance checking, migration, and documentation. We propose model-driven solutions for these tasks. By their application in industrial case studies we investigate the extent to which the evolution tasks can be automated, the impact of the use of software product lines, and the possibilities and difficulties to integrate these solutions in industrial practice.</text:p>
          </table:table-cell>
          <table:table-cell table:style-name="ce2"/>
          <table:table-cell table:style-name="ce2" office:value-type="string" calcext:value-type="string">
            <text:p>10.1109/CSMR.2007.35</text:p>
          </table:table-cell>
          <table:table-cell table:style-name="ce2" office:value-type="string" calcext:value-type="string">
            <text:p>https://doi.org/10.1109/CSMR.2007.35</text:p>
          </table:table-cell>
          <table:table-cell table:style-name="ce2" table:number-columns-repeated="3"/>
          <table:table-cell table:style-name="ce2" office:value-type="string" calcext:value-type="string">
            <text:p>IEEE Computer Societ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Verifying Protocol Conformance Using Software Model Checking for the Model-Driven Development of Embedded Systems</text:p>
          </table:table-cell>
          <table:table-cell table:style-name="ce2" office:value-type="string" calcext:value-type="string">
            <text:p>Moffett, Yann and Dingel, Juergen and Beaulieu, Alain</text:p>
          </table:table-cell>
          <table:table-cell table:style-name="ce2" office:value-type="string" calcext:value-type="string">
            <text:p>IEEE Trans. Softw. Eng.</text:p>
          </table:table-cell>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1307–13256</text:p>
          </table:table-cell>
          <table:table-cell table:style-name="ce2" office:value-type="string" calcext:value-type="string">
            <text:p>39</text:p>
          </table:table-cell>
          <table:table-cell table:style-name="ce2" office:value-type="string" calcext:value-type="string">
            <text:p>To facilitate modular development, the use of state machines has been proposed to specify the protocol (i.e., the sequence of messages) that each port of a component can engage in. The protocol conformance checking problem consists of determining whether the actual behavior of a component conforms to the protocol specifications on its ports. In this paper, we consider this problem in the context of the model-driven development (MDD) of embedded systems based on UML 2, in which UML 2 state machines are used to specify component behavior. We provide a definition of conformance which slightly extends those found in the literature and reduce the conformance check to a state space exploration. We describe a tool implementing the approach using the Java PathFinder software model checker and the MDD tool IBM Rational RoseRT, discuss its application to three case studies, and show how the tool repeatedly allowed us to find unexpected conformance errors with encouraging performance. We conclude that the approach is promising for supporting the modular development of embedded components in the context of industrial applications of MDD.</text:p>
          </table:table-cell>
          <table:table-cell table:style-name="ce2"/>
          <table:table-cell table:style-name="ce2" office:value-type="string" calcext:value-type="string">
            <text:p>10.1109/TSE.2013.14</text:p>
          </table:table-cell>
          <table:table-cell table:style-name="ce2" office:value-type="string" calcext:value-type="string">
            <text:p>https://doi.org/10.1109/TSE.2013.14</text:p>
          </table:table-cell>
          <table:table-cell table:style-name="ce2" table:number-columns-repeated="2"/>
          <table:table-cell table:style-name="ce2" office:value-type="string" calcext:value-type="string">
            <text:p>Component-based software engineering, Context, Java, Ports (Computers), Protocols, Safety, Software, Unified modeling language, behavioral interface specifications, formal specification and verification, model-driven development, software model checking, software modeling</text:p>
          </table:table-cell>
          <table:table-cell table:style-name="ce2" office:value-type="string" calcext:value-type="string">
            <text:p>IEEE Press</text:p>
          </table:table-cell>
          <table:table-cell table:style-name="ce2" office:value-type="string" calcext:value-type="string">
            <text:p>0098-5589</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utomated extraction and checking of property models from source code for robot swarms</text:p>
          </table:table-cell>
          <table:table-cell table:style-name="ce2" office:value-type="string" calcext:value-type="string">
            <text:p>Merlo, Ettore and Pinciroli, Carlo and Panerati, Jacopo and Famelis, Michalis and Beltrame, Giovanni</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47–54</text:p>
          </table:table-cell>
          <table:table-cell table:style-name="ce2"/>
          <table:table-cell table:style-name="ce2" office:value-type="string" calcext:value-type="string">
            <text:p>As robots become a common presence in our everyday lives, ensuring the security and safety of robotic systems becomes an increasingly important and urgent challenge. Multi-robot systems, in particular, have the potential to revolutionize multiple industries---such as transportation and home care---where safety guarantees are a primary requirement. A known challenge for swarms and multi-robot systems is the gap between requirements and design, due to the need to translate swarm-level objectives into robot-level behaviors. In this paper, we focus on a less studied problem---the gap between requirements and implementation. As a case study, we use Buzz, that is a dynamic programming language designed for swarm robotics applications. Similarly to Python, Lua, and JavaScript, Buzz does not natively offer formal guarantees of correctness or safety. We propose an approach to automatically extract "as-implemented" models from Buzz programs, whose properties can then be formally analyzed and verified. Results obtained from the experiments performed on two medium-size open-source production-level systems for robotics research have also been reported. Our results show that the approach is feasible and is scalable to larger systems.</text:p>
          </table:table-cell>
          <table:table-cell table:style-name="ce2"/>
          <table:table-cell table:style-name="ce2" office:value-type="string" calcext:value-type="string">
            <text:p>10.1145/3526071.3527516</text:p>
          </table:table-cell>
          <table:table-cell table:style-name="ce2" office:value-type="string" calcext:value-type="string">
            <text:p>https://doi.org/10.1145/3526071.3527516</text:p>
          </table:table-cell>
          <table:table-cell table:style-name="ce2" table:number-columns-repeated="2"/>
          <table:table-cell table:style-name="ce2" office:value-type="string" calcext:value-type="string">
            <text:p>domain-specific languages, model checking, model extraction, safety, software engineering, swarm robotics</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utomated procedure clustering for reverse engineering PL/SQL programs</text:p>
          </table:table-cell>
          <table:table-cell table:style-name="ce2" office:value-type="string" calcext:value-type="string">
            <text:p>Altιnι\c{s}ιk, Metin and S\"{o}zer, Hasan</text:p>
          </table:table-cell>
          <table:table-cell table:style-name="ce2"/>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1440–1445</text:p>
          </table:table-cell>
          <table:table-cell table:style-name="ce2"/>
          <table:table-cell table:style-name="ce2" office:value-type="string" calcext:value-type="string">
            <text:p>PL/SQL programs are mainly composed of procedures that interact with a database. These procedures are grouped into packages at the architecture design level for increasing modularity and maintainability. However, the intended modular structure is subject to architectural drift especially for large scale programs that are maintained for a long duration. Existing reverse engineering and refactoring techniques cannot be directly applied for these programs. Unlike other programs, PL/SQL programs involve procedures that are in most cases indirectly coupled due to their database operations. In this paper, we provide an approach and a tool that support reverse engineering and refactoring of PL/SQL programs. We analyze dependencies among PL/SQL procedures based on the accessed database elements. We represent these dependencies in the form of a design structure matrix. Then, we cluster the procedures and propose a packaging structure to the designer. We performed an industrial case study from the telecommunications domain. We observed promising results in which several unexisted packages were proposed by our tool and the accuracy of the results were approved by domain experts.</text:p>
          </table:table-cell>
          <table:table-cell table:style-name="ce2"/>
          <table:table-cell table:style-name="ce2" office:value-type="string" calcext:value-type="string">
            <text:p>10.1145/2851613.2851781</text:p>
          </table:table-cell>
          <table:table-cell table:style-name="ce2" office:value-type="string" calcext:value-type="string">
            <text:p>https://doi.org/10.1145/2851613.2851781</text:p>
          </table:table-cell>
          <table:table-cell table:style-name="ce2" table:number-columns-repeated="2"/>
          <table:table-cell table:style-name="ce2" office:value-type="string" calcext:value-type="string">
            <text:p>PL/SQL programs, industrial case study, module clustering, refactoring, reverse engineering</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MADDC: Multi-Scale Anomaly Detection, Diagnosis and Correction for Discrete Event Logs</text:p>
          </table:table-cell>
          <table:table-cell table:style-name="ce2" office:value-type="string" calcext:value-type="string">
            <text:p>Wang, Xiaolei and Yang, Lin and Li, Dongyang and Ma, Linru and He, Yongzhong and Xiao, Junchao and Liu, Jiyuan and Yang, Yuexiang</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769–784</text:p>
          </table:table-cell>
          <table:table-cell table:style-name="ce2"/>
          <table:table-cell table:style-name="ce2" office:value-type="string" calcext:value-type="string">
            <text:p>Anomaly detection for discrete event logs can provide critical information for building secure and reliable systems in various application domains, such as large scale data centers, autonomous driving, and intrusion detection. However, the task is very challenging due to the lack of a clear understanding and definition of anomaly in the specific problem space, and the log data is often highly complex with temporal correlation. Existing deep learning based methods mostly suffer from such issues as overfitting, uncertainty or low interpretability; consequently, the detection results may be inaccurate, with little information to help security analysts diagnose the reported anomalies with high confidence. To tackle this challenge, in this research, we propose a general framework named MADDC, which aims to (1) accurately perform Multi-scale Anomaly Detection, Diagnosis and Correction for discrete event logs, and (2) help analysts further mitigate anomalies based on diagnosis results. Specifically, we first design a new anomaly critic for LSTM variational autoencoder based model to alleviate overfitting and reduce false negatives during anomaly detection. As one of our main contributions, we then introduce process mining technique to build process-centric workflow models in an unsupervised manner, which forms the ‘normal’ context of an event sequence and help perform accurate and consistent anomaly diagnosis through global sequence alignment. Experiments on publicly available datasets show that MADDC not only outperformed several representative methods in terms of detection accuracy, but also could improve the visibility to abnormal deviations from normal execution, hence helping security analysts understand anomalies and make further corrections.</text:p>
          </table:table-cell>
          <table:table-cell table:style-name="ce2"/>
          <table:table-cell table:style-name="ce2" office:value-type="string" calcext:value-type="string">
            <text:p>10.1145/3564625.3567972</text:p>
          </table:table-cell>
          <table:table-cell table:style-name="ce2" office:value-type="string" calcext:value-type="string">
            <text:p>https://doi.org/10.1145/3564625.3567972</text:p>
          </table:table-cell>
          <table:table-cell table:style-name="ce2" table:number-columns-repeated="2"/>
          <table:table-cell table:style-name="ce2" office:value-type="string" calcext:value-type="string">
            <text:p>Anomaly Detection, Anomaly Diagnosis, Deep Learning, Discrete Event Log</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Microservice Security Metrics for Secure Communication, Identity Management, and Observability</text:p>
          </table:table-cell>
          <table:table-cell table:style-name="ce2" office:value-type="string" calcext:value-type="string">
            <text:p>Zdun, Uwe and Queval, Pierre-Jean and Simhandl, Georg and Scandariato, Riccardo and Chakravarty, Somik and Jelic, Marjan and Jovanovic, Aleksandar</text:p>
          </table:table-cell>
          <table:table-cell table:style-name="ce2" office:value-type="string" calcext:value-type="string">
            <text:p>ACM Trans. Softw. Eng. Methodol.</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32</text:p>
          </table:table-cell>
          <table:table-cell table:style-name="ce2" office:value-type="string" calcext:value-type="string">
            <text:p>Microservice architectures are increasingly being used to develop application systems. Despite many guidelines and best practices being published, architecting microservice systems for security is challenging. Reasons are the size and complexity of microservice systems, their polyglot nature, and the demand for the continuous evolution of these systems. In this context, to manually validate that security architecture tactics are employed as intended throughout the system is a time-consuming and error-prone task. In this article, we present an approach to avoid such manual validation before each continuous evolution step in a microservice system, which we demonstrate using three widely used categories of security tactics: secure communication, identity management, and observability. Our approach is based on a review of existing security guidelines, the gray literature, and the scientific literature, from which we derived Architectural Design Decisions (ADDs) with the found security tactics as decision options. In our approach, we propose novel detectors to detect these decision options automatically and formally defined metrics to measure the conformance of a system to the different options of the ADDs. We apply the approach to a case study data set of 10 open source microservice systems, plus another 20 variants of these systems, for which we manually inspected the source code for security tactics. We demonstrate and assess the validity and appropriateness of our metrics by performing an assessment of their conformance to the ADDs in our systems’ dataset through statistical methods.</text:p>
          </table:table-cell>
          <table:table-cell table:style-name="ce2"/>
          <table:table-cell table:style-name="ce2" office:value-type="string" calcext:value-type="string">
            <text:p>10.1145/3532183</text:p>
          </table:table-cell>
          <table:table-cell table:style-name="ce2" office:value-type="string" calcext:value-type="string">
            <text:p>https://doi.org/10.1145/3532183</text:p>
          </table:table-cell>
          <table:table-cell table:style-name="ce2" table:number-columns-repeated="2"/>
          <table:table-cell table:style-name="ce2" office:value-type="string" calcext:value-type="string">
            <text:p>Microservice architecture, microservice security, software architecture metrics, software architecture detectors</text:p>
          </table:table-cell>
          <table:table-cell table:style-name="ce2" office:value-type="string" calcext:value-type="string">
            <text:p>Association for Computing Machinery</text:p>
          </table:table-cell>
          <table:table-cell table:style-name="ce2" office:value-type="string" calcext:value-type="string">
            <text:p>1049-331X</text:p>
          </table:table-cell>
          <table:table-cell table:style-name="ce2" table:number-columns-repeated="3"/>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Co-evolution of component-based architecture-model and object-oriented source code</text:p>
          </table:table-cell>
          <table:table-cell table:style-name="ce2" office:value-type="string" calcext:value-type="string">
            <text:p>Langhammer, Michael</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37–42</text:p>
          </table:table-cell>
          <table:table-cell table:style-name="ce2"/>
          <table:table-cell table:style-name="ce2" office:value-type="string" calcext:value-type="string">
            <text:p>With the evolution of software systems, architecture model and system implementation tend to drift apart. While suitable architecture model supports architects and developers in better understanding the software system, the missing synchronization to source code of the underlying implementation can result in outdated architecture models. In this paper, we address two challenges in today's architecture-driven software development: architecture drift and architecture erosion. We introduce a co-evolution approach of a component-based architecture model and object-oriented source code. Our novel approach supports software architects and software developers by introducing a tight and continuous synchronization of a component-based architecture model and the source code. To get architecture evolution under control, our co-evolution approach maps architecture changes done via the source code to the architecture model and vice versa. This explicit support of changes and refactorings at architecture-level prevents unintended architecture violations. In order to evaluate our approach, we plan different case studies whose layout is designed in the evaluation section.</text:p>
          </table:table-cell>
          <table:table-cell table:style-name="ce2"/>
          <table:table-cell table:style-name="ce2" office:value-type="string" calcext:value-type="string">
            <text:p>10.1145/2465498.2465504</text:p>
          </table:table-cell>
          <table:table-cell table:style-name="ce2" office:value-type="string" calcext:value-type="string">
            <text:p>https://doi.org/10.1145/2465498.2465504</text:p>
          </table:table-cell>
          <table:table-cell table:style-name="ce2" table:number-columns-repeated="2"/>
          <table:table-cell table:style-name="ce2" office:value-type="string" calcext:value-type="string">
            <text:p>co-evolu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Type-Safe Dynamic Placement with First-Class Placed Values</text:p>
          </table:table-cell>
          <table:table-cell table:style-name="ce2" office:value-type="string" calcext:value-type="string">
            <text:p>Zakhour, George and Weisenburger, Pascal and Salvaneschi, Guido</text:p>
          </table:table-cell>
          <table:table-cell table:style-name="ce2" office:value-type="string" calcext:value-type="string">
            <text:p>Proc. ACM Program. Lang.</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7</text:p>
          </table:table-cell>
          <table:table-cell table:style-name="ce2" office:value-type="string" calcext:value-type="string">
            <text:p>Several distributed programming language solutions have been proposed to reason about the placement of data, computations, and peers interaction. Such solutions include, among the others, multitier programming, choreographic programming and various approaches based on behavioral types. These methods statically ensure safety properties thanks to a complete knowledge about placement of data and computation at compile time. In distributed systems, however, dynamic placement of computation and data is crucial to enable performance optimizations, e.g., driven by data locality or in presence of a number of other constraints such as security and compliance regarding data storage location. Unfortunately, in existing programming languages, dynamic placement conflicts with static reasoning about distributed programs: the flexibility required by dynamic placement hinders statically tracking the location of data and computation. <text:s text:c="2"/>In this paper we present Dyno, a programming language that enables static reasoning about dynamic placement. Dyno features a type system where values are explicitly placed, but in contrast to existing approaches, placed values are also first class, ensuring that they can be passed around and referred to from other locations. Building on top of this mechanism, we provide a novel interpretation of dynamic placement as unions of placement types. We formalize type soundness, placement correctness (as part of type soundness) and architecture conformance. In case studies and benchmarks, our evaluation shows that Dyno enables static reasoning about programs even in presence of dynamic placement, ensuring type safety and placement correctness of programs at negligible performance cost. We reimplement an Android app with ∼ 7 K LOC in Dyno, find a bug in the existing implementation, and show that the app's approach is representative of a common way to implement dynamic placement found in over 100 apps in a large open-source app store.</text:p>
          </table:table-cell>
          <table:table-cell table:style-name="ce2"/>
          <table:table-cell table:style-name="ce2" office:value-type="string" calcext:value-type="string">
            <text:p>10.1145/3622873</text:p>
          </table:table-cell>
          <table:table-cell table:style-name="ce2" office:value-type="string" calcext:value-type="string">
            <text:p>https://doi.org/10.1145/3622873</text:p>
          </table:table-cell>
          <table:table-cell table:style-name="ce2" table:number-columns-repeated="2"/>
          <table:table-cell table:style-name="ce2" office:value-type="string" calcext:value-type="string">
            <text:p>Distributed Programming, Dynamic Placement, Multitier Programming, Placement Types, Scala, Union Types</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Secure multicast for power grid communications</text:p>
          </table:table-cell>
          <table:table-cell table:style-name="ce2" office:value-type="string" calcext:value-type="string">
            <text:p>Zhang, Jianqing</text:p>
          </table:table-cell>
          <table:table-cell table:style-name="ce2"/>
          <table:table-cell table:style-name="ce2" office:value-type="string" calcext:value-type="string">
            <text:p>201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ecure multicast for power grid systems faces a number of challenges like complex and error-prone group configuration, inefficient group key management, real-time challenges to existing security protocols and the balance among correctness, efficiency, feasibility and cost. We propose an application-aware approach to setting up secure multicast for power grid communications that automatically derives group memberships and verifies configuration conformance from data dependencies in system specifications. We present an analytic publish-subscribe model, which formally depicts the relationships between data objects, publishers, subscribers and group controllers in a secure multicast system. Based on the model, we study anomalies in multicast functionality configurations like redundant and unauthorized publications, source-anomaly and data-dissatisfaction subscriptions. Algorithms are developed to detect the anomalies and verify the configuration conformance. A practical architecture is designed for automatic and error-resistant group configuration. It transforms the application layer system specifications to the network layer group security associations, policies and credentials. We also demonstrate the feasibility of raising link layer control messages to the network layer and protecting timing critical multicast traffic using one of the off-the-shelf network layer security protocols, namely IPsec. We provide experimental evidence that native IPsec multicast is capable of addressing latency constraints in medium scale networks.To evaluate the approach, we present a case study of IEC 61850 power substation networks and have developed a demo system, SecureSCL. The case study shows the benefits a real-world application gains from the automatically-generated group security configurations and demonstrates the practicality and efficiency of the approach.This work provides a cross-layer approach of automatically self-generated group configuration for power grid communications, addressing key concerns of both system implementation and conformance analysis. The proposed multicast model and verification mechanism can be extended for generic secure communication configurations. On the other hand, the prototype system SecureSCL has a potential of being developed into a realistic application for power substations.</text:p>
          </table:table-cell>
          <table:table-cell table:style-name="ce2" table:number-columns-repeated="6"/>
          <table:table-cell table:style-name="ce2" office:value-type="string" calcext:value-type="string">
            <text:p>University of Illinois at Urbana-Champaign</text:p>
          </table:table-cell>
          <table:table-cell table:style-name="ce2" table:number-columns-repeated="2"/>
          <table:table-cell table:style-name="ce2" office:value-type="string" calcext:value-type="string">
            <text:p>AAI345590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n Experimental Evaluation of Process Concept Drift Detection</text:p>
          </table:table-cell>
          <table:table-cell table:style-name="ce2" office:value-type="string" calcext:value-type="string">
            <text:p>Adams, Jan Niklas and Pitsch, Cameron and Brockhoff, Tobias and van der Aalst, Wil M. P.</text:p>
          </table:table-cell>
          <table:table-cell table:style-name="ce2" office:value-type="string" calcext:value-type="string">
            <text:p>Proc. VLDB Endow.</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856–1869</text:p>
          </table:table-cell>
          <table:table-cell table:style-name="ce2" office:value-type="string" calcext:value-type="string">
            <text:p>16</text:p>
          </table:table-cell>
          <table:table-cell table:style-name="ce2" office:value-type="string" calcext:value-type="string">
            <text:p>Process mining provides techniques to learn models from event data. These models can be descriptive (e.g., Petri nets) or predictive (e.g., neural networks). The learned models offer operational support to process owners by conformance checking, process enhancement, or predictive monitoring. However, processes are frequently subject to significant changes, making the learned models outdated and less valuable over time. To tackle this problem, Process Concept Drift (PCD) detection techniques are employed. By identifying when the process changes occur, one can replace learned models by relearning, updating, or discounting pre-drift knowledge. Various techniques to detect PCDs have been proposed. However, each technique's evaluation focuses on different evaluation goals out of accuracy, latency, versatility, scalability, parameter sensitivity, and robustness. Furthermore, the employed evaluation techniques and data sets differ. Since many techniques are not evaluated against more than one other technique, this lack of comparability raises one question: How do PCD detection techniques compare against each other? With this paper, we propose, implement, and apply a unified evaluation framework for PCD detection. We do this by collecting evaluation goals and evaluation techniques together with data sets. We derive a representative sample of techniques from a taxonomy for PCD detection. The implemented techniques and proposed evaluation framework are provided in a publicly available repository. We present the results of our experimental evaluation and observe that none of the implemented techniques works well across all evaluation goals. However, the results indicate future improvement points of algorithms and guide practitioners.</text:p>
          </table:table-cell>
          <table:table-cell table:style-name="ce2"/>
          <table:table-cell table:style-name="ce2" office:value-type="string" calcext:value-type="string">
            <text:p>10.14778/3594512.3594517</text:p>
          </table:table-cell>
          <table:table-cell table:style-name="ce2" office:value-type="string" calcext:value-type="string">
            <text:p>https://doi.org/10.14778/3594512.3594517</text:p>
          </table:table-cell>
          <table:table-cell table:style-name="ce2" table:number-columns-repeated="3"/>
          <table:table-cell table:style-name="ce2" office:value-type="string" calcext:value-type="string">
            <text:p>VLDB Endowment</text:p>
          </table:table-cell>
          <table:table-cell table:style-name="ce2" office:value-type="string" calcext:value-type="string">
            <text:p>2150-8097</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Consistency Management for Security Annotations for Continuous Verification</text:p>
          </table:table-cell>
          <table:table-cell table:style-name="ce2" office:value-type="string" calcext:value-type="string">
            <text:p>Reiche, Frederik and Weber, Thomas and Becker, Simeon and Weber, Sebastian and Heinrich, Robert and Burger, Erik</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1096–1105</text:p>
          </table:table-cell>
          <table:table-cell table:style-name="ce2"/>
          <table:table-cell table:style-name="ce2" office:value-type="string" calcext:value-type="string">
            <text:p>Analyses on the architecture of systems can yield valuable insights into a system even before it is built. The applicability of the results of these design time analyses to the system requires the system to be built according to its specification, i.e., to not violate constraints defined on the architecture. The conformance of the results of static code analyses and design time analyses ensures the system is built according to its specification. The first step for conforming results of these analyses is to ensure that the system and its specification is represented consistently in the input of the design time analysis and static code analysis, i.e., they comprise corresponding system elements and specifications for them. To achieve conforming inputs, we used consistency specifications between architecture and code models and implemented them between annotation models that enrich the architecture description with security annotations on the architecture level, as well as security annotations on the code level. This allows the continuous conformance checking during implementation and later during evolution of the system. We implemented the consistency specifications in the Vitruvius framework for an ADL and Java and tested it on case studies.</text:p>
          </table:table-cell>
          <table:table-cell table:style-name="ce2"/>
          <table:table-cell table:style-name="ce2" office:value-type="string" calcext:value-type="string">
            <text:p>10.1145/3652620.3687821</text:p>
          </table:table-cell>
          <table:table-cell table:style-name="ce2" office:value-type="string" calcext:value-type="string">
            <text:p>https://doi.org/10.1145/3652620.3687821</text:p>
          </table:table-cell>
          <table:table-cell table:style-name="ce2" table:number-columns-repeated="2"/>
          <table:table-cell table:style-name="ce2" office:value-type="string" calcext:value-type="string">
            <text:p>model-based analysis, consistency management, development framework, early and continuous verifica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PROVED: A Tool for Graph Representation and Analysis of Uncertain Event Data</text:p>
          </table:table-cell>
          <table:table-cell table:style-name="ce2" office:value-type="string" calcext:value-type="string">
            <text:p>Pegoraro, Marco and Uysal, Merih Seran and van der Aalst, Wil M. P.</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476–486</text:p>
          </table:table-cell>
          <table:table-cell table:style-name="ce2"/>
          <table:table-cell table:style-name="ce2" office:value-type="string" calcext:value-type="string">
            <text:p>The discipline of process mining aims to study processes in a data-driven manner by analyzing historical process executions, often employing Petri nets. Event data, extracted from information systems (e.g. SAP), serve as the starting point for process mining. Recently, novel types of event data have gathered interest among the process mining community, including uncertain event data. Uncertain events, process traces and logs contain attributes that are characterized by quantified imprecisions, e.g., a set of possible attribute values. The PROVED tool helps to explore, navigate and analyze such uncertain event data by abstracting the uncertain information using behavior graphs and nets, which have Petri nets semantics. Based on these constructs, the tool enables discovery and conformance checking.</text:p>
          </table:table-cell>
          <table:table-cell table:style-name="ce2"/>
          <table:table-cell table:style-name="ce2" office:value-type="string" calcext:value-type="string">
            <text:p>10.1007/978-3-030-76983-3_24</text:p>
          </table:table-cell>
          <table:table-cell table:style-name="ce2" office:value-type="string" calcext:value-type="string">
            <text:p>https://doi.org/10.1007/978-3-030-76983-3_24</text:p>
          </table:table-cell>
          <table:table-cell table:style-name="ce2" table:number-columns-repeated="2"/>
          <table:table-cell table:style-name="ce2" office:value-type="string" calcext:value-type="string">
            <text:p>Process mining, Uncertain data, Partial order, Petri net tool</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nalyzing Data Streams from Cyber-Physical-Systems: A Case Study</text:p>
          </table:table-cell>
          <table:table-cell table:style-name="ce2" office:value-type="string" calcext:value-type="string">
            <text:p>Beyel, Harry H. and Makke, Omar and Pourbafrani, Mahsa and Gusikhin, Oleg and van der Aalst, Wil M. P.</text:p>
          </table:table-cell>
          <table:table-cell table:style-name="ce2" office:value-type="string" calcext:value-type="string">
            <text:p>SN Comput. Sci.</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5</text:p>
          </table:table-cell>
          <table:table-cell table:style-name="ce2" office:value-type="string" calcext:value-type="string">
            <text:p>We show that conducting a process-mining-centric analysis concerning cyber-physical systems provides insights into usage behavior. To show that, we perform our analysis on connected-vehicle data. We transform connected-vehicle data into an event log. We analyze the resulting event log using various process-mining techniques. In particular, we apply basic statistical analysis as well as process-discovery and conformance-checking techniques to receive a well-representative process model. We apply various process-enhancement techniques to get deeper insights. Finally, we capture a multi-perspective view using a state-based approach. We show deviations between a de-jure model and our picked process model, leading to better knowledge concerning real user behavior. We observed that the predefined escalation of warning states does not happen. Additionally, we verified system requirements. Furthermore, we show that the reasons for drivers’ behavior are not related to system issues. Applying process-mining techniques to data concerning cyber-physical systems provides valuable insights into their functionality in a real-world setting. By utilizing process-mining techniques, we can extract insights to a human-understandable level and provide a well-studied access point.</text:p>
          </table:table-cell>
          <table:table-cell table:style-name="ce2"/>
          <table:table-cell table:style-name="ce2" office:value-type="string" calcext:value-type="string">
            <text:p>10.1007/s42979-024-03008-8</text:p>
          </table:table-cell>
          <table:table-cell table:style-name="ce2" office:value-type="string" calcext:value-type="string">
            <text:p>https://doi.org/10.1007/s42979-024-03008-8</text:p>
          </table:table-cell>
          <table:table-cell table:style-name="ce2" table:number-columns-repeated="2"/>
          <table:table-cell table:style-name="ce2" office:value-type="string" calcext:value-type="string">
            <text:p>Process mining, Connected vehicles, Internet of Things, Cyber-physical systems</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Supporting Software Evolution by Integrating DSL-based Architectural Abstraction and Understandability Related Metrics</text:p>
          </table:table-cell>
          <table:table-cell table:style-name="ce2" office:value-type="string" calcext:value-type="string">
            <text:p>Stevanetic, Srdjan and Haitzer, Thomas and Zdun, Uwe</text:p>
          </table:table-cell>
          <table:table-cell table:style-name="ce2"/>
          <table:table-cell table:style-name="ce2" office:value-type="string" calcext:value-type="string">
            <text:p>2014</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oftware architecture erosion and architectural drift are well known software evolution problems. While there exist a number of approaches to address these problems, so far in these approaches the understandability of the resulting architectural models (e.g., component models) is seldom studied. However, reduced understandability of the architectural models might lead to problems similar to architecture erosion and architectural drift. To address this problem, we propose to extend our existing DSL-based architecture abstraction approach with empirically evaluated understandability metrics. While the DSL-based architecture abstraction approach enables software architects to keep source code and architecture consistent, the understandability metrics extensions enables them, while working with the DSL, to continuously judge the understandability of the architectural component models they create with the DSL. We studied the applicability of our approach in a case study of an existing open source system.</text:p>
          </table:table-cell>
          <table:table-cell table:style-name="ce2"/>
          <table:table-cell table:style-name="ce2" office:value-type="string" calcext:value-type="string">
            <text:p>10.1145/2642803.2642822</text:p>
          </table:table-cell>
          <table:table-cell table:style-name="ce2" office:value-type="string" calcext:value-type="string">
            <text:p>https://doi.org/10.1145/2642803.2642822</text:p>
          </table:table-cell>
          <table:table-cell table:style-name="ce2" table:number-columns-repeated="2"/>
          <table:table-cell table:style-name="ce2" office:value-type="string" calcext:value-type="string">
            <text:p>Architectural Abstraction, Architectural Component Views, DSL, Empirical Evaluation, Software Evolution, Software Metrics, Understandability</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Unsupervised Learning and Process Analysis for Sensor Data Validation in the IIoT</text:p>
          </table:table-cell>
          <table:table-cell table:style-name="ce2" office:value-type="string" calcext:value-type="string">
            <text:p>Husom, Erik Johannes and Goknil, Arda and Mannhardt, Felix and Tverdal, Simeon and Sen, Sagar and Nguyen, Phu</text:p>
          </table:table-cell>
          <table:table-cell table:style-name="ce2" office:value-type="string" calcext:value-type="string">
            <text:p>ACM Trans. Internet Technol.</text:p>
          </table:table-cell>
          <table:table-cell table:style-name="ce2" office:value-type="string" calcext:value-type="string">
            <text:p>2026</text:p>
          </table:table-cell>
          <table:table-cell table:style-name="ce2" office:value-type="string" calcext:value-type="string">
            <text:p>ACM Digital Library</text:p>
          </table:table-cell>
          <table:table-cell table:style-name="ce2"/>
          <table:table-cell table:style-name="ce2" office:value-type="string" calcext:value-type="string">
            <text:p>26</text:p>
          </table:table-cell>
          <table:table-cell table:style-name="ce2" office:value-type="string" calcext:value-type="string">
            <text:p>Integrating Artificial Intelligence (AI) with the Industrial Internet of Things (IIoT) has transformed industrial processes, enhancing productivity, quality control, and operational efficiency. However, ensuring the precision and reliability of sensor-generated data remains a critical challenge due to the evolving nature of industrial processes and the limitations of conventional validation methods. Traditional rule-based and supervised learning approaches struggle to adapt to process shifts, drifts, and novel anomalies, making sensor data validation an ongoing issue. This article introduces UDAVA (Unsupervised Learning Approach using Process Mining for Sensor Data Validation in IIoT), a novel AI-driven pipeline designed to automate the identification of reference patterns in sensor data and validate subsequent production cycles by recognizing deviations from expected behaviors. UDAVA employs a multi-stage process that includes preprocessing sensor data, clustering recurring patterns, and assessing deviations. It supports semi-supervised learning by integrating manual labels where available, improving interpretability and accuracy. One of UDAVA’s key strengths lies in its ability to extract features from sensor data rather than relying on raw time series similarity, making it robust against noise and diverse process variations. Additionally, UDAVA integrates process mining techniques—process discovery and conformance checking—to enhance its ability to detect even subtle anomalies and deviations in industrial workflows. We conduct a comprehensive evaluation of UDAVA using three industrial datasets, demonstrating its effectiveness in identifying high-level process behaviors, detecting process shifts and drifts, and ensuring data validation across multiple production cycles. The results highlight UDAVA ’s adaptability across different industrial processes, making it a valuable tool for optimizing operations and ensuring sensor data reliability in IIoT environments.</text:p>
          </table:table-cell>
          <table:table-cell table:style-name="ce2"/>
          <table:table-cell table:style-name="ce2" office:value-type="string" calcext:value-type="string">
            <text:p>10.1145/3777897</text:p>
          </table:table-cell>
          <table:table-cell table:style-name="ce2" office:value-type="string" calcext:value-type="string">
            <text:p>https://doi.org/10.1145/3777897</text:p>
          </table:table-cell>
          <table:table-cell table:style-name="ce2" table:number-columns-repeated="2"/>
          <table:table-cell table:style-name="ce2" office:value-type="string" calcext:value-type="string">
            <text:p>Unsupervised learning, IIoT, process mining, data reliability</text:p>
          </table:table-cell>
          <table:table-cell table:style-name="ce2" office:value-type="string" calcext:value-type="string">
            <text:p>Association for Computing Machinery</text:p>
          </table:table-cell>
          <table:table-cell table:style-name="ce2" office:value-type="string" calcext:value-type="string">
            <text:p>1533-5399</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Towards integrating process mining with agent-based modeling and simulation: State of the art and outlook</text:p>
          </table:table-cell>
          <table:table-cell table:style-name="ce2" office:value-type="string" calcext:value-type="string">
            <text:p>Bemthuis, Rob H. and Lazarova-Molnar, Sanja</text:p>
          </table:table-cell>
          <table:table-cell table:style-name="ce2" office:value-type="string" calcext:value-type="string">
            <text:p>Expert Syst. Appl.</text:p>
          </table:table-cell>
          <table:table-cell table:style-name="ce2" office:value-type="string" calcext:value-type="string">
            <text:p>2025</text:p>
          </table:table-cell>
          <table:table-cell table:style-name="ce2" office:value-type="string" calcext:value-type="string">
            <text:p>ACM Digital Library</text:p>
          </table:table-cell>
          <table:table-cell table:style-name="ce2"/>
          <table:table-cell table:style-name="ce2" office:value-type="string" calcext:value-type="string">
            <text:p>281</text:p>
          </table:table-cell>
          <table:table-cell table:style-name="ce2" office:value-type="string" calcext:value-type="string">
            <text:p>Agent-based modeling and simulation (ABMS) is a valuable tool for assessing complex socio-technical systems and is becoming increasingly advanced through the integration with data-driven capabilities. Process mining is an emerging data-driven discipline that combines elements from data mining and process modeling to gain insights into process execution through tasks such as process discovery, conformance checking, and process enhancement using event data. This study explores the role of process mining and its impact on the ABMS paradigm, identifying the current state of the art, gaps in the literature, and future directions for integrating process mining with ABMS. A systematic literature review is conducted to examine how ABMS and process mining techniques are jointly employed to address challenges reported in the literature. From an initial pool of 189 publications, a final set of 20 papers was synthesized, their primary contributions were discussed, and open issues and challenges for future research were identified. Although the integrated field of process mining and ABMS shows an upward trend in publications, it remains modest and requires further efforts to achieve synergistic improvements in socio-technical systems. The findings offer initial guidance for promising research directions.</text:p>
          </table:table-cell>
          <table:table-cell table:style-name="ce2"/>
          <table:table-cell table:style-name="ce2" office:value-type="string" calcext:value-type="string">
            <text:p>10.1016/j.eswa.2025.127571</text:p>
          </table:table-cell>
          <table:table-cell table:style-name="ce2" office:value-type="string" calcext:value-type="string">
            <text:p>https://doi.org/10.1016/j.eswa.2025.127571</text:p>
          </table:table-cell>
          <table:table-cell table:style-name="ce2" table:number-columns-repeated="2"/>
          <table:table-cell table:style-name="ce2" office:value-type="string" calcext:value-type="string">
            <text:p>Agent-based modeling, Agent-based simulation, Process mining, Systematic literature review</text:p>
          </table:table-cell>
          <table:table-cell table:style-name="ce2" office:value-type="string" calcext:value-type="string">
            <text:p>Pergamon Press, Inc.</text:p>
          </table:table-cell>
          <table:table-cell table:style-name="ce2" office:value-type="string" calcext:value-type="string">
            <text:p>0957-4174</text:p>
          </table:table-cell>
          <table:table-cell table:style-name="ce2" table:number-columns-repeated="2"/>
          <table:table-cell table:style-name="ce2" office:value-type="string" calcext:value-type="string">
            <text:p>Secondary studies, such as Systematic Literature Reviews (SLRs), Mapping Studies (SMS), Multivocal Reviews (MLRs), or surveys.</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3</text:p>
          </table:table-cell>
          <table:table-cell table:style-name="ce4" office:value-type="string" calcext:value-type="string">
            <text:p>Study is a secondary study (SLR, SMS, survey).</text:p>
          </table:table-cell>
          <table:table-cell table:style-name="ce4" office:value-type="string" calcext:value-type="string">
            <text:p>REJECTED</text:p>
          </table:table-cell>
          <table:table-cell table:style-name="ce4" office:value-type="string" calcext:value-type="string">
            <text:p>EC3</text:p>
          </table:table-cell>
          <table:table-cell table:style-name="ce4" office:value-type="string" calcext:value-type="string">
            <text:p>The study is a secondary study (review or survey).</text:p>
          </table:table-cell>
          <table:table-cell table:number-columns-repeated="998"/>
        </table:table-row>
        <table:table-row table:style-name="ro1">
          <table:table-cell table:style-name="ce2" office:value-type="string" calcext:value-type="string">
            <text:p>Anomaly Classification to&amp;nbsp;Enable Self-healing in&amp;nbsp;Cyber Physical Systems Using Process Mining</text:p>
          </table:table-cell>
          <table:table-cell table:style-name="ce2" office:value-type="string" calcext:value-type="string">
            <text:p>Singh, Uphar and Gajjala, Deepak and Khondoker, Rahamatullah and Gupta, Harshit and Sinha, Ayush and Vyas, O. P.</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15</text:p>
          </table:table-cell>
          <table:table-cell table:style-name="ce2"/>
          <table:table-cell table:style-name="ce2" office:value-type="string" calcext:value-type="string">
            <text:p>Industrial Cyber Physical Systems (CPS) are large-scale critical infrastructures that are vulnerable to cyberattacks with wide-ranging consequences. Being a combination of heterogeneous devices and protocols, the large-scale CPS anomaly is also exposed to critical vulnerabilities. These vulnerabilities are treated in terms of anomalies and cyberattacks, and their detection and corresponding self-healing mechanisms on large-scale critical infrastructures can be challenging because of their massive size and interconnections. With the objective of process optimization through anomaly detection and conformance-checking approach, the present work addresses different issues, such as event log generation with tools such as PLG 2.0 for data-driven approach. Self-healing is enabled through machine learning models based on anomaly classification ensemble learning-based machine learning models. The work uses process mining to analyze event log files, and then combinations of conformance-checking methods with ensemble classification models were used to best classify anomalies. Finally, the proposed work establishes that, in comparison to techniques like KNN and C-SVC, the proposed ensemble models perform better, with an accuracy of 84.7% using trace alignment as a conformance technique with gradient boosting to classify anomalies, with the end objectives of process improvement.</text:p>
          </table:table-cell>
          <table:table-cell table:style-name="ce2"/>
          <table:table-cell table:style-name="ce2" office:value-type="string" calcext:value-type="string">
            <text:p>10.1007/978-3-031-44505-7_1</text:p>
          </table:table-cell>
          <table:table-cell table:style-name="ce2" office:value-type="string" calcext:value-type="string">
            <text:p>https://doi.org/10.1007/978-3-031-44505-7_1</text:p>
          </table:table-cell>
          <table:table-cell table:style-name="ce2" table:number-columns-repeated="2"/>
          <table:table-cell table:style-name="ce2" office:value-type="string" calcext:value-type="string">
            <text:p>Cybersecurity, Process Mining, Cyber Physical Sytems, Anomaly Detection, Anomaly Classification, Self Heal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Towards Trace Variant Explainability</text:p>
          </table:table-cell>
          <table:table-cell table:style-name="ce2" office:value-type="string" calcext:value-type="string">
            <text:p>Grigore, Iuliana Malina and Marques Tavares, Gabriel and Pasquadibisceglie, Vincenzo and Seidl, Thomas and Barbon Junior, Sylvio</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95–110</text:p>
          </table:table-cell>
          <table:table-cell table:style-name="ce2"/>
          <table:table-cell table:style-name="ce2" office:value-type="string" calcext:value-type="string">
            <text:p>Understanding process variability remains a key challenge in process mining, especially when analyzing trace variants that capture diverse behavioral patterns in modern systems characterized by high data volume and complexity. In this paper, we propose a multiview explanation framework that enables interpretable analysis of trace variants through both global and local explanations. Our approach first encodes traces using multiple views—including activity, transition, case, and event-level information—applying nominal and time-based strategies suited to structural and performance aspects. Then, it introduces a dual-layer explanation mechanism: at the global level, variant representatives are compared to a global behavioral profile to highlight key differentiating features; at the local level, individual traces are contrasted with their assigned representatives to reveal the specific factors driving their inclusion. The framework is compatible with various variant analysis techniques, as long as a representative (e.g., medoid or central node) can be defined. We demonstrate the method’s effectiveness using benchmark event logs and interpretable visualizations, showing how it supports transparency, trust, and diagnostic insight in trace variant analysis.</text:p>
          </table:table-cell>
          <table:table-cell table:style-name="ce2"/>
          <table:table-cell table:style-name="ce2" office:value-type="string" calcext:value-type="string">
            <text:p>10.1007/978-3-032-05281-0_7</text:p>
          </table:table-cell>
          <table:table-cell table:style-name="ce2" office:value-type="string" calcext:value-type="string">
            <text:p>https://doi.org/10.1007/978-3-032-05281-0_7</text:p>
          </table:table-cell>
          <table:table-cell table:style-name="ce2" table:number-columns-repeated="2"/>
          <table:table-cell table:style-name="ce2" office:value-type="string" calcext:value-type="string">
            <text:p>Process mining, Conformance Checking, Clustering, Explainability, Variant analysis, Multi-perspective</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Monitoring Behavioral Compliance with Architectural Patterns Based on&amp;nbsp;Complex Event Processing</text:p>
          </table:table-cell>
          <table:table-cell table:style-name="ce2" office:value-type="string" calcext:value-type="string">
            <text:p>Krieger, Christoph and Breitenb\"{u}cher, Uwe and Falkenthal, Michael and Leymann, Frank and Yussupov, Vladimir and Zdun, Uwe</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125–140</text:p>
          </table:table-cell>
          <table:table-cell table:style-name="ce2"/>
          <table:table-cell table:style-name="ce2" office:value-type="string" calcext:value-type="string">
            <text:p>Architectural patterns assist in the process of architectural decision making as they capture architectural aspects of proven solutions. In many cases, the chosen patterns have system-wide implications on non-functional requirements such as availability, performance, and resilience. Ensuring compliance with the selected patterns is of vital importance to avoid architectural drift between the implementation and its desired architecture. Most of the patterns not only capture structural but also significant behavioral architectural aspects that need to be checked. In case all properties of the system are known before runtime, static compliance checks of application code and configuration files might be sufficient. However, in case aspects of the system dynamically evolve, e.g., due to manual reconfiguration, compliance with the architectural patterns also needs to be monitored during runtime. In this paper, we propose to link compliance rules to architectural patterns that specify behavioral aspects of the patterns based on runtime events using stream queries. These queries serve as input for a complex event processing component to automatically monitor architecture compliance of a running system. To validate the practical feasibility, we applied the approach to a set of architectural patterns in the domain of distributed systems and prototypically implemented a compliance monitor.</text:p>
          </table:table-cell>
          <table:table-cell table:style-name="ce2"/>
          <table:table-cell table:style-name="ce2" office:value-type="string" calcext:value-type="string">
            <text:p>10.1007/978-3-030-44769-4_10</text:p>
          </table:table-cell>
          <table:table-cell table:style-name="ce2" office:value-type="string" calcext:value-type="string">
            <text:p>https://doi.org/10.1007/978-3-030-44769-4_10</text:p>
          </table:table-cell>
          <table:table-cell table:style-name="ce2" table:number-columns-repeated="2"/>
          <table:table-cell table:style-name="ce2" office:value-type="string" calcext:value-type="string">
            <text:p>Architecture compliance, Architectural patterns, Behavioral compliance monitoring, Complex event process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Replaying history on process models for conformance checking and performance analysis</text:p>
          </table:table-cell>
          <table:table-cell table:style-name="ce2" office:value-type="string" calcext:value-type="string">
            <text:p>van der Aalst, Wil and Adriansyah, Arya and van Dongen, Boudewijn</text:p>
          </table:table-cell>
          <table:table-cell table:style-name="ce2" office:value-type="string" calcext:value-type="string">
            <text:p>Wiley Int. Rev. Data Min. and Knowl. Disc.</text:p>
          </table:table-cell>
          <table:table-cell table:style-name="ce2" office:value-type="string" calcext:value-type="string">
            <text:p>2012</text:p>
          </table:table-cell>
          <table:table-cell table:style-name="ce2" office:value-type="string" calcext:value-type="string">
            <text:p>ACM Digital Library</text:p>
          </table:table-cell>
          <table:table-cell table:style-name="ce2" office:value-type="string" calcext:value-type="string">
            <text:p>182–192</text:p>
          </table:table-cell>
          <table:table-cell table:style-name="ce2" office:value-type="string" calcext:value-type="string">
            <text:p>2</text:p>
          </table:table-cell>
          <table:table-cell table:style-name="ce2" office:value-type="string" calcext:value-type="string">
            <text:p>Process mining techniques use event data to discover process models, to check the conformance of predefined process models, and to extend such models with information about bottlenecks, decisions, and resource usage. These techniques are driven by observed events rather than hand-made models. Event logs are used to learn and enrich process models. By replaying history using the model, it is possible to establish a precise relationship between events and model elements. This relationship can be used to check conformance and to analyze performance. For example, it is possible to diagnose deviations from the modeled behavior. The severity of each deviation can be quantified. Moreover, the relationship established during replay and the timestamps in the event log can be combined to show bottlenecks. These examples illustrate the importance of maintaining a proper alignment between event log and process model. Therefore, we elaborate on the realization of such alignments and their application to conformance checking and performance analysis. © 2012 Wiley Periodicals, Inc. © 2012 Wiley Periodicals, Inc.</text:p>
          </table:table-cell>
          <table:table-cell table:style-name="ce2"/>
          <table:table-cell table:style-name="ce2" office:value-type="string" calcext:value-type="string">
            <text:p>10.1002/widm.1045</text:p>
          </table:table-cell>
          <table:table-cell table:style-name="ce2" office:value-type="string" calcext:value-type="string">
            <text:p>https://doi.org/10.1002/widm.1045</text:p>
          </table:table-cell>
          <table:table-cell table:style-name="ce2" table:number-columns-repeated="2"/>
          <table:table-cell table:style-name="ce2" office:value-type="string" calcext:value-type="string">
            <text:p>Association Rules, Business and Industry, Data Concepts, Spatial and Temporal Data Mining</text:p>
          </table:table-cell>
          <table:table-cell table:style-name="ce2" office:value-type="string" calcext:value-type="string">
            <text:p>John Wiley &amp;amp; Sons, Inc.</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Checking conformance of applications against GUI policies</text:p>
          </table:table-cell>
          <table:table-cell table:style-name="ce2" office:value-type="string" calcext:value-type="string">
            <text:p>Zhang, Zhen and Feng, Yu and Ernst, Michael D. and Porst, Sebastian and Dillig, Isil</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95–106</text:p>
          </table:table-cell>
          <table:table-cell table:style-name="ce2"/>
          <table:table-cell table:style-name="ce2" office:value-type="string" calcext:value-type="string">
            <text:p>A good graphical user interface (GUI) is crucial for an application's usability, so vendors and regulatory agencies increasingly place restrictions on how GUI elements should appear to and interact with users. Motivated by this concern, this paper presents a new technique (based on static analysis) for checking conformance between (Android) applications and GUI policies expressed in a formal specification language. In particular, this paper (1) describes a specification language for formalizing GUI policies, (2) proposes a new program abstraction called an _event-driven layout forest_, and (3) describes a static analysis for constructing this abstraction and checking it against a GUI policy. We have implemented the proposed approach in a tool called Venus, and we evaluate it on 2361 Android applications and 17 policies. Our evaluation shows that Venus can uncover malicious applications that perform ad fraud and identify violations of GUI design guidelines and GDPR laws.</text:p>
          </table:table-cell>
          <table:table-cell table:style-name="ce2"/>
          <table:table-cell table:style-name="ce2" office:value-type="string" calcext:value-type="string">
            <text:p>10.1145/3468264.3468561</text:p>
          </table:table-cell>
          <table:table-cell table:style-name="ce2" office:value-type="string" calcext:value-type="string">
            <text:p>https://doi.org/10.1145/3468264.3468561</text:p>
          </table:table-cell>
          <table:table-cell table:style-name="ce2" table:number-columns-repeated="2"/>
          <table:table-cell table:style-name="ce2" office:value-type="string" calcext:value-type="string">
            <text:p>Android, ad fraud, mobile app, static analysis, user interface</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Efficient Optimal Alignment Between Dynamic Condition Response Graphs and&amp;nbsp;Traces</text:p>
          </table:table-cell>
          <table:table-cell table:style-name="ce2" office:value-type="string" calcext:value-type="string">
            <text:p>Christfort, Axel Kjeld Fjelrad and Slaats, Tijs</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3–19</text:p>
          </table:table-cell>
          <table:table-cell table:style-name="ce2"/>
          <table:table-cell table:style-name="ce2" office:value-type="string" calcext:value-type="string">
            <text:p>Dynamic Condition Response (DCR) Graphs is a popular declarative process modelling notation which is supported by commercial modelling tools and has seen significant industrial adoption. The problem of aligning traces with DCR Graphs, with it’s multitude of applications such as conformance checking and log repair, has surprisingly not been solved yet. In this paper we address this open gap in the research by developing an algorithm for efficiently computing the optimal alignment of a DCR Graph and a trace. We evaluate the algorithm on the PDC 2022 dataset, showing that even for large models and traces alignment problems can be solved within milliseconds, and present a case study based on test-driven modelling.</text:p>
          </table:table-cell>
          <table:table-cell table:style-name="ce2"/>
          <table:table-cell table:style-name="ce2" office:value-type="string" calcext:value-type="string">
            <text:p>10.1007/978-3-031-41620-0_1</text:p>
          </table:table-cell>
          <table:table-cell table:style-name="ce2" office:value-type="string" calcext:value-type="string">
            <text:p>https://doi.org/10.1007/978-3-031-41620-0_1</text:p>
          </table:table-cell>
          <table:table-cell table:style-name="ce2" table:number-columns-repeated="2"/>
          <table:table-cell table:style-name="ce2" office:value-type="string" calcext:value-type="string">
            <text:p>Trace alignment, DCR graphs, Conformance checking, Declarative process models, Test-driven Modell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ssessing architectural drift in commercial software development: a case study</text:p>
          </table:table-cell>
          <table:table-cell table:style-name="ce2" office:value-type="string" calcext:value-type="string">
            <text:p>Rosik, Jacek and Le Gear, Andrew and Buckley, Jim and Babar, Muhammad Ali and Connolly, Dave</text:p>
          </table:table-cell>
          <table:table-cell table:style-name="ce2" office:value-type="string" calcext:value-type="string">
            <text:p>Softw. Pract. Exper.</text:p>
          </table:table-cell>
          <table:table-cell table:style-name="ce2" office:value-type="string" calcext:value-type="string">
            <text:p>2011</text:p>
          </table:table-cell>
          <table:table-cell table:style-name="ce2" office:value-type="string" calcext:value-type="string">
            <text:p>ACM Digital Library</text:p>
          </table:table-cell>
          <table:table-cell table:style-name="ce2" office:value-type="string" calcext:value-type="string">
            <text:p>63–86</text:p>
          </table:table-cell>
          <table:table-cell table:style-name="ce2" office:value-type="string" calcext:value-type="string">
            <text:p>41</text:p>
          </table:table-cell>
          <table:table-cell table:style-name="ce2"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Copyright © 2010 John Wiley &amp;amp; Sons, Ltd.</text:p>
          </table:table-cell>
          <table:table-cell table:style-name="ce2"/>
          <table:table-cell table:style-name="ce2" office:value-type="string" calcext:value-type="string">
            <text:p>10.1002/spe.999</text:p>
          </table:table-cell>
          <table:table-cell table:style-name="ce2" office:value-type="string" calcext:value-type="string">
            <text:p>https://doi.org/10.1002/spe.999</text:p>
          </table:table-cell>
          <table:table-cell table:style-name="ce2" table:number-columns-repeated="2"/>
          <table:table-cell table:style-name="ce2" office:value-type="string" calcext:value-type="string">
            <text:p>architecture consistency, architecture degeneration, reflection models, software/program verification</text:p>
          </table:table-cell>
          <table:table-cell table:style-name="ce2" office:value-type="string" calcext:value-type="string">
            <text:p>John Wiley &amp;amp; Sons, Inc.</text:p>
          </table:table-cell>
          <table:table-cell table:style-name="ce2" office:value-type="string" calcext:value-type="string">
            <text:p>0038-0644</text:p>
          </table:table-cell>
          <table:table-cell table:style-name="ce2" table:number-columns-repeated="3"/>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n industrial case study of architecture conformance</text:p>
          </table:table-cell>
          <table:table-cell table:style-name="ce2" office:value-type="string" calcext:value-type="string">
            <text:p>Rosik, Jacek and Le Gear, Andrew and Buckley, Jim and Ali Babar, Muhammad</text:p>
          </table:table-cell>
          <table:table-cell table:style-name="ce2"/>
          <table:table-cell table:style-name="ce2" office:value-type="string" calcext:value-type="string">
            <text:p>2008</text:p>
          </table:table-cell>
          <table:table-cell table:style-name="ce2" office:value-type="string" calcext:value-type="string">
            <text:p>ACM Digital Library</text:p>
          </table:table-cell>
          <table:table-cell table:style-name="ce2" office:value-type="string" calcext:value-type="string">
            <text:p>80–89</text:p>
          </table:table-cell>
          <table:table-cell table:style-name="ce2"/>
          <table:table-cell table:style-name="ce2" office:value-type="string" calcext:value-type="string">
            <text:p>A software designer often has little control over, or means of checking, whether his design is being adhered to, once the implementation begins. This 'architectural drift', where the original design of the system and the as-implemented design of the system diverge, can cause serious problems for evolution, maintenance and the comprehensibility of a system if it remains undocumented or uncorrected. The earlier such discrepancies can be identified, the better.This paper reports on a case study designed to evaluate a proposed approach for monitoring architectural drift during software development. The proposed approach differs significantly from existing design conformance approaches in that it has been designed for application within a forward engineering context. The findings show the utility of the approach in identifying architectural drift but also illustrate a number of improvements that could be made to the technique to further promote architecture conformance.</text:p>
          </table:table-cell>
          <table:table-cell table:style-name="ce2"/>
          <table:table-cell table:style-name="ce2" office:value-type="string" calcext:value-type="string">
            <text:p>10.1145/1414004.1414019</text:p>
          </table:table-cell>
          <table:table-cell table:style-name="ce2" office:value-type="string" calcext:value-type="string">
            <text:p>https://doi.org/10.1145/1414004.1414019</text:p>
          </table:table-cell>
          <table:table-cell table:style-name="ce2" table:number-columns-repeated="2"/>
          <table:table-cell table:style-name="ce2" office:value-type="string" calcext:value-type="string">
            <text:p>architectural drift, architecture conformance, industrial experience, reflexion modell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Detecting deviations in the code using architecture view-based drift analysis</text:p>
          </table:table-cell>
          <table:table-cell table:style-name="ce2" office:value-type="string" calcext:value-type="string">
            <text:p>Uzun, Burak and Tekinerdogan, Bedir</text:p>
          </table:table-cell>
          <table:table-cell table:style-name="ce2" office:value-type="string" calcext:value-type="string">
            <text:p>Comput. Stand. Interfaces</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87</text:p>
          </table:table-cell>
          <table:table-cell table:style-name="ce2" table:number-columns-repeated="2"/>
          <table:table-cell table:style-name="ce2" office:value-type="string" calcext:value-type="string">
            <text:p>10.1016/j.csi.2023.103774</text:p>
          </table:table-cell>
          <table:table-cell table:style-name="ce2" office:value-type="string" calcext:value-type="string">
            <text:p>https://doi.org/10.1016/j.csi.2023.103774</text:p>
          </table:table-cell>
          <table:table-cell table:style-name="ce2" table:number-columns-repeated="2"/>
          <table:table-cell table:style-name="ce2" office:value-type="string" calcext:value-type="string">
            <text:p>Software architecture reconstruction, Model-driven development, Architecture drift analysis, Architecture drift</text:p>
          </table:table-cell>
          <table:table-cell table:style-name="ce2" office:value-type="string" calcext:value-type="string">
            <text:p>Elsevier Science Publishers B. V.</text:p>
          </table:table-cell>
          <table:table-cell table:style-name="ce2" office:value-type="string" calcext:value-type="string">
            <text:p>0920-5489</text:p>
          </table:table-cell>
          <table:table-cell table:style-name="ce2" table:number-columns-repeated="3"/>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Conformance checking and performance improvement in scheduled processes</text:p>
          </table:table-cell>
          <table:table-cell table:style-name="ce2" office:value-type="string" calcext:value-type="string">
            <text:p>Senderovich, Arik and Weidlich, Matthias and Yedidsion, Liron and Gal, Avigdor and Mandelbaum, Avishai and Kadish, Sarah and Bunnell, Craig A.</text:p>
          </table:table-cell>
          <table:table-cell table:style-name="ce2" office:value-type="string" calcext:value-type="string">
            <text:p>Inf. Syst.</text:p>
          </table:table-cell>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185–206</text:p>
          </table:table-cell>
          <table:table-cell table:style-name="ce2" office:value-type="string" calcext:value-type="string">
            <text:p>62</text:p>
          </table:table-cell>
          <table:table-cell table:style-name="ce2" office:value-type="string" calcext:value-type="string">
            <text:p>Service processes, for example in transportation, telecommunications or the health sector, are the backbone of today's economies. Conceptual models of service processes enable operational analysis that supports, e.g., resource provisioning or delay prediction. In the presence of event logs containing recorded traces of process execution, such operational models can be mined automatically.In this work, we target the analysis of resource-driven, scheduled processes based on event logs. We focus on processes for which there exists a pre-defined assignment of activity instances to resources that execute activities. Specifically, we approach the questions of conformance checking (how to assess the conformance of the schedule and the actual process execution) and performance improvement (how to improve the operational process performance). The first question is addressed based on a queueing network for both the schedule and the actual process execution. Based on these models, we detect operational deviations and then apply statistical inference and similarity measures to validate the scheduling assumptions, thereby identifying root-causes for these deviations. These results are the starting point for our technique to improve the operational performance. It suggests adaptations of the scheduling policy of the service process to decrease the tardiness (non-punctuality) and lower the flow time. We demonstrate the value of our approach based on a real-world dataset comprising clinical pathways of an outpatient clinic that have been recorded by a real-time location system (RTLS). Our results indicate that the presented technique enables localization of operational bottlenecks along with their root-causes, while our improvement technique yields a decrease in median tardiness and flow time by more than 20%. HighlightsWe provide a broad extension to the notions of conceptual, operational and continuous conformance checking techniques.We present novel theoretical results in terms of scheduling algorithms for Fork/Join networks that re-sequence arriving cases. We prove that these scheduling algorithms are guaranteed to never perform worse than the baseline approach.We test the new techniques for process improvement on real-world data, and show that the proposed algorithms yield a 20%-40% improvement in median flow time and tardiness.</text:p>
          </table:table-cell>
          <table:table-cell table:style-name="ce2"/>
          <table:table-cell table:style-name="ce2" office:value-type="string" calcext:value-type="string">
            <text:p>10.1016/j.is.2016.01.002</text:p>
          </table:table-cell>
          <table:table-cell table:style-name="ce2" office:value-type="string" calcext:value-type="string">
            <text:p>https://doi.org/10.1016/j.is.2016.01.002</text:p>
          </table:table-cell>
          <table:table-cell table:style-name="ce2" table:number-columns-repeated="2"/>
          <table:table-cell table:style-name="ce2" office:value-type="string" calcext:value-type="string">
            <text:p>Conformance checking, Process improvement, Process mining, Queueing networks, Scheduled processes, Scheduling, Statistical inference</text:p>
          </table:table-cell>
          <table:table-cell table:style-name="ce2" office:value-type="string" calcext:value-type="string">
            <text:p>Elsevier Science Ltd.</text:p>
          </table:table-cell>
          <table:table-cell table:style-name="ce2" office:value-type="string" calcext:value-type="string">
            <text:p>0306-4379</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Complementing model-driven development for the detection of software architecture erosion</text:p>
          </table:table-cell>
          <table:table-cell table:style-name="ce2" office:value-type="string" calcext:value-type="string">
            <text:p>Herold, Sebastian and Rausch, Andreas</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24–30</text:p>
          </table:table-cell>
          <table:table-cell table:style-name="ce2"/>
          <table:table-cell table:style-name="ce2" office:value-type="string" calcext:value-type="string">
            <text:p>Detecting software architecture erosion is an important task during the development and maintenance of software systems. Even in model-driven approaches in which consistency between artifacts can partially be established by construction and consistency issues have been intensively investigated, the intended architecture and its realization may diverge with negative effects on software quality.In this article, we describe an approach to flexible architecture erosion detection for model-driven development approaches. Consistency constraints expressed by architectural aspects called architectural rules are specified as formulas on a common ontology, and models are mapped to instances of that ontology. A knowledge representation and reasoning system is then utilized to check whether these architectural rules are satisfied for a given set of models.We describe three case studies in which this approach has been used to detect architecture erosion flexibly and argue that the negative effects of architecture erosion can be minimized effectively.</text:p>
          </table:table-cell>
          <table:table-cell table:style-name="ce2" table:number-columns-repeated="5"/>
          <table:table-cell table:style-name="ce2" office:value-type="string" calcext:value-type="string">
            <text:p>architecture conformance checking, inter-model consistency, software architecture, software architecture erosion</text:p>
          </table:table-cell>
          <table:table-cell table:style-name="ce2" office:value-type="string" calcext:value-type="string">
            <text:p>IEEE Press</text:p>
          </table:table-cell>
          <table:table-cell table:style-name="ce2" table:number-columns-repeated="4"/>
          <table:table-cell table:style-name="ce2" office:value-type="string" calcext:value-type="string">
            <text:p>Unclassifi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Global conformance checking measures using shallow representation and deep learning</text:p>
          </table:table-cell>
          <table:table-cell table:style-name="ce2" office:value-type="string" calcext:value-type="string">
            <text:p>Peeperkorn, Jari and vanden Broucke, Seppe and De Weerdt, Jochen</text:p>
          </table:table-cell>
          <table:table-cell table:style-name="ce2" office:value-type="string" calcext:value-type="string">
            <text:p>Eng. Appl. Artif. Intell.</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123</text:p>
          </table:table-cell>
          <table:table-cell table:style-name="ce2" office:value-type="string" calcext:value-type="string">
            <text:p>Conformance checking refers to techniques that can compare normative process behavior, typically captured by process models, and observed process behavior, usually captured in an event log. Recently, machine and deep learning methods have been proposed to tackle multiple problems in process mining, mostly for predictive process monitoring purposes. In this work, we propose two different neural network-based conformance checking techniques, allowing for a fully data-driven approach. Concretely, two approaches for measuring fitness and precision are introduced, using techniques from representation learning and deep learning respectively. The first approach relies on computing the distances between process traces coming from both an event log and a process model by means of vector representations extracted from a shallow neural network trained in a self-supervised setting. The second approach uses a recurrent neural network trained on an event log and a log containing artificially created counterfactuals. The first setup of these methods is tested on a proof-of-concept artificial event log, a plethora of artificially generated process models, and 4 real-life data sets. Our approaches exhibit generally promising and interesting results and in this way provide fully data-driven alternatives to other conformance checking techniques, which are usually model-driven. Moreover, they allow for a possible combination of different purposes, when already using neural networks for process discovery or predictive process monitoring.</text:p>
          </table:table-cell>
          <table:table-cell table:style-name="ce2"/>
          <table:table-cell table:style-name="ce2" office:value-type="string" calcext:value-type="string">
            <text:p>10.1016/j.engappai.2023.106393</text:p>
          </table:table-cell>
          <table:table-cell table:style-name="ce2" office:value-type="string" calcext:value-type="string">
            <text:p>https://doi.org/10.1016/j.engappai.2023.106393</text:p>
          </table:table-cell>
          <table:table-cell table:style-name="ce2" table:number-columns-repeated="2"/>
          <table:table-cell table:style-name="ce2" office:value-type="string" calcext:value-type="string">
            <text:p>Process mining, Conformance checking, Recurrent neural networks, LSTM, Representation learning, Word2vec</text:p>
          </table:table-cell>
          <table:table-cell table:style-name="ce2" office:value-type="string" calcext:value-type="string">
            <text:p>Pergamon Press, Inc.</text:p>
          </table:table-cell>
          <table:table-cell table:style-name="ce2" office:value-type="string" calcext:value-type="string">
            <text:p>0952-1976</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Model-Driven Software Architecture Conformance Analysis</text:p>
          </table:table-cell>
          <table:table-cell table:style-name="ce2" office:value-type="string" calcext:value-type="string">
            <text:p>Uzun, Burak and M., Ak\c{s}it, and M., Chaudron, and H., Vangheluwe, and J, Pennings,</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Every software system has an architecture that defines the gross-level structure of the system and consists of architectural components, relations and their interactions. A common practice to model software architectures is based on the notion of so-called architecture viewpoints, which define the templates and guidelines for the architecture from the perspective of one or more stakeholder concerns. Based on architecture viewpoints, architecture views can be derived for a particular system. Usually, the architecture of a system consists of multiple architecture views. Since software systems constantly evolve, the software code can start to diverge from the documented software architecture. Architecture conformance analysis methods have been proposed that compare and check the differences between the code and the software architecture. Elements in the code might conform to the elements in the architecture, elements might be absent, or the code might diverge from the architecture and introduce new elements. Conformance analysis is performed on two levels which are code and architecture levels. Codelevel conformance analysis employs intended architecture to generate runnable specifications that are executed on the code to reveal divergence or absence relations. Architecture level conformance analysis employs reconstructed architecture from implementation and compares intended architecture with reconstructed architecture. Manually checking for divergence and absence relations in large-scale software systems is time-consuming and cumbersome; hence, most conformance analysis methods in the industry are either semi-automated or fully automated. Software testing can be used to detect the divergence and absence relations. Automation in software testing can be achieved by model-based testing techniques. Modelbased testing is a software testing technique in which certain aspects of software system behaviours are defined in a model that is a basis for abstract tests. Concrete tests are derived from these abstract tests and executed against the software system under test.The main objective in this thesis is to define model-driven conformance analysis methodologies to detect the absence and divergence relations of software systems. To this end we answered the following research questions:RQ1:What are current solutions for model-driven architecture-based testing?RQ2:What are the limitations and benefits of code level model-based architecture conformance analysis using architecture viewpoints?RQ3:What are the characteristic features of architecture reconstruction methods?RQ4:What are the limitations and benefits of architecture level model-based architecture conformance analysis using architecture viewpoints?To answer these research questions, we used five different research methodologies which are: Systematic Literature Review, Case Study Research, Survey Study, Domain Analysis, Design Science Research.In chapter 2, we applied a systematic literature review for model-driven architecture based testing. We defined three research questions which are related to identifying addressed concerns, proposed solutions and existing research directions. We thoroughly analyzed 31 primary studies out of 739 studies. Firstly, we identified two concerns for applying MDABT which are: code to architecture conformance checking and internal architecture consistency checking. Furthermore, we derived a generic process model for model-driven architecture- based testing. Lastly, we identified current obstacles and existing research directions based on selected primary studies. We identified seven obstacles for MDABT which are: the need for executable models for representing architecture, coping with the abstraction difference between architecture and code, the combinatorial state explosion problem, the lack of architecture views to consider multiple different concerns, the need for automating the process by tools, the costbenefit analysis, and the need for applying </text:p>
          </table:table-cell>
          <table:table-cell table:style-name="ce2" table:number-columns-repeated="6"/>
          <table:table-cell table:style-name="ce2" office:value-type="string" calcext:value-type="string">
            <text:p>Wageningen University and Research</text:p>
          </table:table-cell>
          <table:table-cell table:style-name="ce2" table:number-columns-repeated="2"/>
          <table:table-cell table:style-name="ce2" office:value-type="string" calcext:value-type="string">
            <text:p>AAI28820543</text:p>
          </table:table-cell>
          <table:table-cell table:style-name="ce2" office:value-type="string" calcext:value-type="string">
            <text:p>Theses, dissertations, monographs, or books.</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Experimental Conformance Evaluation onUBER ATG Safety Case Framework withANSI/UL 4600</text:p>
          </table:table-cell>
          <table:table-cell table:style-name="ce2" office:value-type="string" calcext:value-type="string">
            <text:p>Taguchi, Kenji and Ishikawa, Fuyuki</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272–283</text:p>
          </table:table-cell>
          <table:table-cell table:style-name="ce2"/>
          <table:table-cell table:style-name="ce2" office:value-type="string" calcext:value-type="string">
            <text:p>The safety of Self-Driving Vehicles (SDVs) is crucial for social acceptance of self-driving technology/vehicles, and how to assure such safety is of great concern for automakers and regulatory and standardization bodies. ANSI/UL 4600 (4600) [3], a standard for the safety of autonomous products, has an impact on the regulatory regime of self-driving technology/vehicles due to its detailed and well defined assurance requirements on what will be required for the safety of autonomous products. One of the major characteristics of the standard is wide-scale adoption of the safety case, which has been traditionally used for safety assurance of safety-critical systems such as railways and automobiles.Uber ATG (now Aurora) then released its own safety case called the Safety Case Framework (SCF) [1] for their SDVs. A question arises as to how much the SCF would conform to 4600 even though the SFC does not claim its conformance with the standard. An answer to this question would result in what type of argumentation would be fit for purpose for safety assurance for SDVs and address issues with conformance assessment of a safety case with a standard.In this paper we report on lessons we learned from an experimental analysis on the conformance ratios of the SCF with 4600 and structural analysis following the argument structure of the SCF.</text:p>
          </table:table-cell>
          <table:table-cell table:style-name="ce2"/>
          <table:table-cell table:style-name="ce2" office:value-type="string" calcext:value-type="string">
            <text:p>10.1007/978-3-030-83906-2_22</text:p>
          </table:table-cell>
          <table:table-cell table:style-name="ce2" office:value-type="string" calcext:value-type="string">
            <text:p>https://doi.org/10.1007/978-3-030-83906-2_22</text:p>
          </table:table-cell>
          <table:table-cell table:style-name="ce2" table:number-columns-repeated="2"/>
          <table:table-cell table:style-name="ce2" office:value-type="string" calcext:value-type="string">
            <text:p>Safety, Self-driving vehicles, Safety case, Uber ATS’s safety case framework, ANSI/UL 4600, Regulatory compliance</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Software Architecture Recovery with Information Fusion</text:p>
          </table:table-cell>
          <table:table-cell table:style-name="ce2" office:value-type="string" calcext:value-type="string">
            <text:p>Zhang, Yiran and Xu, Zhengzi and Liu, Chengwei and Chen, Hongxu and Sun, Jianwen and Qiu, Dong and Liu, Yang</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535–1547</text:p>
          </table:table-cell>
          <table:table-cell table:style-name="ce2"/>
          <table:table-cell table:style-name="ce2" office:value-type="string" calcext:value-type="string">
            <text:p>Understanding the architecture is vital for effectively maintaining and managing large software systems. However, as software systems evolve over time, their architectures inevitably change. To keep up with the change, architects need to track the implementation-level changes and update the architectural documentation accordingly, which is time-consuming and error-prone. Therefore, many automatic architecture recovery techniques have been proposed to ease this process. Despite efforts have been made to improve the accuracy of architecture recovery, existing solutions still suffer from two limitations. First, most of them only use one or two type of information for the recovery, ignoring the potential usefulness of other sources. Second, they tend to use the information in a coarse-grained manner, overlooking important details within it. To address these limitations, we propose SARIF, a fully automated architecture recovery technique, which incorporates three types of comprehensive information, including dependencies, code text and folder structure. SARIF can recover architecture more accurately by thoroughly analyzing the details of each type of information and adaptively fusing them based on their relevance and quality. To evaluate SARIF, we collected six projects with published ground-truth architectures and three open-source projects labeled by our industrial collaborators. We compared SARIF with nine state-of-the-art techniques using three commonly-used architecture similarity metrics and two new metrics. The experimental results show that SARIF is 36.1% more accurate than the best of the previous techniques on average. By providing comprehensive architecture, SARIF can help users understand systems effectively and reduce the manual effort of obtaining ground-truth architectures.</text:p>
          </table:table-cell>
          <table:table-cell table:style-name="ce2"/>
          <table:table-cell table:style-name="ce2" office:value-type="string" calcext:value-type="string">
            <text:p>10.1145/3611643.3616285</text:p>
          </table:table-cell>
          <table:table-cell table:style-name="ce2" office:value-type="string" calcext:value-type="string">
            <text:p>https://doi.org/10.1145/3611643.3616285</text:p>
          </table:table-cell>
          <table:table-cell table:style-name="ce2" table:number-columns-repeated="2"/>
          <table:table-cell table:style-name="ce2" office:value-type="string" calcext:value-type="string">
            <text:p>architecture comparison, reverse engineering, software architecture recovery, software module clustering</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The study discusses software architecture in general without addressing conformance or compliance.</text:p>
          </table:table-cell>
          <table:table-cell table:number-columns-repeated="998"/>
        </table:table-row>
        <table:table-row table:style-name="ro1">
          <table:table-cell table:style-name="ce2" office:value-type="string" calcext:value-type="string">
            <text:p>A Data-Driven Framework to Test Validity of the Discovered Clinical Process Based on Selected Patient Outcomes</text:p>
          </table:table-cell>
          <table:table-cell table:style-name="ce2" office:value-type="string" calcext:value-type="string">
            <text:p>Chen, Qifan and Lu, Yang and Tam, Charmaine S. and Poon, Simon K.</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248–251</text:p>
          </table:table-cell>
          <table:table-cell table:style-name="ce2"/>
          <table:table-cell table:style-name="ce2" office:value-type="string" calcext:value-type="string">
            <text:p>A clinical process contains a treatment pathway for a well-defined patient group that aims to improve patient outcomes. Electronic Health Records (EHRs) have become popular with the rapid development of healthcare information systems. Process mining utilises event logs extracted from EHRs and aims to discover systematic clinical processes automatically. Hence, the validity of the discovered clinical process becomes a critical issue for stakeholders. Existing methods mainly focus on evaluating the performance of the discovery algorithms (the conformance between the discovered process and the event log) while ignoring the validity of the discovered clinical process. Therefore, we propose a data-driven framework that can test the validity of the process by correlating selected patient outcomes with the discovered clinical process. A valid and effective clinical process should positively impact patient outcomes and can potentially assist in developing evidence-based guidelines for future treatments. The data-driven framework adopts the triangulation method combined with the statistical test model consisting of propensity score matching and difference-in-difference regression to overcome the limitations of existing methods. A use case scenario is presented to discover the clinical process for patients with suspected acute coronary syndrome.</text:p>
          </table:table-cell>
          <table:table-cell table:style-name="ce2"/>
          <table:table-cell table:style-name="ce2" office:value-type="string" calcext:value-type="string">
            <text:p>10.1145/3579375.3579414</text:p>
          </table:table-cell>
          <table:table-cell table:style-name="ce2" office:value-type="string" calcext:value-type="string">
            <text:p>https://doi.org/10.1145/3579375.3579414</text:p>
          </table:table-cell>
          <table:table-cell table:style-name="ce2" table:number-columns-repeated="2"/>
          <table:table-cell table:style-name="ce2" office:value-type="string" calcext:value-type="string">
            <text:p>Healthcare process, Process mining, Process validation</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 Framework for Secure Service Composition</text:p>
          </table:table-cell>
          <table:table-cell table:style-name="ce2" office:value-type="string" calcext:value-type="string">
            <text:p>Brucker, Achim D. and Malmignati, Francesco and Merabti, Madjid and Shi, Qi and Zhou, Bo</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647-652</text:p>
          </table:table-cell>
          <table:table-cell table:style-name="ce2"/>
          <table:table-cell table:style-name="ce2" office:value-type="string" calcext:value-type="string">
            <text:p>Modern applications are inherently heterogeneous: they are built by composing loosely coupled services that are, usually, offered and operated by different service providers. While this approach increases the flexibility of the composed applications, it makes the implementation of security and trustworthiness requirements difficult. As the number of security requirements is increasing dramatically, there is a need for new approaches that integrate security requirements right from the beginning while composing service-based applications. In this paper, we present a framework for secure service composition using a model-based approach for specifying, building, and executing composed services. As a unique feature, this framework integrates security requirements as a first class citizen and, thus, avoids the ``security as an afterthought'' paradigm.</text:p>
          </table:table-cell>
          <table:table-cell table:style-name="ce2"/>
          <table:table-cell table:style-name="ce2" office:value-type="string" calcext:value-type="string">
            <text:p>10.1109/SocialCom.2013.97</text:p>
          </table:table-cell>
          <table:table-cell table:style-name="ce2" table:number-columns-repeated="3"/>
          <table:table-cell table:style-name="ce2" office:value-type="string" calcext:value-type="string">
            <text:p>Security;Availability;Business;Runtime;Service-oriented architecture;Biological system modeling;secure service composition;BPMN;service modelling;service availability</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The study discusses software architecture in general without addressing conformance or compliance.</text:p>
          </table:table-cell>
          <table:table-cell table:number-columns-repeated="998"/>
        </table:table-row>
        <table:table-row table:style-name="ro1">
          <table:table-cell table:style-name="ce2" office:value-type="string" calcext:value-type="string">
            <text:p>Enabling smarter compliance architecture using social networks and cognitive agents</text:p>
          </table:table-cell>
          <table:table-cell table:style-name="ce2" office:value-type="string" calcext:value-type="string">
            <text:p>Azua, M. and Goodman, B. D.</text:p>
          </table:table-cell>
          <table:table-cell table:style-name="ce2" office:value-type="string" calcext:value-type="string">
            <text:p>IBM Journal of Research and Development</text:p>
          </table:table-cell>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11:1-11:11</text:p>
          </table:table-cell>
          <table:table-cell table:style-name="ce2" office:value-type="string" calcext:value-type="string">
            <text:p>55</text:p>
          </table:table-cell>
          <table:table-cell table:style-name="ce2" office:value-type="string" calcext:value-type="string">
            <text:p>The advent of cloud computing has made a significant impact on the usage and implementation of cognitive agents. The boundless resources of cloud computing offer cognitive agents a rich platform on which to help build smarter systems. Given the explosive growth of content, cognitive agents are well positioned to make use of this massive amount of information that people struggle to consume and corporations need to manage in order to satisfy new security and compliance regulations. Data collected from several IBM Cloud test platforms with more than 6,000 users and from social software statistics involving 350,000 IBM employees confirm the power of user context and social networking to enable a new generation of cognitive agents. This “position paper” reviews several aspects of the confluence of cloud computing, social software, and cognitive agents.</text:p>
          </table:table-cell>
          <table:table-cell table:style-name="ce2"/>
          <table:table-cell table:style-name="ce2" office:value-type="string" calcext:value-type="string">
            <text:p>10.1147/JRD.2011.2165680</text:p>
          </table:table-cell>
          <table:table-cell table:style-name="ce2" table:number-columns-repeated="3"/>
          <table:table-cell table:style-name="ce2" office:value-type="string" calcext:value-type="string">
            <text:p>Cloud computing;Investments;Cognitive informatics;Computational modeling;Information services;Electronic publishing;User interfaces</text:p>
          </table:table-cell>
          <table:table-cell table:style-name="ce2"/>
          <table:table-cell table:style-name="ce2" office:value-type="string" calcext:value-type="string">
            <text:p>0018-8646</text:p>
          </table:table-cell>
          <table:table-cell table:style-name="ce2" table:number-columns-repeated="2"/>
          <table:table-cell table:style-name="ce2" office:value-type="string" calcext:value-type="string">
            <text:p>Non–peer-reviewed publications, including white papers, technical reports, position papers, posters, or extended abstracts.</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Design for configurability: rethinking interdomain routing policies from the ground up</text:p>
          </table:table-cell>
          <table:table-cell table:style-name="ce2" office:value-type="string" calcext:value-type="string">
            <text:p>Wang, Yi and Avramopoulos, Ioannis and Rexford, Jennifer</text:p>
          </table:table-cell>
          <table:table-cell table:style-name="ce2" office:value-type="string" calcext:value-type="string">
            <text:p>IEEE Journal on Selected Areas in Communications</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36-348</text:p>
          </table:table-cell>
          <table:table-cell table:style-name="ce2" office:value-type="string" calcext:value-type="string">
            <text:p>27</text:p>
          </table:table-cell>
          <table:table-cell table:style-name="ce2" office:value-type="string" calcext:value-type="string">
            <text:p>Giving ISPs more fine-grain control over interdomain routing policies would help them better manage their networks and offer value-added services to their customers. Unfortunately, the current BGP route-selection process imposes inherent restrictions on the policies an ISP can configure, making many useful policies infeasible. In this paper, we present Morpheus, a routing control platform that is designed for configurability. Morpheus enables a single ISP to safely realize a much broader range of routing policies without requiring changes to the underlying routers or the BGP protocol itself. Morpheus allows network operators to: (1) make flexible trade-offs between policy objectives through a weighted-sum based decision process, (2) realize customer-specific policies by supporting multiple route-selection processes in parallel, and allowing customers to influence the decision processes, and (3) configure the decision processes through a simple and intuitive configuration interface based on the Analytic Hierarchy Process, a decision-theoretic technique for balancing conflicting objectives. We also present the design, implementation, and evaluation of Morpheus as an extension to the XORP software router.</text:p>
          </table:table-cell>
          <table:table-cell table:style-name="ce2"/>
          <table:table-cell table:style-name="ce2" office:value-type="string" calcext:value-type="string">
            <text:p>10.1109/JSAC.2009.090409</text:p>
          </table:table-cell>
          <table:table-cell table:style-name="ce2" table:number-columns-repeated="3"/>
          <table:table-cell table:style-name="ce2" office:value-type="string" calcext:value-type="string">
            <text:p>Routing protocols;IP networks;Performance analysis;Scalability;Protection;Internet;Computer science;Laboratories;Computer architecture;Service oriented architecture;BGP, interdomain routing, policy, configuration, analytic hierarchy process (AHP)</text:p>
          </table:table-cell>
          <table:table-cell table:style-name="ce2"/>
          <table:table-cell table:style-name="ce2" office:value-type="string" calcext:value-type="string">
            <text:p>1558-0008</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The study discusses software architecture in general without addressing conformance or compliance.</text:p>
          </table:table-cell>
          <table:table-cell table:number-columns-repeated="998"/>
        </table:table-row>
        <table:table-row table:style-name="ro1">
          <table:table-cell table:style-name="ce2" office:value-type="string" calcext:value-type="string">
            <text:p>SLA-Driven Clustering of QoS-Aware Application Servers</text:p>
          </table:table-cell>
          <table:table-cell table:style-name="ce2" office:value-type="string" calcext:value-type="string">
            <text:p>Lodi, Giorgia and Panzieri, Fabio and Rossi, Davide and Turrini, Elisa</text:p>
          </table:table-cell>
          <table:table-cell table:style-name="ce2" office:value-type="string" calcext:value-type="string">
            <text:p>IEEE Transactions on Software Engineering</text:p>
          </table:table-cell>
          <table:table-cell table:style-name="ce2" office:value-type="string" calcext:value-type="string">
            <text:p>2007</text:p>
          </table:table-cell>
          <table:table-cell table:style-name="ce2" office:value-type="string" calcext:value-type="string">
            <text:p>IEEE Digital Library</text:p>
          </table:table-cell>
          <table:table-cell table:style-name="ce2" office:value-type="string" calcext:value-type="string">
            <text:p>186-197</text:p>
          </table:table-cell>
          <table:table-cell table:style-name="ce2" office:value-type="string" calcext:value-type="string">
            <text:p>33</text:p>
          </table:table-cell>
          <table:table-cell table:style-name="ce2" office:value-type="string" calcext:value-type="string">
            <text:p>In this paper, we discuss the design, implementation, and experimental evaluation of a middleware architecture for enabling service level agreement (SLA)-driven clustering of QoS-aware application servers. Our middleware architecture supports application server technologies with dynamic resource management: application servers can dynamically change the amount of clustered resources assigned to hosted applications on-demand so as to meet application-level quality of service (QoS) requirements. These requirements can include timeliness, availability, and high throughput and are specified in SLAs. A prototype of our architecture has been implemented using the open-source J2EE application server JBoss. The evaluation of this prototype shows that our approach makes possible JBoss' resource usage optimization and allows JBoss to effectively meet the QoS requirements of the applications it hosts, i.e., to honor the SLAs of those applications</text:p>
          </table:table-cell>
          <table:table-cell table:style-name="ce2"/>
          <table:table-cell table:style-name="ce2" office:value-type="string" calcext:value-type="string">
            <text:p>10.1109/TSE.2007.28</text:p>
          </table:table-cell>
          <table:table-cell table:style-name="ce2" table:number-columns-repeated="3"/>
          <table:table-cell table:style-name="ce2" office:value-type="string" calcext:value-type="string">
            <text:p>Quality of service;Load management;Middleware;Resource management;Availability;Monitoring;Runtime;Application software;Prototypes;Scalability;Service Level Agreement;Quality of Service;QoS-aware application server;QoS-aware cluster;dynamic cluster configuration;monitoring;load balancing.</text:p>
          </table:table-cell>
          <table:table-cell table:style-name="ce2"/>
          <table:table-cell table:style-name="ce2" office:value-type="string" calcext:value-type="string">
            <text:p>1939-3520</text:p>
          </table:table-cell>
          <table:table-cell table:style-name="ce2" table:number-columns-repeated="2"/>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The study discusses software architecture in general without addressing conformance or compliance.</text:p>
          </table:table-cell>
          <table:table-cell table:number-columns-repeated="998"/>
        </table:table-row>
        <table:table-row table:style-name="ro1">
          <table:table-cell table:style-name="ce2" office:value-type="string" calcext:value-type="string">
            <text:p>PROS: A Plug-in for Routability Optimization applied in theState-of-the-art commercial EDA tool using deep learning</text:p>
          </table:table-cell>
          <table:table-cell table:style-name="ce2" office:value-type="string" calcext:value-type="string">
            <text:p>Chen, Jingsong and Kuang, Jian and Zhao, Guowei and Huang, Dennis J-Hand Young, Evangeline F. Y.</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table:number-columns-repeated="2"/>
          <table:table-cell table:style-name="ce2" office:value-type="string" calcext:value-type="string">
            <text:p>Recently the topic of routability optimization with prior knowledge</text:p>
            <text:p>obtained by machine learning techniques has been widely studied.</text:p>
            <text:p>However, limited by the prediction accuracy, the predictors of the</text:p>
            <text:p>existing related works can hardly be applied in a real-world EDA tool</text:p>
            <text:p>without extra runtime overhead for feature preparation. In this paper,</text:p>
            <text:p>we revisit this topic and propose a practical plug-in for routability</text:p>
            <text:p>optimization named PROS which can be applied in the state-of-the-art</text:p>
            <text:p>commercial EDA tool with negligible runtime overhead. PROS consists of</text:p>
            <text:p>an effective fully convolutional network (FCN) based predictor that only</text:p>
            <text:p>utilizes the data from placement result to forecast global routing (GR)</text:p>
            <text:p>congestion and a parameter optimizer that can reasonably adjust GR cost</text:p>
            <text:p>parameters based on prediction result to generate a better GR solution</text:p>
            <text:p>for detailed routing. Experiments on 19 industrial designs in advanced</text:p>
            <text:p>technology node show that PROS can achieve high accuracy of GR</text:p>
            <text:p>congestion prediction and significantly reduce design rule checking</text:p>
            <text:p>(DRC) violations by 11.65\% on average.</text:p>
          </table:table-cell>
          <table:table-cell table:style-name="ce2" office:value-type="string" calcext:value-type="string">
            <text:p>Proceedings Paper</text:p>
          </table:table-cell>
          <table:table-cell table:style-name="ce2" office:value-type="string" calcext:value-type="string">
            <text:p>10.1145/3400302.3415662</text:p>
          </table:table-cell>
          <table:table-cell table:style-name="ce2"/>
          <table:table-cell table:style-name="ce2" office:value-type="string" calcext:value-type="string">
            <text:p>Chen, JS (Corresponding Author), Chinese Univ Hong Kong, Hong Kong, Peoples R China.Chen, Jingsong; Young, Evangeline F. Y., Chinese Univ Hong Kong, Hong Kong, Peoples R China.Kuang, Jian; Zhao, Guowei; Huang, Dennis J-H, Cadence Design Syst, San Jose, CA USA.</text:p>
          </table:table-cell>
          <table:table-cell table:style-name="ce2" table:number-columns-repeated="2"/>
          <table:table-cell table:style-name="ce2" office:value-type="string" calcext:value-type="string">
            <text:p>IEEE</text:p>
          </table:table-cell>
          <table:table-cell table:style-name="ce2" office:value-type="string" calcext:value-type="string">
            <text:p>1933-7760</text:p>
          </table:table-cell>
          <table:table-cell table:style-name="ce2" office:value-type="string" calcext:value-type="string">
            <text:p>English</text:p>
          </table:table-cell>
          <table:table-cell table:style-name="ce2" office:value-type="string" calcext:value-type="string">
            <text:p>39th IEEE/ACM International Conference On Computer Aided Design (ICCAD),ELECTR NETWORK, NOV 02-05, 202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3</text:p>
          </table:table-cell>
          <table:table-cell table:style-name="ce4" office:value-type="string" calcext:value-type="string">
            <text:p>Study is a secondary study (SLR, SMS, survey).</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 Standard Deviation Incorporated Attention Module Enhanced U-Net forRoutability Prediction</text:p>
          </table:table-cell>
          <table:table-cell table:style-name="ce2" office:value-type="string" calcext:value-type="string">
            <text:p>Chen, Yinjie and Zhang, Di and Chen, Hua</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671-674</text:p>
          </table:table-cell>
          <table:table-cell table:style-name="ce2"/>
          <table:table-cell table:style-name="ce2" office:value-type="string" calcext:value-type="string">
            <text:p>With the remarkable increase in the complexity of Very Large-Scale</text:p>
            <text:p>Integration (VLSI) designs, the integration of artificial intelligence</text:p>
            <text:p>(AI) into electronic design automation (EDA) has become indispensable,</text:p>
            <text:p>particularly in the realm of back-end design tasks like Routing</text:p>
            <text:p>Congestion (RC) prediction and Design Rule Checking (DRC) hotspot map</text:p>
            <text:p>prediction. In this paper, we introduce an innovative variant of the</text:p>
            <text:p>U-Net model, enhanced by an attention module, to accurately predict</text:p>
            <text:p>routability. The attention module incorporates standard deviation</text:p>
            <text:p>operation to extract more comprehensive distribution information from</text:p>
            <text:p>the features, enabling mitigate the adverse effects of data imbalance.</text:p>
            <text:p>Our proposed model outperforms existing models, particularly with rate</text:p>
            <text:p>reductions of 1.5\% (RC) and 4.6\% (DRC) in Avg-NRMSE when compared to</text:p>
            <text:p>the prior model ibUnet, as evidenced by experimental results on the</text:p>
            <text:p>CircuitNet dataset. Furthermore, it outperforms the ibUnet on model size</text:p>
            <text:p>which exhibits a significant improvement of over 50\% rate reduction.</text:p>
          </table:table-cell>
          <table:table-cell table:style-name="ce2" office:value-type="string" calcext:value-type="string">
            <text:p>Proceedings Paper</text:p>
          </table:table-cell>
          <table:table-cell table:style-name="ce2" office:value-type="string" calcext:value-type="string">
            <text:p>10.1109/ICETIS61828.2024.10593700</text:p>
          </table:table-cell>
          <table:table-cell table:style-name="ce2"/>
          <table:table-cell table:style-name="ce2" office:value-type="string" calcext:value-type="string">
            <text:p>Chen, H (Corresponding Author), Zhejiang Univ, Sch Aeronaut \&amp; Astronaut, Hangzhou, Peoples R China.Chen, Yinjie, Zhejiang Univ, Coll Informat Sci \&amp; Elect Engn, Hangzhou, Peoples R China.Zhang, Di; Chen, Hua, Zhejiang Univ, Sch Aeronaut \&amp; Astronaut, Hangzhou, Peoples R China.</text:p>
          </table:table-cell>
          <table:table-cell table:style-name="ce2"/>
          <table:table-cell table:style-name="ce2" office:value-type="string" calcext:value-type="string">
            <text:p>Very Large-Scale Integration (VLSI) designs; Routability Prediction;Artificial Intelligence; Electronic Design Automation (EDA); U-Net</text:p>
          </table:table-cell>
          <table:table-cell table:style-name="ce2" office:value-type="string" calcext:value-type="string">
            <text:p>IEEE</text:p>
          </table:table-cell>
          <table:table-cell table:style-name="ce2"/>
          <table:table-cell table:style-name="ce2" office:value-type="string" calcext:value-type="string">
            <text:p>English</text:p>
          </table:table-cell>
          <table:table-cell table:style-name="ce2" office:value-type="string" calcext:value-type="string">
            <text:p>9th International Conference on Electronic Technology and InformationScience (ICETIS), Hangzhou, PEOPLES R CHINA, MAY 17-19, 202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2</text:p>
          </table:table-cell>
          <table:table-cell table:style-name="ce4" office:value-type="string" calcext:value-type="string">
            <text:p>Study discusses software architecture without addressing conformance or compliance.</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MCFRoute 2.0: A Redundant Via Insertion Enhanced Concurrent DetailedRouter</text:p>
          </table:table-cell>
          <table:table-cell table:style-name="ce2" office:value-type="string" calcext:value-type="string">
            <text:p>Jia, Xiaotao and Cai, Yici and Zhou, Qiang and Yu, Bei</text:p>
          </table:table-cell>
          <table:table-cell table:style-name="ce2"/>
          <table:table-cell table:style-name="ce2" office:value-type="string" calcext:value-type="string">
            <text:p>2016</text:p>
          </table:table-cell>
          <table:table-cell table:style-name="ce2" office:value-type="string" calcext:value-type="string">
            <text:p>ISI Web of Science</text:p>
          </table:table-cell>
          <table:table-cell table:style-name="ce2" office:value-type="string" calcext:value-type="string">
            <text:p>87-92</text:p>
          </table:table-cell>
          <table:table-cell table:style-name="ce2"/>
          <table:table-cell table:style-name="ce2" office:value-type="string" calcext:value-type="string">
            <text:p>In modern VLSI design, manufacturing yield and chip performance are</text:p>
            <text:p>seriously affected by via failure. Redundant via insertion is an</text:p>
            <text:p>effective technique recommended by foundries to deal with the via</text:p>
            <text:p>failure. However, due to the extreme scaling of feature size, it is more</text:p>
            <text:p>and more difficult to resolve redundant via insertion (RVI) with limited</text:p>
            <text:p>routing resource while obeying complicated design rules. In this paper,</text:p>
            <text:p>we propose an RVI enhanced concurrent detailed router, MCFRoute 2.0,</text:p>
            <text:p>which effectively avoids design rule violations through a compact</text:p>
            <text:p>integer linear programming (ILP) model. The proposed router can not only</text:p>
            <text:p>route all nets simultaneously but also search for redundant via</text:p>
            <text:p>positions for all via simultaneously during routing stage. In addition,</text:p>
            <text:p>it proposes an RVI aware pin access allocation to further improve the</text:p>
            <text:p>routing performance. Experimental results show that our detailed router</text:p>
            <text:p>outperforms an industry EDA tool that it improves the redundant via</text:p>
            <text:p>insertion rate by 21\%, while reducing design rule checking violation</text:p>
            <text:p>count, total wire length and via count by 47\%, 4\% and 14\%,</text:p>
            <text:p>respectively.</text:p>
          </table:table-cell>
          <table:table-cell table:style-name="ce2" office:value-type="string" calcext:value-type="string">
            <text:p>Proceedings Paper</text:p>
          </table:table-cell>
          <table:table-cell table:style-name="ce2" office:value-type="string" calcext:value-type="string">
            <text:p>10.1145/2902961.2902966</text:p>
          </table:table-cell>
          <table:table-cell table:style-name="ce2"/>
          <table:table-cell table:style-name="ce2" office:value-type="string" calcext:value-type="string">
            <text:p>Jia, XT (Corresponding Author), Tsinghua Univ, Dept Comp Sci Technol, Beijing, Peoples R China.Jia, XT (Corresponding Author), Chinese Univ Hong Kong, CSE Dept, Hong Kong, NT, Peoples R China.Jia, Xiaotao; Cai, Yici; Zhou, Qiang, Tsinghua Natl Lab, Informat Sci \&amp; Technol, Beijing, Peoples R China.Jia, Xiaotao; Cai, Yici; Zhou, Qiang, Tsinghua Univ, Dept Comp Sci Technol, Beijing, Peoples R China.Jia, Xiaotao; Yu, Bei, Chinese Univ Hong Kong, CSE Dept, Hong Kong, NT, Peoples R China.</text:p>
          </table:table-cell>
          <table:table-cell table:style-name="ce2"/>
          <table:table-cell table:style-name="ce2" office:value-type="string" calcext:value-type="string">
            <text:p>Detailed Routing; ILP; Redundant Via Insertion; Design Rule</text:p>
          </table:table-cell>
          <table:table-cell table:style-name="ce2" office:value-type="string" calcext:value-type="string">
            <text:p>IEEE</text:p>
          </table:table-cell>
          <table:table-cell table:style-name="ce2"/>
          <table:table-cell table:style-name="ce2" office:value-type="string" calcext:value-type="string">
            <text:p>English</text:p>
          </table:table-cell>
          <table:table-cell table:style-name="ce2" office:value-type="string" calcext:value-type="string">
            <text:p>26th ACM Great Lakes Symposium on VLSI (GLSVLSI), Boston Univ, Dept Elect \&amp; Comp Engn, Boston, MA, MAY 18-20, 2016</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Feasibility Prediction for Rapid IC Design Space Exploration</text:p>
          </table:table-cell>
          <table:table-cell table:style-name="ce2" office:value-type="string" calcext:value-type="string">
            <text:p>Islam, Riadul</text:p>
          </table:table-cell>
          <table:table-cell table:style-name="ce2" office:value-type="string" calcext:value-type="string">
            <text:p>ELECTRONICS</text:p>
          </table:table-cell>
          <table:table-cell table:style-name="ce2" office:value-type="string" calcext:value-type="string">
            <text:p>2022</text:p>
          </table:table-cell>
          <table:table-cell table:style-name="ce2" office:value-type="string" calcext:value-type="string">
            <text:p>ISI Web of Science</text:p>
          </table:table-cell>
          <table:table-cell table:style-name="ce2"/>
          <table:table-cell table:style-name="ce2" office:value-type="string" calcext:value-type="string">
            <text:p>11</text:p>
          </table:table-cell>
          <table:table-cell table:style-name="ce2" office:value-type="string" calcext:value-type="string">
            <text:p>The DARPA POSH program echoes with the research community and identifies</text:p>
            <text:p>that engineering productivity has fallen behind Moore's law, resulting</text:p>
            <text:p>in the prohibitive increase in IC design cost at leading technology</text:p>
            <text:p>nodes. The primary reason is that it requires many computing resources,</text:p>
            <text:p>expensive tools, and even many days to complete a design implementation.</text:p>
            <text:p>However, at the end of this process, some designs could not meet the</text:p>
            <text:p>design constraints and become unroutable, creating a vicious circuit</text:p>
            <text:p>design cycle. As a result, designers have to re-run the whole process</text:p>
            <text:p>after design modification. This research applied a machine learning</text:p>
            <text:p>approach to automatically identify design constraints and design rule</text:p>
            <text:p>checking (DRC) violation issues and help the designer identify design</text:p>
            <text:p>constraints with optimal DRCs before the long detailed routing process</text:p>
            <text:p>through iterative greedy search. The proposed algorithm achieved up to</text:p>
            <text:p>99.99\% design constraint prediction accuracy and reduced 98.4\% DRC</text:p>
            <text:p>violations with only a 6.9\% area penalty.</text:p>
          </table:table-cell>
          <table:table-cell table:style-name="ce2" office:value-type="string" calcext:value-type="string">
            <text:p>Article</text:p>
          </table:table-cell>
          <table:table-cell table:style-name="ce2" office:value-type="string" calcext:value-type="string">
            <text:p>10.3390/electronics11071161</text:p>
          </table:table-cell>
          <table:table-cell table:style-name="ce2"/>
          <table:table-cell table:style-name="ce2" office:value-type="string" calcext:value-type="string">
            <text:p>Islam, R (Corresponding Author), Univ Maryland Baltimore Cty, Dept Comp Sci \&amp; Elect Engn, Baltimore, MD 21250 USA.Islam, Riadul, Univ Maryland Baltimore Cty, Dept Comp Sci \&amp; Elect Engn, Baltimore, MD 21250 USA.</text:p>
          </table:table-cell>
          <table:table-cell table:style-name="ce2"/>
          <table:table-cell table:style-name="ce2" office:value-type="string" calcext:value-type="string">
            <text:p>design rule check; electronic design automation (EDA); decision tree; ICdesign; design constraints</text:p>
          </table:table-cell>
          <table:table-cell table:style-name="ce2" office:value-type="string" calcext:value-type="string">
            <text:p>MDPI</text:p>
          </table:table-cell>
          <table:table-cell table:style-name="ce2" office:value-type="string" calcext:value-type="string">
            <text:p>2079-9292</text:p>
          </table:table-cell>
          <table:table-cell table:style-name="ce2" office:value-type="string" calcext:value-type="string">
            <text:p>English</text:p>
          </table:table-cell>
          <table:table-cell table:style-name="ce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Fast, accurate assembly-level physical verification of 3DIC packages</text:p>
          </table:table-cell>
          <table:table-cell table:style-name="ce2" office:value-type="string" calcext:value-type="string">
            <text:p>Hossam, Nermeen and Ferguson, John</text:p>
          </table:table-cell>
          <table:table-cell table:style-name="ce2"/>
          <table:table-cell table:style-name="ce2" office:value-type="string" calcext:value-type="string">
            <text:p>2023</text:p>
          </table:table-cell>
          <table:table-cell table:style-name="ce2" office:value-type="string" calcext:value-type="string">
            <text:p>ISI Web of Science</text:p>
          </table:table-cell>
          <table:table-cell table:style-name="ce2" table:number-columns-repeated="2"/>
          <table:table-cell table:style-name="ce2" office:value-type="string" calcext:value-type="string">
            <text:p>Advanced packaging techniques are critical to ensuring product</text:p>
            <text:p>performance, function, and cost in the semiconductor industry.</text:p>
            <text:p>Three-dimensional integrated circuits (3DICs) offer the ultimate</text:p>
            <text:p>flexibility in product design. However, they are not without their</text:p>
            <text:p>challenges, bringing packaging technologies to the forefront for</text:p>
            <text:p>innovation. 3DICs contain multiple stacked die that achieve the required</text:p>
            <text:p>connectivity through traces on an interposer, or with special vias or</text:p>
            <text:p>bumps. Independently verifying the physical and connectivity accuracy of</text:p>
            <text:p>these discrete dies and substrates per their process rules does not</text:p>
            <text:p>ensure that the overall 2.5D/3D package assembly is correct, or will</text:p>
            <text:p>perform as expected.</text:p>
            <text:p>The Calibre 3DSTACK electronic design automation (EDA) tool provides</text:p>
            <text:p>fast, accurate, assembly-level verification of diedie or die-interposer</text:p>
            <text:p>interfaces in 3DIC designs. It operates on the interface geometries</text:p>
            <text:p>between chip designs from multiple process nodes to perform both design</text:p>
            <text:p>rule checking (DRC) alignment verification and layout vs. schematic</text:p>
            <text:p>(LVS) connectivity checking of the complete multi-die 2.5D or 3DIC</text:p>
            <text:p>system. Design engineers can also use the Calibre 3DSTACK tool to</text:p>
            <text:p>prepare the data required for coupling capacitance extraction, if</text:p>
            <text:p>required.</text:p>
            <text:p>In this paper, we explain the differences between traditional 3DIC</text:p>
            <text:p>physical verification techniques and Calibre 3DSTACK 3DIC assembly</text:p>
            <text:p>verification, and demonstrate how Calibre 3DSTACK functionality can be</text:p>
            <text:p>used to resolve many of the challenges of 3DIC physical verification</text:p>
            <text:p>while ensuring the accuracy and performance of the complete 3DIC design.</text:p>
          </table:table-cell>
          <table:table-cell table:style-name="ce2" office:value-type="string" calcext:value-type="string">
            <text:p>Proceedings Paper</text:p>
          </table:table-cell>
          <table:table-cell table:style-name="ce2" office:value-type="string" calcext:value-type="string">
            <text:p>10.1109/3DIC57175.2023.10155000</text:p>
          </table:table-cell>
          <table:table-cell table:style-name="ce2"/>
          <table:table-cell table:style-name="ce2" office:value-type="string" calcext:value-type="string">
            <text:p>Hossam, N (Corresponding Author), Siemens Digital Ind Software, Calibre Design Solut, Cairo, Egypt.Hossam, Nermeen; Ferguson, John, Siemens Digital Ind Software, Calibre Design Solut, Cairo, Egypt.</text:p>
          </table:table-cell>
          <table:table-cell table:style-name="ce2"/>
          <table:table-cell table:style-name="ce2" office:value-type="string" calcext:value-type="string">
            <text:p>3DIC; chiplet; IC; SoC; IP; physical verification</text:p>
          </table:table-cell>
          <table:table-cell table:style-name="ce2" office:value-type="string" calcext:value-type="string">
            <text:p>IEEE</text:p>
          </table:table-cell>
          <table:table-cell table:style-name="ce2" office:value-type="string" calcext:value-type="string">
            <text:p>2164-0157</text:p>
          </table:table-cell>
          <table:table-cell table:style-name="ce2" office:value-type="string" calcext:value-type="string">
            <text:p>English</text:p>
          </table:table-cell>
          <table:table-cell table:style-name="ce2" office:value-type="string" calcext:value-type="string">
            <text:p>IEEE International 3D Systems Integration Conference (3DIC), Univ CollCork, Cork, IRELAND, MAY 10-12, 2023</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number-columns-repeated="998"/>
        </table:table-row>
        <table:table-row table:style-name="ro1">
          <table:table-cell table:style-name="ce2" office:value-type="string" calcext:value-type="string">
            <text:p>A Novel Architecture That Examines Network Activity in a Docker-Based Multitenant to Verify Zero Trust Container Architecture (ZTCA) Compliance</text:p>
          </table:table-cell>
          <table:table-cell table:style-name="ce2" office:value-type="string" calcext:value-type="string">
            <text:p>Jackson, Lethia and Teymourlouei, Haydar and Stone, Daryl Bryant and Latson, Velma and Cobbs, Malik and Ramos, Jefry Jesus and Olayinka, Jamiu and Paja, John</text:p>
          </table:table-cell>
          <table:table-cell table:style-name="ce2" office:value-type="string" calcext:value-type="string">
            <text:p>Communications in Computer and Information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52 - 64</text:p>
          </table:table-cell>
          <table:table-cell table:style-name="ce2" office:value-type="string" calcext:value-type="string">
            <text:p>2263 CCIS</text:p>
          </table:table-cell>
          <table:table-cell table:style-name="ce2" office:value-type="string" calcext:value-type="string">
            <text:p>The Zero Trust Container Architecture (ZTCA) security model ensures secure access control to applications within containers while trusting and verifying every access to each request. This research paper presents a multitenant architecture and a testing environment for analyzing and collecting Event ID data performance. This project will reveal if the testing environment demonstrates ZTCA compliance by designing and implementing a program to enhance visibility and secure multitenant environments using Docker containers to store and access data through Zero Trust Container Architecture’s principle. In addition, the infrastructure and architectural framework for managing and deploying applications at scale that Microservices and Docker provide in a multitenant environment. Results show that Docker containers could verify ZTCA compliance using network activity recorded with the Event IDs.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86644-9_4</text:p>
          </table:table-cell>
          <table:table-cell table:style-name="ce2" office:value-type="string" calcext:value-type="string">
            <text:p>https://www.scopus.com/inward/record.uri?eid=2-s2.0-105003622903&amp;doi=10.1007%2F978-3-031-86644-9_4&amp;partnerID=40&amp;md5=d992a4b83d1df47fb9c819882708b1d3</text:p>
          </table:table-cell>
          <table:table-cell table:style-name="ce2"/>
          <table:table-cell table:style-name="ce2" office:value-type="string" calcext:value-type="string">
            <text:p>access control; Docker container; microservices; multitenant environments; Zero Trust Container Architecture (ZTCA)</text:p>
          </table:table-cell>
          <table:table-cell table:style-name="ce2" office:value-type="string" calcext:value-type="string">
            <text:p>Access control models; Authentication; Medium access control; Network architecture; Architecture compliance; Docker container; Microservice; Multi tenants; Multitenant environment; Network activities; Novel architecture; Security modeling; Testing environment; Zero trust container architecture; Authorization</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office:value-type="string" calcext:value-type="string">
            <text:p>Proceedings - International Conference on Software Engineering</text:p>
          </table:table-cell>
          <table:table-cell table:style-name="ce2" office:value-type="string" calcext:value-type="string">
            <text:p>2012</text:p>
          </table:table-cell>
          <table:table-cell table:style-name="ce2" office:value-type="string" calcext:value-type="string">
            <text:p>Scopus</text:p>
          </table:table-cell>
          <table:table-cell table:style-name="ce2" office:value-type="string" calcext:value-type="string">
            <text:p>1483 - 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 © 2012 IEEE.</text:p>
          </table:table-cell>
          <table:table-cell table:style-name="ce2" office:value-type="string" calcext:value-type="string">
            <text:p>Conference paper</text:p>
          </table:table-cell>
          <table:table-cell table:style-name="ce2" office:value-type="string" calcext:value-type="string">
            <text:p>10.1109/ICSE.2012.6227056</text:p>
          </table:table-cell>
          <table:table-cell table:style-name="ce2" office:value-type="string" calcext:value-type="string">
            <text:p>https://www.scopus.com/inward/record.uri?eid=2-s2.0-84864236994&amp;doi=10.1109%2FICSE.2012.6227056&amp;partnerID=40&amp;md5=9148e41c6836598b5d1e14fd2025bec6</text:p>
          </table:table-cell>
          <table:table-cell table:style-name="ce2"/>
          <table:table-cell table:style-name="ce2" office:value-type="string" calcext:value-type="string">
            <text:p>Conformance Checking; Service-Oriented Product Line; Variability Management; Variability Modeling</text:p>
          </table:table-cell>
          <table:table-cell table:style-name="ce2" office:value-type="string" calcext:value-type="string">
            <text:p>Black boxes; Component based; Conformance checking; Dynamic softwares; Feature models; Modeling variability; Product line engineering; Product-lines; Service Oriented; Variability management; Variability modeling; Information services; Production engineering; Service oriented architecture (SOA); Software design</text:p>
          </table:table-cell>
          <table:table-cell table:style-name="ce2" table:number-columns-repeated="3"/>
          <table:table-cell table:style-name="ce2" office:value-type="string" calcext:value-type="string">
            <text:p>Cited by: 5</text:p>
          </table:table-cell>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Automatic component protocol generation and verification of components</text:p>
          </table:table-cell>
          <table:table-cell table:style-name="ce2" office:value-type="string" calcext:value-type="string">
            <text:p>Both, Andreas and Richter, Dirk</text:p>
          </table:table-cell>
          <table:table-cell table:style-name="ce2"/>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94 - 101</text:p>
          </table:table-cell>
          <table:table-cell table:style-name="ce2"/>
          <table:table-cell table:style-name="ce2" office:value-type="string" calcext:value-type="string">
            <text:p>In several works a method was suggested to overcome the lack of signature-based composition currently enabled in component-based and service-oriented architectures (SOA). Several approaches allow to encode non-functional properties of a single component in a contract (component protocol) where the remote calls to a component are taken into consideration. Component protocols ensures that bugs or unsafe behavior caused interaction sequences are obeyed. Encoding business rules works fine as these contracts can be derived from human knowledge only and have to be defined manually, too. In this work we will show, how such unsafe behavior within source code can be discovered and prevented by automatic component protocol generation and model checking techniques. © 2010 IEEE.</text:p>
          </table:table-cell>
          <table:table-cell table:style-name="ce2" office:value-type="string" calcext:value-type="string">
            <text:p>Conference paper</text:p>
          </table:table-cell>
          <table:table-cell table:style-name="ce2" office:value-type="string" calcext:value-type="string">
            <text:p>10.1109/SEAA.2010.30</text:p>
          </table:table-cell>
          <table:table-cell table:style-name="ce2" office:value-type="string" calcext:value-type="string">
            <text:p>https://www.scopus.com/inward/record.uri?eid=2-s2.0-78449290381&amp;doi=10.1109%2FSEAA.2010.30&amp;partnerID=40&amp;md5=3faff80c698791b7d85b796a0dd13147</text:p>
          </table:table-cell>
          <table:table-cell table:style-name="ce2"/>
          <table:table-cell table:style-name="ce2" office:value-type="string" calcext:value-type="string">
            <text:p>Component composition; Component-based software engineering; Model checking; Protocol conformance checking; Protocol generation; Verification</text:p>
          </table:table-cell>
          <table:table-cell table:style-name="ce2" office:value-type="string" calcext:value-type="string">
            <text:p>Business rules; Component based; Component composition; Component protocols; Component-based software engineering; Conformance checking; Human knowledge; Model-checking techniques; Non functional properties; Protocol generation; Single components; Source codes; Automatic programming; Computer software selection and evaluation; Encoding (symbols); Information services; Service oriented architecture (SOA); Software engineering; Model checking</text:p>
          </table:table-cell>
          <table:table-cell table:style-name="ce2" table:number-columns-repeated="3"/>
          <table:table-cell table:style-name="ce2" office:value-type="string" calcext:value-type="string">
            <text:p>Cited by: 1</text:p>
          </table:table-cell>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Predicting Architectural Styles from Component Specification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5</text:p>
          </table:table-cell>
          <table:table-cell table:style-name="ce2" office:value-type="string" calcext:value-type="string">
            <text:p>ACM Digital Library</text:p>
          </table:table-cell>
          <table:table-cell table:style-name="ce2" office:value-type="string" calcext:value-type="string">
            <text:p>231–232</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a System Integrator could make necessary changes to ensure that the quality attributes dictated by the system requirements were satisfied before the actual system was deployed and tested. In this paper we propose a model for predicting architectural styles based on use cases that need to be met by a system configuration. Moreover, our technique can be used to determine stylistic conformance and hence indicate the presence or absence of architectural drift</text:p>
          </table:table-cell>
          <table:table-cell table:style-name="ce2"/>
          <table:table-cell table:style-name="ce2" office:value-type="string" calcext:value-type="string">
            <text:p>10.1109/WICSA.2005.50</text:p>
          </table:table-cell>
          <table:table-cell table:style-name="ce2" office:value-type="string" calcext:value-type="string">
            <text:p>https://doi.org/10.1109/WICSA.2005.50</text:p>
          </table:table-cell>
          <table:table-cell table:style-name="ce2" table:number-columns-repeated="2"/>
          <table:table-cell table:style-name="ce2" office:value-type="string" calcext:value-type="string">
            <text:p>Architectural Style, Component Based Software Engineering, Reuse, System Composition</text:p>
          </table:table-cell>
          <table:table-cell table:style-name="ce2" office:value-type="string" calcext:value-type="string">
            <text:p>IEEE Computer Society</text:p>
          </table:table-cell>
          <table:table-cell table:style-name="ce2" table:number-columns-repeated="3"/>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Video transcoder architectures for networked multimedia applications</text:p>
          </table:table-cell>
          <table:table-cell table:style-name="ce2" office:value-type="string" calcext:value-type="string">
            <text:p>Youn, Jeongnam and Sun, Ming-Ting</text:p>
          </table:table-cell>
          <table:table-cell table:style-name="ce2"/>
          <table:table-cell table:style-name="ce2" office:value-type="string" calcext:value-type="string">
            <text:p>200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For the deployment of multimedia services over heterogeneous networks, it is very desirable that a video delivery system be able to dynamically adapt the bit-rate of a video bit-stream to the time-varying network conditions, such as the available bandwidth. A video transcoder which can adapt the bit-rate of a video bit-stream and support various content. manipulations, error-resilience, and video watermarking insertion will improve the overall performance of multimedia systems. In this dissertation, we investigate various issues regarding transcoder architectures for networked multimedia applications. We first investigate existing fast architectures and analyze potential problems and limitations. We show that due to inherent but often ignored assumptions in the derivation, the existing fast architectures have severe limitations in practical applications. We also propose a fast transcoder scheme which does not have the limitations and problems of the existing fast transcoder architectures and can achieve drift-free performance with similar processing speed as the existing fast transcoders. In the proposed architecture, drift-error is prevented by adopting a pixel-domain cascaded structure. To reduce the computational cost in transcoding, several stages of computational blocks, such as Discrete Cosine Transform (DCT), Inverse DCT (IDCT), quantization, and inverse quantization are optimized. We also extend the transcoding function to applications. of a logo insertion. We consider the case when transcoding is necessary in the logo insertion process to reduce the bit-rate. As many multimedia services are deployed in the Internet environment, the video delivery system requires a more intelligent and sophisticated bit-rate adaptation scheme with a high transcoding ratio because of the wide range of operating bandwidths of the current Internet infrastructure. Down-conversions of frame-rates or picture resolutions can be effectively used for achieving a high transcoding ratio while maintaining an acceptable video quality. For this temporal and resolution transcoding, we propose a fast-motion vector refinement scheme to obtain the outgoing motion vectors from the motion vectors extracted from the incoming bit-stream. Simulation results show that significant computational saving is possible while achieving almost the same video quality compared with that of using full-scale motion estimation.</text:p>
          </table:table-cell>
          <table:table-cell table:style-name="ce2" table:number-columns-repeated="6"/>
          <table:table-cell table:style-name="ce2" office:value-type="string" calcext:value-type="string">
            <text:p>University of Washington</text:p>
          </table:table-cell>
          <table:table-cell table:style-name="ce2" table:number-columns-repeated="2"/>
          <table:table-cell table:style-name="ce2" office:value-type="string" calcext:value-type="string">
            <text:p>AAI996430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Title page]</text:p>
          </table:table-cell>
          <table:table-cell table:style-name="ce2" table:number-columns-repeated="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1-5</text:p>
          </table:table-cell>
          <table:table-cell table:style-name="ce2"/>
          <table:table-cell table:style-name="ce2" office:value-type="string" calcext:value-type="string">
            <text:p>The following topics are dealt with: BS-SVM multi-classification model; conformance checking; release management; multi-sensors data fusion; security policies; software engineer behavior analysis measurement process; data clustering support; agile adoption experience; business-related design; interoperability testing; energy-aware backbone construction algorithm; distributed file system; sheep and goat expert system;npost internship management system; multi-bank flash memory storage systems; fair-exchange protocols; udp-based high-speed transport protocols; e-commerce; table tennis game; SOA; collision arbitration protocol; life-cycle oriented design model; computer network virtual lab system design; assertion testing framework; privacy preserving data mining; MJ2-RSA cryptosystem; community health records;traffic simulation system;price uncertainty inventory problem; oil theft signal detection; gesture recognition;text clustering algorithm; timed automata;software structure evaluation; wireless data acquisition system; Web service schema matching; software construction; distributed database systems; software development; object oriented analysis; data mining approach; face detection algorithm; neural networks; data replication; video motion compensation errors; software design; dynamic vehicle scheduling; service oriented architecture; customer satisfaction; e-manufacturing system; cryptanalysis; item-based collaborative filtering method; recommender system; savant middleware; ontology-based mobile publishing framework; high-speed data acquisition system; MAC protocols; safety-critical systems; program slicing algorithm; wireless sensor network; augmented reality; spam detection; image retrieval algorithm; tax income; foreign direct investment; IT outsourcing; enterprise mobile e-business system model; medium-sized and small enterprises; supply chain management; immune intrusion detection system; adaptive wiener filtering; VPN technology; GIS sharing platform and image restoration.</text:p>
          </table:table-cell>
          <table:table-cell table:style-name="ce2"/>
          <table:table-cell table:style-name="ce2" office:value-type="string" calcext:value-type="string">
            <text:p>10.1109/ICSESS.2011.5982490</text:p>
          </table:table-cell>
          <table:table-cell table:style-name="ce2" table:number-columns-repeated="5"/>
          <table:table-cell table:style-name="ce2" office:value-type="string" calcext:value-type="string">
            <text:p>2327-0594</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number-columns-repeated="998"/>
        </table:table-row>
        <table:table-row table:style-name="ro1">
          <table:table-cell table:style-name="ce2" office:value-type="string" calcext:value-type="string">
            <text:p>Joint Post-Proceedings of the 3rd and 4th International Conference on Microservices, Microservices 2020 and 2022</text:p>
          </table:table-cell>
          <table:table-cell table:style-name="ce2"/>
          <table:table-cell table:style-name="ce2" office:value-type="string" calcext:value-type="string">
            <text:p>OpenAccess Series in Informatic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111</text:p>
          </table:table-cell>
          <table:table-cell table:style-name="ce2" office:value-type="string" calcext:value-type="string">
            <text:p>The proceedings contain 9 papers. The topics discussed include: microservice-aware static analysis: opportunities, gaps, and advancements; modular choreographies: bridging Alice and Bob notation to Java; ZVAX – a microservice reference architecture for nation-scale pandemic management; custom serverless function scheduling policies: an APP tutorial; model-driven code generation for microservices: service models; towards self-architecting autonomic microservices; correct-by-construction microservices with model-driven engineering: the case for architectural pattern conformance checking and pattern-conform code generation; and applying QoS in FaaS applications: a software product line approach.</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82378572&amp;partnerID=40&amp;md5=849b5f6896ac09bbafa5a6feda531999</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DEBS 2023 - Proceedings of the 17th ACM International Conference on Distributed and Event-based Systems</text:p>
          </table:table-cell>
          <table:table-cell table:style-name="ce2" table:number-columns-repeated="2"/>
          <table:table-cell table:style-name="ce2" office:value-type="string" calcext:value-type="string">
            <text:p>2023</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26 papers. The topics discussed include: a selective and biased choice of techniques for building a distributed data store; accelerating the performance of distributed stream processing systems with in-network computing; secure distributed data and event processing at scale: where are we now?; adaptive distributed streaming similarity joins; I will survive: an event-driven conformance checking approach over process streams; on improving streaming system Autoscaler behavior using windowing and weighting methods; practical forecasting of cryptocoins timeseries using correlation patterns; an exploratory analysis of methods for real-time data deduplication in streaming processes; considerations for integrating virtual threads in a Java framework: a Quarkus example in a resource-constrained environment; and discovery of breakout patterns in financial tick data via parallel stream processing with in-order guarante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70088550&amp;partnerID=40&amp;md5=75a480b5d42a46613f181ad7f467bcfd</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Proceedings of the 2023 International Workshop on Petri Nets and Software Engineering, PNSE 2023, co-located with the 44th International Conference on Application and Theory of Petri Nets and Concurrency, PETRI NETS 2023</text:p>
          </table:table-cell>
          <table:table-cell table:style-name="ce2"/>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3430</text:p>
          </table:table-cell>
          <table:table-cell table:style-name="ce2" office:value-type="string" calcext:value-type="string">
            <text:p>The proceedings contain 16 papers. The topics discussed include: a petri-net-based approach to modeling communication algorithms for HPC molecular dynamics simulations; efficient strategies to compute invariants, bounds and stable places of Petri nets; Petri-Nets@Run.Time: handling uncertainty during run-time adaptation using digital twins; robustness: a natural definition based on nets-within-nets; a symmetric petri net model of generic publish-subscribe systems for verification and business process conformance checking; towards a formal and executable software architecture specification of the smart ocean data service platform; modeling interaction-oriented architectures using choreographies; hierarchical simulation of timed behaviors of structured occurrence nets; probabilistic behavioral acyclic nets; and context-sensitive analysis of data interference for concurrent program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66011676&amp;partnerID=40&amp;md5=d3dc221326e3ec101e81e4fad30d135c</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16th European Conference on Software Architecture, ECSA 2022</text:p>
          </table:table-cell>
          <table:table-cell table:style-name="ce2"/>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3444 LNCS</text:p>
          </table:table-cell>
          <table:table-cell table:style-name="ce2" office:value-type="string" calcext:value-type="string">
            <text:p>The proceedings contain 15 papers. The special focus in this conference is on Software Architecture. The topics include: Persistence Factories Architectural Design Pattern; feature-Based Investigation of Simulation Structure and Behaviour; ARCHI4MOM: Using Tracing Information to Extract the Architecture of Microservice-Based Systems from Message-Oriented Middleware; autoArx: Digital Twins of Living Architectures; documentation-as-Code for Interface Control Document Management in Systems of Systems: A Technical Action Research Study; To Deprecate or to Simply Drop Operations? An Empirical Study on the Evolution of a Large OpenAPI Collection; ProML: A Decentralised Platform for Provenance Management of Machine Learning Software Systems; a Systematic Survey of Architectural Approaches and Trade-Offs in Data De-identification; accurate Performance Predictions with Component-Based Models of Data Streaming Applications; assessing Architecture Conformance to Coupling-Related Infrastructure-as-Code Best Practices: Metrics and Case Studies; teaching Microservice Architecture Using DevOps—An Experience Report; should Microservice Security Smells Stay or be Refactored? Towards a Trade-off Analysis; prefac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9007817&amp;partnerID=40&amp;md5=2b850fa0894ee8300360e6882f4f81a6</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45th International Conference on Application and Theory of Petri Nets and Concurrency, Petri Nets 2024</text:p>
          </table:table-cell>
          <table:table-cell table:style-name="ce2"/>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table:table-cell table:style-name="ce2" office:value-type="string" calcext:value-type="string">
            <text:p>14628 LNCS</text:p>
          </table:table-cell>
          <table:table-cell table:style-name="ce2" office:value-type="string" calcext:value-type="string">
            <text:p>The proceedings contain 21 papers. The special focus in this conference is on Application and Theory of Petri Nets and Concurrency. The topics include: Concurrent Context-Free Grammar for Parsing Business Processes with Iterated Shuffles; conformance Checking with Model Projections; process Comparison Using Petri Net Decomposition; on the Expressive Power of Transfinite Sequences for Continuous Petri Nets; hilbert Composition of Multilabelled Events; relational Structures for Interval Order Semantics of Concurrent Systems; Token Trail Semantics II - Petri Nets And Their Net Language; languages of Higher-Dimensional Timed Automata; petri Net Synthesis from a Reachability Set; symbolic Domains and Reachability for Nets with Trajectories; symbolic Model Checking Using Intervals of Vectors; safety Verification of Wait-Only Non-Blocking Broadcast Protocols; modular State Spaces - A New Perspective; verifying Temporal Logic Properties in the Modular State Space; design of Event-Driven Tsetlin Machines Using Safe Petri Nets; identifying Duplicates in Large Collections of Petri Nets and Nested-Unit Petri Nets; Remote Debugger: A Tool to Remotely Monitor and Operate IOPT-Nets Controllers; using Petri Nets for Digital Twins Modeling and Deployment: A Power Wheelchair System Case Study; cosyVerif: The Path to Formalisms Cohabita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97262642&amp;partnerID=40&amp;md5=8a17c892858fef08aa7f0b80aa63894d</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8th Workshop on Software Architecture Erosion and Architectural Consistency, SAEroCon 2021, 1st International Workshop on Software Architecture and Machine Learning, SAML 2021, 4th International Workshop on Context-aware, Autonomous and Smart Architecture, CASA 2021, 5th Workshop on Formal Approaches for Advanced Computing Systems, FAACS 2021, 2nd International Workshop on Model-Driven Engineering for Software Architecture, MDE4SA 2021 and 1st International Workshop on Mining Software Repositories for Software Architecture, MSR4SA 2021 which complemented 15th European Conference on Software Architecture, ECSA 2021</text:p>
          </table:table-cell>
          <table:table-cell table:style-name="ce2"/>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3365 LNCS</text:p>
          </table:table-cell>
          <table:table-cell table:style-name="ce2" office:value-type="string" calcext:value-type="string">
            <text:p>The proceedings contain 15 papers presendted at a virtual meeting. The special focus in this conference is on Software Architecture Erosion and Architectural Consistency. The topics include: Interactive Elicitation of Resilience Scenarios Based on Hazard Analysis Techniques; Towards an Extensible Approach for Generative Microservice Development and Deployment Using LEMMA; applying Knowledge-Driven Architecture Composition with Gabble; architectural Optimization for Confidentiality Under Structural Uncertainty; foundations and Research Agenda for Simulation of Smart Ecosystems Architectures; Blended Graphical and Textual Modelling of UML-RT State-Machines: An Industrial Experience; toward Awareness Creation of Common Challenges Women are Facing in Academia: A Study from a German Perspective; mapping Source Code to Modular Architectures Using Keywords; hierarchical Code-to-Architecture Mapping; Building the MSR Tool Kaiaulu: Design Principles and Experiences; self-adaptive Machine Learning Systems: Research Challenges and Opportunities; behavioral Maps: Identifying Architectural Smells in Self-adaptive Systems at Runtime; an Architectural Approach for Enabling and Developing Cooperative Behaviour in Diverse Autonomous Robo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7000762&amp;partnerID=40&amp;md5=f5db01f01875a8b8a47e461266505a6d</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Proceedings - IEEE 18th International Conference on Software Architecture, ICSA 2021</text:p>
          </table:table-cell>
          <table:table-cell table:style-name="ce2" table:number-columns-repeated="2"/>
          <table:table-cell table:style-name="ce2" office:value-type="string" calcext:value-type="string">
            <text:p>2021</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the influence of cognitive biases on architectural technical debt; constructing a shared infrastructure for software architecture analysis and maintenance; exploring web search engines to find architectural knowledge; enabling consistency between software artefacts for software adaption and evolution; system- and software-level architecting harmonization practices for systems-of-systems: an exploratory case study on a long-running large-scale scientific instrument; practitioner views on the interrelation of microservice APIs and domain-driven design: a grey literature study based on grounded theory; semi-automatic feedback for improving architecture conformance to microservice patterns and practices; and a decision model for choosing patterns in blockchain-based application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06998243&amp;partnerID=40&amp;md5=ca10de04345a35215d1f875dd4752c49</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19th International Conference on Service-Oriented Computing, ICSOC 2021</text:p>
          </table:table-cell>
          <table:table-cell table:style-name="ce2"/>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13121 LNCS</text:p>
          </table:table-cell>
          <table:table-cell table:style-name="ce2" office:value-type="string" calcext:value-type="string">
            <text:p>The proceedings contain 67 papers. The special focus in this conference is on Service-Oriented Computing. The topics include: Are Developers Equally Concerned About Making Their APIs RESTful and the Linguistic Quality? A Study on Google APIs; evaluating and Improving Microservice Architecture Conformance to Architectural Design Decisions; thunQ: A Distributed and Deep Authorization Middleware for Early and Lazy Policy Enforcement in Microservice Applications; boreas – A Service Scheduler for Optimal Kubernetes Deployment; resource Management for TensorFlow Inference; representation Learning Based Query Decomposition for Batch Shortest Path Processing in Road Networks; an Adaptive Charging Scheduling for Electric Vehicles Using Multiagent Reinforcement Learning; Locating False Data Injection Attacks on Smart Grids Using D-FACTS Devices; privacy-Preserving Worker Recruitment Under Variety Requirement in Spatial Crowdsourcing; DeepProcess: Supporting Business Process Execution Using a MANN-Based Recommender System; t2L2: A Tiny Three Linear Layers Model for Service Mashup Creation; energy-Aware Placement of Device-to-Device Mediation Services in IoT Systems; fairness-Aware Crowdsourcing of IoT Energy Services; dynamic Conflict Resolution of IoT Services in Smart Homes; migration-Based Service Allocation Optimization in Dynamic IoT Networks; automated Paraphrase Generation with Over-Generation and Pruning Services; privacy-Aware Identity Cloning Detection Based on Deep Forest; multiple Agents Reinforcement Learning Based Influence Maximization in Social Network Services; on the Scalability of Compositions of Service-Oriented Applications; ServiceBERT: A Pre-trained Model for Web Service Tagging and Recommendation; interval-Based Remaining Time Prediction for Business Processes; top-k Dynamic Service Composition in Skyway Networks; graph-Based Data Deduplication in Mobile Edge Computing Environment; iaaS Signature Change Detection with Performance Nois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20568278&amp;partnerID=40&amp;md5=138bde8667c39b18ad69f8fb6ea7c6be</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CEUR Workshop Proceedings</text:p>
          </table:table-cell>
          <table:table-cell table:style-name="ce2"/>
          <table:table-cell table:style-name="ce2" office:value-type="string" calcext:value-type="string">
            <text:p>CEUR Workshop Proceedings</text:p>
          </table:table-cell>
          <table:table-cell table:style-name="ce2" office:value-type="string" calcext:value-type="string">
            <text:p>2017</text:p>
          </table:table-cell>
          <table:table-cell table:style-name="ce2" office:value-type="string" calcext:value-type="string">
            <text:p>Scopus</text:p>
          </table:table-cell>
          <table:table-cell table:style-name="ce2"/>
          <table:table-cell table:style-name="ce2" office:value-type="string" calcext:value-type="string">
            <text:p>1920</text:p>
          </table:table-cell>
          <table:table-cell table:style-name="ce2" office:value-type="string" calcext:value-type="string">
            <text:p>The proceedings contain 41 papers. The topics discussed include: replay using recomposition: alignment-based conformance checking in the large; DPIL Navigator 2.0: multi-perspective declarative process execution; design it like Darwin 2.0 an evolutionary algorithm for automatic process redesign; NLP4BPM - natural language processing tools for business process management; improving interactivity in multidimensional process mining: the interactive PMCube explorer tool; SPOT: simulation and evaluation of real time locating system data; online conformance checking for Petri nets and event streams; the process checklist generator: establishing paper-based process support; predictive analysis of BPM tasks with autoCEP; heuristic mining revamped: an interactive, data-aware, and conformance-aware miner; PALIA-ER: bringing question-driven process mining closer to the emergency room; testing event-driven applications with automatically generated events; CJM-ex: goal-oriented exploration of customer journey maps using event logs and data analytics; a model-driven framework for domain specific process design and governance; and a tool for checking soundness of decision-aware business process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0089077&amp;partnerID=40&amp;md5=72d0b2179cd6f72db9c86d224bcebb16</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REJECTED</text:p>
          </table:table-cell>
          <table:table-cell table:style-name="ce4" office:value-type="string" calcext:value-type="string">
            <text:p>EC9</text:p>
          </table:table-cell>
          <table:table-cell table:style-name="ce4" office:value-type="string" calcext:value-type="string">
            <text:p>Study focuses on business process conformance rather than architectural conformance.</text:p>
          </table:table-cell>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11th European Conference on Software Architecture, ECSA 2017</text:p>
          </table:table-cell>
          <table:table-cell table:style-name="ce2"/>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1 - 215</text:p>
          </table:table-cell>
          <table:table-cell table:style-name="ce2" office:value-type="string" calcext:value-type="string">
            <text:p>10475 LNCS</text:p>
          </table:table-cell>
          <table:table-cell table:style-name="ce2" office:value-type="string" calcext:value-type="string">
            <text:p>The proceedings contain 15 papers. The special focus in this conference is on Software Architecture. The topics include: Synthesis and quantitative verification of tradeoff spaces for families of software systems; PARAD repository: on the capitalization of the performance analysis process for AADL designs; continuous rearchitecting of QoS models: collaborative analysis for uncertainty reduction; the evolution of technical debt in the apache ecosystem; preventing erosion in exception handling design using static-architecture conformance checking; considerations about continuous experimentation for resource-constrained platforms in self-driving vehicles; an architecture framework for modelling and simulation of situational-aware cyber-physical systems; control of self-adaptation under partial observation; on cognitive biases in architecture decision making; automatic extraction of design decisions from issue management systems; design areas, stakeholders, use cases, and requirements; software architecture risk containers; a model for prioritization of software architecture effort; architectural assumptions and their management in industry - an exploratory study; microservices in a small development organiza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28982397&amp;partnerID=40&amp;md5=3660de41cf1dc6714b6b9f4fe5fcbfc9</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3rd International Symposium on Engineering Secure Software and Systems, ESSoS 2011</text:p>
          </table:table-cell>
          <table:table-cell table:style-name="ce2"/>
          <table:table-cell table:style-name="ce2" office:value-type="string" calcext:value-type="string">
            <text:p>Lecture Notes in Computer Science</text:p>
          </table:table-cell>
          <table:table-cell table:style-name="ce2" office:value-type="string" calcext:value-type="string">
            <text:p>2011</text:p>
          </table:table-cell>
          <table:table-cell table:style-name="ce2" office:value-type="string" calcext:value-type="string">
            <text:p>Scopus</text:p>
          </table:table-cell>
          <table:table-cell table:style-name="ce2"/>
          <table:table-cell table:style-name="ce2" office:value-type="string" calcext:value-type="string">
            <text:p>6542 LNCS</text:p>
          </table:table-cell>
          <table:table-cell table:style-name="ce2" office:value-type="string" calcext:value-type="string">
            <text:p>The proceedings contain 21 papers. The special focus in this conference is on Engineering Secure Software and Systems. The topics include: A Tool-Supported Method for the Design and Implementation of Secure Distributed Applications; an Architecture-Centric Approach to Detecting Security Patterns in Software; the Security Twin Peaks; evolution of Security Requirements Tests for Service–Centric Systems; after-Life Vulnerabilities: A Study on Firefox Evolution, Its Vulnerabilities, and Fixes; authorization Enforcement Usability Case Study; scalable Authorization Middleware for Service Oriented Architectures; adaptable Authentication Model: Exploring Security with Weaker Attacker Models; idea: Interactive Support for Secure Software Development; automatic Conformance Checking of Role-Based Access Control Policies via Alloy; idea: A Reference Platform for Systematic Information Security Management Tool Support; idea: Simulation Based Security Requirement Verification for Transaction Level Models; security Validation of Business Processes via Model-Checking; on-Device Control Flow Verification for Java Programs; efficient Symbolic Execution for Analysing Cryptographic Protocol Implementations; predictability of Enforcement; sessionShield: Lightweight Protection against Session Hijacking; security Sensitive Data Flow Coverage Criterion for Automatic Security Testing of Web Applications; middleware Support for Complex and Distributed Security Services in Multi-tier Web Application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7716892&amp;partnerID=40&amp;md5=1b92caee72d5d1f8b6b78191bcda9219</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Web Services and Formal Methods - Third International Workshop, WS-FM 2006,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4184 LNCS</text:p>
          </table:table-cell>
          <table:table-cell table:style-name="ce2" office:value-type="string" calcext:value-type="string">
            <text:p>The proceedings contain 18 papers. The topics discussed include: service QoS composition at the level of part names; SCC service centered calculus; semantic querying of mathematical Web service descriptions; verified reference implementations WS-security protocols; translating Orc features into Petri Nets and the join calculus; dynamic constraint-based invocation of Web services; a formal of contracts for Web services; execution semantics for service chreographies; analysis and verification of time requirements applied to the Web services composition; a formal approach to service component architecture; evaluating the scalability of a Web service-based distributed e-learning and course management system; chereography conformance analysis: asynchronous communications and information alignment; and towards a unifying theory for Web services composi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941181272&amp;partnerID=40&amp;md5=8f439d33ad00107421c7862182f32e90</text:p>
          </table:table-cell>
          <table:table-cell table:style-name="ce2" table:number-columns-repeated="2"/>
          <table:table-cell table:style-name="ce2" office:value-type="string" calcext:value-type="string">
            <text:p>Information services; Petri nets; Quality of service; Semantics; Telecommunication services; Asynchronous communications; Service chreographies; Web services composition; World Wide Web</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1">
          <table:table-cell table:style-name="ce2" office:value-type="string" calcext:value-type="string">
            <text:p>Proceedings - 2017 IEEE International Conference on Software Architecture, ICSA 2017</text:p>
          </table:table-cell>
          <table:table-cell table:style-name="ce2" table:number-columns-repeated="2"/>
          <table:table-cell table:style-name="ce2" office:value-type="string" calcext:value-type="string">
            <text:p>2017</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34 papers. The topics discussed include: microservice ambients: an architectural meta-modelling approach for microservice granularity; research on architecting microservices: trends, focus, and potential for industrial adoption; quality evaluation of PaaS cloud application design using generated prototypes; towards a reference architecture for cloud-based plant genotyping and phenotyping analysis frameworks; comparing the built-in application architecture models in the web browser; determination and enforcement of least-privilege architecture in android; understanding software vulnerabilities related to architectural security tactics: an empirical investigation of chromium, PHP and Thunderbird; experiments in curation: towards machine-assisted construction of software architecture knowledge bases; developing an ontology for architecture knowledge from developer communities; digital space systems engineering through semantic data models; human aspects in software architecture decision making: a literature review; accurate analysis of quality properties of software with observation-based Markov chain refinement; designing robust software systems through parametric Markov chain synthesis; semantic differencing for message-driven component &amp; connector architectures; and on the understandability of semantic constraints for behavioral software architecture compliance: a controlled experiment.</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21426692&amp;partnerID=40&amp;md5=85341f583a96ebc36c08f17bbd96a9c0</text:p>
          </table:table-cell>
          <table:table-cell table:style-name="ce2" table:number-columns-repeated="6"/>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REJECTED</text:p>
          </table:table-cell>
          <table:table-cell table:style-name="ce4" office:value-type="string" calcext:value-type="string">
            <text:p>EC4</text:p>
          </table:table-cell>
          <table:table-cell table:style-name="ce4" office:value-type="string" calcext:value-type="string">
            <text:p>The publication is a non-peer-reviewed document type (e.g., conference review or editorial).</text:p>
          </table:table-cell>
          <table:table-cell table:number-columns-repeated="998"/>
        </table:table-row>
        <table:table-row table:style-name="ro2" table:number-rows-repeated="781">
          <table:table-cell table:number-columns-repeated="20"/>
          <table:table-cell table:style-name="ce4" table:number-columns-repeated="6"/>
          <table:table-cell table:number-columns-repeated="998"/>
        </table:table-row>
        <table:table-row table:style-name="ro3" table:number-rows-repeated="1047632">
          <table:table-cell table:number-columns-repeated="1024"/>
        </table:table-row>
        <table:table-row table:style-name="ro3">
          <table:table-cell table:number-columns-repeated="1024"/>
        </table:table-row>
        <table:named-expressions>
          <table:named-range table:name="_xlnm._FilterDatabase" table:base-cell-address="$Articles.$A$1" table:cell-range-address="$Articles.$A$1:.$Z$162"/>
        </table:named-expressions>
      </table:table>
      <table:named-expressions/>
      <table:database-ranges>
        <table:database-range table:name="__Anonymous_Sheet_DB__0" table:target-range-address="Articles.A1:Articles.Z16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12" meta:object-count="0"/>
    <meta:generator>LibreOfficeDev/6.0.5.2$Linux_X86_64 LibreOffice_project/</meta:generator>
  </office:meta>
</office:document-meta>
</file>