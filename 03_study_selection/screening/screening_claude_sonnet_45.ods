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laude_5f_sonnet_5f_45_5f_screening_5f_resul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ude_sonnet_45_screening_results"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LLM_Decision</text:p>
          </table:table-cell>
          <table:table-cell table:style-name="ce1" office:value-type="string" calcext:value-type="string">
            <text:p>LLM_Exclusion_Criterion</text:p>
          </table:table-cell>
          <table:table-cell table:style-name="ce1" office:value-type="string" calcext:value-type="string">
            <text:p>LLM_Justification</text:p>
          </table:table-cell>
          <table:table-cell table:number-columns-repeated="1003"/>
        </table:table-row>
        <table:table-row table:style-name="ro1">
          <table:table-cell table:style-name="ce1" office:value-type="string" calcext:value-type="string">
            <text:p>Service Mining: Using Process Mining to Discover, Check, and Improve Service Behavior</text:p>
          </table:table-cell>
          <table:table-cell table:style-name="ce1" office:value-type="string" calcext:value-type="string">
            <text:p>Aalst, Wil van der</text:p>
          </table:table-cell>
          <table:table-cell table:style-name="ce1" office:value-type="string" calcext:value-type="string">
            <text:p>IEEE Transactions on Services Computing</text:p>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525-535</text:p>
          </table:table-cell>
          <table:table-cell table:style-name="ce1" office:value-type="float" office:value="6" calcext:value-type="float">
            <text:p>6</text:p>
          </table:table-cell>
          <table:table-cell table:style-name="ce1"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table-cell table:style-name="ce1" office:value-type="string" calcext:value-type="string">
            <text:p>10.1109/TSC.2012.25</text:p>
          </table:table-cell>
          <table:table-cell table:number-columns-repeated="3"/>
          <table:table-cell table:style-name="ce1" office:value-type="string" calcext:value-type="string">
            <text:p>Data mining;Web services;Computational modeling;Context;Analytical models;Customer services;Process mining;business process management;service discovery;conformance checking</text:p>
          </table:table-cell>
          <table:table-cell/>
          <table:table-cell table:style-name="ce1" office:value-type="string" calcext:value-type="string">
            <text:p>1939-1374</text:p>
          </table:table-cell>
          <table:table-cell table:number-columns-repeated="2"/>
          <table:table-cell table:style-name="ce1" office:value-type="string" calcext:value-type="string">
            <text:p>REJECTED</text:p>
          </table:table-cell>
          <table:table-cell table:style-name="ce1" office:value-type="string" calcext:value-type="string">
            <text:p>EC9</text:p>
          </table:table-cell>
          <table:table-cell table:style-name="ce1" office:value-type="string" calcext:value-type="string">
            <text:p>Study focuses on business process conformance rather than architectural conformance.</text:p>
          </table:table-cell>
          <table:table-cell table:number-columns-repeated="1003"/>
        </table:table-row>
        <table:table-row table:style-name="ro1">
          <table:table-cell table:style-name="ce1" office:value-type="string" calcext:value-type="string">
            <text:p>An architectural style for scalable choreography-based microservice-oriented distributed systems</text:p>
          </table:table-cell>
          <table:table-cell table:style-name="ce1" office:value-type="string" calcext:value-type="string">
            <text:p>Filippone, Gianluca and Pompilio, Claudio and Autili, Marco and Tivoli, Massimo</text:p>
          </table:table-cell>
          <table:table-cell table:style-name="ce1" office:value-type="string" calcext:value-type="string">
            <text:p>Computing</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1933 - 1956</text:p>
          </table:table-cell>
          <table:table-cell table:style-name="ce1" office:value-type="float" office:value="105" calcext:value-type="float">
            <text:p>105</text:p>
          </table:table-cell>
          <table:table-cell table:style-name="ce1"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1" office:value-type="string" calcext:value-type="string">
            <text:p>Article</text:p>
          </table:table-cell>
          <table:table-cell table:style-name="ce1" office:value-type="string" calcext:value-type="string">
            <text:p>10.1007/s00607-022-01139-5</text:p>
          </table:table-cell>
          <table:table-cell table:style-name="ce3" office:value-type="string" calcext:value-type="string">
            <text:p><text:a xlink:href="https://www.scopus.com/inward/record.uri?eid=2-s2.0-85143627065&amp;doi=10.1007%2Fs00607-022-01139-5&amp;partnerID=40&amp;md5=99268a3d9dd57170a99d75632836bdea" xlink:type="simple">https://www.scopus.com/inward/record.uri?eid=2-s2.0-85143627065&amp;doi=10.1007%2Fs00607-022-01139-5&amp;partnerID=40&amp;md5=99268a3d9dd57170a99d75632836bdea</text:a></text:p>
          </table:table-cell>
          <table:table-cell/>
          <table:table-cell table:style-name="ce1" office:value-type="string" calcext:value-type="string">
            <text:p>Distributed systems; Load balancing; Microservices; Scalability</text:p>
          </table:table-cell>
          <table:table-cell table:style-name="ce1"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EFSM-based test generation for validation of SDL specifications</text:p>
          </table:table-cell>
          <table:table-cell table:style-name="ce1" office:value-type="string" calcext:value-type="string">
            <text:p>Wong, W. Eric and Restrepo, Andy and Qi, Yu and Choi, Byoungju</text:p>
          </table:table-cell>
          <table:table-cell/>
          <table:table-cell table:style-name="ce1" office:value-type="float" office:value="2008" calcext:value-type="float">
            <text:p>2008</text:p>
          </table:table-cell>
          <table:table-cell table:style-name="ce1" office:value-type="string" calcext:value-type="string">
            <text:p>ACM Digital Library</text:p>
          </table:table-cell>
          <table:table-cell table:style-name="ce1" office:value-type="string" calcext:value-type="string">
            <text:p>25–32</text:p>
          </table:table-cell>
          <table:table-cell/>
          <table:table-cell table:style-name="ce1"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table-cell table:style-name="ce1" office:value-type="string" calcext:value-type="string">
            <text:p>10.1145/1370042.1370049</text:p>
          </table:table-cell>
          <table:table-cell table:style-name="ce3" office:value-type="string" calcext:value-type="string">
            <text:p><text:a xlink:href="https://doi.org/10.1145/1370042.1370049" xlink:type="simple">https://doi.org/10.1145/1370042.1370049</text:a></text:p>
          </table:table-cell>
          <table:table-cell table:number-columns-repeated="2"/>
          <table:table-cell table:style-name="ce1" office:value-type="string" calcext:value-type="string">
            <text:p>EFSM (extended finite state machine), SDL, coverage test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Reliable Monitoring for Runtime Validation of Choreographies</text:p>
          </table:table-cell>
          <table:table-cell table:style-name="ce1" office:value-type="string" calcext:value-type="string">
            <text:p>von Riegen, Michael and Ritter, Norbert</text:p>
          </table:table-cell>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1" office:value-type="string" calcext:value-type="string">
            <text:p>310-315</text:p>
          </table:table-cell>
          <table:table-cell/>
          <table:table-cell table:style-name="ce1"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table-cell table:style-name="ce1" office:value-type="string" calcext:value-type="string">
            <text:p>10.1109/ICIW.2009.52</text:p>
          </table:table-cell>
          <table:table-cell table:number-columns-repeated="3"/>
          <table:table-cell table:style-name="ce1"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ultimedia Content Provisioning Using Service Oriented Architectures</text:p>
          </table:table-cell>
          <table:table-cell table:style-name="ce1" office:value-type="string" calcext:value-type="string">
            <text:p>Brunkhorst, Ingo and Tönnies, Sascha and Balke, Wolf-Tilo</text:p>
          </table:table-cell>
          <table:table-cell/>
          <table:table-cell table:style-name="ce1" office:value-type="float" office:value="2008" calcext:value-type="float">
            <text:p>2008</text:p>
          </table:table-cell>
          <table:table-cell table:style-name="ce1" office:value-type="string" calcext:value-type="string">
            <text:p>IEEE Digital Library</text:p>
          </table:table-cell>
          <table:table-cell table:style-name="ce1" office:value-type="string" calcext:value-type="string">
            <text:p>262-269</text:p>
          </table:table-cell>
          <table:table-cell/>
          <table:table-cell table:style-name="ce1"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table-cell table:style-name="ce1" office:value-type="string" calcext:value-type="string">
            <text:p>10.1109/ICWS.2008.37</text:p>
          </table:table-cell>
          <table:table-cell table:number-columns-repeated="3"/>
          <table:table-cell table:style-name="ce1" office:value-type="string" calcext:value-type="string">
            <text:p>Service oriented architecture;Streaming media;Multimedia systems;Web services;Buildings;Large-scale systems;Protocols;TV;Prototypes;IPTV;Multimedia Workflows;Conformance Verification;Validation</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Software Architecture in Practice: Challenges and Opportunities</text:p>
          </table:table-cell>
          <table:table-cell table:style-name="ce1" office:value-type="string" calcext:value-type="string">
            <text:p>Wan, Zhiyuan and Zhang, Yun and Xia, Xin and Jiang, Yi and Lo, David</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457–1469</text:p>
          </table:table-cell>
          <table:table-cell/>
          <table:table-cell table:style-name="ce1"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table-cell table:style-name="ce1" office:value-type="string" calcext:value-type="string">
            <text:p>10.1145/3611643.3616367</text:p>
          </table:table-cell>
          <table:table-cell table:style-name="ce3" office:value-type="string" calcext:value-type="string">
            <text:p><text:a xlink:href="https://doi.org/10.1145/3611643.3616367" xlink:type="simple">https://doi.org/10.1145/3611643.3616367</text:a></text:p>
          </table:table-cell>
          <table:table-cell table:number-columns-repeated="2"/>
          <table:table-cell table:style-name="ce1" office:value-type="string" calcext:value-type="string">
            <text:p>Grounded Theory, Practice, Software Architecture, Software Development and Maintenance</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Process mining for healthcare decision analytics with micro-costing estimations</text:p>
          </table:table-cell>
          <table:table-cell table:style-name="ce1" office:value-type="string" calcext:value-type="string">
            <text:p>Leemans, Sander J.J. and Partington, Andrew and Karnon, Jonathan and Wynn, Moe T.</text:p>
          </table:table-cell>
          <table:table-cell table:style-name="ce1" office:value-type="string" calcext:value-type="string">
            <text:p>Artif. Intell. Med.</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135" calcext:value-type="float">
            <text:p>135</text:p>
          </table:table-cell>
          <table:table-cell table:style-name="ce1" office:value-type="string" calcext:value-type="string">
            <text:p>Managing constrained healthcare resources is an important and inescapable role of healthcare decision makers. Allocative decisions are based on downstream consequences of changes to care processes: judging whether the costs involved are offset by the magnitude of the consequences, and therefore whether the change represents value for money. Process mining techniques can inform such decisions by quantitatively discovering, comparing and detailing care processes using recorded data, however the scope of techniques typically excludes anything ‘after-the-process’ i.e., their accumulated costs and resulting consequences. Cost considerations are increasingly incorporated into process mining techniques, but the majority of healthcare costs for service and overhead components are commonly apportioned and recorded at the patient (trace) level, hiding event level detail. Within decision-analysis, event-driven and individual-level simulation models are sometimes used to forecast the expected downstream consequences of process changes, but are expensive to manually operationalise. In this paper, we address both of these gaps within and between process mining and decision analytics, by better linking them together. In particular, we introduce a new type of process model containing trace data that can be used in individual-level or cohort-level decision-analytical model building. Furthermore, we enhance these models with process-based micro-costing estimations. The approach was evaluated with health economics and decision modelling experts, with discussion centred on how the outputs could be used, and how similar information would otherwise be compiled.</text:p>
          </table:table-cell>
          <table:table-cell/>
          <table:table-cell table:style-name="ce1" office:value-type="string" calcext:value-type="string">
            <text:p>10.1016/j.artmed.2022.102473</text:p>
          </table:table-cell>
          <table:table-cell table:style-name="ce3" office:value-type="string" calcext:value-type="string">
            <text:p><text:a xlink:href="https://doi.org/10.1016/j.artmed.2022.102473" xlink:type="simple">https://doi.org/10.1016/j.artmed.2022.102473</text:a></text:p>
          </table:table-cell>
          <table:table-cell table:number-columns-repeated="2"/>
          <table:table-cell table:style-name="ce1" office:value-type="string" calcext:value-type="string">
            <text:p>Process mining, Decision analytics, Healthcare economics</text:p>
          </table:table-cell>
          <table:table-cell table:style-name="ce1" office:value-type="string" calcext:value-type="string">
            <text:p>Elsevier Science Publishers Ltd.</text:p>
          </table:table-cell>
          <table:table-cell table:style-name="ce1" office:value-type="string" calcext:value-type="string">
            <text:p>0933-3657</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Gradual Drift Detection in Process Models Using Conformance Metrics</text:p>
          </table:table-cell>
          <table:table-cell table:style-name="ce1" office:value-type="string" calcext:value-type="string">
            <text:p>Gallego-Fontenla, V\'{\i}ctor and Gamallo-Fernandez, Pedro and Vidal, Juan C. and Lama, Manuel</text:p>
          </table:table-cell>
          <table:table-cell table:style-name="ce1" office:value-type="string" calcext:value-type="string">
            <text:p>ACM Trans. Knowl. Discov. Data</text:p>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table-cell table:style-name="ce1" office:value-type="float" office:value="19" calcext:value-type="float">
            <text:p>19</text:p>
          </table:table-cell>
          <table:table-cell table:style-name="ce1"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table-cell table:style-name="ce1" office:value-type="string" calcext:value-type="string">
            <text:p>10.1145/3716169</text:p>
          </table:table-cell>
          <table:table-cell table:style-name="ce3" office:value-type="string" calcext:value-type="string">
            <text:p><text:a xlink:href="https://doi.org/10.1145/3716169" xlink:type="simple">https://doi.org/10.1145/3716169</text:a></text:p>
          </table:table-cell>
          <table:table-cell table:number-columns-repeated="2"/>
          <table:table-cell table:style-name="ce1" office:value-type="string" calcext:value-type="string">
            <text:p>Business Processes, Concept drift, Gradual drift, Process mining, Conformance checking</text:p>
          </table:table-cell>
          <table:table-cell table:style-name="ce1" office:value-type="string" calcext:value-type="string">
            <text:p>Association for Computing Machinery</text:p>
          </table:table-cell>
          <table:table-cell table:style-name="ce1" office:value-type="string" calcext:value-type="string">
            <text:p>1556-4681</text:p>
          </table:table-cell>
          <table:table-cell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Leveraging Petri Nets for&amp;nbsp;Workflow Anomaly Detection in&amp;nbsp;Microservice Architectures</text:p>
          </table:table-cell>
          <table:table-cell table:style-name="ce1" office:value-type="string" calcext:value-type="string">
            <text:p>Kamboj, Priyanka and Artho, Cyrille and Guanciale, Roberto and Jabbarvand, Reyhaneh and Godfrey, Brighten</text:p>
          </table:table-cell>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style-name="ce1" office:value-type="string" calcext:value-type="string">
            <text:p>219–241</text:p>
          </table:table-cell>
          <table:table-cell/>
          <table:table-cell table:style-name="ce1"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table-cell table:style-name="ce1" office:value-type="string" calcext:value-type="string">
            <text:p>10.1007/978-3-031-94634-9_11</text:p>
          </table:table-cell>
          <table:table-cell table:style-name="ce3" office:value-type="string" calcext:value-type="string">
            <text:p><text:a xlink:href="https://doi.org/10.1007/978-3-031-94634-9_11" xlink:type="simple">https://doi.org/10.1007/978-3-031-94634-9_11</text:a></text:p>
          </table:table-cell>
          <table:table-cell table:number-columns-repeated="2"/>
          <table:table-cell table:style-name="ce1" office:value-type="string" calcext:value-type="string">
            <text:p>Alignments, Cost function, Delay, Microservices, Process mining, Process discovery, Conformance Checking</text:p>
          </table:table-cell>
          <table:table-cell table:style-name="ce1" office:value-type="string" calcext:value-type="string">
            <text:p>Springer-Verlag</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fficiently Computing Alignments: Using the Extended Marking Equation</text:p>
          </table:table-cell>
          <table:table-cell table:style-name="ce1" office:value-type="string" calcext:value-type="string">
            <text:p>van Dongen, Boudewijn F.</text:p>
          </table:table-cell>
          <table:table-cell/>
          <table:table-cell table:style-name="ce1" office:value-type="float" office:value="2018" calcext:value-type="float">
            <text:p>2018</text:p>
          </table:table-cell>
          <table:table-cell table:style-name="ce1" office:value-type="string" calcext:value-type="string">
            <text:p>ACM Digital Library</text:p>
          </table:table-cell>
          <table:table-cell table:style-name="ce1" office:value-type="string" calcext:value-type="string">
            <text:p>197–214</text:p>
          </table:table-cell>
          <table:table-cell/>
          <table:table-cell table:style-name="ce1"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table-cell table:style-name="ce1" office:value-type="string" calcext:value-type="string">
            <text:p>10.1007/978-3-319-98648-7_12</text:p>
          </table:table-cell>
          <table:table-cell table:style-name="ce3" office:value-type="string" calcext:value-type="string">
            <text:p><text:a xlink:href="https://doi.org/10.1007/978-3-319-98648-7_12" xlink:type="simple">https://doi.org/10.1007/978-3-319-98648-7_12</text:a></text:p>
          </table:table-cell>
          <table:table-cell table:number-columns-repeated="2"/>
          <table:table-cell table:style-name="ce1" office:value-type="string" calcext:value-type="string">
            <text:p>Alignments, Conformance checking, Process Min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Quality-Informed Process Mining: A Case for Standardised Data Quality Annotations</text:p>
          </table:table-cell>
          <table:table-cell table:style-name="ce1" office:value-type="string" calcext:value-type="string">
            <text:p>Goel, Kanika and Leemans, Sander J. J. and Martin, Niels and Wynn, Moe T.</text:p>
          </table:table-cell>
          <table:table-cell table:style-name="ce1" office:value-type="string" calcext:value-type="string">
            <text:p>ACM Trans. Knowl. Discov. Data</text:p>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table-cell table:style-name="ce1" office:value-type="float" office:value="16" calcext:value-type="float">
            <text:p>16</text:p>
          </table:table-cell>
          <table:table-cell table:style-name="ce1"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table-cell table:style-name="ce1" office:value-type="string" calcext:value-type="string">
            <text:p>10.1145/3511707</text:p>
          </table:table-cell>
          <table:table-cell table:style-name="ce3" office:value-type="string" calcext:value-type="string">
            <text:p><text:a xlink:href="https://doi.org/10.1145/3511707" xlink:type="simple">https://doi.org/10.1145/3511707</text:a></text:p>
          </table:table-cell>
          <table:table-cell table:number-columns-repeated="2"/>
          <table:table-cell table:style-name="ce1" office:value-type="string" calcext:value-type="string">
            <text:p>Process mining, data quality, annotations, metadata, quality-informed performance analysis, quality-informed conformance checking</text:p>
          </table:table-cell>
          <table:table-cell table:style-name="ce1" office:value-type="string" calcext:value-type="string">
            <text:p>Association for Computing Machinery</text:p>
          </table:table-cell>
          <table:table-cell table:style-name="ce1" office:value-type="string" calcext:value-type="string">
            <text:p>1556-4681</text:p>
          </table:table-cell>
          <table:table-cell table:number-columns-repeated="2"/>
          <table:table-cell table:style-name="ce1" office:value-type="string" calcext:value-type="string">
            <text:p>REJECTED</text:p>
          </table:table-cell>
          <table:table-cell table:style-name="ce1" office:value-type="string" calcext:value-type="string">
            <text:p>EC9</text:p>
          </table:table-cell>
          <table:table-cell table:style-name="ce1" office:value-type="string" calcext:value-type="string">
            <text:p>Study focuses on business process conformance rather than architectural conformance.</text:p>
          </table:table-cell>
          <table:table-cell table:number-columns-repeated="1003"/>
        </table:table-row>
        <table:table-row table:style-name="ro1">
          <table:table-cell table:style-name="ce1" office:value-type="string" calcext:value-type="string">
            <text:p>Enhanced Transformation of&amp;nbsp;BPMN Models with&amp;nbsp;Cancellation Features</text:p>
          </table:table-cell>
          <table:table-cell table:style-name="ce1" office:value-type="string" calcext:value-type="string">
            <text:p>Lomidze, Giorgi and Schuster, Daniel and Li, Chiao-Yun and van Zelst, Sebastiaan J.</text:p>
          </table:table-cell>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style-name="ce1" office:value-type="string" calcext:value-type="string">
            <text:p>128–144</text:p>
          </table:table-cell>
          <table:table-cell/>
          <table:table-cell table:style-name="ce1"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table-cell table:style-name="ce1" office:value-type="string" calcext:value-type="string">
            <text:p>10.1007/978-3-031-17604-3_8</text:p>
          </table:table-cell>
          <table:table-cell table:style-name="ce3" office:value-type="string" calcext:value-type="string">
            <text:p><text:a xlink:href="https://doi.org/10.1007/978-3-031-17604-3_8" xlink:type="simple">https://doi.org/10.1007/978-3-031-17604-3_8</text:a></text:p>
          </table:table-cell>
          <table:table-cell table:number-columns-repeated="2"/>
          <table:table-cell table:style-name="ce1" office:value-type="string" calcext:value-type="string">
            <text:p>Business process management, Business process modeling, BPMN, Petri nets</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rtifact-Driven Process Monitoring: A Viable Solution to Continuously and Autonomously Monitor Business Processes</text:p>
          </table:table-cell>
          <table:table-cell table:style-name="ce1" office:value-type="string" calcext:value-type="string">
            <text:p>Meroni, Giovanni</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37–43</text:p>
          </table:table-cell>
          <table:table-cell/>
          <table:table-cell table:style-name="ce1"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table-cell table:style-name="ce1" office:value-type="string" calcext:value-type="string">
            <text:p>10.1007/978-3-030-85469-0_5</text:p>
          </table:table-cell>
          <table:table-cell table:style-name="ce3" office:value-type="string" calcext:value-type="string">
            <text:p><text:a xlink:href="https://doi.org/10.1007/978-3-030-85469-0_5" xlink:type="simple">https://doi.org/10.1007/978-3-030-85469-0_5</text:a></text:p>
          </table:table-cell>
          <table:table-cell table:number-columns-repeated="2"/>
          <table:table-cell table:style-name="ce1" office:value-type="string" calcext:value-type="string">
            <text:p>Business process monitoring, Artifact-driven, Conformance check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Reinforcement Learning-Based Streaming Process Discovery Under Concept Drift</text:p>
          </table:table-cell>
          <table:table-cell table:style-name="ce1" office:value-type="string" calcext:value-type="string">
            <text:p>Cai, Rujian and Zheng, Chao and Wang, Jian and Li, Duantengchuan and Wang, Chong and Li, Bing</text:p>
          </table:table-cell>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style-name="ce1" office:value-type="string" calcext:value-type="string">
            <text:p>55–70</text:p>
          </table:table-cell>
          <table:table-cell/>
          <table:table-cell table:style-name="ce1"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table-cell table:style-name="ce1" office:value-type="string" calcext:value-type="string">
            <text:p>10.1007/978-3-031-61057-8_4</text:p>
          </table:table-cell>
          <table:table-cell table:style-name="ce3" office:value-type="string" calcext:value-type="string">
            <text:p><text:a xlink:href="https://doi.org/10.1007/978-3-031-61057-8_4" xlink:type="simple">https://doi.org/10.1007/978-3-031-61057-8_4</text:a></text:p>
          </table:table-cell>
          <table:table-cell table:number-columns-repeated="2"/>
          <table:table-cell table:style-name="ce1" office:value-type="string" calcext:value-type="string">
            <text:p>Process discovery, Concept drift, Trace stream, Reinforcement learn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rchitectural Technical Debt - A Systematic Mapping Study</text:p>
          </table:table-cell>
          <table:table-cell table:style-name="ce1" office:value-type="string" calcext:value-type="string">
            <text:p>Sousa, Armando and Rocha, Lincoln and Britto, Ricardo</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96–205</text:p>
          </table:table-cell>
          <table:table-cell/>
          <table:table-cell table:style-name="ce1"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table-cell table:style-name="ce1" office:value-type="string" calcext:value-type="string">
            <text:p>10.1145/3613372.3613399</text:p>
          </table:table-cell>
          <table:table-cell table:style-name="ce3" office:value-type="string" calcext:value-type="string">
            <text:p><text:a xlink:href="https://doi.org/10.1145/3613372.3613399" xlink:type="simple">https://doi.org/10.1145/3613372.3613399</text:a></text:p>
          </table:table-cell>
          <table:table-cell table:number-columns-repeated="2"/>
          <table:table-cell table:style-name="ce1" office:value-type="string" calcext:value-type="string">
            <text:p>Architectural Technical Debt, Large-scale Software Systems, Software Maintenance and Evolu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Machine learning approaches for the discovery of clinical pathways from patient data: A systematic review</text:p>
          </table:table-cell>
          <table:table-cell table:style-name="ce1" office:value-type="string" calcext:value-type="string">
            <text:p>Muyama, Lillian and Neuraz, Antoine and Coulet, Adrien</text:p>
          </table:table-cell>
          <table:table-cell table:style-name="ce1" office:value-type="string" calcext:value-type="string">
            <text:p>J. of Biomedical Informatics</text:p>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table-cell table:style-name="ce1" office:value-type="float" office:value="160" calcext:value-type="float">
            <text:p>160</text:p>
          </table:table-cell>
          <table:table-cell table:style-name="ce1" office:value-type="string" calcext:value-type="string">
            <text:p>Background:</text:p>
            <text:p>Clinical pathways are sequences of events followed during the clinical care of a group of patients who meet pre-defined criteria. They have many applications ranging from healthcare evaluation and optimization to clinical decision support. These pathways can be discovered from existing healthcare data, in particular with machine learning which is a family of methods used to learn patterns from data. This review provides a comprehensive overview of the literature concerning the use of machine learning methods for clinical pathway discovery from patient data.</text:p>
            <text:p>Methods:</text:p>
            <text:p>Guided by the Preferred Reporting Items for Systematic Reviews and Meta-Analyses (PRISMA) method , we conducted a systematic review of the existing literature. We searched 6 databases, i.e., ACM Digital Library, ScienceDirect, Web of Science, PubMed, IEEE Xplore, and Scopus spanning from January 2004 to December 2023 using search terms pertinent to clinical pathways and their development. Subsequently, the retrieved papers were analyzed to assess their relevance to the scope of this study.</text:p>
            <text:p>Results:</text:p>
            <text:p>In total, 131 papers that met the specified inclusion criteria were identified. These papers expressed diverse motivations behind data-driven clinical pathway discovery ranging from knowledge discovery to conformance checking with established clinical guidelines (derived from existing literature and clinical experts). Notably, the predominant methods employed (67.2%, </text:p>
            <text:p>=88) involved unsupervised machine learning techniques, such as clustering and process mining.</text:p>
            <text:p>Conclusions:</text:p>
            <text:p>Relevant clinical pathways can be discovered from patient data using machine learning methods, with the desirable potential to aid clinical decision-making in healthcare. However, to reach this objective, the methods used to discover pathways should be reproducible, and rigorous performance evaluation by clinical experts needs to be conducted for validation.</text:p>
          </table:table-cell>
          <table:table-cell/>
          <table:table-cell table:style-name="ce1" office:value-type="string" calcext:value-type="string">
            <text:p>10.1016/j.jbi.2024.104746</text:p>
          </table:table-cell>
          <table:table-cell table:style-name="ce3" office:value-type="string" calcext:value-type="string">
            <text:p><text:a xlink:href="https://doi.org/10.1016/j.jbi.2024.104746" xlink:type="simple">https://doi.org/10.1016/j.jbi.2024.104746</text:a></text:p>
          </table:table-cell>
          <table:table-cell table:number-columns-repeated="2"/>
          <table:table-cell table:style-name="ce1" office:value-type="string" calcext:value-type="string">
            <text:p>Clinical pathway, Machine learning, Data-driven approach, Patient data</text:p>
          </table:table-cell>
          <table:table-cell table:style-name="ce1" office:value-type="string" calcext:value-type="string">
            <text:p>Elsevier Science</text:p>
          </table:table-cell>
          <table:table-cell table:style-name="ce1" office:value-type="string" calcext:value-type="string">
            <text:p>1532-0464</text:p>
          </table:table-cell>
          <table:table-cell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Real-World Streaming Process Discovery from&amp;nbsp;Low-Level Event Data</text:p>
          </table:table-cell>
          <table:table-cell table:style-name="ce1" office:value-type="string" calcext:value-type="string">
            <text:p>Lefebure, Franck and Thuault, Cecile and Cholet, Stephane</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50–164</text:p>
          </table:table-cell>
          <table:table-cell/>
          <table:table-cell table:style-name="ce1"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table-cell table:style-name="ce1" office:value-type="string" calcext:value-type="string">
            <text:p>10.1007/978-3-031-44505-7_11</text:p>
          </table:table-cell>
          <table:table-cell table:style-name="ce3" office:value-type="string" calcext:value-type="string">
            <text:p><text:a xlink:href="https://doi.org/10.1007/978-3-031-44505-7_11" xlink:type="simple">https://doi.org/10.1007/978-3-031-44505-7_11</text:a></text:p>
          </table:table-cell>
          <table:table-cell table:number-columns-repeated="2"/>
          <table:table-cell table:style-name="ce1" office:value-type="string" calcext:value-type="string">
            <text:p>Streaming process mining, Unsupervised process discovery, Real time, Scaling process mining, Organizational perspective</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9</text:p>
          </table:table-cell>
          <table:table-cell table:style-name="ce1" office:value-type="string" calcext:value-type="string">
            <text:p>Study focuses on business process conformance rather than architectural conformance.</text:p>
          </table:table-cell>
          <table:table-cell table:number-columns-repeated="1003"/>
        </table:table-row>
        <table:table-row table:style-name="ro1">
          <table:table-cell table:style-name="ce1" office:value-type="string" calcext:value-type="string">
            <text:p>Decision Mining versus Process Mining: a Comparison of Mining Methods</text:p>
          </table:table-cell>
          <table:table-cell table:style-name="ce1" office:value-type="string" calcext:value-type="string">
            <text:p>de Jong, Robin and Leewis, Sam and Berkhout, Matthijs</text:p>
          </table:table-cell>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style-name="ce1" office:value-type="string" calcext:value-type="string">
            <text:p>28–32</text:p>
          </table:table-cell>
          <table:table-cell/>
          <table:table-cell table:style-name="ce1"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table-cell table:style-name="ce1" office:value-type="string" calcext:value-type="string">
            <text:p>10.1145/3507485.3507490</text:p>
          </table:table-cell>
          <table:table-cell table:style-name="ce3" office:value-type="string" calcext:value-type="string">
            <text:p><text:a xlink:href="https://doi.org/10.1145/3507485.3507490" xlink:type="simple">https://doi.org/10.1145/3507485.3507490</text:a></text:p>
          </table:table-cell>
          <table:table-cell table:number-columns-repeated="2"/>
          <table:table-cell table:style-name="ce1" office:value-type="string" calcext:value-type="string">
            <text:p>Data mining, Decision mining, Process min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Research on Enterprise Business Architecture Design Method Based on Domain-Driven Design</text:p>
          </table:table-cell>
          <table:table-cell table:style-name="ce1" office:value-type="string" calcext:value-type="string">
            <text:p>Deng, Huiwen and Zhao, Yan</text:p>
          </table:table-cell>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style-name="ce1" office:value-type="string" calcext:value-type="string">
            <text:p>1056–1061</text:p>
          </table:table-cell>
          <table:table-cell/>
          <table:table-cell table:style-name="ce1"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table-cell table:style-name="ce1" office:value-type="string" calcext:value-type="string">
            <text:p>10.1145/3708036.3708210</text:p>
          </table:table-cell>
          <table:table-cell table:style-name="ce3" office:value-type="string" calcext:value-type="string">
            <text:p><text:a xlink:href="https://doi.org/10.1145/3708036.3708210" xlink:type="simple">https://doi.org/10.1145/3708036.3708210</text:a></text:p>
          </table:table-cell>
          <table:table-cell table:number-columns-repeated="2"/>
          <table:table-cell table:style-name="ce1" office:value-type="string" calcext:value-type="string">
            <text:p>Digital transformation, Domain-Driven Design, Enterprise business architecture, Meta-model</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Validation of SDL specifications using EFSM-based test generation</text:p>
          </table:table-cell>
          <table:table-cell table:style-name="ce1" office:value-type="string" calcext:value-type="string">
            <text:p>Wong, W. Eric and Restrepo, Andy and Choi, Byoungju</text:p>
          </table:table-cell>
          <table:table-cell table:style-name="ce1" office:value-type="string" calcext:value-type="string">
            <text:p>Inf. Softw. Technol.</text:p>
          </table:table-cell>
          <table:table-cell table:style-name="ce1" office:value-type="float" office:value="2009" calcext:value-type="float">
            <text:p>2009</text:p>
          </table:table-cell>
          <table:table-cell table:style-name="ce1" office:value-type="string" calcext:value-type="string">
            <text:p>ACM Digital Library</text:p>
          </table:table-cell>
          <table:table-cell table:style-name="ce1" office:value-type="string" calcext:value-type="string">
            <text:p>1505–1519</text:p>
          </table:table-cell>
          <table:table-cell table:style-name="ce1" office:value-type="float" office:value="51" calcext:value-type="float">
            <text:p>51</text:p>
          </table:table-cell>
          <table:table-cell table:style-name="ce1"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table-cell table:style-name="ce1" office:value-type="string" calcext:value-type="string">
            <text:p>10.1016/j.infsof.2009.06.005</text:p>
          </table:table-cell>
          <table:table-cell table:style-name="ce3" office:value-type="string" calcext:value-type="string">
            <text:p><text:a xlink:href="https://doi.org/10.1016/j.infsof.2009.06.005" xlink:type="simple">https://doi.org/10.1016/j.infsof.2009.06.005</text:a></text:p>
          </table:table-cell>
          <table:table-cell table:number-columns-repeated="2"/>
          <table:table-cell table:style-name="ce1" office:value-type="string" calcext:value-type="string">
            <text:p>Constraint solver, Coverage testing, Dominator analysis, EFSM (Extended Finite State Machine), Hot spot, SDL</text:p>
          </table:table-cell>
          <table:table-cell table:style-name="ce1" office:value-type="string" calcext:value-type="string">
            <text:p>Butterworth-Heinemann</text:p>
          </table:table-cell>
          <table:table-cell table:style-name="ce1" office:value-type="string" calcext:value-type="string">
            <text:p>0950-5849</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 Symmetric Petri Net Model of Generic Publish-Subscribe Systems for Verification and Business Process Conformance Checking</text:p>
          </table:table-cell>
          <table:table-cell table:style-name="ce1" office:value-type="string" calcext:value-type="string">
            <text:p>Meyer, Tom</text:p>
          </table:table-cell>
          <table:table-cell table:style-name="ce1" office:value-type="string" calcext:value-type="string">
            <text:p>CEUR Workshop Proceedings</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88 - 109</text:p>
          </table:table-cell>
          <table:table-cell table:style-name="ce1" office:value-type="float" office:value="3430" calcext:value-type="float">
            <text:p>3430</text:p>
          </table:table-cell>
          <table:table-cell table:style-name="ce1"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1" office:value-type="string" calcext:value-type="string">
            <text:p>Conference paper</text:p>
          </table:table-cell>
          <table:table-cell/>
          <table:table-cell table:style-name="ce3" office:value-type="string" calcext:value-type="string">
            <text:p><text:a xlink:href="https://www.scopus.com/inward/record.uri?eid=2-s2.0-85166003230&amp;partnerID=40&amp;md5=ad17cf37b861564cb633ca803ac7775f" xlink:type="simple">https://www.scopus.com/inward/record.uri?eid=2-s2.0-85166003230&amp;partnerID=40&amp;md5=ad17cf37b861564cb633ca803ac7775f</text:a></text:p>
          </table:table-cell>
          <table:table-cell/>
          <table:table-cell table:style-name="ce1" office:value-type="string" calcext:value-type="string">
            <text:p>Conformance Checking; Distributed System; Event-Driven Architecture; Petri Net Model; Publish-Subscribe; Verification</text:p>
          </table:table-cell>
          <table:table-cell table:style-name="ce1"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ulti-perspective Conformance Checking for&amp;nbsp;Email-Driven Processes</text:p>
          </table:table-cell>
          <table:table-cell table:style-name="ce1" office:value-type="string" calcext:value-type="string">
            <text:p>Bou Nader, Ralph and Garfatta, Ikram and Elleuch, Marwa and Gaaloul, Walid and Taher, Yehia</text:p>
          </table:table-cell>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style-name="ce1" office:value-type="string" calcext:value-type="string">
            <text:p>441–457</text:p>
          </table:table-cell>
          <table:table-cell/>
          <table:table-cell table:style-name="ce1"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table-cell table:style-name="ce1" office:value-type="string" calcext:value-type="string">
            <text:p>10.1007/978-981-96-0576-7_32</text:p>
          </table:table-cell>
          <table:table-cell table:style-name="ce3" office:value-type="string" calcext:value-type="string">
            <text:p><text:a xlink:href="https://doi.org/10.1007/978-981-96-0576-7_32" xlink:type="simple">https://doi.org/10.1007/978-981-96-0576-7_32</text:a></text:p>
          </table:table-cell>
          <table:table-cell table:number-columns-repeated="2"/>
          <table:table-cell table:style-name="ce1" office:value-type="string" calcext:value-type="string">
            <text:p>Process mining, Conformance checking, Event logs, Email-driven process</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 Decomposition and Metric-Based Evaluation Framework for Microservices</text:p>
          </table:table-cell>
          <table:table-cell table:style-name="ce1" office:value-type="string" calcext:value-type="string">
            <text:p>Taibi, Davide and Systä, Kari</text:p>
          </table:table-cell>
          <table:table-cell table:style-name="ce1" office:value-type="string" calcext:value-type="string">
            <text:p>Communications in Computer and Information Science</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133 - 149</text:p>
          </table:table-cell>
          <table:table-cell table:style-name="ce1" office:value-type="string" calcext:value-type="string">
            <text:p>1218 CCIS</text:p>
          </table:table-cell>
          <table:table-cell table:style-name="ce1"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1" office:value-type="string" calcext:value-type="string">
            <text:p>Conference paper</text:p>
          </table:table-cell>
          <table:table-cell table:style-name="ce1" office:value-type="string" calcext:value-type="string">
            <text:p>10.1007/978-3-030-49432-2_7</text:p>
          </table:table-cell>
          <table:table-cell table:style-name="ce3" office:value-type="string" calcext:value-type="string">
            <text:p><text:a xlink:href="https://www.scopus.com/inward/record.uri?eid=2-s2.0-85086276785&amp;doi=10.1007%2F978-3-030-49432-2_7&amp;partnerID=40&amp;md5=7e30d56ffbf6a6e5162e9492e3cf2d47" xlink:type="simple">https://www.scopus.com/inward/record.uri?eid=2-s2.0-85086276785&amp;doi=10.1007%2F978-3-030-49432-2_7&amp;partnerID=40&amp;md5=7e30d56ffbf6a6e5162e9492e3cf2d47</text:a></text:p>
          </table:table-cell>
          <table:table-cell/>
          <table:table-cell table:style-name="ce1" office:value-type="string" calcext:value-type="string">
            <text:p>Cloud-native; Microservice decomposition; Microservice migration; Microservice slicing; Microservices</text:p>
          </table:table-cell>
          <table:table-cell table:style-name="ce1"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number-columns-repeated="3"/>
          <table:table-cell table:style-name="ce1" office:value-type="string" calcext:value-type="string">
            <text:p>Cited by: 21; All Open Access; Green Accepted Open Access; Green Open Access</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IntelliGOV - A semantic approach for compliance validation of service-oriented architectures</text:p>
          </table:table-cell>
          <table:table-cell table:style-name="ce1" office:value-type="string" calcext:value-type="string">
            <text:p>Filho, Haroldo Maria Teixeira and Azevedo, Leonardo Guerreiro and Siqueira, Sean Wolfgand Matsui</text:p>
          </table:table-cell>
          <table:table-cell table:style-name="ce1" office:value-type="string" calcext:value-type="string">
            <text:p>Journal of Universal Computer Science</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1048 - 1071</text:p>
          </table:table-cell>
          <table:table-cell table:style-name="ce1" office:value-type="float" office:value="22" calcext:value-type="float">
            <text:p>22</text:p>
          </table:table-cell>
          <table:table-cell table:style-name="ce1"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1" office:value-type="string" calcext:value-type="string">
            <text:p>Article</text:p>
          </table:table-cell>
          <table:table-cell/>
          <table:table-cell table:style-name="ce3" office:value-type="string" calcext:value-type="string">
            <text:p><text:a xlink:href="https://www.scopus.com/inward/record.uri?eid=2-s2.0-84994593688&amp;partnerID=40&amp;md5=5f8f38522e7c65e70b800d18f66a8a00" xlink:type="simple">https://www.scopus.com/inward/record.uri?eid=2-s2.0-84994593688&amp;partnerID=40&amp;md5=5f8f38522e7c65e70b800d18f66a8a00</text:a></text:p>
          </table:table-cell>
          <table:table-cell/>
          <table:table-cell table:style-name="ce1" office:value-type="string" calcext:value-type="string">
            <text:p>Governance; Ontology; Semantic queries; Semantic rules; Service-Oriented Architecture (SOA)</text:p>
          </table:table-cell>
          <table:table-cell table:number-columns-repeated="4"/>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aking the case for centralized software architecture management</text:p>
          </table:table-cell>
          <table:table-cell table:style-name="ce1" office:value-type="string" calcext:value-type="string">
            <text:p>Buchgeher, Georg and Weinreich, Rainer and Kriechbaum, Thomas</text:p>
          </table:table-cell>
          <table:table-cell table:style-name="ce1" office:value-type="string" calcext:value-type="string">
            <text:p>Lecture Notes in Business Information Processing</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109 - 121</text:p>
          </table:table-cell>
          <table:table-cell table:style-name="ce1" office:value-type="float" office:value="238" calcext:value-type="float">
            <text:p>238</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1" office:value-type="string" calcext:value-type="string">
            <text:p>Conference paper</text:p>
          </table:table-cell>
          <table:table-cell table:style-name="ce1" office:value-type="string" calcext:value-type="string">
            <text:p>10.1007/978-3-319-27033-3_8</text:p>
          </table:table-cell>
          <table:table-cell table:style-name="ce3" office:value-type="string" calcext:value-type="string">
            <text:p><text:a xlink:href="https://www.scopus.com/inward/record.uri?eid=2-s2.0-84952684861&amp;doi=10.1007%2F978-3-319-27033-3_8&amp;partnerID=40&amp;md5=a4af8833cd4d31ab4b96504f136faa9c" xlink:type="simple">https://www.scopus.com/inward/record.uri?eid=2-s2.0-84952684861&amp;doi=10.1007%2F978-3-319-27033-3_8&amp;partnerID=40&amp;md5=a4af8833cd4d31ab4b96504f136faa9c</text:a></text:p>
          </table:table-cell>
          <table:table-cell/>
          <table:table-cell table:style-name="ce1"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1"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ss Mining and Monitoring Processes and Services: Workshop Report</text:p>
          </table:table-cell>
          <table:table-cell table:style-name="ce1" office:value-type="string" calcext:value-type="string">
            <text:p>van der Aalst, Wil M.P.</text:p>
          </table:table-cell>
          <table:table-cell table:style-name="ce1" office:value-type="string" calcext:value-type="string">
            <text:p>Dagstuhl Seminar Proceedings</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float" office:value="6291" calcext:value-type="float">
            <text:p>6291</text:p>
          </table:table-cell>
          <table:table-cell table:style-name="ce1"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1" office:value-type="string" calcext:value-type="string">
            <text:p>Conference paper</text:p>
          </table:table-cell>
          <table:table-cell/>
          <table:table-cell table:style-name="ce3" office:value-type="string" calcext:value-type="string">
            <text:p><text:a xlink:href="https://www.scopus.com/inward/record.uri?eid=2-s2.0-85174288086&amp;partnerID=40&amp;md5=048a151f07a074a04b510b6d2279deb9" xlink:type="simple">https://www.scopus.com/inward/record.uri?eid=2-s2.0-85174288086&amp;partnerID=40&amp;md5=048a151f07a074a04b510b6d2279deb9</text:a></text:p>
          </table:table-cell>
          <table:table-cell table:number-columns-repeated="2"/>
          <table:table-cell table:style-name="ce1"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number-columns-repeated="3"/>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9</text:p>
          </table:table-cell>
          <table:table-cell table:style-name="ce1" office:value-type="string" calcext:value-type="string">
            <text:p>Study focuses on business process conformance rather than architectural conformance.</text:p>
          </table:table-cell>
          <table:table-cell table:number-columns-repeated="1003"/>
        </table:table-row>
        <table:table-row table:style-name="ro1">
          <table:table-cell table:style-name="ce1" office:value-type="string" calcext:value-type="string">
            <text:p>Choreography conformance analysis: Asynchronous communications and information alignment</text:p>
          </table:table-cell>
          <table:table-cell table:style-name="ce1" office:value-type="string" calcext:value-type="string">
            <text:p>Kazhamiakin, Raman and Pistore, Marco</text:p>
          </table:table-cell>
          <table:table-cell table:style-name="ce1" office:value-type="string" calcext:value-type="string">
            <text:p>Lecture Notes in Computer Science</text:p>
          </table:table-cell>
          <table:table-cell table:style-name="ce1" office:value-type="float" office:value="2006" calcext:value-type="float">
            <text:p>2006</text:p>
          </table:table-cell>
          <table:table-cell table:style-name="ce1" office:value-type="string" calcext:value-type="string">
            <text:p>Scopus</text:p>
          </table:table-cell>
          <table:table-cell table:style-name="ce1" office:value-type="string" calcext:value-type="string">
            <text:p>227 - 241</text:p>
          </table:table-cell>
          <table:table-cell table:style-name="ce1" office:value-type="string" calcext:value-type="string">
            <text:p>4184 LNCS</text:p>
          </table:table-cell>
          <table:table-cell table:style-name="ce1"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1" office:value-type="string" calcext:value-type="string">
            <text:p>Conference paper</text:p>
          </table:table-cell>
          <table:table-cell table:style-name="ce1" office:value-type="string" calcext:value-type="string">
            <text:p>10.1007/11841197_15</text:p>
          </table:table-cell>
          <table:table-cell table:style-name="ce3" office:value-type="string" calcext:value-type="string">
            <text:p><text:a xlink:href="https://www.scopus.com/inward/record.uri?eid=2-s2.0-33845220517&amp;doi=10.1007%2F11841197_15&amp;partnerID=40&amp;md5=9ce08b1c40da21b55f7ed59e0a23e002" xlink:type="simple">https://www.scopus.com/inward/record.uri?eid=2-s2.0-33845220517&amp;doi=10.1007%2F11841197_15&amp;partnerID=40&amp;md5=9ce08b1c40da21b55f7ed59e0a23e002</text:a></text:p>
          </table:table-cell>
          <table:table-cell table:number-columns-repeated="2"/>
          <table:table-cell table:style-name="ce1"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number-columns-repeated="3"/>
          <table:table-cell table:style-name="ce1" office:value-type="string" calcext:value-type="string">
            <text:p>Cited by: 26</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Interoperability in the ProM framework</text:p>
          </table:table-cell>
          <table:table-cell table:style-name="ce1" office:value-type="string" calcext:value-type="string">
            <text:p>Verbeek, H. M.W. and Van Dongen, Boudewijn F. and Mendling, Jan and van der Aalst, Wil M.P.</text:p>
          </table:table-cell>
          <table:table-cell table:style-name="ce1" office:value-type="string" calcext:value-type="string">
            <text:p>CEUR Workshop Proceedings</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float" office:value="200" calcext:value-type="float">
            <text:p>200</text:p>
          </table:table-cell>
          <table:table-cell table:style-name="ce1"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1" office:value-type="string" calcext:value-type="string">
            <text:p>Conference paper</text:p>
          </table:table-cell>
          <table:table-cell/>
          <table:table-cell table:style-name="ce3" office:value-type="string" calcext:value-type="string">
            <text:p><text:a xlink:href="https://www.scopus.com/inward/record.uri?eid=2-s2.0-84873562737&amp;partnerID=40&amp;md5=bc427407c008c0c47f58a5dbe2b68e51" xlink:type="simple">https://www.scopus.com/inward/record.uri?eid=2-s2.0-84873562737&amp;partnerID=40&amp;md5=bc427407c008c0c47f58a5dbe2b68e51</text:a></text:p>
          </table:table-cell>
          <table:table-cell table:number-columns-repeated="2"/>
          <table:table-cell table:style-name="ce1"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number-columns-repeated="3"/>
          <table:table-cell table:style-name="ce1" office:value-type="string" calcext:value-type="string">
            <text:p>Cited by: 1</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he Role of Business Processes in Service Oriented Architectures 2006</text:p>
          </table:table-cell>
          <table:table-cell/>
          <table:table-cell table:style-name="ce1" office:value-type="string" calcext:value-type="string">
            <text:p>Dagstuhl Seminar Proceedings</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float" office:value="6291" calcext:value-type="float">
            <text:p>6291</text:p>
          </table:table-cell>
          <table:table-cell table:style-name="ce1"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74303016&amp;partnerID=40&amp;md5=c95d37d7ae03b61bc4b95960efb22473" xlink:type="simple">https://www.scopus.com/inward/record.uri?eid=2-s2.0-85174303016&amp;partnerID=40&amp;md5=c95d37d7ae03b61bc4b95960efb22473</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Web service choreography conformance verification through the pi&lt;X-model</text:p>
          </table:table-cell>
          <table:table-cell table:style-name="ce1" office:value-type="string" calcext:value-type="string">
            <text:p>van Seghbroeck, Gregory and Volckaert, Bruno and de Turck, Filip D. and Dhoedt, Bart and Demeester, Piet M.A.</text:p>
          </table:table-cell>
          <table:table-cell table:style-name="ce1" office:value-type="string" calcext:value-type="string">
            <text:p>International Journal of Cooperative Information Systems</text:p>
          </table:table-cell>
          <table:table-cell table:style-name="ce1" office:value-type="float" office:value="2010" calcext:value-type="float">
            <text:p>2010</text:p>
          </table:table-cell>
          <table:table-cell table:style-name="ce1" office:value-type="string" calcext:value-type="string">
            <text:p>Scopus</text:p>
          </table:table-cell>
          <table:table-cell table:style-name="ce1" office:value-type="string" calcext:value-type="string">
            <text:p>1 - 30</text:p>
          </table:table-cell>
          <table:table-cell table:style-name="ce1" office:value-type="float" office:value="19" calcext:value-type="float">
            <text:p>19</text:p>
          </table:table-cell>
          <table:table-cell table:style-name="ce1"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1" office:value-type="string" calcext:value-type="string">
            <text:p>Article</text:p>
          </table:table-cell>
          <table:table-cell table:style-name="ce1" office:value-type="string" calcext:value-type="string">
            <text:p>10.1142/S0218843010002097</text:p>
          </table:table-cell>
          <table:table-cell table:style-name="ce3" office:value-type="string" calcext:value-type="string">
            <text:p><text:a xlink:href="https://www.scopus.com/inward/record.uri?eid=2-s2.0-77953822042&amp;doi=10.1142%2FS0218843010002097&amp;partnerID=40&amp;md5=59cb8e3b64c6aa0f7de30b851b9e31e4" xlink:type="simple">https://www.scopus.com/inward/record.uri?eid=2-s2.0-77953822042&amp;doi=10.1142%2FS0218843010002097&amp;partnerID=40&amp;md5=59cb8e3b64c6aa0f7de30b851b9e31e4</text:a></text:p>
          </table:table-cell>
          <table:table-cell/>
          <table:table-cell table:style-name="ce1" office:value-type="string" calcext:value-type="string">
            <text:p>choreography; open bisimulation; Web services; WS-CDL</text:p>
          </table:table-cell>
          <table:table-cell table:number-columns-repeated="4"/>
          <table:table-cell table:style-name="ce1" office:value-type="string" calcext:value-type="string">
            <text:p>Cited by: 2</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A formal and visual modeling approach to choreography based web services composition and conformance verification</text:p>
          </table:table-cell>
          <table:table-cell table:style-name="ce1" office:value-type="string" calcext:value-type="string">
            <text:p>Yeung, Wing Lok</text:p>
          </table:table-cell>
          <table:table-cell table:style-name="ce1" office:value-type="string" calcext:value-type="string">
            <text:p>Expert Systems with Applications</text:p>
          </table:table-cell>
          <table:table-cell table:style-name="ce1" office:value-type="float" office:value="2011" calcext:value-type="float">
            <text:p>2011</text:p>
          </table:table-cell>
          <table:table-cell table:style-name="ce1" office:value-type="string" calcext:value-type="string">
            <text:p>Scopus</text:p>
          </table:table-cell>
          <table:table-cell table:style-name="ce1" office:value-type="string" calcext:value-type="string">
            <text:p>12772 - 12785</text:p>
          </table:table-cell>
          <table:table-cell table:style-name="ce1" office:value-type="float" office:value="38" calcext:value-type="float">
            <text:p>38</text:p>
          </table:table-cell>
          <table:table-cell table:style-name="ce1"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1" office:value-type="string" calcext:value-type="string">
            <text:p>Article</text:p>
          </table:table-cell>
          <table:table-cell table:style-name="ce1" office:value-type="string" calcext:value-type="string">
            <text:p>10.1016/j.eswa.2011.04.068</text:p>
          </table:table-cell>
          <table:table-cell table:style-name="ce3" office:value-type="string" calcext:value-type="string">
            <text:p><text:a xlink:href="https://www.scopus.com/inward/record.uri?eid=2-s2.0-79957995532&amp;doi=10.1016%2Fj.eswa.2011.04.068&amp;partnerID=40&amp;md5=afe862255cad1bfca3badf60847427cb" xlink:type="simple">https://www.scopus.com/inward/record.uri?eid=2-s2.0-79957995532&amp;doi=10.1016%2Fj.eswa.2011.04.068&amp;partnerID=40&amp;md5=afe862255cad1bfca3badf60847427cb</text:a></text:p>
          </table:table-cell>
          <table:table-cell/>
          <table:table-cell table:style-name="ce1" office:value-type="string" calcext:value-type="string">
            <text:p>Choreography; Conformance verification; Contract negotiation; Model checking; Orchestration; Web services</text:p>
          </table:table-cell>
          <table:table-cell table:style-name="ce1"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text:p>
          </table:table-cell>
          <table:table-cell table:number-columns-repeated="3"/>
          <table:table-cell table:style-name="ce1" office:value-type="string" calcext:value-type="string">
            <text:p>Cited by: 2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ngineering Secure Software and Systems - Third International Symposium, ESSoS 2011, Proceedings</text:p>
          </table:table-cell>
          <table:table-cell/>
          <table:table-cell table:style-name="ce1" office:value-type="string" calcext:value-type="string">
            <text:p>Lecture Notes in Computer Science</text:p>
          </table:table-cell>
          <table:table-cell table:style-name="ce1" office:value-type="float" office:value="2011" calcext:value-type="float">
            <text:p>2011</text:p>
          </table:table-cell>
          <table:table-cell table:style-name="ce1" office:value-type="string" calcext:value-type="string">
            <text:p>Scopus</text:p>
          </table:table-cell>
          <table:table-cell/>
          <table:table-cell table:style-name="ce1" office:value-type="string" calcext:value-type="string">
            <text:p>6542 LNCS</text:p>
          </table:table-cell>
          <table:table-cell table:style-name="ce1"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79551531399&amp;partnerID=40&amp;md5=2383dc51f13fd378825b30e4a5bcc1cd" xlink:type="simple">https://www.scopus.com/inward/record.uri?eid=2-s2.0-79551531399&amp;partnerID=40&amp;md5=2383dc51f13fd378825b30e4a5bcc1cd</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On the Move to Meaningful Internet Systems, OTM 2012 - Confederated International Conferences: CoopIS, DOA-SVI, and ODBASE 2012, Proceedings</text:p>
          </table:table-cell>
          <table:table-cell/>
          <table:table-cell table:style-name="ce1" office:value-type="string" calcext:value-type="string">
            <text:p>Lecture Notes in Computer Science</text:p>
          </table:table-cell>
          <table:table-cell table:style-name="ce1" office:value-type="float" office:value="2012" calcext:value-type="float">
            <text:p>2012</text:p>
          </table:table-cell>
          <table:table-cell table:style-name="ce1" office:value-type="string" calcext:value-type="string">
            <text:p>Scopus</text:p>
          </table:table-cell>
          <table:table-cell/>
          <table:table-cell table:style-name="ce1" office:value-type="string" calcext:value-type="string">
            <text:p>7565 LNCS</text:p>
          </table:table-cell>
          <table:table-cell table:style-name="ce1"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872791572&amp;partnerID=40&amp;md5=07015934dd82482c77ef85174cfaa95a" xlink:type="simple">https://www.scopus.com/inward/record.uri?eid=2-s2.0-84872791572&amp;partnerID=40&amp;md5=07015934dd82482c77ef85174cfaa95a</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Business Process Management - 10th International Conference, BPM 2012, Proceedings</text:p>
          </table:table-cell>
          <table:table-cell/>
          <table:table-cell table:style-name="ce1" office:value-type="string" calcext:value-type="string">
            <text:p>Lecture Notes in Computer Science</text:p>
          </table:table-cell>
          <table:table-cell table:style-name="ce1" office:value-type="float" office:value="2012" calcext:value-type="float">
            <text:p>2012</text:p>
          </table:table-cell>
          <table:table-cell table:style-name="ce1" office:value-type="string" calcext:value-type="string">
            <text:p>Scopus</text:p>
          </table:table-cell>
          <table:table-cell/>
          <table:table-cell table:style-name="ce1" office:value-type="string" calcext:value-type="string">
            <text:p>7481 LNCS</text:p>
          </table:table-cell>
          <table:table-cell table:style-name="ce1"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866401355&amp;partnerID=40&amp;md5=a4a9ca0345db56a8614d2a07f748042b" xlink:type="simple">https://www.scopus.com/inward/record.uri?eid=2-s2.0-84866401355&amp;partnerID=40&amp;md5=a4a9ca0345db56a8614d2a07f748042b</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utomatic reference architecture conformance checking for SOA - Based software systems</text:p>
          </table:table-cell>
          <table:table-cell table:style-name="ce1" office:value-type="string" calcext:value-type="string">
            <text:p>Weinreich, Rainer and Buchgeher, Georg</text:p>
          </table:table-cell>
          <table:table-cell/>
          <table:table-cell table:style-name="ce1" office:value-type="float" office:value="2014" calcext:value-type="float">
            <text:p>2014</text:p>
          </table:table-cell>
          <table:table-cell table:style-name="ce1" office:value-type="string" calcext:value-type="string">
            <text:p>Scopus</text:p>
          </table:table-cell>
          <table:table-cell table:style-name="ce1" office:value-type="string" calcext:value-type="string">
            <text:p>95 - 104</text:p>
          </table:table-cell>
          <table:table-cell/>
          <table:table-cell table:style-name="ce1"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1" office:value-type="string" calcext:value-type="string">
            <text:p>Conference paper</text:p>
          </table:table-cell>
          <table:table-cell table:style-name="ce1" office:value-type="string" calcext:value-type="string">
            <text:p>10.1109/WICSA.2014.22</text:p>
          </table:table-cell>
          <table:table-cell table:style-name="ce3" office:value-type="string" calcext:value-type="string">
            <text:p><text:a xlink:href="https://www.scopus.com/inward/record.uri?eid=2-s2.0-84903699771&amp;doi=10.1109%2FWICSA.2014.22&amp;partnerID=40&amp;md5=96fd4bda5bf10a64931ef66740c65973" xlink:type="simple">https://www.scopus.com/inward/record.uri?eid=2-s2.0-84903699771&amp;doi=10.1109%2FWICSA.2014.22&amp;partnerID=40&amp;md5=96fd4bda5bf10a64931ef66740c65973</text:a></text:p>
          </table:table-cell>
          <table:table-cell/>
          <table:table-cell table:style-name="ce1" office:value-type="string" calcext:value-type="string">
            <text:p>conformance checking; reference architecture; service-oriented architecture (SOA); software architecture</text:p>
          </table:table-cell>
          <table:table-cell table:style-name="ce1"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number-columns-repeated="3"/>
          <table:table-cell table:style-name="ce1" office:value-type="string" calcext:value-type="string">
            <text:p>Cited by: 19</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toolset for conformance testing against UML sequence diagrams based on event-driven colored Petri nets</text:p>
          </table:table-cell>
          <table:table-cell table:style-name="ce1" office:value-type="string" calcext:value-type="string">
            <text:p>Faria, João Pascoal and Paiva, Ana C.R.</text:p>
          </table:table-cell>
          <table:table-cell table:style-name="ce1" office:value-type="string" calcext:value-type="string">
            <text:p>International Journal on Software Tools for Technology Transfer</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285 - 304</text:p>
          </table:table-cell>
          <table:table-cell table:style-name="ce1" office:value-type="float" office:value="18" calcext:value-type="float">
            <text:p>18</text:p>
          </table:table-cell>
          <table:table-cell table:style-name="ce1"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1" office:value-type="string" calcext:value-type="string">
            <text:p>Article</text:p>
          </table:table-cell>
          <table:table-cell table:style-name="ce1" office:value-type="string" calcext:value-type="string">
            <text:p>10.1007/s10009-014-0354-x</text:p>
          </table:table-cell>
          <table:table-cell table:style-name="ce3" office:value-type="string" calcext:value-type="string">
            <text:p><text:a xlink:href="https://www.scopus.com/inward/record.uri?eid=2-s2.0-84916919978&amp;doi=10.1007%2Fs10009-014-0354-x&amp;partnerID=40&amp;md5=3e8d8d432ab1be0aab49b10fb25b96ec" xlink:type="simple">https://www.scopus.com/inward/record.uri?eid=2-s2.0-84916919978&amp;doi=10.1007%2Fs10009-014-0354-x&amp;partnerID=40&amp;md5=3e8d8d432ab1be0aab49b10fb25b96ec</text:a></text:p>
          </table:table-cell>
          <table:table-cell/>
          <table:table-cell table:style-name="ce1" office:value-type="string" calcext:value-type="string">
            <text:p>Conformance testing; Petri nets; Sequence diagrams</text:p>
          </table:table-cell>
          <table:table-cell table:style-name="ce1"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number-columns-repeated="3"/>
          <table:table-cell table:style-name="ce1" office:value-type="string" calcext:value-type="string">
            <text:p>Cited by: 12</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Frank de Boer on the Occasion of His 60th Birthday, 2016</text:p>
          </table:table-cell>
          <table:table-cell/>
          <table:table-cell table:style-name="ce1" office:value-type="string" calcext:value-type="string">
            <text:p>Lecture Notes in Computer Science</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1 - 426</text:p>
          </table:table-cell>
          <table:table-cell table:style-name="ce1" office:value-type="float" office:value="9660" calcext:value-type="float">
            <text:p>9660</text:p>
          </table:table-cell>
          <table:table-cell table:style-name="ce1"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962563952&amp;partnerID=40&amp;md5=7535bb31cc6e6d4cdecf785ea6ffcd94" xlink:type="simple">https://www.scopus.com/inward/record.uri?eid=2-s2.0-84962563952&amp;partnerID=40&amp;md5=7535bb31cc6e6d4cdecf785ea6ffcd94</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15th International Conference on Service-Oriented Computing, ICSOC 2017</text:p>
          </table:table-cell>
          <table:table-cell/>
          <table:table-cell table:style-name="ce1" office:value-type="string" calcext:value-type="string">
            <text:p>Lecture Notes in Computer Science</text:p>
          </table:table-cell>
          <table:table-cell table:style-name="ce1" office:value-type="float" office:value="2017" calcext:value-type="float">
            <text:p>2017</text:p>
          </table:table-cell>
          <table:table-cell table:style-name="ce1" office:value-type="string" calcext:value-type="string">
            <text:p>Scopus</text:p>
          </table:table-cell>
          <table:table-cell/>
          <table:table-cell table:style-name="ce1" office:value-type="string" calcext:value-type="string">
            <text:p>10601 LNCS</text:p>
          </table:table-cell>
          <table:table-cell table:style-name="ce1"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34044606&amp;partnerID=40&amp;md5=7c48a56b229888e62d2f683faa0d5976" xlink:type="simple">https://www.scopus.com/inward/record.uri?eid=2-s2.0-85034044606&amp;partnerID=40&amp;md5=7c48a56b229888e62d2f683faa0d5976</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nsuring and assessing architecture conformance to microservice decomposition patterns</text:p>
          </table:table-cell>
          <table:table-cell table:style-name="ce1" office:value-type="string" calcext:value-type="string">
            <text:p>Zdun, Uwe and Navarro, Elena M. and Leymann, Frank</text:p>
          </table:table-cell>
          <table:table-cell table:style-name="ce1" office:value-type="string" calcext:value-type="string">
            <text:p>Lecture Notes in Computer Science</text:p>
          </table:table-cell>
          <table:table-cell table:style-name="ce1" office:value-type="float" office:value="2017" calcext:value-type="float">
            <text:p>2017</text:p>
          </table:table-cell>
          <table:table-cell table:style-name="ce1" office:value-type="string" calcext:value-type="string">
            <text:p>Scopus</text:p>
          </table:table-cell>
          <table:table-cell table:style-name="ce1" office:value-type="string" calcext:value-type="string">
            <text:p>411 - 429</text:p>
          </table:table-cell>
          <table:table-cell table:style-name="ce1" office:value-type="string" calcext:value-type="string">
            <text:p>10601 LNCS</text:p>
          </table:table-cell>
          <table:table-cell table:style-name="ce1"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1" office:value-type="string" calcext:value-type="string">
            <text:p>Conference paper</text:p>
          </table:table-cell>
          <table:table-cell table:style-name="ce1" office:value-type="string" calcext:value-type="string">
            <text:p>10.1007/978-3-319-69035-3_29</text:p>
          </table:table-cell>
          <table:table-cell table:style-name="ce3" office:value-type="string" calcext:value-type="string">
            <text:p><text:a xlink:href="https://www.scopus.com/inward/record.uri?eid=2-s2.0-85034118349&amp;doi=10.1007%2F978-3-319-69035-3_29&amp;partnerID=40&amp;md5=09028be9a2824f32498a3cc9a1e061cb" xlink:type="simple">https://www.scopus.com/inward/record.uri?eid=2-s2.0-85034118349&amp;doi=10.1007%2F978-3-319-69035-3_29&amp;partnerID=40&amp;md5=09028be9a2824f32498a3cc9a1e061cb</text:a></text:p>
          </table:table-cell>
          <table:table-cell table:number-columns-repeated="2"/>
          <table:table-cell table:style-name="ce1"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number-columns-repeated="3"/>
          <table:table-cell table:style-name="ce1" office:value-type="string" calcext:value-type="string">
            <text:p>Cited by: 40; All Open Access; Green Accepted Open Access; Green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ssessing architecture conformance to coupling-related patterns and practices in microservices</text:p>
          </table:table-cell>
          <table:table-cell table:style-name="ce1" office:value-type="string" calcext:value-type="string">
            <text:p>Ntentos, Evangelos and Zdun, Uwe and Plakidas, Konstantinos and Meixner, Sebastian and Geiger, Sebastian</text:p>
          </table:table-cell>
          <table:table-cell table:style-name="ce1" office:value-type="string" calcext:value-type="string">
            <text:p>Lecture Notes in Computer Science</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3 - 20</text:p>
          </table:table-cell>
          <table:table-cell table:style-name="ce1" office:value-type="string" calcext:value-type="string">
            <text:p>12292 LNCS</text:p>
          </table:table-cell>
          <table:table-cell table:style-name="ce1"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1" office:value-type="string" calcext:value-type="string">
            <text:p>Conference paper</text:p>
          </table:table-cell>
          <table:table-cell table:style-name="ce1" office:value-type="string" calcext:value-type="string">
            <text:p>10.1007/978-3-030-58923-3_1</text:p>
          </table:table-cell>
          <table:table-cell table:style-name="ce3" office:value-type="string" calcext:value-type="string">
            <text:p><text:a xlink:href="https://www.scopus.com/inward/record.uri?eid=2-s2.0-85091491521&amp;doi=10.1007%2F978-3-030-58923-3_1&amp;partnerID=40&amp;md5=40ac2ec320983cc02b5585a7b76de071" xlink:type="simple">https://www.scopus.com/inward/record.uri?eid=2-s2.0-85091491521&amp;doi=10.1007%2F978-3-030-58923-3_1&amp;partnerID=40&amp;md5=40ac2ec320983cc02b5585a7b76de071</text:a></text:p>
          </table:table-cell>
          <table:table-cell table:number-columns-repeated="2"/>
          <table:table-cell table:style-name="ce1"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number-columns-repeated="3"/>
          <table:table-cell table:style-name="ce1" office:value-type="string" calcext:value-type="string">
            <text:p>Cited by: 1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etrics for assessing architecture conformance to microservice architecture patterns and practices</text:p>
          </table:table-cell>
          <table:table-cell table:style-name="ce1" office:value-type="string" calcext:value-type="string">
            <text:p>Ntentos, Evangelos and Zdun, Uwe and Plakidas, Konstantinos and Meixner, Sebastian and Geiger, Sebastian</text:p>
          </table:table-cell>
          <table:table-cell table:style-name="ce1" office:value-type="string" calcext:value-type="string">
            <text:p>Lecture Notes in Computer Science</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580 - 596</text:p>
          </table:table-cell>
          <table:table-cell table:style-name="ce1" office:value-type="string" calcext:value-type="string">
            <text:p>12571 LNCS</text:p>
          </table:table-cell>
          <table:table-cell table:style-name="ce1"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1" office:value-type="string" calcext:value-type="string">
            <text:p>Conference paper</text:p>
          </table:table-cell>
          <table:table-cell table:style-name="ce1" office:value-type="string" calcext:value-type="string">
            <text:p>10.1007/978-3-030-65310-1_42</text:p>
          </table:table-cell>
          <table:table-cell table:style-name="ce3" office:value-type="string" calcext:value-type="string">
            <text:p><text:a xlink:href="https://www.scopus.com/inward/record.uri?eid=2-s2.0-85098257999&amp;doi=10.1007%2F978-3-030-65310-1_42&amp;partnerID=40&amp;md5=3aa4617740e9ab7d0afe4515c2f39740" xlink:type="simple">https://www.scopus.com/inward/record.uri?eid=2-s2.0-85098257999&amp;doi=10.1007%2F978-3-030-65310-1_42&amp;partnerID=40&amp;md5=3aa4617740e9ab7d0afe4515c2f39740</text:a></text:p>
          </table:table-cell>
          <table:table-cell table:number-columns-repeated="2"/>
          <table:table-cell table:style-name="ce1"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number-columns-repeated="3"/>
          <table:table-cell table:style-name="ce1" office:value-type="string" calcext:value-type="string">
            <text:p>Cited by: 9</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pplying a multi-platform architectural conformance solution in a real-world microservice-based system</text:p>
          </table:table-cell>
          <table:table-cell table:style-name="ce1" office:value-type="string" calcext:value-type="string">
            <text:p>Araujo, Elena A. and Espíndola, Álvaro M. and Garcia, Vinícius Cardoso and Terra, Ricardo</text:p>
          </table:table-cell>
          <table:table-cell table:style-name="ce1" office:value-type="string" calcext:value-type="string">
            <text:p>ACM International Conference Proceeding Series</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41 - 50</text:p>
          </table:table-cell>
          <table:table-cell/>
          <table:table-cell table:style-name="ce1"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1" office:value-type="string" calcext:value-type="string">
            <text:p>Conference paper</text:p>
          </table:table-cell>
          <table:table-cell table:style-name="ce1" office:value-type="string" calcext:value-type="string">
            <text:p>10.1145/3425269.3425270</text:p>
          </table:table-cell>
          <table:table-cell table:style-name="ce3" office:value-type="string" calcext:value-type="string">
            <text:p><text:a xlink:href="https://www.scopus.com/inward/record.uri?eid=2-s2.0-85095810870&amp;doi=10.1145%2F3425269.3425270&amp;partnerID=40&amp;md5=e7e0a97f76bf857656bc9c0a149ea44a" xlink:type="simple">https://www.scopus.com/inward/record.uri?eid=2-s2.0-85095810870&amp;doi=10.1145%2F3425269.3425270&amp;partnerID=40&amp;md5=e7e0a97f76bf857656bc9c0a149ea44a</text:a></text:p>
          </table:table-cell>
          <table:table-cell table:number-columns-repeated="2"/>
          <table:table-cell table:style-name="ce1"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number-columns-repeated="3"/>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Proceedings - 14th Brazilian Symposium on Software Components, Architectures, and Reuse, SBCARS 2020</text:p>
          </table:table-cell>
          <table:table-cell/>
          <table:table-cell table:style-name="ce1" office:value-type="string" calcext:value-type="string">
            <text:p>ACM International Conference Proceeding Series</text:p>
          </table:table-cell>
          <table:table-cell table:style-name="ce1" office:value-type="float" office:value="2020" calcext:value-type="float">
            <text:p>2020</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23040650&amp;partnerID=40&amp;md5=6f1019ea014396d9edec26062a12ac8d" xlink:type="simple">https://www.scopus.com/inward/record.uri?eid=2-s2.0-85123040650&amp;partnerID=40&amp;md5=6f1019ea014396d9edec26062a12ac8d</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owards a method for monitoring the coupling evolution of microservice-based architectures</text:p>
          </table:table-cell>
          <table:table-cell table:style-name="ce1" office:value-type="string" calcext:value-type="string">
            <text:p>de Freitas Apolinário, Daniel Rodrigo and de França, Breno Bernard Nicolau</text:p>
          </table:table-cell>
          <table:table-cell table:style-name="ce1" office:value-type="string" calcext:value-type="string">
            <text:p>ACM International Conference Proceeding Series</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71 - 80</text:p>
          </table:table-cell>
          <table:table-cell/>
          <table:table-cell table:style-name="ce1"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1" office:value-type="string" calcext:value-type="string">
            <text:p>Conference paper</text:p>
          </table:table-cell>
          <table:table-cell table:style-name="ce1" office:value-type="string" calcext:value-type="string">
            <text:p>10.1145/3425269.3425273</text:p>
          </table:table-cell>
          <table:table-cell table:style-name="ce3" office:value-type="string" calcext:value-type="string">
            <text:p><text:a xlink:href="https://www.scopus.com/inward/record.uri?eid=2-s2.0-85095820890&amp;doi=10.1145%2F3425269.3425273&amp;partnerID=40&amp;md5=add7766e1e8a85bb98d13c462bb4a90c" xlink:type="simple">https://www.scopus.com/inward/record.uri?eid=2-s2.0-85095820890&amp;doi=10.1145%2F3425269.3425273&amp;partnerID=40&amp;md5=add7766e1e8a85bb98d13c462bb4a90c</text:a></text:p>
          </table:table-cell>
          <table:table-cell/>
          <table:table-cell table:style-name="ce1" office:value-type="string" calcext:value-type="string">
            <text:p>Coupling metrics; Maintainability; Microservices; Software Evolution</text:p>
          </table:table-cell>
          <table:table-cell table:style-name="ce1"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number-columns-repeated="3"/>
          <table:table-cell table:style-name="ce1" office:value-type="string" calcext:value-type="string">
            <text:p>Cited by: 3</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Evaluating and Improving Microservice Architecture Conformance to Architectural Design Decisions</text:p>
          </table:table-cell>
          <table:table-cell table:style-name="ce1" office:value-type="string" calcext:value-type="string">
            <text:p>Ntentos, Evangelos and Zdun, Uwe and Plakidas, Konstantinos and Geiger, Sebastian</text:p>
          </table:table-cell>
          <table:table-cell table:style-name="ce1" office:value-type="string" calcext:value-type="string">
            <text:p>Lecture Notes in Computer Science</text:p>
          </table:table-cell>
          <table:table-cell table:style-name="ce1" office:value-type="float" office:value="2021" calcext:value-type="float">
            <text:p>2021</text:p>
          </table:table-cell>
          <table:table-cell table:style-name="ce1" office:value-type="string" calcext:value-type="string">
            <text:p>Scopus</text:p>
          </table:table-cell>
          <table:table-cell table:style-name="ce1" office:value-type="string" calcext:value-type="string">
            <text:p>188 - 203</text:p>
          </table:table-cell>
          <table:table-cell table:style-name="ce1" office:value-type="string" calcext:value-type="string">
            <text:p>13121 LNCS</text:p>
          </table:table-cell>
          <table:table-cell table:style-name="ce1"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1" office:value-type="string" calcext:value-type="string">
            <text:p>Conference paper</text:p>
          </table:table-cell>
          <table:table-cell table:style-name="ce1" office:value-type="string" calcext:value-type="string">
            <text:p>10.1007/978-3-030-91431-8_12</text:p>
          </table:table-cell>
          <table:table-cell table:style-name="ce3" office:value-type="string" calcext:value-type="string">
            <text:p><text:a xlink:href="https://www.scopus.com/inward/record.uri?eid=2-s2.0-85120524117&amp;doi=10.1007%2F978-3-030-91431-8_12&amp;partnerID=40&amp;md5=7c0a3ca83ce0ea7e29e48e83a98d3392" xlink:type="simple">https://www.scopus.com/inward/record.uri?eid=2-s2.0-85120524117&amp;doi=10.1007%2F978-3-030-91431-8_12&amp;partnerID=40&amp;md5=7c0a3ca83ce0ea7e29e48e83a98d3392</text:a></text:p>
          </table:table-cell>
          <table:table-cell table:number-columns-repeated="2"/>
          <table:table-cell table:style-name="ce1"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IEEE 19th International Conference on Software Architecture, ICSA 2022</text:p>
          </table:table-cell>
          <table:table-cell table:number-columns-repeated="2"/>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2033293&amp;partnerID=40&amp;md5=a78de98b086991d0b5246534e23a898c" xlink:type="simple">https://www.scopus.com/inward/record.uri?eid=2-s2.0-85132033293&amp;partnerID=40&amp;md5=a78de98b086991d0b5246534e23a898c</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Semi-automatic Feedback for Improving Architecture Conformance to Microservice Patterns and Practices</text:p>
          </table:table-cell>
          <table:table-cell table:style-name="ce1" office:value-type="string" calcext:value-type="string">
            <text:p>Ntentos, Evangelos and Zdun, Uwe and Plakidas, Konstantinos and Geiger, Sebastian</text:p>
          </table:table-cell>
          <table:table-cell/>
          <table:table-cell table:style-name="ce1" office:value-type="float" office:value="2021" calcext:value-type="float">
            <text:p>2021</text:p>
          </table:table-cell>
          <table:table-cell table:style-name="ce1" office:value-type="string" calcext:value-type="string">
            <text:p>Scopus</text:p>
          </table:table-cell>
          <table:table-cell table:style-name="ce1" office:value-type="string" calcext:value-type="string">
            <text:p>36 - 46</text:p>
          </table:table-cell>
          <table:table-cell/>
          <table:table-cell table:style-name="ce1"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1" office:value-type="string" calcext:value-type="string">
            <text:p>Conference paper</text:p>
          </table:table-cell>
          <table:table-cell table:style-name="ce1" office:value-type="string" calcext:value-type="string">
            <text:p>10.1109/ICSA51549.2021.00012</text:p>
          </table:table-cell>
          <table:table-cell table:style-name="ce3" office:value-type="string" calcext:value-type="string">
            <text:p><text:a xlink:href="https://www.scopus.com/inward/record.uri?eid=2-s2.0-85106981120&amp;doi=10.1109%2FICSA51549.2021.00012&amp;partnerID=40&amp;md5=21f3e272b00832b218635553f530d18f" xlink:type="simple">https://www.scopus.com/inward/record.uri?eid=2-s2.0-85106981120&amp;doi=10.1109%2FICSA51549.2021.00012&amp;partnerID=40&amp;md5=21f3e272b00832b218635553f530d18f</text:a></text:p>
          </table:table-cell>
          <table:table-cell/>
          <table:table-cell table:style-name="ce1" office:value-type="string" calcext:value-type="string">
            <text:p>best practices; continuous architecture improvement; feedback loop; Microservices; patterns</text:p>
          </table:table-cell>
          <table:table-cell table:style-name="ce1" office:value-type="string" calcext:value-type="string">
            <text:p>Software architecture; Architectural style; Architecture reconstruction; Automated approach; Automated support; Best practices; Distributed applications; Feed-back loop; Semi-automatics; Automation</text:p>
          </table:table-cell>
          <table:table-cell table:number-columns-repeated="3"/>
          <table:table-cell table:style-name="ce1" office:value-type="string" calcext:value-type="string">
            <text:p>Cited by: 17</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method for monitoring the coupling evolution of microservice-based architectures</text:p>
          </table:table-cell>
          <table:table-cell table:style-name="ce1" office:value-type="string" calcext:value-type="string">
            <text:p>Apolinário, Daniel R.F. and de França, Breno Bernard Nicolau</text:p>
          </table:table-cell>
          <table:table-cell table:style-name="ce1" office:value-type="string" calcext:value-type="string">
            <text:p>Journal of the Brazilian Computer Society</text:p>
          </table:table-cell>
          <table:table-cell table:style-name="ce1" office:value-type="float" office:value="2021" calcext:value-type="float">
            <text:p>2021</text:p>
          </table:table-cell>
          <table:table-cell table:style-name="ce1" office:value-type="string" calcext:value-type="string">
            <text:p>Scopus</text:p>
          </table:table-cell>
          <table:table-cell/>
          <table:table-cell table:style-name="ce1" office:value-type="float" office:value="27" calcext:value-type="float">
            <text:p>27</text:p>
          </table:table-cell>
          <table:table-cell table:style-name="ce1"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1" office:value-type="string" calcext:value-type="string">
            <text:p>Article</text:p>
          </table:table-cell>
          <table:table-cell table:style-name="ce1" office:value-type="string" calcext:value-type="string">
            <text:p>10.1186/s13173-021-00120-y</text:p>
          </table:table-cell>
          <table:table-cell table:style-name="ce3" office:value-type="string" calcext:value-type="string">
            <text:p><text:a xlink:href="https://www.scopus.com/inward/record.uri?eid=2-s2.0-85120964084&amp;doi=10.1186%2Fs13173-021-00120-y&amp;partnerID=40&amp;md5=cbc0e8df254457768b1cae8caeaf6e2b" xlink:type="simple">https://www.scopus.com/inward/record.uri?eid=2-s2.0-85120964084&amp;doi=10.1186%2Fs13173-021-00120-y&amp;partnerID=40&amp;md5=cbc0e8df254457768b1cae8caeaf6e2b</text:a></text:p>
          </table:table-cell>
          <table:table-cell/>
          <table:table-cell table:style-name="ce1" office:value-type="string" calcext:value-type="string">
            <text:p>Coupling metrics; Maintainability; Microservices; Software architecture; Software engineering; Software evolution</text:p>
          </table:table-cell>
          <table:table-cell table:style-name="ce1"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number-columns-repeated="3"/>
          <table:table-cell table:style-name="ce1" office:value-type="string" calcext:value-type="string">
            <text:p>Cited by: 20; All Open Access; Gold Open Access</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Conformance Assessment of Architectural Design Decisions on the Mapping of Domain Model Elements to APIs and API Endpoints</text:p>
          </table:table-cell>
          <table:table-cell table:style-name="ce1" office:value-type="string" calcext:value-type="string">
            <text:p>Singjai, Apitchaka and Zdun, Uwe</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76 - 83</text:p>
          </table:table-cell>
          <table:table-cell/>
          <table:table-cell table:style-name="ce1"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1" office:value-type="string" calcext:value-type="string">
            <text:p>Conference paper</text:p>
          </table:table-cell>
          <table:table-cell table:style-name="ce1" office:value-type="string" calcext:value-type="string">
            <text:p>10.1109/ICSA-C54293.2022.00058</text:p>
          </table:table-cell>
          <table:table-cell table:style-name="ce3" office:value-type="string" calcext:value-type="string">
            <text:p><text:a xlink:href="https://www.scopus.com/inward/record.uri?eid=2-s2.0-85132156777&amp;doi=10.1109%2FICSA-C54293.2022.00058&amp;partnerID=40&amp;md5=3e2aa421b5fd4b24cafd09c2a033ac48" xlink:type="simple">https://www.scopus.com/inward/record.uri?eid=2-s2.0-85132156777&amp;doi=10.1109%2FICSA-C54293.2022.00058&amp;partnerID=40&amp;md5=3e2aa421b5fd4b24cafd09c2a033ac48</text:a></text:p>
          </table:table-cell>
          <table:table-cell/>
          <table:table-cell table:style-name="ce1" office:value-type="string" calcext:value-type="string">
            <text:p>API Design; Architectural Design Decision; Conformance Assessment; DDD; Microservice Architecture</text:p>
          </table:table-cell>
          <table:table-cell table:style-name="ce1"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number-columns-repeated="3"/>
          <table:table-cell table:style-name="ce1" office:value-type="string" calcext:value-type="string">
            <text:p>Cited by: 1</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2022 IEEE International Conference on Services Computing, SCC 2022</text:p>
          </table:table-cell>
          <table:table-cell table:number-columns-repeated="2"/>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8057848&amp;partnerID=40&amp;md5=fb04b3f4e80d34ad02dd0a81af03c438" xlink:type="simple">https://www.scopus.com/inward/record.uri?eid=2-s2.0-85138057848&amp;partnerID=40&amp;md5=fb04b3f4e80d34ad02dd0a81af03c438</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structing a service process model based on distributed tracing for conformance checking of microservices</text:p>
          </table:table-cell>
          <table:table-cell table:style-name="ce1" office:value-type="string" calcext:value-type="string">
            <text:p>Sakai, Masaru and Takahashi, Kensuke</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1" office:value-type="string" calcext:value-type="string">
            <text:p>Conference paper</text:p>
          </table:table-cell>
          <table:table-cell table:style-name="ce1" office:value-type="string" calcext:value-type="string">
            <text:p>10.1109/NOMS54207.2022.9789804</text:p>
          </table:table-cell>
          <table:table-cell table:style-name="ce3" office:value-type="string" calcext:value-type="string">
            <text:p><text:a xlink:href="https://www.scopus.com/inward/record.uri?eid=2-s2.0-85133197228&amp;doi=10.1109%2FNOMS54207.2022.9789804&amp;partnerID=40&amp;md5=6bb94303cc22ddc54037170a9b0245fd" xlink:type="simple">https://www.scopus.com/inward/record.uri?eid=2-s2.0-85133197228&amp;doi=10.1109%2FNOMS54207.2022.9789804&amp;partnerID=40&amp;md5=6bb94303cc22ddc54037170a9b0245fd</text:a></text:p>
          </table:table-cell>
          <table:table-cell/>
          <table:table-cell table:style-name="ce1" office:value-type="string" calcext:value-type="string">
            <text:p>Conformance Checking; Distributed Tracing; Petri nets; Process Mining; Process Model</text:p>
          </table:table-cell>
          <table:table-cell table:style-name="ce1" office:value-type="string" calcext:value-type="string">
            <text:p>Conformance checking; Distributed tracing; Event logs; Model-based OPC; Petri net models; Process Discovery; Process mining; Process-models; Service process; Trace data; Petri nets</text:p>
          </table:table-cell>
          <table:table-cell table:number-columns-repeated="3"/>
          <table:table-cell table:style-name="ce1" office:value-type="string" calcext:value-type="string">
            <text:p>Cited by: 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ssessing Architecture Conformance to Security-Related Practices in Infrastructure as Code Based Deployments</text:p>
          </table:table-cell>
          <table:table-cell table:style-name="ce1" office:value-type="string" calcext:value-type="string">
            <text:p>Ntentos, Evangelos and Zdun, Uwe and Falazi, Ghareeb and Breitenbücher, Uwe and Leymann, Frank</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123 - 133</text:p>
          </table:table-cell>
          <table:table-cell/>
          <table:table-cell table:style-name="ce1"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1" office:value-type="string" calcext:value-type="string">
            <text:p>Conference paper</text:p>
          </table:table-cell>
          <table:table-cell table:style-name="ce1" office:value-type="string" calcext:value-type="string">
            <text:p>10.1109/SCC55611.2022.00029</text:p>
          </table:table-cell>
          <table:table-cell table:style-name="ce3" office:value-type="string" calcext:value-type="string">
            <text:p><text:a xlink:href="https://www.scopus.com/inward/record.uri?eid=2-s2.0-85138037280&amp;doi=10.1109%2FSCC55611.2022.00029&amp;partnerID=40&amp;md5=8426e3bbce08ccc97b9609781c1c9c9c" xlink:type="simple">https://www.scopus.com/inward/record.uri?eid=2-s2.0-85138037280&amp;doi=10.1109%2FSCC55611.2022.00029&amp;partnerID=40&amp;md5=8426e3bbce08ccc97b9609781c1c9c9c</text:a></text:p>
          </table:table-cell>
          <table:table-cell/>
          <table:table-cell table:style-name="ce1" office:value-type="string" calcext:value-type="string">
            <text:p>best practices; Infrastructure as code; metrics; modeling; software architecture</text:p>
          </table:table-cell>
          <table:table-cell table:style-name="ce1"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16th IEEE International Conference on Service-Oriented System Engineering, SOSE 2022</text:p>
          </table:table-cell>
          <table:table-cell table:number-columns-repeated="2"/>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41359579&amp;partnerID=40&amp;md5=d5e5e17d4cb126bea1f52c273efbfcd9" xlink:type="simple">https://www.scopus.com/inward/record.uri?eid=2-s2.0-85141359579&amp;partnerID=40&amp;md5=d5e5e17d4cb126bea1f52c273efbfcd9</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ssessing Architecture Conformance to Coupling-Related Infrastructure-as-Code Best Practices: Metrics and Case Studies</text:p>
          </table:table-cell>
          <table:table-cell table:style-name="ce1" office:value-type="string" calcext:value-type="string">
            <text:p>Ntentos, Evangelos and Zdun, Uwe and Soldani, Jacopo and Brogi, A.</text:p>
          </table:table-cell>
          <table:table-cell table:style-name="ce1" office:value-type="string" calcext:value-type="string">
            <text:p>Lecture Notes in Computer Science</text:p>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101 - 116</text:p>
          </table:table-cell>
          <table:table-cell table:style-name="ce1" office:value-type="string" calcext:value-type="string">
            <text:p>13444 LNCS</text:p>
          </table:table-cell>
          <table:table-cell table:style-name="ce1"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1" office:value-type="string" calcext:value-type="string">
            <text:p>Conference paper</text:p>
          </table:table-cell>
          <table:table-cell table:style-name="ce1" office:value-type="string" calcext:value-type="string">
            <text:p>10.1007/978-3-031-16697-6_7</text:p>
          </table:table-cell>
          <table:table-cell table:style-name="ce3" office:value-type="string" calcext:value-type="string">
            <text:p><text:a xlink:href="https://www.scopus.com/inward/record.uri?eid=2-s2.0-85139055698&amp;doi=10.1007%2F978-3-031-16697-6_7&amp;partnerID=40&amp;md5=92a48b524ba0d45d201490a08b8edce9" xlink:type="simple">https://www.scopus.com/inward/record.uri?eid=2-s2.0-85139055698&amp;doi=10.1007%2F978-3-031-16697-6_7&amp;partnerID=40&amp;md5=92a48b524ba0d45d201490a08b8edce9</text:a></text:p>
          </table:table-cell>
          <table:table-cell/>
          <table:table-cell table:style-name="ce1" office:value-type="string" calcext:value-type="string">
            <text:p>architecture conformance; IaC best practices; Infrastructure as Code; metrics; software architecture</text:p>
          </table:table-cell>
          <table:table-cell table:style-name="ce1"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number-columns-repeated="3"/>
          <table:table-cell table:style-name="ce1" office:value-type="string" calcext:value-type="string">
            <text:p>Cited by: 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PI Description-Based Conformance Assessment of Architectural Design Decision</text:p>
          </table:table-cell>
          <table:table-cell table:style-name="ce1" office:value-type="string" calcext:value-type="string">
            <text:p>Singjai, Apitchaka and Zdun, Uwe</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59 - 68</text:p>
          </table:table-cell>
          <table:table-cell/>
          <table:table-cell table:style-name="ce1"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1" office:value-type="string" calcext:value-type="string">
            <text:p>Conference paper</text:p>
          </table:table-cell>
          <table:table-cell table:style-name="ce1" office:value-type="string" calcext:value-type="string">
            <text:p>10.1109/SOSE55356.2022.00013</text:p>
          </table:table-cell>
          <table:table-cell table:style-name="ce3" office:value-type="string" calcext:value-type="string">
            <text:p><text:a xlink:href="https://www.scopus.com/inward/record.uri?eid=2-s2.0-85141357694&amp;doi=10.1109%2FSOSE55356.2022.00013&amp;partnerID=40&amp;md5=2ad201d4c891488ae0242aec28663d21" xlink:type="simple">https://www.scopus.com/inward/record.uri?eid=2-s2.0-85141357694&amp;doi=10.1109%2FSOSE55356.2022.00013&amp;partnerID=40&amp;md5=2ad201d4c891488ae0242aec28663d21</text:a></text:p>
          </table:table-cell>
          <table:table-cell/>
          <table:table-cell table:style-name="ce1" office:value-type="string" calcext:value-type="string">
            <text:p>ADD; API Design; Architecture Conformance Assessment; DDD; Microservice Architecture</text:p>
          </table:table-cell>
          <table:table-cell table:style-name="ce1"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assessment of Architectural Design Decisions on API endpoint designs derived from domain models</text:p>
          </table:table-cell>
          <table:table-cell table:style-name="ce1" office:value-type="string" calcext:value-type="string">
            <text:p>Singjai, Apitchaka and Zdun, Uwe</text:p>
          </table:table-cell>
          <table:table-cell table:style-name="ce1" office:value-type="string" calcext:value-type="string">
            <text:p>Journal of Systems and Software</text:p>
          </table:table-cell>
          <table:table-cell table:style-name="ce1" office:value-type="float" office:value="2022" calcext:value-type="float">
            <text:p>2022</text:p>
          </table:table-cell>
          <table:table-cell table:style-name="ce1" office:value-type="string" calcext:value-type="string">
            <text:p>Scopus</text:p>
          </table:table-cell>
          <table:table-cell/>
          <table:table-cell table:style-name="ce1" office:value-type="float" office:value="193" calcext:value-type="float">
            <text:p>193</text:p>
          </table:table-cell>
          <table:table-cell table:style-name="ce1"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1" office:value-type="string" calcext:value-type="string">
            <text:p>Article</text:p>
          </table:table-cell>
          <table:table-cell table:style-name="ce1" office:value-type="string" calcext:value-type="string">
            <text:p>10.1016/j.jss.2022.111433</text:p>
          </table:table-cell>
          <table:table-cell table:style-name="ce3" office:value-type="string" calcext:value-type="string">
            <text:p><text:a xlink:href="https://www.scopus.com/inward/record.uri?eid=2-s2.0-85135305434&amp;doi=10.1016%2Fj.jss.2022.111433&amp;partnerID=40&amp;md5=32dd3c4553ebddce3f7b2a8dc625d20d" xlink:type="simple">https://www.scopus.com/inward/record.uri?eid=2-s2.0-85135305434&amp;doi=10.1016%2Fj.jss.2022.111433&amp;partnerID=40&amp;md5=32dd3c4553ebddce3f7b2a8dc625d20d</text:a></text:p>
          </table:table-cell>
          <table:table-cell/>
          <table:table-cell table:style-name="ce1" office:value-type="string" calcext:value-type="string">
            <text:p>API design; Architecture conformance assessment; Domain driven design; Microservice architecture</text:p>
          </table:table-cell>
          <table:table-cell table:style-name="ce1"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number-columns-repeated="3"/>
          <table:table-cell table:style-name="ce1" office:value-type="string" calcext:value-type="string">
            <text:p>Cited by: 5; All Open Access; Hybrid Gold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tracting the Architecture of Microservices: An Approach for Explainability and Traceability</text:p>
          </table:table-cell>
          <table:table-cell table:style-name="ce1" office:value-type="string" calcext:value-type="string">
            <text:p>Queval, Pierre Jean and Zdun, Uwe</text:p>
          </table:table-cell>
          <table:table-cell table:style-name="ce1" office:value-type="string" calcext:value-type="string">
            <text:p>Lecture Notes in Computer Science</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346 - 353</text:p>
          </table:table-cell>
          <table:table-cell table:style-name="ce1" office:value-type="string" calcext:value-type="string">
            <text:p>14212 LNCS</text:p>
          </table:table-cell>
          <table:table-cell table:style-name="ce1"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1" office:value-type="string" calcext:value-type="string">
            <text:p>Conference paper</text:p>
          </table:table-cell>
          <table:table-cell table:style-name="ce1" office:value-type="string" calcext:value-type="string">
            <text:p>10.1007/978-3-031-42592-9_24</text:p>
          </table:table-cell>
          <table:table-cell table:style-name="ce3" office:value-type="string" calcext:value-type="string">
            <text:p><text:a xlink:href="https://www.scopus.com/inward/record.uri?eid=2-s2.0-85172069966&amp;doi=10.1007%2F978-3-031-42592-9_24&amp;partnerID=40&amp;md5=0a4509fefe26e4240984deaa4b0a70d1" xlink:type="simple">https://www.scopus.com/inward/record.uri?eid=2-s2.0-85172069966&amp;doi=10.1007%2F978-3-031-42592-9_24&amp;partnerID=40&amp;md5=0a4509fefe26e4240984deaa4b0a70d1</text:a></text:p>
          </table:table-cell>
          <table:table-cell/>
          <table:table-cell table:style-name="ce1" office:value-type="string" calcext:value-type="string">
            <text:p>Architecture; Explainability; Microservices; Polyglot</text:p>
          </table:table-cell>
          <table:table-cell table:style-name="ce1"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number-columns-repeated="3"/>
          <table:table-cell table:style-name="ce1" office:value-type="string" calcext:value-type="string">
            <text:p>Cited by: 6</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I Will Survive: An Event-driven Conformance Checking Approach Over Process Streams</text:p>
          </table:table-cell>
          <table:table-cell table:style-name="ce1" office:value-type="string" calcext:value-type="string">
            <text:p>Raun, Kristo and Tommasini, Riccardo and Awad, Ahmed</text:p>
          </table:table-cell>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49 - 60</text:p>
          </table:table-cell>
          <table:table-cell/>
          <table:table-cell table:style-name="ce1"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1" office:value-type="string" calcext:value-type="string">
            <text:p>Conference paper</text:p>
          </table:table-cell>
          <table:table-cell table:style-name="ce1" office:value-type="string" calcext:value-type="string">
            <text:p>10.1145/3583678.3596887</text:p>
          </table:table-cell>
          <table:table-cell table:style-name="ce3" office:value-type="string" calcext:value-type="string">
            <text:p><text:a xlink:href="https://www.scopus.com/inward/record.uri?eid=2-s2.0-85170086139&amp;doi=10.1145%2F3583678.3596887&amp;partnerID=40&amp;md5=f2a719cdf5382b5f5bd0795c932fcd9e" xlink:type="simple">https://www.scopus.com/inward/record.uri?eid=2-s2.0-85170086139&amp;doi=10.1145%2F3583678.3596887&amp;partnerID=40&amp;md5=f2a719cdf5382b5f5bd0795c932fcd9e</text:a></text:p>
          </table:table-cell>
          <table:table-cell/>
          <table:table-cell table:style-name="ce1" office:value-type="string" calcext:value-type="string">
            <text:p>data streams; event-based business process management; online conformance checking; prefix-alignments</text:p>
          </table:table-cell>
          <table:table-cell table:style-name="ce1"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number-columns-repeated="3"/>
          <table:table-cell table:style-name="ce1" office:value-type="string" calcext:value-type="string">
            <text:p>Cited by: 4; All Open Access; Green Accepted Open Access; Green Open Acces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Detecting and Resolving Coupling-Related Infrastructure as Code Based Architecture Smells in Microservice Deployments</text:p>
          </table:table-cell>
          <table:table-cell table:style-name="ce1" office:value-type="string" calcext:value-type="string">
            <text:p>Ntentos, Evangelos and Zdun, Uwe and Falazi, Ghareeb and Breitenbücher, Uwe and Leymann, Frank</text:p>
          </table:table-cell>
          <table:table-cell table:style-name="ce1" office:value-type="string" calcext:value-type="string">
            <text:p>IEEE International Conference on Cloud Computing, CLOUD</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201 - 211</text:p>
          </table:table-cell>
          <table:table-cell table:style-name="ce1" office:value-type="string" calcext:value-type="string">
            <text:p>2023-July</text:p>
          </table:table-cell>
          <table:table-cell table:style-name="ce1"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1" office:value-type="string" calcext:value-type="string">
            <text:p>Conference paper</text:p>
          </table:table-cell>
          <table:table-cell table:style-name="ce1" office:value-type="string" calcext:value-type="string">
            <text:p>10.1109/CLOUD60044.2023.00031</text:p>
          </table:table-cell>
          <table:table-cell table:style-name="ce3" office:value-type="string" calcext:value-type="string">
            <text:p><text:a xlink:href="https://www.scopus.com/inward/record.uri?eid=2-s2.0-85174302755&amp;doi=10.1109%2FCLOUD60044.2023.00031&amp;partnerID=40&amp;md5=c14bcce16ca5f1ab642cef5a88458038" xlink:type="simple">https://www.scopus.com/inward/record.uri?eid=2-s2.0-85174302755&amp;doi=10.1109%2FCLOUD60044.2023.00031&amp;partnerID=40&amp;md5=c14bcce16ca5f1ab642cef5a88458038</text:a></text:p>
          </table:table-cell>
          <table:table-cell/>
          <table:table-cell table:style-name="ce1" office:value-type="string" calcext:value-type="string">
            <text:p>architecture smells; best practices; Infrastructure as code; metrics; modeling</text:p>
          </table:table-cell>
          <table:table-cell table:style-name="ce1"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rrect-By-Construction Microservices with Model-Driven Engineering</text:p>
          </table:table-cell>
          <table:table-cell table:style-name="ce1" office:value-type="string" calcext:value-type="string">
            <text:p>Rademacher, Florian</text:p>
          </table:table-cell>
          <table:table-cell table:style-name="ce1" office:value-type="string" calcext:value-type="string">
            <text:p>OpenAccess Series in Informatics</text:p>
          </table:table-cell>
          <table:table-cell table:style-name="ce1" office:value-type="float" office:value="2023" calcext:value-type="float">
            <text:p>2023</text:p>
          </table:table-cell>
          <table:table-cell table:style-name="ce1" office:value-type="string" calcext:value-type="string">
            <text:p>Scopus</text:p>
          </table:table-cell>
          <table:table-cell/>
          <table:table-cell table:style-name="ce1" office:value-type="float" office:value="111" calcext:value-type="float">
            <text:p>111</text:p>
          </table:table-cell>
          <table:table-cell table:style-name="ce1"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1" office:value-type="string" calcext:value-type="string">
            <text:p>Conference paper</text:p>
          </table:table-cell>
          <table:table-cell table:style-name="ce1" office:value-type="string" calcext:value-type="string">
            <text:p>10.4230/OASIcs.Microservices.2020-2022.8</text:p>
          </table:table-cell>
          <table:table-cell table:style-name="ce3" office:value-type="string" calcext:value-type="string">
            <text:p><text:a xlink:href="https://www.scopus.com/inward/record.uri?eid=2-s2.0-85181985621&amp;doi=10.4230%2FOASIcs.Microservices.2020-2022.8&amp;partnerID=40&amp;md5=64696f33c95f674399485b0285aff4f8" xlink:type="simple">https://www.scopus.com/inward/record.uri?eid=2-s2.0-85181985621&amp;doi=10.4230%2FOASIcs.Microservices.2020-2022.8&amp;partnerID=40&amp;md5=64696f33c95f674399485b0285aff4f8</text:a></text:p>
          </table:table-cell>
          <table:table-cell/>
          <table:table-cell table:style-name="ce1" office:value-type="string" calcext:value-type="string">
            <text:p>Architectural Pattern Conformance Checking; Architectural Patterns; Code Generation; Microservice Architecture; Model Validation; Model-Driven Engineering; Static Model Analysis</text:p>
          </table:table-cell>
          <table:table-cell table:style-name="ce1"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ploring Architectural Evolution in Microservice Systems Using Repository Mining Techniques and Static Code Analysis</text:p>
          </table:table-cell>
          <table:table-cell table:style-name="ce1" office:value-type="string" calcext:value-type="string">
            <text:p>Genfer, Patric and Zdun, Uwe</text:p>
          </table:table-cell>
          <table:table-cell table:style-name="ce1" office:value-type="string" calcext:value-type="string">
            <text:p>Lecture Notes in Computer Science</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157 - 173</text:p>
          </table:table-cell>
          <table:table-cell table:style-name="ce1" office:value-type="string" calcext:value-type="string">
            <text:p>14889 LNCS</text:p>
          </table:table-cell>
          <table:table-cell table:style-name="ce1"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1" office:value-type="string" calcext:value-type="string">
            <text:p>Conference paper</text:p>
          </table:table-cell>
          <table:table-cell table:style-name="ce1" office:value-type="string" calcext:value-type="string">
            <text:p>10.1007/978-3-031-70797-1_10</text:p>
          </table:table-cell>
          <table:table-cell table:style-name="ce3" office:value-type="string" calcext:value-type="string">
            <text:p><text:a xlink:href="https://www.scopus.com/inward/record.uri?eid=2-s2.0-85203600424&amp;doi=10.1007%2F978-3-031-70797-1_10&amp;partnerID=40&amp;md5=7a0d70dcf9868757ca1f21ec1cf1b792" xlink:type="simple">https://www.scopus.com/inward/record.uri?eid=2-s2.0-85203600424&amp;doi=10.1007%2F978-3-031-70797-1_10&amp;partnerID=40&amp;md5=7a0d70dcf9868757ca1f21ec1cf1b792</text:a></text:p>
          </table:table-cell>
          <table:table-cell/>
          <table:table-cell table:style-name="ce1" office:value-type="string" calcext:value-type="string">
            <text:p>evolution; metrics; Microservice API; source code detectors; source code repository mining</text:p>
          </table:table-cell>
          <table:table-cell table:style-name="ce1"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number-columns-repeated="3"/>
          <table:table-cell table:style-name="ce1" office:value-type="string" calcext:value-type="string">
            <text:p>Cited by: 4</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DOMICO: Checking conformance between domain models and implementations</text:p>
          </table:table-cell>
          <table:table-cell table:style-name="ce1" office:value-type="string" calcext:value-type="string">
            <text:p>Zhong, Chenxing and Zhang, He and Huang, Huang and Chen, Zhikun and Li, Chao and Liu, Xiaodong and Li, Shanshan</text:p>
          </table:table-cell>
          <table:table-cell table:style-name="ce1" office:value-type="string" calcext:value-type="string">
            <text:p>Software - Practice and Experience</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595 - 616</text:p>
          </table:table-cell>
          <table:table-cell table:style-name="ce1" office:value-type="float" office:value="54" calcext:value-type="float">
            <text:p>54</text:p>
          </table:table-cell>
          <table:table-cell table:style-name="ce1"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1" office:value-type="string" calcext:value-type="string">
            <text:p>Article</text:p>
          </table:table-cell>
          <table:table-cell table:style-name="ce1" office:value-type="string" calcext:value-type="string">
            <text:p>10.1002/spe.3272</text:p>
          </table:table-cell>
          <table:table-cell table:style-name="ce3" office:value-type="string" calcext:value-type="string">
            <text:p><text:a xlink:href="https://www.scopus.com/inward/record.uri?eid=2-s2.0-85174190323&amp;doi=10.1002%2Fspe.3272&amp;partnerID=40&amp;md5=77117fcaf4d7e21b10d8ffbc4c176c19" xlink:type="simple">https://www.scopus.com/inward/record.uri?eid=2-s2.0-85174190323&amp;doi=10.1002%2Fspe.3272&amp;partnerID=40&amp;md5=77117fcaf4d7e21b10d8ffbc4c176c19</text:a></text:p>
          </table:table-cell>
          <table:table-cell/>
          <table:table-cell table:style-name="ce1" office:value-type="string" calcext:value-type="string">
            <text:p>architectural drift; architecture conformance checking; code implementation; domain model; domain-driven design; microservices architecture</text:p>
          </table:table-cell>
          <table:table-cell table:style-name="ce1"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number-columns-repeated="3"/>
          <table:table-cell table:style-name="ce1" office:value-type="string" calcext:value-type="string">
            <text:p>Cited by: 5; All Open Access; Bronze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tection Strategies for Microservice Security Tactics</text:p>
          </table:table-cell>
          <table:table-cell table:style-name="ce1" office:value-type="string" calcext:value-type="string">
            <text:p>Zdun, Uwe and Queval, Pierre Jean and Simhandl, Georg and Scandariato, Riccardo and Chakravarty, Somik and Jelić, Marjan and Jovanović, A. S.</text:p>
          </table:table-cell>
          <table:table-cell table:style-name="ce1" office:value-type="string" calcext:value-type="string">
            <text:p>IEEE Transactions on Dependable and Secure Computing</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1257 - 1273</text:p>
          </table:table-cell>
          <table:table-cell table:style-name="ce1" office:value-type="float" office:value="21" calcext:value-type="float">
            <text:p>21</text:p>
          </table:table-cell>
          <table:table-cell table:style-name="ce1"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1" office:value-type="string" calcext:value-type="string">
            <text:p>Article</text:p>
          </table:table-cell>
          <table:table-cell table:style-name="ce1" office:value-type="string" calcext:value-type="string">
            <text:p>10.1109/TDSC.2023.3276487</text:p>
          </table:table-cell>
          <table:table-cell table:style-name="ce3" office:value-type="string" calcext:value-type="string">
            <text:p><text:a xlink:href="https://www.scopus.com/inward/record.uri?eid=2-s2.0-85160216527&amp;doi=10.1109%2FTDSC.2023.3276487&amp;partnerID=40&amp;md5=9c14d9de24c27f20d68ba619a574a65d" xlink:type="simple">https://www.scopus.com/inward/record.uri?eid=2-s2.0-85160216527&amp;doi=10.1109%2FTDSC.2023.3276487&amp;partnerID=40&amp;md5=9c14d9de24c27f20d68ba619a574a65d</text:a></text:p>
          </table:table-cell>
          <table:table-cell/>
          <table:table-cell table:style-name="ce1" office:value-type="string" calcext:value-type="string">
            <text:p>Conformance checking; detection strategies; metrics; microservice architecture security; microservices</text:p>
          </table:table-cell>
          <table:table-cell table:style-name="ce1"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number-columns-repeated="3"/>
          <table:table-cell table:style-name="ce1" office:value-type="string" calcext:value-type="string">
            <text:p>Cited by: 3; All Open Access; Hybrid Gold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Leveraging Petri Nets for Workflow Anomaly Detection in Microservice Architectures</text:p>
          </table:table-cell>
          <table:table-cell table:style-name="ce1" office:value-type="string" calcext:value-type="string">
            <text:p>Kamboj, Priyanka and Artho, Cyrille Valentin and Guanciale, Roberto and Jabbarvand, Reyhaneh and Godfrey, Philip Brighten</text:p>
          </table:table-cell>
          <table:table-cell table:style-name="ce1" office:value-type="string" calcext:value-type="string">
            <text:p>Lecture Notes in Computer Science</text:p>
          </table:table-cell>
          <table:table-cell table:style-name="ce1" office:value-type="float" office:value="2025" calcext:value-type="float">
            <text:p>2025</text:p>
          </table:table-cell>
          <table:table-cell table:style-name="ce1" office:value-type="string" calcext:value-type="string">
            <text:p>Scopus</text:p>
          </table:table-cell>
          <table:table-cell table:style-name="ce1" office:value-type="string" calcext:value-type="string">
            <text:p>219 - 241</text:p>
          </table:table-cell>
          <table:table-cell table:style-name="ce1" office:value-type="string" calcext:value-type="string">
            <text:p>15714 LNCS</text:p>
          </table:table-cell>
          <table:table-cell table:style-name="ce1"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1" office:value-type="string" calcext:value-type="string">
            <text:p>Conference paper</text:p>
          </table:table-cell>
          <table:table-cell table:style-name="ce1" office:value-type="string" calcext:value-type="string">
            <text:p>10.1007/978-3-031-94634-9_11</text:p>
          </table:table-cell>
          <table:table-cell table:style-name="ce3" office:value-type="string" calcext:value-type="string">
            <text:p><text:a xlink:href="https://www.scopus.com/inward/record.uri?eid=2-s2.0-105008762714&amp;doi=10.1007%2F978-3-031-94634-9_11&amp;partnerID=40&amp;md5=7ce18bf00b36b36d0623423caff5fdb1" xlink:type="simple">https://www.scopus.com/inward/record.uri?eid=2-s2.0-105008762714&amp;doi=10.1007%2F978-3-031-94634-9_11&amp;partnerID=40&amp;md5=7ce18bf00b36b36d0623423caff5fdb1</text:a></text:p>
          </table:table-cell>
          <table:table-cell/>
          <table:table-cell table:style-name="ce1" office:value-type="string" calcext:value-type="string">
            <text:p>Alignments; Conformance Checking; Cost function; Delay; Microservices; Process discovery; Process mining</text:p>
          </table:table-cell>
          <table:table-cell table:style-name="ce1"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ATMA: Conformance Analysis Tool for Microservice Applications</text:p>
          </table:table-cell>
          <table:table-cell table:style-name="ce1" office:value-type="string" calcext:value-type="string">
            <text:p>Cao, Clinton and Schneider, Simon and Díaz Ferreyra, Nicolás E. and Verwer, Sicco E. and Panichella, Annibale and Scandariato, Riccardo</text:p>
          </table:table-cell>
          <table:table-cell table:style-name="ce1" office:value-type="string" calcext:value-type="string">
            <text:p>Proceedings - International Conference on Software Engineering</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59 - 63</text:p>
          </table:table-cell>
          <table:table-cell/>
          <table:table-cell table:style-name="ce1"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1" office:value-type="string" calcext:value-type="string">
            <text:p>Conference paper</text:p>
          </table:table-cell>
          <table:table-cell table:style-name="ce1" office:value-type="string" calcext:value-type="string">
            <text:p>10.1145/3639478.3640022</text:p>
          </table:table-cell>
          <table:table-cell table:style-name="ce3" office:value-type="string" calcext:value-type="string">
            <text:p><text:a xlink:href="https://www.scopus.com/inward/record.uri?eid=2-s2.0-85188258629&amp;doi=10.1145%2F3639478.3640022&amp;partnerID=40&amp;md5=1f4f18ceba149d26d74bb010a0657fb2" xlink:type="simple">https://www.scopus.com/inward/record.uri?eid=2-s2.0-85188258629&amp;doi=10.1145%2F3639478.3640022&amp;partnerID=40&amp;md5=1f4f18ceba149d26d74bb010a0657fb2</text:a></text:p>
          </table:table-cell>
          <table:table-cell/>
          <table:table-cell table:style-name="ce1" office:value-type="string" calcext:value-type="string">
            <text:p>dynamic analysis; empirical software engineering; microservices; software testing; static analysis</text:p>
          </table:table-cell>
          <table:table-cell table:style-name="ce1"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number-columns-repeated="3"/>
          <table:table-cell table:style-name="ce1" office:value-type="string" calcext:value-type="string">
            <text:p>Cited by: 4; All Open Access; Gold Open Access; Green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dvanced manufacturing rules check (MRC) for fully-automated assessmentof complex reticle designs - Part II</text:p>
          </table:table-cell>
          <table:table-cell table:style-name="ce1" office:value-type="string" calcext:value-type="string">
            <text:p>Straub, J. A. and Aguilar, D. and Buck, P. D. and Dawkins, D. andGladhill, R. and Nolke, S. and Riddick, J.</text:p>
          </table:table-cell>
          <table:table-cell/>
          <table:table-cell table:style-name="ce1" office:value-type="float" office:value="2006" calcext:value-type="float">
            <text:p>2006</text:p>
          </table:table-cell>
          <table:table-cell table:style-name="ce1" office:value-type="string" calcext:value-type="string">
            <text:p>ISI Web of Science</text:p>
          </table:table-cell>
          <table:table-cell/>
          <table:table-cell table:style-name="ce1" office:value-type="float" office:value="6349" calcext:value-type="float">
            <text:p>6349</text:p>
          </table:table-cell>
          <table:table-cell table:style-name="ce1" office:value-type="string" calcext:value-type="string">
            <text:p>Advanced electronic design automation (EDA) tools, with their</text:p>
            <text:p>simulation, modeling, design rule checking, and optical proximity</text:p>
            <text:p>correction capabilities, have facilitated the improvement of first pass</text:p>
            <text:p>wafer yields. While the data produced by these tools may have been</text:p>
            <text:p>processed for optimal wafer manufacturing, it is possible for the same</text:p>
            <text:p>data to be far from ideal for photomask manufacturing, particularly at</text:p>
            <text:p>lithography and inspection stages, resulting in production delays and</text:p>
            <text:p>increased costs. The same EDA tools used to produce the data can be used</text:p>
            <text:p>to detect potential problems for photomask manufacturing in the data.</text:p>
            <text:p>In the previous paper(1), it was shown how photomask MRC is used to</text:p>
            <text:p>uncover data related problems prior to automated defect inspection. It</text:p>
            <text:p>was demonstrated how jobs which are likely to have problems at</text:p>
            <text:p>inspection could be identified and separated from those which are not.</text:p>
            <text:p>The use of photomask MRC in production was shown to reduce time lost to</text:p>
            <text:p>aborted runs and troubleshooting due to data issues.</text:p>
            <text:p>In this paper, the effectiveness of this photomask MRC program in a high</text:p>
            <text:p>volume photomask factory over the course of a year as applied to more</text:p>
            <text:p>than ten thousand jobs will be shown. Statistics on the results of the</text:p>
            <text:p>MRC runs will be presented along with the associated impact to the</text:p>
            <text:p>automated defect inspection process. Common design problems will be</text:p>
            <text:p>shown as well as their impact to mask manufacturing throughput and</text:p>
            <text:p>productivity. Finally, solutions to the most common and most severe</text:p>
            <text:p>problems will be offered and discussed.</text:p>
          </table:table-cell>
          <table:table-cell table:style-name="ce1" office:value-type="string" calcext:value-type="string">
            <text:p>Proceedings Paper</text:p>
          </table:table-cell>
          <table:table-cell table:style-name="ce1" office:value-type="string" calcext:value-type="string">
            <text:p>10.1117/12.686134</text:p>
          </table:table-cell>
          <table:table-cell/>
          <table:table-cell table:style-name="ce1" office:value-type="string" calcext:value-type="string">
            <text:p>Straub, JA (Corresponding Author), Toppan Photomasks Inc, 400 Texas Ave, Round Rock, TX 78664 USA.Straub, J. A.; Aguilar, D.; Dawkins, D.; Riddick, J., Toppan Photomasks Inc, 400 Texas Ave, Round Rock, TX 78664 USA.Buck, P. D.; Gladhill, R.; Nolke, S., Toppan Photomasks Inc, Gresham, OR 97030 USA.</text:p>
          </table:table-cell>
          <table:table-cell/>
          <table:table-cell table:style-name="ce1" office:value-type="string" calcext:value-type="string">
            <text:p>manufacturing rules check; MRC; mask data inspection; mask datapreparation; defect inspection; design for manufacturing</text:p>
          </table:table-cell>
          <table:table-cell table:style-name="ce1" office:value-type="string" calcext:value-type="string">
            <text:p>SPIE-INT SOC OPTICAL ENGINEERING</text:p>
          </table:table-cell>
          <table:table-cell table:style-name="ce1" office:value-type="string" calcext:value-type="string">
            <text:p>0277-786X</text:p>
          </table:table-cell>
          <table:table-cell table:style-name="ce1" office:value-type="string" calcext:value-type="string">
            <text:p>English</text:p>
          </table:table-cell>
          <table:table-cell table:style-name="ce1" office:value-type="string" calcext:value-type="string">
            <text:p>26th Annual BACUS Symposium on Photomask Technology, Monterey, CA, SEP19-22, 2006</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DRC Violation Prediction After Global Route Through Convolutional NeuralNetwork</text:p>
          </table:table-cell>
          <table:table-cell table:style-name="ce1" office:value-type="string" calcext:value-type="string">
            <text:p>Hung, Wei-Tse and Chen, Yu-Guang and Lin, Jhen-Gang and Yang, Yun-Weiand Tsai, Cheng-Hong and Chao, Mango Chia-Tso</text:p>
          </table:table-cell>
          <table:table-cell table:style-name="ce1" office:value-type="string" calcext:value-type="string">
            <text:p>IEEE TRANSACTIONS ON VERY LARGE SCALE INTEGRATION (VLSI) SYSTEMS</text:p>
          </table:table-cell>
          <table:table-cell table:style-name="ce1" office:value-type="float" office:value="2023" calcext:value-type="float">
            <text:p>2023</text:p>
          </table:table-cell>
          <table:table-cell table:style-name="ce1" office:value-type="string" calcext:value-type="string">
            <text:p>ISI Web of Science</text:p>
          </table:table-cell>
          <table:table-cell table:style-name="ce1" office:value-type="string" calcext:value-type="string">
            <text:p>1425-1438</text:p>
          </table:table-cell>
          <table:table-cell table:style-name="ce1" office:value-type="float" office:value="31" calcext:value-type="float">
            <text:p>31</text:p>
          </table:table-cell>
          <table:table-cell table:style-name="ce1" office:value-type="string" calcext:value-type="string">
            <text:p>Design rule checking (DRC) violation (DRV) prediction with early stage</text:p>
            <text:p>design information can help to reduce the iterations of design procedure</text:p>
            <text:p>and can speed up the physical-design closure. It is known that</text:p>
            <text:p>accurately predicting detailed routing-level DRV with information</text:p>
            <text:p>obtained at global route (GR) stage can significantly speed up the</text:p>
            <text:p>design closure. However, without sufficient prediction accuracy, the</text:p>
            <text:p>result may lead to suboptimal design or even longer design time.</text:p>
            <text:p>Therefore, in this article, we propose two machine-learning frameworks</text:p>
            <text:p>to predict the detailed routing-level DRV map of a given design. The</text:p>
            <text:p>first framework is based on the congestion report obtained at global</text:p>
            <text:p>routing stage, and the second framework considers both the placement</text:p>
            <text:p>information and the congestion report of global routing. We then compare</text:p>
            <text:p>the runtime and accuracy of the two models. The proposed frameworks</text:p>
            <text:p>utilize convolutional neural network as the core technique to train</text:p>
            <text:p>these prediction models. The training dataset is collected from 15</text:p>
            <text:p>industrial designs using a leading commercial automatic placement and</text:p>
            <text:p>routing (APR) tool, and the total number of collected training samples</text:p>
            <text:p>exceeds 26M. A specialized under-sampling technique is also proposed to</text:p>
            <text:p>select important training samples for learning, compensate for the</text:p>
            <text:p>inaccuracy misled by a highly imbalanced training dataset, and speed up</text:p>
            <text:p>the entire training process. The experimental results demonstrate that</text:p>
            <text:p>our both models can result in not only a significantly higher accuracy</text:p>
            <text:p>than previous related works, but also a DRV map visually matching the</text:p>
            <text:p>actual ones closely. The average runtime of using our learned model from</text:p>
            <text:p>the first framework to generate a DRV map is only 3\% of global routing,</text:p>
            <text:p>and the prediction accuracy of our learned model from the second</text:p>
            <text:p>framework can improve 7.6\% compared to the one from the first</text:p>
            <text:p>framework. Our proposed framework can be viewed as a simple add-on tool</text:p>
            <text:p>to a current commercial placement and global router that can efficiently</text:p>
            <text:p>and effectively generate a more realistic DRV map without really</text:p>
            <text:p>applying detailed routing.</text:p>
          </table:table-cell>
          <table:table-cell table:style-name="ce1" office:value-type="string" calcext:value-type="string">
            <text:p>Article</text:p>
          </table:table-cell>
          <table:table-cell table:style-name="ce1" office:value-type="string" calcext:value-type="string">
            <text:p>10.1109/TVLSI.2023.3271932</text:p>
          </table:table-cell>
          <table:table-cell/>
          <table:table-cell table:style-name="ce1" office:value-type="string" calcext:value-type="string">
            <text:p>Chen, YG (Corresponding Author), Natl Cent Univ, Dept Elect Engn, Taoyuan 32001, Taiwan.Hung, Wei-Tse; Lin, Jhen-Gang; Chao, Mango Chia-Tso, Natl Yang Ming Chiao Tung Univ, Inst Elect, Hsinchu 300, Taiwan.Chen, Yu-Guang; Yang, Yun-Wei, Natl Cent Univ, Dept Elect Engn, Taoyuan 32001, Taiwan.Tsai, Cheng-Hong, Global Unichip Corp, Hsinchu 300, Taiwan.</text:p>
          </table:table-cell>
          <table:table-cell/>
          <table:table-cell table:style-name="ce1" office:value-type="string" calcext:value-type="string">
            <text:p>Design rule checking (DRC); neural networks; physical design (EDA);physical verification; supervised learning by classification</text:p>
          </table:table-cell>
          <table:table-cell table:style-name="ce1" office:value-type="string" calcext:value-type="string">
            <text:p>IEEE-INST ELECTRICAL ELECTRONICS ENGINEERS INC</text:p>
          </table:table-cell>
          <table:table-cell table:style-name="ce1" office:value-type="string" calcext:value-type="string">
            <text:p>1063-8210</text:p>
          </table:table-cell>
          <table:table-cell table:style-name="ce1" office:value-type="string" calcext:value-type="string">
            <text:p>English</text:p>
          </table:table-cell>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complete design flow for silicon photonics</text:p>
          </table:table-cell>
          <table:table-cell table:style-name="ce1" office:value-type="string" calcext:value-type="string">
            <text:p>Pond, James and Cone, Chris and Chrostowski, Lukas and Klein, Jacksonand Flueckiger, Jonas and Liu, Amy and McGuire, Dylan and Wang, Xu</text:p>
          </table:table-cell>
          <table:table-cell/>
          <table:table-cell table:style-name="ce1" office:value-type="float" office:value="2014" calcext:value-type="float">
            <text:p>2014</text:p>
          </table:table-cell>
          <table:table-cell table:style-name="ce1" office:value-type="string" calcext:value-type="string">
            <text:p>ISI Web of Science</text:p>
          </table:table-cell>
          <table:table-cell/>
          <table:table-cell table:style-name="ce1" office:value-type="float" office:value="9133" calcext:value-type="float">
            <text:p>9133</text:p>
          </table:table-cell>
          <table:table-cell table:style-name="ce1" office:value-type="string" calcext:value-type="string">
            <text:p>Broad adoption of silicon photonics technology for photonic integrated</text:p>
            <text:p>circuits requires standardized design flows that are similar to what is</text:p>
            <text:p>available for analog and mixed signal electrical circuit design. We have</text:p>
            <text:p>developed a design flow that combines mature electronic design</text:p>
            <text:p>automation (EDA) software with optical simulation software.</text:p>
            <text:p>An essential component of any design flow, whether electrical or</text:p>
            <text:p>photonic, is the ability to accurately simulate large-scale circuits.</text:p>
            <text:p>This is particularly important when the behavior of the circuit is not</text:p>
            <text:p>trivially related to the individual component performance. While this is</text:p>
            <text:p>clearly the case for electronic circuits consisting of hundreds to</text:p>
            <text:p>billions of transistors, it is already becoming important in photonic</text:p>
            <text:p>circuits such as WDM transmitters, where signal cross talk needs to be</text:p>
            <text:p>considered, as well as optical cross-connect switches. In addition,</text:p>
            <text:p>optical routing to connect different components requires the</text:p>
            <text:p>introduction of additional waveguide sections, waveguide bends, and</text:p>
            <text:p>waveguide crossings, which affect the overall circuit performance.</text:p>
            <text:p>Manufacturing variability can also have dramatic circuit-level</text:p>
            <text:p>consequences that need to be simulated. Circuit simulations must rely on</text:p>
            <text:p>compact models that can accurately represent the behavior of each</text:p>
            <text:p>component, and the compact model parameters must be extracted from</text:p>
            <text:p>physical level simulation and experimental results.</text:p>
            <text:p>We show how large scale circuits can be simulated in both the time and</text:p>
            <text:p>frequency domains, including the effects of bidirectional and, where</text:p>
            <text:p>appropriate, multimode and multichannel photonic waveguides. We also</text:p>
            <text:p>show how active, passive and nonlinear individual components such as</text:p>
            <text:p>grating couplers, waveguides, splitters, filters, electro-optical</text:p>
            <text:p>modulators and detectors can be simulated using a combination of</text:p>
            <text:p>electrical and optical algorithms, and good agreement with experimental</text:p>
            <text:p>results can be obtained. We then show how parameters, with inclusion of</text:p>
            <text:p>fabrication process variations, can be extracted for use in the circuit</text:p>
            <text:p>level simulations. Ultimately, we show how a multi-channel WDM</text:p>
            <text:p>transceiver can be created, from schematic design to tapeout, using key</text:p>
            <text:p>features of EDA design flows such as schematic driven layout, design</text:p>
            <text:p>rule checking and layout versus schematic.</text:p>
          </table:table-cell>
          <table:table-cell table:style-name="ce1" office:value-type="string" calcext:value-type="string">
            <text:p>Proceedings Paper</text:p>
          </table:table-cell>
          <table:table-cell table:style-name="ce1" office:value-type="string" calcext:value-type="string">
            <text:p>10.1117/12.2052050</text:p>
          </table:table-cell>
          <table:table-cell/>
          <table:table-cell table:style-name="ce1" office:value-type="string" calcext:value-type="string">
            <text:p>Pond, J (Corresponding Author), Lumer Solut Inc, 535 Thurlow St, Vancouver, BC V6E 3L2, Canada.Pond, James; Klein, Jackson; Liu, Amy; McGuire, Dylan; Wang, Xu, Lumer Solut Inc, 535 Thurlow St, Vancouver, BC V6E 3L2, Canada.Cone, Chris, Mentor Graph Corp, Wilsonville, OR 97070 USA.Chrostowski, Lukas, Univ British Columbia, Electr \&amp; Comp Engn, Vancouver, BC V6T IZ4, Canada.</text:p>
          </table:table-cell>
          <table:table-cell/>
          <table:table-cell table:style-name="ce1" office:value-type="string" calcext:value-type="string">
            <text:p>photonics; simulation; silicon photonics; photonic integrated circuits;electronic design automation (EDA); design flow; process design kit(PDK); photonic circuit simulation</text:p>
          </table:table-cell>
          <table:table-cell table:style-name="ce1" office:value-type="string" calcext:value-type="string">
            <text:p>SPIE-INT SOC OPTICAL ENGINEERING</text:p>
          </table:table-cell>
          <table:table-cell table:style-name="ce1" office:value-type="string" calcext:value-type="string">
            <text:p>0277-786X</text:p>
          </table:table-cell>
          <table:table-cell table:style-name="ce1" office:value-type="string" calcext:value-type="string">
            <text:p>English</text:p>
          </table:table-cell>
          <table:table-cell table:style-name="ce1" office:value-type="string" calcext:value-type="string">
            <text:p>4th Conference on Silicon Photonics and Photonic Integrated Circuits,Brussels, BELGIUM, APR 14-17, 2014</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 Framework for the Generation of Monitor and Plant Model From EventLogs Using Process Mining for Formal Verification of Event-DrivenSystems</text:p>
          </table:table-cell>
          <table:table-cell table:style-name="ce1" office:value-type="string" calcext:value-type="string">
            <text:p>Xavier, Midhun and Dubinin, Victor and Patil, Sandeep and Vyatkin,Valeriy</text:p>
          </table:table-cell>
          <table:table-cell table:style-name="ce1" office:value-type="string" calcext:value-type="string">
            <text:p>IEEE OPEN JOURNAL OF THE INDUSTRIAL ELECTRONICS SOCIETY</text:p>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517-534</text:p>
          </table:table-cell>
          <table:table-cell table:style-name="ce1" office:value-type="float" office:value="5" calcext:value-type="float">
            <text:p>5</text:p>
          </table:table-cell>
          <table:table-cell table:style-name="ce1" office:value-type="string" calcext:value-type="string">
            <text:p>This article proposes a method for the automatic generation of a plant</text:p>
            <text:p>model and monitoring using process mining algorithms based on recorded</text:p>
            <text:p>event logs. The behavioral traces of the system are captured by</text:p>
            <text:p>recording event logs during plant operation in either manual control</text:p>
            <text:p>mode or with an automatic controller. Process discovery algorithms are</text:p>
            <text:p>then applied to extract the logic of the process behavior properties</text:p>
            <text:p>from the recorded event logs. The result is represented as a Petri net,</text:p>
            <text:p>which is used to construct the state machine of the plant model and</text:p>
            <text:p>monitor and is in accordance with the IEC 61499 Standard. The monitor is</text:p>
            <text:p>implemented as a function block and can be deployed in real time to</text:p>
            <text:p>trigger an error signal whenever there is a deviation from the actual</text:p>
            <text:p>process scenario. The plant model and controller are connected in a</text:p>
            <text:p>closed loop and are used for the formal verification of the system with</text:p>
            <text:p>the help of the ``fb2smv{''} converter and symbolic model checking tool</text:p>
            <text:p>NuSMV.</text:p>
          </table:table-cell>
          <table:table-cell table:style-name="ce1" office:value-type="string" calcext:value-type="string">
            <text:p>Article</text:p>
          </table:table-cell>
          <table:table-cell table:style-name="ce1" office:value-type="string" calcext:value-type="string">
            <text:p>10.1109/OJIES.2024.3406059</text:p>
          </table:table-cell>
          <table:table-cell/>
          <table:table-cell table:style-name="ce1" office:value-type="string" calcext:value-type="string">
            <text:p>Vyatkin, V (Corresponding Author), Aalto Univ, Helsinki 02150, Finland.Xavier, Midhun, Lulea Univ Technol, dependable Commun \&amp; computat Syst, Lulea, Sweden.Dubinin, Victor; Patil, Sandeep; Vyatkin, Valeriy, Lulea Univ Technol, Lulea, Sweden.Vyatkin, Valeriy, Aalto Univ, Helsinki 02150, Finland.</text:p>
          </table:table-cell>
          <table:table-cell/>
          <table:table-cell table:style-name="ce1" office:value-type="string" calcext:value-type="string">
            <text:p>IEC 61499; formal verification; plant model generation; process mining</text:p>
          </table:table-cell>
          <table:table-cell table:style-name="ce1" office:value-type="string" calcext:value-type="string">
            <text:p>IEEE-INST ELECTRICAL ELECTRONICS ENGINEERS INC</text:p>
          </table:table-cell>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Increased reliability in SOA environments through registry-based</text:p>
            <text:p>conformance testing of Web services</text:p>
          </table:table-cell>
          <table:table-cell table:style-name="ce1" office:value-type="string" calcext:value-type="string">
            <text:p>Kourtesis, D. and Ramollari, E. and Dranidis, D. and Paraskakis, I.</text:p>
          </table:table-cell>
          <table:table-cell table:style-name="ce1" office:value-type="string" calcext:value-type="string">
            <text:p>PRODUCTION PLANNING \&amp; CONTROL</text:p>
          </table:table-cell>
          <table:table-cell table:style-name="ce1" office:value-type="float" office:value="2010" calcext:value-type="float">
            <text:p>2010</text:p>
          </table:table-cell>
          <table:table-cell table:style-name="ce1" office:value-type="string" calcext:value-type="string">
            <text:p>ISI Web of Science</text:p>
          </table:table-cell>
          <table:table-cell table:style-name="ce1" office:value-type="string" calcext:value-type="string">
            <text:p>130-144</text:p>
          </table:table-cell>
          <table:table-cell table:style-name="ce1" office:value-type="float" office:value="21" calcext:value-type="float">
            <text:p>21</text:p>
          </table:table-cell>
          <table:table-cell table:style-name="ce1"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1" office:value-type="string" calcext:value-type="string">
            <text:p>Article</text:p>
          </table:table-cell>
          <table:table-cell table:style-name="ce1" office:value-type="string" calcext:value-type="string">
            <text:p>10.1080/09537280903441922</text:p>
          </table:table-cell>
          <table:table-cell/>
          <table:table-cell table:style-name="ce1"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table-cell table:style-name="ce1" office:value-type="string" calcext:value-type="string">
            <text:p>Web services; registry; behavioural conformance; testing</text:p>
          </table:table-cell>
          <table:table-cell table:style-name="ce1" office:value-type="string" calcext:value-type="string">
            <text:p>TAYLOR \&amp; FRANCIS LTD</text:p>
          </table:table-cell>
          <table:table-cell table:style-name="ce1" office:value-type="string" calcext:value-type="string">
            <text:p>0953-7287</text:p>
          </table:table-cell>
          <table:table-cell table:style-name="ce1" office:value-type="string" calcext:value-type="string">
            <text:p>English</text:p>
          </table:table-cell>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e-Global Routing DRC Violation Prediction Using Unsupervised Learning</text:p>
          </table:table-cell>
          <table:table-cell table:style-name="ce1" office:value-type="string" calcext:value-type="string">
            <text:p>Islam, Riadul and Challagundla, Dhandeep</text:p>
          </table:table-cell>
          <table:table-cell/>
          <table:table-cell table:style-name="ce1" office:value-type="float" office:value="2025" calcext:value-type="float">
            <text:p>2025</text:p>
          </table:table-cell>
          <table:table-cell table:style-name="ce1" office:value-type="string" calcext:value-type="string">
            <text:p>ISI Web of Science</text:p>
          </table:table-cell>
          <table:table-cell table:style-name="ce1" office:value-type="string" calcext:value-type="string">
            <text:p>450-454</text:p>
          </table:table-cell>
          <table:table-cell/>
          <table:table-cell table:style-name="ce1" office:value-type="string" calcext:value-type="string">
            <text:p>Leveraging artificial intelligence (AI)-driven electronic design and</text:p>
            <text:p>automation (EDA) tools, high-performance computing, and parallelized</text:p>
            <text:p>algorithms are essential for next-generation microprocessor innovation,</text:p>
            <text:p>ensuring continued progress in computing, AI, and semiconductor</text:p>
            <text:p>technology. Machine learning-based design rule checking (DRC) and</text:p>
            <text:p>lithography hotspot detection can improve first-pass silicon success.</text:p>
            <text:p>However, conventional ML and neural network (NN)-based models use</text:p>
            <text:p>supervised learning and require a large balanced dataset (in terms of</text:p>
            <text:p>positive and negative classes) and training time. This research</text:p>
            <text:p>addresses those key challenges by proposing the first-ever unsupervised</text:p>
            <text:p>DRC violation prediction methodology. The proposed model can be built</text:p>
            <text:p>using any unbalanced dataset using only one class and set a threshold</text:p>
            <text:p>for it, then fitting any new data querying if they are within the</text:p>
            <text:p>boundary of the model for classification. This research verified the</text:p>
            <text:p>proposed model by implementing different computational cores using CMOS</text:p>
            <text:p>28 nm technology and Synopsys Design Compiler and IC Compiler II tools.</text:p>
            <text:p>Then, layouts were divided into virtual grids to collect about 60k data</text:p>
            <text:p>for analysis and verification. The proposed method has 99.95\%</text:p>
            <text:p>prediction test accuracy, while the existing support vector machine</text:p>
            <text:p>(SVM) and neural network (NN) models have 85.44\% and 98.74\% accuracy,</text:p>
            <text:p>respectively. In addition, the proposed methodology has about 26.3x and</text:p>
            <text:p>up to 6003x lower training times compared to SVM and NN-models,</text:p>
            <text:p>respectively.</text:p>
          </table:table-cell>
          <table:table-cell table:style-name="ce1" office:value-type="string" calcext:value-type="string">
            <text:p>Proceedings Paper</text:p>
          </table:table-cell>
          <table:table-cell table:style-name="ce1" office:value-type="string" calcext:value-type="string">
            <text:p>10.1109/NEWCAS64648.2025.11107147</text:p>
          </table:table-cell>
          <table:table-cell/>
          <table:table-cell table:style-name="ce1" office:value-type="string" calcext:value-type="string">
            <text:p>Islam, R (Corresponding Author), Univ Maryland Baltimore Cty, Dept Comp Sci \&amp; Elect Engn, Baltimore, MD 21228 USA.Islam, Riadul; Challagundla, Dhandeep, Univ Maryland Baltimore Cty, Dept Comp Sci \&amp; Elect Engn, Baltimore, MD 21228 USA.</text:p>
          </table:table-cell>
          <table:table-cell/>
          <table:table-cell table:style-name="ce1" office:value-type="string" calcext:value-type="string">
            <text:p>Machine learning; Layout; Unsupervised learning; Physical design flow;Design Rule Checking (DRC); Neural networks</text:p>
          </table:table-cell>
          <table:table-cell table:style-name="ce1" office:value-type="string" calcext:value-type="string">
            <text:p>IEEE</text:p>
          </table:table-cell>
          <table:table-cell table:style-name="ce1" office:value-type="string" calcext:value-type="string">
            <text:p>2472-467X</text:p>
          </table:table-cell>
          <table:table-cell table:style-name="ce1" office:value-type="string" calcext:value-type="string">
            <text:p>English</text:p>
          </table:table-cell>
          <table:table-cell table:style-name="ce1" office:value-type="string" calcext:value-type="string">
            <text:p>23rd Interregional NEWCAS Conference-NEWCAS, FRANCE, JUN 22-25, 202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S 2.0: A Plug-In for Routability Optimization and Routed WirelengthEstimation Using Deep Learning</text:p>
          </table:table-cell>
          <table:table-cell table:style-name="ce1" office:value-type="string" calcext:value-type="string">
            <text:p>Chen, Jingsong and Kuang, Jian and Zhao, Guowei and Huang, Dennis J. -H.and Young, Evangeline F. Y.</text:p>
          </table:table-cell>
          <table:table-cell table:style-name="ce1" office:value-type="string" calcext:value-type="string">
            <text:p>IEEE TRANSACTIONS ON COMPUTER-AIDED DESIGN OF INTEGRATED CIRCUITS ANDSYSTEMS</text:p>
          </table:table-cell>
          <table:table-cell table:style-name="ce1" office:value-type="float" office:value="2023" calcext:value-type="float">
            <text:p>2023</text:p>
          </table:table-cell>
          <table:table-cell table:style-name="ce1" office:value-type="string" calcext:value-type="string">
            <text:p>ISI Web of Science</text:p>
          </table:table-cell>
          <table:table-cell table:style-name="ce1" office:value-type="string" calcext:value-type="string">
            <text:p>164-177</text:p>
          </table:table-cell>
          <table:table-cell table:style-name="ce1" office:value-type="float" office:value="42" calcext:value-type="float">
            <text:p>42</text:p>
          </table:table-cell>
          <table:table-cell table:style-name="ce1" office:value-type="string" calcext:value-type="string">
            <text:p>Recently, the topic of how to utilize prior knowledge obtained by</text:p>
            <text:p>machine-learning (ML) techniques during the EDA flow has been widely</text:p>
            <text:p>studied. In this article, we study this topic and propose a practical</text:p>
            <text:p>plug-in named PROS for both routability optimization and routed</text:p>
            <text:p>wirelength estimation which can be applied in the state-of-the-art</text:p>
            <text:p>commercial EDA tool or an academic EDA flow with negligible runtime</text:p>
            <text:p>overhead. PROS consists of three parts: 1) an effective fully</text:p>
            <text:p>convolutional network (FCN)-based predictor that only utilizes the data</text:p>
            <text:p>from placement result to forecast global routing (GR) congestion; 2) a</text:p>
            <text:p>parameter optimizer that can reasonably adjust GR cost parameters based</text:p>
            <text:p>on the prediction result to generate a better GR solution for detailed</text:p>
            <text:p>routing (DR); and 3) a convolutional neural network (CNN)-based</text:p>
            <text:p>wirelength estimator which can report accurate routed wirelength at the</text:p>
            <text:p>placement stage by using the predicted GR congestion. Experiments show</text:p>
            <text:p>that on the industrial benchmark suite in the advanced technology node,</text:p>
            <text:p>PROS can achieve high accuracy of GR congestion prediction and</text:p>
            <text:p>significantly reduce design rule checking (DRC) violations by 11.65\% on</text:p>
            <text:p>average, and on the DAC-2012 benchmark suite, PROS can achieve a very</text:p>
            <text:p>low error rate (1.82\%) for wirelength estimation which greatly</text:p>
            <text:p>outperforms that of FLUTE (21.52\%) by 19.70\%.</text:p>
          </table:table-cell>
          <table:table-cell table:style-name="ce1" office:value-type="string" calcext:value-type="string">
            <text:p>Article</text:p>
          </table:table-cell>
          <table:table-cell table:style-name="ce1" office:value-type="string" calcext:value-type="string">
            <text:p>10.1109/TCAD.2022.3168259</text:p>
          </table:table-cell>
          <table:table-cell/>
          <table:table-cell table:style-name="ce1" office:value-type="string" calcext:value-type="string">
            <text:p>Chen, JS (Corresponding Author), Chinese Univ Hong Kong, Dept Comp Sci \&amp; Engn, Hong Kong, Peoples R China.Chen, Jingsong; Young, Evangeline F. Y., Chinese Univ Hong Kong, Dept Comp Sci \&amp; Engn, Hong Kong, Peoples R China.Kuang, Jian; Zhao, Guowei; Huang, Dennis J. -H., Cadence Design Syst, Digital \&amp; Signoff Grp, San Jose, CA 95134 USA.</text:p>
          </table:table-cell>
          <table:table-cell/>
          <table:table-cell table:style-name="ce1" office:value-type="string" calcext:value-type="string">
            <text:p>Circuit optimization; design automation; deep learning; routing</text:p>
          </table:table-cell>
          <table:table-cell table:style-name="ce1" office:value-type="string" calcext:value-type="string">
            <text:p>IEEE-INST ELECTRICAL ELECTRONICS ENGINEERS INC</text:p>
          </table:table-cell>
          <table:table-cell table:style-name="ce1" office:value-type="string" calcext:value-type="string">
            <text:p>0278-0070</text:p>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Enhancing extensibility of the design rule checker of an EDA tool byobject-oriented modeling</text:p>
          </table:table-cell>
          <table:table-cell table:style-name="ce1" office:value-type="string" calcext:value-type="string">
            <text:p>Khwaja, AA</text:p>
          </table:table-cell>
          <table:table-cell/>
          <table:table-cell table:style-name="ce1" office:value-type="float" office:value="1997" calcext:value-type="float">
            <text:p>1997</text:p>
          </table:table-cell>
          <table:table-cell table:style-name="ce1" office:value-type="string" calcext:value-type="string">
            <text:p>ISI Web of Science</text:p>
          </table:table-cell>
          <table:table-cell table:style-name="ce1" office:value-type="string" calcext:value-type="string">
            <text:p>104-108</text:p>
          </table:table-cell>
          <table:table-cell/>
          <table:table-cell table:style-name="ce1" office:value-type="string" calcext:value-type="string">
            <text:p>Design rule checking systems are an integral part of electronic design</text:p>
            <text:p>automation toots. Rapid advances and continuous change in the</text:p>
            <text:p>semi-conductor technology requires that these DRC systems also change</text:p>
            <text:p>accordingly. This paper presents the architecture and mechanism of the</text:p>
            <text:p>DRC module of an IC package design toot. Design goals were identified</text:p>
            <text:p>far the module to allow easy addition, removal, and modification of</text:p>
            <text:p>rules and to minimize the effect of changes among others.</text:p>
            <text:p>Object-oriented modeling technique facilitates in the accomplishment of</text:p>
            <text:p>these goats by supporting concepts such as abstraction, encapsulation,</text:p>
            <text:p>inheritance, and dynamic binding. The paper puts these concepts in</text:p>
            <text:p>perspective within the context of the architecture and mechanism of the</text:p>
            <text:p>DRC module.</text:p>
          </table:table-cell>
          <table:table-cell table:style-name="ce1" office:value-type="string" calcext:value-type="string">
            <text:p>Proceedings Paper</text:p>
          </table:table-cell>
          <table:table-cell table:style-name="ce1" office:value-type="string" calcext:value-type="string">
            <text:p>10.1109/CMPSAC.1997.624771</text:p>
          </table:table-cell>
          <table:table-cell/>
          <table:table-cell table:style-name="ce1" office:value-type="string" calcext:value-type="string">
            <text:p>Khwaja, AA (Corresponding Author), INTEL CORP,5000 W CHANDLER BLVD,CHANDLER,AZ 85226, USA.</text:p>
          </table:table-cell>
          <table:table-cell table:number-columns-repeated="2"/>
          <table:table-cell table:style-name="ce1" office:value-type="string" calcext:value-type="string">
            <text:p>I E E E, COMPUTER SOC PRESS</text:p>
          </table:table-cell>
          <table:table-cell table:style-name="ce1" office:value-type="string" calcext:value-type="string">
            <text:p>0730-3157</text:p>
          </table:table-cell>
          <table:table-cell table:style-name="ce1" office:value-type="string" calcext:value-type="string">
            <text:p>English</text:p>
          </table:table-cell>
          <table:table-cell table:style-name="ce1" office:value-type="string" calcext:value-type="string">
            <text:p>21st Annual International Computer Software and Applications Conference(COMPSAC 97), WASHINGTON, DC, AUG 13-15, 1997</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Physical Verification at Advanced Technology Nodes and the Road Ahead</text:p>
          </table:table-cell>
          <table:table-cell table:style-name="ce1" office:value-type="string" calcext:value-type="string">
            <text:p>Rey, Juan C.</text:p>
          </table:table-cell>
          <table:table-cell/>
          <table:table-cell table:style-name="ce1" office:value-type="float" office:value="2020" calcext:value-type="float">
            <text:p>2020</text:p>
          </table:table-cell>
          <table:table-cell table:style-name="ce1" office:value-type="string" calcext:value-type="string">
            <text:p>ISI Web of Science</text:p>
          </table:table-cell>
          <table:table-cell table:style-name="ce1" office:value-type="float" office:value="143" calcext:value-type="float">
            <text:p>143</text:p>
          </table:table-cell>
          <table:table-cell/>
          <table:table-cell table:style-name="ce1" office:value-type="string" calcext:value-type="string">
            <text:p>In spite of ``doomsday{''} expectations, Moore's Law is alive and well.</text:p>
            <text:p>Semiconductor manufacturing and design companies, as well as the</text:p>
            <text:p>Electronic Design Automation (EDA) industry have been pushing ahead to</text:p>
            <text:p>bring more functionality to satisfy more aggressive</text:p>
            <text:p>space/power/performance requirements.</text:p>
            <text:p>Physical verification occupies a unique space in the ecosystem as one of</text:p>
            <text:p>the key bridges between design and manufacturing. As such, the</text:p>
            <text:p>traditional space of design rule checking (DRC) and layout versus</text:p>
            <text:p>schematic (LVS) have expanded into electrical verification and yield</text:p>
            <text:p>enabling technologies such as optical proximity correction, critical</text:p>
            <text:p>area analysis, multi-patterning decomposition and automated filling.</text:p>
            <text:p>To achieve the expected accuracy and performance demanded by the design</text:p>
            <text:p>and manufacturing community, it is necessary to consider the physical</text:p>
            <text:p>effects of the manufacturing processes and electronic devices and to use</text:p>
            <text:p>the most advanced software engineering technology and computational</text:p>
            <text:p>capabilities.</text:p>
          </table:table-cell>
          <table:table-cell table:style-name="ce1" office:value-type="string" calcext:value-type="string">
            <text:p>Proceedings Paper</text:p>
          </table:table-cell>
          <table:table-cell table:style-name="ce1" office:value-type="string" calcext:value-type="string">
            <text:p>10.1145/3372780.3378168</text:p>
          </table:table-cell>
          <table:table-cell/>
          <table:table-cell table:style-name="ce1" office:value-type="string" calcext:value-type="string">
            <text:p>Rey, JC (Corresponding Author), Mentor, Fremont, CA 94538 USA.Rey, Juan C., Mentor, Fremont, CA 94538 USA.</text:p>
          </table:table-cell>
          <table:table-cell/>
          <table:table-cell table:style-name="ce1" office:value-type="string" calcext:value-type="string">
            <text:p>Electronic Design Automation (EDA); Semiconductor Manufacturing Moore'sLaw; Layout Versus Schematics (LVS); Optical Proximity Correction (OPC)</text:p>
          </table:table-cell>
          <table:table-cell table:style-name="ce1" office:value-type="string" calcext:value-type="string">
            <text:p>ASSOC COMPUTING MACHINERY</text:p>
          </table:table-cell>
          <table:table-cell/>
          <table:table-cell table:style-name="ce1" office:value-type="string" calcext:value-type="string">
            <text:p>English</text:p>
          </table:table-cell>
          <table:table-cell table:style-name="ce1" office:value-type="string" calcext:value-type="string">
            <text:p>ACM International Symposium on Physical Design (ISPD), Taipei, TAIWAN,MAR 29-APR 01, 2020</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Enabling alternating phase shifted mask designs for a full logic gatelevel: Design rules and design rule checking</text:p>
          </table:table-cell>
          <table:table-cell table:style-name="ce1" office:value-type="string" calcext:value-type="string">
            <text:p>Liebmann, L and Lund, J and Heng, FL and Graur, I</text:p>
          </table:table-cell>
          <table:table-cell/>
          <table:table-cell table:style-name="ce1" office:value-type="float" office:value="2001" calcext:value-type="float">
            <text:p>2001</text:p>
          </table:table-cell>
          <table:table-cell table:style-name="ce1" office:value-type="string" calcext:value-type="string">
            <text:p>ISI Web of Science</text:p>
          </table:table-cell>
          <table:table-cell table:style-name="ce1" office:value-type="string" calcext:value-type="string">
            <text:p>79-84</text:p>
          </table:table-cell>
          <table:table-cell/>
          <table:table-cell table:style-name="ce1" office:value-type="string" calcext:value-type="string">
            <text:p>The International Technology Roadmap for Semiconductors lists F2 (lambda</text:p>
            <text:p>= 157 mn) optical lithography and extreme ultraviolet next generation</text:p>
            <text:p>lithography as the two most feasible lithography solutions for the 70 mn</text:p>
            <text:p>technology node. It is likely that both of these solutions will be late,</text:p>
            <text:p>forcing ArF (lambda = 193 mn) lithography to operate at unprecedented</text:p>
            <text:p>resolution levels. Theoretically, alternating phase shifted masks</text:p>
            <text:p>({''}altPSM{''}) can achieve the resolution required to manufacture 70</text:p>
            <text:p>mn logic products with ArF lithography equipment, but technical and</text:p>
            <text:p>logistical challenges associated with the broad implementation of altPSM</text:p>
            <text:p>require novel and invasive EDA solutions which have caused the industry</text:p>
            <text:p>to shy away from altPSM in the past. One of the biggest such challenges</text:p>
            <text:p>is the creation of robust design rule checking (DRC) tools which can</text:p>
            <text:p>predict whether a given layout has a valid, manufacturable altPSM</text:p>
            <text:p>solution. This paper takes a detailed look at the technical and</text:p>
            <text:p>practical issues associated with altPSM design rules and DRC.</text:p>
          </table:table-cell>
          <table:table-cell table:style-name="ce1" office:value-type="string" calcext:value-type="string">
            <text:p>Proceedings Paper</text:p>
          </table:table-cell>
          <table:table-cell table:number-columns-repeated="2"/>
          <table:table-cell table:style-name="ce1" office:value-type="string" calcext:value-type="string">
            <text:p>Liebmann, L (Corresponding Author), IBM Corp, Microelect, Fishkill, NY USA.IBM Corp, Microelect, Fishkill, NY USA.</text:p>
          </table:table-cell>
          <table:table-cell table:number-columns-repeated="2"/>
          <table:table-cell table:style-name="ce1" office:value-type="string" calcext:value-type="string">
            <text:p>ASSOC COMPUTING MACHINERY</text:p>
          </table:table-cell>
          <table:table-cell table:style-name="ce1" office:value-type="string" calcext:value-type="string">
            <text:p>0738-100X</text:p>
          </table:table-cell>
          <table:table-cell table:style-name="ce1" office:value-type="string" calcext:value-type="string">
            <text:p>English</text:p>
          </table:table-cell>
          <table:table-cell table:style-name="ce1" office:value-type="string" calcext:value-type="string">
            <text:p>38th Design Automation Conference (DAC), LAS VEGAS, NV, JUN 18-22, 2001</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 Metamodel and Model-based Design Rule Checking DSL for Verificationand Validation of Electronic Circuit Designs</text:p>
          </table:table-cell>
          <table:table-cell table:style-name="ce1" office:value-type="string" calcext:value-type="string">
            <text:p>Rumpold, Adrian and Bauer, Bernhard</text:p>
          </table:table-cell>
          <table:table-cell/>
          <table:table-cell table:style-name="ce1" office:value-type="float" office:value="2019" calcext:value-type="float">
            <text:p>2019</text:p>
          </table:table-cell>
          <table:table-cell table:style-name="ce1" office:value-type="string" calcext:value-type="string">
            <text:p>ISI Web of Science</text:p>
          </table:table-cell>
          <table:table-cell table:style-name="ce1" office:value-type="string" calcext:value-type="string">
            <text:p>315-322</text:p>
          </table:table-cell>
          <table:table-cell/>
          <table:table-cell table:style-name="ce1" office:value-type="string" calcext:value-type="string">
            <text:p>Development of embedded systems depends on both software and hardware</text:p>
            <text:p>design activities. Quality management of development artifacts is of</text:p>
            <text:p>crucial importance for the overall function and safety of the final</text:p>
            <text:p>product. This paper introduces a metamodel and model-based approach and</text:p>
            <text:p>accompanying domain-specific language for validation of electronic</text:p>
            <text:p>circuit designs. The solution does not depend on any particular</text:p>
            <text:p>electronic design automation (EDA) software, instead we propose a</text:p>
            <text:p>workflow that is integrated into a modular, general-purpose model</text:p>
            <text:p>analysis framework. The paper illustrates both the underlying concepts</text:p>
            <text:p>as well as possible application scenarios for the developed validation</text:p>
            <text:p>domain-specific language, MBDRC (Model-Based Design Rule Checking). It</text:p>
            <text:p>also discusses fields for further research and transfer of the initial</text:p>
            <text:p>results.</text:p>
          </table:table-cell>
          <table:table-cell table:style-name="ce1" office:value-type="string" calcext:value-type="string">
            <text:p>Proceedings Paper</text:p>
          </table:table-cell>
          <table:table-cell table:style-name="ce1" office:value-type="string" calcext:value-type="string">
            <text:p>10.5220/0007381303150322</text:p>
          </table:table-cell>
          <table:table-cell/>
          <table:table-cell table:style-name="ce1" office:value-type="string" calcext:value-type="string">
            <text:p>Rumpold, A (Corresponding Author), Univ Augsburg, Inst Comp Sci, Augsburg, Germany.Rumpold, Adrian; Bauer, Bernhard, Univ Augsburg, Inst Comp Sci, Augsburg, Germany.</text:p>
          </table:table-cell>
          <table:table-cell/>
          <table:table-cell table:style-name="ce1" office:value-type="string" calcext:value-type="string">
            <text:p>Domain-specific Modeling; Model-based Analysis; Model-based Testing andValidation; Systems Engineering; Electronic Design Automation; DesignRule Checking</text:p>
          </table:table-cell>
          <table:table-cell table:style-name="ce1" office:value-type="string" calcext:value-type="string">
            <text:p>SCITEPRESS</text:p>
          </table:table-cell>
          <table:table-cell/>
          <table:table-cell table:style-name="ce1" office:value-type="string" calcext:value-type="string">
            <text:p>English</text:p>
          </table:table-cell>
          <table:table-cell table:style-name="ce1" office:value-type="string" calcext:value-type="string">
            <text:p>7th International Conference on Model-Driven Engineering and SoftwareDevelopment (MODELSWARD), Prague, CZECH REPUBLIC, FEB 20-22, 2019</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 Lightweight Inception Boosted U-Net Neural Network for RoutabilityPrediction</text:p>
          </table:table-cell>
          <table:table-cell table:style-name="ce1" office:value-type="string" calcext:value-type="string">
            <text:p>Li, Hailiang and Huo, Yan and Wang, Yan and Yang, Xu and Hao, Miaohuiand Wang, Xiao</text:p>
          </table:table-cell>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648-653</text:p>
          </table:table-cell>
          <table:table-cell/>
          <table:table-cell table:style-name="ce1" office:value-type="string" calcext:value-type="string">
            <text:p>As the modern CPU, GPU, and NPU chip's design complexity and transistor</text:p>
            <text:p>counts keep increasing, and with the relentless shrinking of</text:p>
            <text:p>semiconductor technology node to nearly 1 nanometer, the placement and</text:p>
            <text:p>routing have gradually become the two most pivotal processes in modern</text:p>
            <text:p>very-large-scale-integrated (VLSI) circuit back-end design. How to</text:p>
            <text:p>evaluate routability efficiently and accurately in advance (at the</text:p>
            <text:p>placement and global routing stages) has grown into a crucial research</text:p>
            <text:p>area in the field of artificial intelligence (AI) assisted electronic</text:p>
            <text:p>design automation (EDA). In this paper, we propose a novel U-Net variant</text:p>
            <text:p>model boosted by an Inception embedded module to predict Routing</text:p>
            <text:p>Congestion (RC) and Design Rule Checking (DRC) hotspots. Experimental</text:p>
            <text:p>results on the recently published CircuitNet dataset benchmark show that</text:p>
            <text:p>our proposed method achieves up to 5\% (RC) and 20\% (DRC) rate</text:p>
            <text:p>reduction in terms of Avg-NRMSE (Average Normalized Root Mean Square</text:p>
            <text:p>Error) compared to the classic architecture. Furthermore, our approach</text:p>
            <text:p>consistently outperforms the prior model on the SSIM (Structural</text:p>
            <text:p>Similarity Index Measure) metric.</text:p>
          </table:table-cell>
          <table:table-cell table:style-name="ce1" office:value-type="string" calcext:value-type="string">
            <text:p>Proceedings Paper</text:p>
          </table:table-cell>
          <table:table-cell table:style-name="ce1" office:value-type="string" calcext:value-type="string">
            <text:p>10.1109/ISEDA62518.2024.10617987</text:p>
          </table:table-cell>
          <table:table-cell/>
          <table:table-cell table:style-name="ce1" office:value-type="string" calcext:value-type="string">
            <text:p>Li, HL (Corresponding Author), Hong Kong Appl Sci \&amp; Technol Res Inst Co Ltd ASTR, Adv Elect Components \&amp; Syst AECS Div, Integrated Circuit Enabling Technol ICET Grp, Hong Kong, Peoples R China.Li, Hailiang; Huo, Yan; Wang, Yan; Yang, Xu; Hao, Miaohui; Wang, Xiao, Hong Kong Appl Sci \&amp; Technol Res Inst Co Ltd ASTR, Adv Elect Components \&amp; Syst AECS Div, Integrated Circuit Enabling Technol ICET Grp, Hong Kong, Peoples R China.</text:p>
          </table:table-cell>
          <table:table-cell/>
          <table:table-cell table:style-name="ce1" office:value-type="string" calcext:value-type="string">
            <text:p>Routing Congestion Prediction; Design Rule Checking (DRC) HotspotPrediction; Artificial Intelligence for Electronic Design Automation(EDA); Deep Learning Model; Inception Module based Network</text:p>
          </table:table-cell>
          <table:table-cell table:style-name="ce1" office:value-type="string" calcext:value-type="string">
            <text:p>IEEE</text:p>
          </table:table-cell>
          <table:table-cell/>
          <table:table-cell table:style-name="ce1" office:value-type="string" calcext:value-type="string">
            <text:p>English</text:p>
          </table:table-cell>
          <table:table-cell table:style-name="ce1" office:value-type="string" calcext:value-type="string">
            <text:p>2nd International Symposium of Electronics Design Automation (ISEDA),Xian, PEOPLES R CHINA, MAY 10-13, 2024</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Dynamic checking improves MEMS design methodology.</text:p>
          </table:table-cell>
          <table:table-cell table:style-name="ce1" office:value-type="string" calcext:value-type="string">
            <text:p>Marín, X and Carrabina, J and Bausells, J</text:p>
          </table:table-cell>
          <table:table-cell/>
          <table:table-cell table:style-name="ce1" office:value-type="float" office:value="2000" calcext:value-type="float">
            <text:p>2000</text:p>
          </table:table-cell>
          <table:table-cell table:style-name="ce1" office:value-type="string" calcext:value-type="string">
            <text:p>ISI Web of Science</text:p>
          </table:table-cell>
          <table:table-cell table:style-name="ce1" office:value-type="string" calcext:value-type="string">
            <text:p>266-271</text:p>
          </table:table-cell>
          <table:table-cell table:style-name="ce1" office:value-type="float" office:value="4019" calcext:value-type="float">
            <text:p>4019</text:p>
          </table:table-cell>
          <table:table-cell table:style-name="ce1" office:value-type="string" calcext:value-type="string">
            <text:p>Design verification methodologies and tools such as DRC (Design rule</text:p>
            <text:p>checking) and ERC (Electrical Rule Checking) used on MEMS design have</text:p>
            <text:p>been inherited from the transistor based analog and digital full custom</text:p>
            <text:p>design flows. However the devices are defined on a 2D layout, they have</text:p>
            <text:p>a 3D structure. Thus, current tools do not have into account the new</text:p>
            <text:p>features that appear in MEMS design, especially those related with</text:p>
            <text:p>device micromachining. The main consequence on it is that it is</text:p>
            <text:p>necessary to include information of the vertical (the normal of the</text:p>
            <text:p>wafer plane) parameters on the DRC, what is not at all usual in</text:p>
            <text:p>classical design. We claim that the inclusion of such information</text:p>
            <text:p>together with the consequent improvement of tools for DRC, ERC and</text:p>
            <text:p>device parameter extraction, can reduce design and simulation efforts as</text:p>
            <text:p>well as improve the manufacturing yield.</text:p>
          </table:table-cell>
          <table:table-cell table:style-name="ce1" office:value-type="string" calcext:value-type="string">
            <text:p>Proceedings Paper</text:p>
          </table:table-cell>
          <table:table-cell table:style-name="ce1" office:value-type="string" calcext:value-type="string">
            <text:p>10.1117/12.382310</text:p>
          </table:table-cell>
          <table:table-cell/>
          <table:table-cell table:style-name="ce1" office:value-type="string" calcext:value-type="string">
            <text:p>Marín, X (Corresponding Author), CSIC, IMB, Ctr Nacl Microelect, Campus UAB, Bellaterra 08193, Spain.CSIC, IMB, Ctr Nacl Microelect, Bellaterra 08193, Spain.</text:p>
          </table:table-cell>
          <table:table-cell/>
          <table:table-cell table:style-name="ce1" office:value-type="string" calcext:value-type="string">
            <text:p>design verification; EDA tools for MEMS; design rule checking</text:p>
          </table:table-cell>
          <table:table-cell table:style-name="ce1" office:value-type="string" calcext:value-type="string">
            <text:p>SPIE-INT SOC OPTICAL ENGINEERING</text:p>
          </table:table-cell>
          <table:table-cell table:style-name="ce1" office:value-type="string" calcext:value-type="string">
            <text:p>0277-786X</text:p>
          </table:table-cell>
          <table:table-cell table:style-name="ce1" office:value-type="string" calcext:value-type="string">
            <text:p>English</text:p>
          </table:table-cell>
          <table:table-cell table:style-name="ce1" office:value-type="string" calcext:value-type="string">
            <text:p>Symposium on Design, Test, Integration, and Packaging of MEMS/MOEMS,PARIS, FRANCE, MAY 09-11, 2000</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utomata applications in chip-design software</text:p>
          </table:table-cell>
          <table:table-cell table:style-name="ce1" office:value-type="string" calcext:value-type="string">
            <text:p>Watson, Bruce W.</text:p>
          </table:table-cell>
          <table:table-cell/>
          <table:table-cell table:style-name="ce1" office:value-type="float" office:value="2007" calcext:value-type="float">
            <text:p>2007</text:p>
          </table:table-cell>
          <table:table-cell table:style-name="ce1" office:value-type="string" calcext:value-type="string">
            <text:p>ISI Web of Science</text:p>
          </table:table-cell>
          <table:table-cell table:style-name="ce1" office:value-type="string" calcext:value-type="string">
            <text:p>24-26</text:p>
          </table:table-cell>
          <table:table-cell table:style-name="ce1" office:value-type="float" office:value="4783" calcext:value-type="float">
            <text:p>4783</text:p>
          </table:table-cell>
          <table:table-cell table:style-name="ce1" office:value-type="string" calcext:value-type="string">
            <text:p>In this paper, I present several new automata applications in software</text:p>
            <text:p>for electronic design automation (EDA) - chip design. EDA software has</text:p>
            <text:p>typically been implemented by and for microelectronic engineers, and the</text:p>
            <text:p>associated algorithmics remains underdeveloped. In several cases, overly</text:p>
            <text:p>complex algorithms have been used whereas automata could have been</text:p>
            <text:p>applied after abstracting from the problem details.</text:p>
          </table:table-cell>
          <table:table-cell table:style-name="ce1" office:value-type="string" calcext:value-type="string">
            <text:p>Proceedings Paper</text:p>
          </table:table-cell>
          <table:table-cell table:number-columns-repeated="2"/>
          <table:table-cell table:style-name="ce1" office:value-type="string" calcext:value-type="string">
            <text:p>Watson, BW (Corresponding Author), Univ Pretoria, FASTAR, ZA-0002 Pretoria, South Africa.Watson, Bruce W., Univ Pretoria, FASTAR, ZA-0002 Pretoria, South Africa.</text:p>
          </table:table-cell>
          <table:table-cell/>
          <table:table-cell table:style-name="ce1" office:value-type="string" calcext:value-type="string">
            <text:p>EDA; integrated circuit layout; pattern matching; design rule checking;chip design</text:p>
          </table:table-cell>
          <table:table-cell table:style-name="ce1" office:value-type="string" calcext:value-type="string">
            <text:p>SPRINGER-VERLAG BERLIN</text:p>
          </table:table-cell>
          <table:table-cell table:style-name="ce1" office:value-type="string" calcext:value-type="string">
            <text:p>0302-9743</text:p>
          </table:table-cell>
          <table:table-cell table:style-name="ce1" office:value-type="string" calcext:value-type="string">
            <text:p>English</text:p>
          </table:table-cell>
          <table:table-cell table:style-name="ce1" office:value-type="string" calcext:value-type="string">
            <text:p>12th International Conference on Implementation and Application ofAutomata, Czech Tech Univ, Prague, CZECH REPUBLIC, JUL 16-18, 2007</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D2D-GPT: Leveraging Incremental Learning GPT for Seamless Design RuleConversion Across EDA Tools</text:p>
          </table:table-cell>
          <table:table-cell table:style-name="ce1" office:value-type="string" calcext:value-type="string">
            <text:p>Wang, Chao and Zhang, Yunxiang and Lu, Wangzilu and Huang, Jiajie andZhang, Qing and Yin, Minghui and Zhang, Yuhang and Li, Zhiqiang and Li,Yongfu</text:p>
          </table:table-cell>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110-114</text:p>
          </table:table-cell>
          <table:table-cell/>
          <table:table-cell table:style-name="ce1" office:value-type="string" calcext:value-type="string">
            <text:p>This paper investigates the use of fine-tuned ChatGPT, in Electronic</text:p>
            <text:p>Design Automation (EDA) for Design Rule Checking (DRC). As integrated</text:p>
            <text:p>circuits grow in complexity, so do the design rules, exacerbated by the</text:p>
            <text:p>diversity of EDA tools with unique DRC specifications. We introduce</text:p>
            <text:p>D2D-GPT, a unified tool leveraging ChatGPT's language capabilities to</text:p>
            <text:p>translate DRC specifications across different EDA platforms. This</text:p>
            <text:p>research focuses on optimizing input datasets - native DRC rules - to</text:p>
            <text:p>improve ChatGPT's translation accuracy and efficiency. Our objective is</text:p>
            <text:p>to streamline the EDA workflow, bridge gaps between various tools, and</text:p>
            <text:p>pave the way for more cohesive design processes in the semiconductor</text:p>
            <text:p>industry.</text:p>
          </table:table-cell>
          <table:table-cell table:style-name="ce1" office:value-type="string" calcext:value-type="string">
            <text:p>Proceedings Paper</text:p>
          </table:table-cell>
          <table:table-cell table:style-name="ce1" office:value-type="string" calcext:value-type="string">
            <text:p>10.1109/APCCAS62602.2024.10808537</text:p>
          </table:table-cell>
          <table:table-cell/>
          <table:table-cell table:style-name="ce1" office:value-type="string" calcext:value-type="string">
            <text:p>Wang, C; Li, YF (Corresponding Author), Shanghai Jiao Tong Univ, Shanghai, Peoples R China.Li, ZQ (Corresponding Author), Chinese Acad Sci, Inst Microelect, Beijing, Peoples R China.Wang, Chao; Zhang, Yunxiang; Lu, Wangzilu; Huang, Jiajie; Zhang, Qing; Zhang, Yuhang; Li, Yongfu, Shanghai Jiao Tong Univ, Shanghai, Peoples R China.Yin, Minghui; Li, Zhiqiang, Chinese Acad Sci, Inst Microelect, Beijing, Peoples R China.</text:p>
          </table:table-cell>
          <table:table-cell/>
          <table:table-cell table:style-name="ce1" office:value-type="string" calcext:value-type="string">
            <text:p>Electronic Design Automation; Design Rule Checking; ChatGPT;Semiconductor Industry; Machine Learning</text:p>
          </table:table-cell>
          <table:table-cell table:style-name="ce1" office:value-type="string" calcext:value-type="string">
            <text:p>IEEE</text:p>
          </table:table-cell>
          <table:table-cell table:style-name="ce1" office:value-type="string" calcext:value-type="string">
            <text:p>2837-4576</text:p>
          </table:table-cell>
          <table:table-cell table:style-name="ce1" office:value-type="string" calcext:value-type="string">
            <text:p>English</text:p>
          </table:table-cell>
          <table:table-cell table:style-name="ce1" office:value-type="string" calcext:value-type="string">
            <text:p>20th Asia-Pacific Conference on Circuits and Systems, Taipei, TAIWAN,NOV 07-09, 2024</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Distributed Estimation of Power System Oscillation Modes Under Attacks on GPS Clocks</text:p>
          </table:table-cell>
          <table:table-cell table:style-name="ce1" office:value-type="string" calcext:value-type="string">
            <text:p>Wang, Yongqiang and Hespanha, João P.</text:p>
          </table:table-cell>
          <table:table-cell table:style-name="ce1" office:value-type="string" calcext:value-type="string">
            <text:p>IEEE Transactions on Instrumentation and Measurement</text:p>
          </table:table-cell>
          <table:table-cell table:style-name="ce1" office:value-type="float" office:value="2018" calcext:value-type="float">
            <text:p>2018</text:p>
          </table:table-cell>
          <table:table-cell table:style-name="ce1" office:value-type="string" calcext:value-type="string">
            <text:p>IEEE Digital Library</text:p>
          </table:table-cell>
          <table:table-cell table:style-name="ce1" office:value-type="string" calcext:value-type="string">
            <text:p>1626-1637</text:p>
          </table:table-cell>
          <table:table-cell table:style-name="ce1" office:value-type="float" office:value="67" calcext:value-type="float">
            <text:p>67</text:p>
          </table:table-cell>
          <table:table-cell table:style-name="ce1"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table-cell table:style-name="ce1" office:value-type="string" calcext:value-type="string">
            <text:p>10.1109/TIM.2018.2801018</text:p>
          </table:table-cell>
          <table:table-cell table:number-columns-repeated="3"/>
          <table:table-cell table:style-name="ce1"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table-cell table:style-name="ce1" office:value-type="string" calcext:value-type="string">
            <text:p>1557-9662</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runtime monitoring and validation framework for Web service interactions</text:p>
          </table:table-cell>
          <table:table-cell table:style-name="ce1" office:value-type="string" calcext:value-type="string">
            <text:p>Li, Z. and Jin, Y. and Han, J.</text:p>
          </table:table-cell>
          <table:table-cell/>
          <table:table-cell table:style-name="ce1" office:value-type="float" office:value="2006" calcext:value-type="float">
            <text:p>2006</text:p>
          </table:table-cell>
          <table:table-cell table:style-name="ce1" office:value-type="string" calcext:value-type="string">
            <text:p>IEEE Digital Library</text:p>
          </table:table-cell>
          <table:table-cell table:style-name="ce1" office:value-type="string" calcext:value-type="string">
            <text:p>10 pp.-79</text:p>
          </table:table-cell>
          <table:table-cell/>
          <table:table-cell table:style-name="ce1"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table-cell table:style-name="ce1" office:value-type="string" calcext:value-type="string">
            <text:p>10.1109/ASWEC.2006.6</text:p>
          </table:table-cell>
          <table:table-cell table:number-columns-repeated="3"/>
          <table:table-cell table:style-name="ce1" office:value-type="string" calcext:value-type="string">
            <text:p>Runtime;Monitoring;Web services;Protocols;Australia;Automata;Contracts;Service oriented architecture;Bridges;Software engineering</text:p>
          </table:table-cell>
          <table:table-cell/>
          <table:table-cell table:style-name="ce1" office:value-type="string" calcext:value-type="string">
            <text:p>2377-5408</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ifying domain ontology with agent-oriented modeling of services</text:p>
          </table:table-cell>
          <table:table-cell table:style-name="ce1" office:value-type="string" calcext:value-type="string">
            <text:p>Jin, Zhi and Zhu, Hong</text:p>
          </table:table-cell>
          <table:table-cell/>
          <table:table-cell table:style-name="ce1" office:value-type="float" office:value="2011" calcext:value-type="float">
            <text:p>2011</text:p>
          </table:table-cell>
          <table:table-cell table:style-name="ce1" office:value-type="string" calcext:value-type="string">
            <text:p>IEEE Digital Library</text:p>
          </table:table-cell>
          <table:table-cell table:style-name="ce1" office:value-type="string" calcext:value-type="string">
            <text:p>31-42</text:p>
          </table:table-cell>
          <table:table-cell/>
          <table:table-cell table:style-name="ce1"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table-cell table:style-name="ce1" office:value-type="string" calcext:value-type="string">
            <text:p>10.1109/SOSE.2011.6139090</text:p>
          </table:table-cell>
          <table:table-cell table:number-columns-repeated="3"/>
          <table:table-cell table:style-name="ce1"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number-columns-repeated="4"/>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Network Management</text:p>
          </table:table-cell>
          <table:table-cell table:number-columns-repeated="2"/>
          <table:table-cell table:style-name="ce1" office:value-type="float" office:value="2015" calcext:value-type="float">
            <text:p>2015</text:p>
          </table:table-cell>
          <table:table-cell table:style-name="ce1" office:value-type="string" calcext:value-type="string">
            <text:p>IEEE Digital Library</text:p>
          </table:table-cell>
          <table:table-cell table:style-name="ce1" office:value-type="string" calcext:value-type="string">
            <text:p>259-278</text:p>
          </table:table-cell>
          <table:table-cell/>
          <table:table-cell table:style-name="ce1"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table-cell table:style-name="ce1" office:value-type="string" calcext:value-type="string">
            <text:p>10.1002/9781118924655.ch7</text:p>
          </table:table-cell>
          <table:table-cell table:style-name="ce3" office:value-type="string" calcext:value-type="string">
            <text:p><text:a xlink:href="https://ieeexplore-ieee-org.ez31.periodicos.capes.gov.br/document/8043716" xlink:type="simple">https://ieeexplore-ieee-org.ez31.periodicos.capes.gov.br/document/8043716</text:a></text:p>
          </table:table-cell>
          <table:table-cell table:number-columns-repeated="2"/>
          <table:table-cell table:style-name="ce1" office:value-type="string" calcext:value-type="string">
            <text:p>Long Term Evolution;Mobile computing;Optimization;Planning;Tools;Land mobile radio</text:p>
          </table:table-cell>
          <table:table-cell table:style-name="ce1" office:value-type="string" calcext:value-type="string">
            <text:p>Wile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Mining and checking web services behavior</text:p>
          </table:table-cell>
          <table:table-cell table:style-name="ce1" office:value-type="string" calcext:value-type="string">
            <text:p>Wan, Xiaomin and Mao, Xiaoguang and Dai, Ziying</text:p>
          </table:table-cell>
          <table:table-cell/>
          <table:table-cell table:style-name="ce1" office:value-type="float" office:value="2012" calcext:value-type="float">
            <text:p>2012</text:p>
          </table:table-cell>
          <table:table-cell table:style-name="ce1" office:value-type="string" calcext:value-type="string">
            <text:p>IEEE Digital Library</text:p>
          </table:table-cell>
          <table:table-cell table:style-name="ce1" office:value-type="string" calcext:value-type="string">
            <text:p>1004-1009</text:p>
          </table:table-cell>
          <table:table-cell/>
          <table:table-cell table:style-name="ce1"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table-cell table:style-name="ce1" office:value-type="string" calcext:value-type="string">
            <text:p>10.1109/INDIN.2012.6301239</text:p>
          </table:table-cell>
          <table:table-cell table:number-columns-repeated="3"/>
          <table:table-cell table:style-name="ce1" office:value-type="string" calcext:value-type="string">
            <text:p>Data mining;Customer services;Simple object access protocol;Automata;Computational modeling;web service mining;conformance checking;web services;behavioral model</text:p>
          </table:table-cell>
          <table:table-cell/>
          <table:table-cell table:style-name="ce1" office:value-type="string" calcext:value-type="string">
            <text:p>2378-363X</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Continuous Conformance of Software Architectures</text:p>
          </table:table-cell>
          <table:table-cell table:style-name="ce1" office:value-type="string" calcext:value-type="string">
            <text:p>Bucaioni, Alessio and Di Salle, Amleto and Iovino, Ludovico and Mariani, Leonardo and Pelliccione, Patrizio</text:p>
          </table:table-cell>
          <table:table-cell/>
          <table:table-cell table:style-name="ce1" office:value-type="float" office:value="2024" calcext:value-type="float">
            <text:p>2024</text:p>
          </table:table-cell>
          <table:table-cell table:style-name="ce1" office:value-type="string" calcext:value-type="string">
            <text:p>IEEE Digital Library</text:p>
          </table:table-cell>
          <table:table-cell table:style-name="ce1" office:value-type="string" calcext:value-type="string">
            <text:p>112-122</text:p>
          </table:table-cell>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table-cell table:style-name="ce1" office:value-type="string" calcext:value-type="string">
            <text:p>10.1109/ICSA59870.2024.00019</text:p>
          </table:table-cell>
          <table:table-cell table:number-columns-repeated="3"/>
          <table:table-cell table:style-name="ce1" office:value-type="string" calcext:value-type="string">
            <text:p>Costs;Software architecture;Computer architecture;Software quality;Maintenance;Internet;Task analysis;Reference architecture;conformance;modeling assistant</text:p>
          </table:table-cell>
          <table:table-cell/>
          <table:table-cell table:style-name="ce1" office:value-type="string" calcext:value-type="string">
            <text:p>2835-7043</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ifying Compliance Management in Adaptive Environments through Variability Descriptors (Short Paper)</text:p>
          </table:table-cell>
          <table:table-cell table:style-name="ce1" office:value-type="string" calcext:value-type="string">
            <text:p>Koetter, Falko and Kochanowski, Monika and Renner, Thomas and Fehling, Christoph and Leymann, Frank</text:p>
          </table:table-cell>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214-219</text:p>
          </table:table-cell>
          <table:table-cell/>
          <table:table-cell table:style-name="ce1"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table-cell table:style-name="ce1" office:value-type="string" calcext:value-type="string">
            <text:p>10.1109/SOCA.2013.23</text:p>
          </table:table-cell>
          <table:table-cell table:number-columns-repeated="3"/>
          <table:table-cell table:style-name="ce1" office:value-type="string" calcext:value-type="string">
            <text:p>Monitoring;Runtime;Companies;Documentation;Computer architecture;Topology;Compliance;BPM;Adaptability;Variability</text:p>
          </table:table-cell>
          <table:table-cell/>
          <table:table-cell table:style-name="ce1" office:value-type="string" calcext:value-type="string">
            <text:p>2163-2871</text:p>
          </table:table-cell>
          <table:table-cell table:number-columns-repeated="2"/>
          <table:table-cell table:style-name="ce1" office:value-type="string" calcext:value-type="string">
            <text:p>REJECTED</text:p>
          </table:table-cell>
          <table:table-cell table:style-name="ce1" office:value-type="string" calcext:value-type="string">
            <text:p>EC5</text:p>
          </table:table-cell>
          <table:table-cell table:style-name="ce1" office:value-type="string" calcext:value-type="string">
            <text:p>Study is a short paper lacking sufficient methodological detail.</text:p>
          </table:table-cell>
          <table:table-cell table:number-columns-repeated="1003"/>
        </table:table-row>
        <table:table-row table:style-name="ro1">
          <table:table-cell table:style-name="ce1" office:value-type="string" calcext:value-type="string">
            <text:p>Multilevel SLA-based QoS Support in Grids</text:p>
          </table:table-cell>
          <table:table-cell table:style-name="ce1" office:value-type="string" calcext:value-type="string">
            <text:p>Conejero, Javier and Tom's, Luis and Caminero, Blanca and Carrión, Carmen</text:p>
          </table:table-cell>
          <table:table-cell/>
          <table:table-cell table:style-name="ce1" office:value-type="float" office:value="2012" calcext:value-type="float">
            <text:p>2012</text:p>
          </table:table-cell>
          <table:table-cell table:style-name="ce1" office:value-type="string" calcext:value-type="string">
            <text:p>IEEE Digital Library</text:p>
          </table:table-cell>
          <table:table-cell table:style-name="ce1" office:value-type="string" calcext:value-type="string">
            <text:p>239-246</text:p>
          </table:table-cell>
          <table:table-cell/>
          <table:table-cell table:style-name="ce1"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table-cell table:style-name="ce1" office:value-type="string" calcext:value-type="string">
            <text:p>10.1109/ISPA.2012.39</text:p>
          </table:table-cell>
          <table:table-cell table:number-columns-repeated="3"/>
          <table:table-cell table:style-name="ce1" office:value-type="string" calcext:value-type="string">
            <text:p>Quality of service;Computer architecture;Proposals;Protocols;Measurement;Availability;Service Level Agreements;WS-Agreement;Scheduling in Advance;Reservation;Grids</text:p>
          </table:table-cell>
          <table:table-cell/>
          <table:table-cell table:style-name="ce1" office:value-type="string" calcext:value-type="string">
            <text:p>2158-9208</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utomatic Protocol Conformance Checking of Recursive and Parallel BPEL Systems</text:p>
          </table:table-cell>
          <table:table-cell table:style-name="ce1" office:value-type="string" calcext:value-type="string">
            <text:p>Both, Andreas and Zimmermann, Wolf</text:p>
          </table:table-cell>
          <table:table-cell/>
          <table:table-cell table:style-name="ce1" office:value-type="float" office:value="2008" calcext:value-type="float">
            <text:p>2008</text:p>
          </table:table-cell>
          <table:table-cell table:style-name="ce1" office:value-type="string" calcext:value-type="string">
            <text:p>IEEE Digital Library</text:p>
          </table:table-cell>
          <table:table-cell table:style-name="ce1" office:value-type="string" calcext:value-type="string">
            <text:p>81-91</text:p>
          </table:table-cell>
          <table:table-cell/>
          <table:table-cell table:style-name="ce1"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table-cell table:style-name="ce1" office:value-type="string" calcext:value-type="string">
            <text:p>10.1109/ECOWS.2008.11</text:p>
          </table:table-cell>
          <table:table-cell table:number-columns-repeated="3"/>
          <table:table-cell table:style-name="ce1" office:value-type="string" calcext:value-type="string">
            <text:p>Protocols;Web services;Algebra;Automata;Petri nets;Assembly systems;Yarn;Personal digital assistants;Computer science;Concurrent computing;Web Services;Protocol;Conformance Checking;Verification;BPEL</text:p>
          </table:table-cell>
          <table:table-cell table:number-columns-repeated="4"/>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Runtime Monitoring of Web Service Conversations</text:p>
          </table:table-cell>
          <table:table-cell table:style-name="ce1" office:value-type="string" calcext:value-type="string">
            <text:p>Simmonds, Jocelyn and Gan, Yuan and Chechik, Marsha and Nejati, Shiva and O'Farrell, Bill and Litani, Elena and Waterhouse, Julie</text:p>
          </table:table-cell>
          <table:table-cell table:style-name="ce1" office:value-type="string" calcext:value-type="string">
            <text:p>IEEE Transactions on Services Computing</text:p>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1" office:value-type="string" calcext:value-type="string">
            <text:p>223-244</text:p>
          </table:table-cell>
          <table:table-cell table:style-name="ce1" office:value-type="float" office:value="2" calcext:value-type="float">
            <text:p>2</text:p>
          </table:table-cell>
          <table:table-cell table:style-name="ce1"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table-cell table:style-name="ce1" office:value-type="string" calcext:value-type="string">
            <text:p>10.1109/TSC.2009.16</text:p>
          </table:table-cell>
          <table:table-cell table:number-columns-repeated="3"/>
          <table:table-cell table:style-name="ce1"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table-cell table:style-name="ce1" office:value-type="string" calcext:value-type="string">
            <text:p>1939-1374</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Verifying conformance between Web service choreography and implementation using learning and model checking</text:p>
          </table:table-cell>
          <table:table-cell table:style-name="ce1" office:value-type="string" calcext:value-type="string">
            <text:p>Pacharoen, Warawoot and Aoki, Toshiaki and Bhattarakosol, Pattarasinee and Surarerks, Athasit</text:p>
          </table:table-cell>
          <table:table-cell/>
          <table:table-cell table:style-name="ce1" office:value-type="float" office:value="2011" calcext:value-type="float">
            <text:p>2011</text:p>
          </table:table-cell>
          <table:table-cell table:style-name="ce1" office:value-type="string" calcext:value-type="string">
            <text:p>IEEE Digital Library</text:p>
          </table:table-cell>
          <table:table-cell table:style-name="ce1" office:value-type="string" calcext:value-type="string">
            <text:p>375-381</text:p>
          </table:table-cell>
          <table:table-cell table:style-name="ce1" office:value-type="float" office:value="2" calcext:value-type="float">
            <text:p>2</text:p>
          </table:table-cell>
          <table:table-cell table:style-name="ce1"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number-columns-repeated="5"/>
          <table:table-cell table:style-name="ce1"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Formalizing exception handling in WS-CDL and WS-BPEL for conformance verification</text:p>
          </table:table-cell>
          <table:table-cell table:style-name="ce1" office:value-type="string" calcext:value-type="string">
            <text:p>Yeung, W. L.</text:p>
          </table:table-cell>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2" office:value-type="date" office:date-value="2026-08-01" calcext:value-type="date">
            <text:p>1-8</text:p>
          </table:table-cell>
          <table:table-cell/>
          <table:table-cell table:style-name="ce1"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table-cell table:style-name="ce1" office:value-type="string" calcext:value-type="string">
            <text:p>10.1109/SOCA.2009.5410265</text:p>
          </table:table-cell>
          <table:table-cell table:number-columns-repeated="3"/>
          <table:table-cell table:style-name="ce1"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table-cell table:style-name="ce1" office:value-type="string" calcext:value-type="string">
            <text:p>2163-2871</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Checking and QoS Selection Based on CPN for Web Service Composition</text:p>
          </table:table-cell>
          <table:table-cell table:style-name="ce1" office:value-type="string" calcext:value-type="string">
            <text:p>Chen, Liping and Ha, Weitao</text:p>
          </table:table-cell>
          <table:table-cell/>
          <table:table-cell table:style-name="ce1" office:value-type="float" office:value="2017" calcext:value-type="float">
            <text:p>2017</text:p>
          </table:table-cell>
          <table:table-cell table:style-name="ce1" office:value-type="string" calcext:value-type="string">
            <text:p>IEEE Digital Library</text:p>
          </table:table-cell>
          <table:table-cell table:style-name="ce1" office:value-type="string" calcext:value-type="string">
            <text:p>273-276</text:p>
          </table:table-cell>
          <table:table-cell/>
          <table:table-cell table:style-name="ce1"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table-cell table:style-name="ce1" office:value-type="string" calcext:value-type="string">
            <text:p>10.1109/CIS.2017.00066</text:p>
          </table:table-cell>
          <table:table-cell table:number-columns-repeated="3"/>
          <table:table-cell table:style-name="ce1" office:value-type="string" calcext:value-type="string">
            <text:p>Web services;Quality of service;Color;Databases;Petri nets;Reliability;Service Composition;Web Service Selection;Skyline;QoS Optimization;Web Service Consistence Verification</text:p>
          </table:table-cell>
          <table:table-cell table:number-columns-repeated="4"/>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Services-oriented dynamic reconfiguration framework for dependable distributed computing</text:p>
          </table:table-cell>
          <table:table-cell table:style-name="ce1" office:value-type="string" calcext:value-type="string">
            <text:p>Tsai, W.T. and Weiwei Song and Paul, R. and Zhibin Cao and Hai Huang</text:p>
          </table:table-cell>
          <table:table-cell/>
          <table:table-cell table:style-name="ce1" office:value-type="float" office:value="2004" calcext:value-type="float">
            <text:p>2004</text:p>
          </table:table-cell>
          <table:table-cell table:style-name="ce1" office:value-type="string" calcext:value-type="string">
            <text:p>IEEE Digital Library</text:p>
          </table:table-cell>
          <table:table-cell table:style-name="ce1" office:value-type="string" calcext:value-type="string">
            <text:p>554-559 vol.1</text:p>
          </table:table-cell>
          <table:table-cell/>
          <table:table-cell table:style-name="ce1"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table-cell table:style-name="ce1" office:value-type="string" calcext:value-type="string">
            <text:p>10.1109/CMPSAC.2004.1342894</text:p>
          </table:table-cell>
          <table:table-cell table:number-columns-repeated="3"/>
          <table:table-cell table:style-name="ce1" office:value-type="string" calcext:value-type="string">
            <text:p>Distributed computing;Computer applications;Application software</text:p>
          </table:table-cell>
          <table:table-cell/>
          <table:table-cell table:style-name="ce1" office:value-type="string" calcext:value-type="string">
            <text:p>0730-3157</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Understanding Architecture Erosion: The Practitioners’ Perceptive</text:p>
          </table:table-cell>
          <table:table-cell table:style-name="ce1" office:value-type="string" calcext:value-type="string">
            <text:p>Li, Ruiyin and Liang, Peng and Soliman, Mohamed and Avgeriou, Paris</text:p>
          </table:table-cell>
          <table:table-cell/>
          <table:table-cell table:style-name="ce1" office:value-type="float" office:value="2021" calcext:value-type="float">
            <text:p>2021</text:p>
          </table:table-cell>
          <table:table-cell table:style-name="ce1" office:value-type="string" calcext:value-type="string">
            <text:p>IEEE Digital Library</text:p>
          </table:table-cell>
          <table:table-cell table:style-name="ce1" office:value-type="string" calcext:value-type="string">
            <text:p>311-322</text:p>
          </table:table-cell>
          <table:table-cell/>
          <table:table-cell table:style-name="ce1"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table-cell table:style-name="ce1" office:value-type="string" calcext:value-type="string">
            <text:p>10.1109/ICPC52881.2021.00037</text:p>
          </table:table-cell>
          <table:table-cell table:number-columns-repeated="3"/>
          <table:table-cell table:style-name="ce1" office:value-type="string" calcext:value-type="string">
            <text:p>Computer architecture;Tools;Maintenance engineering;Software systems;Interviews;Architecture Erosion;Online Developer Communities;Survey;Interview;Empirical Study</text:p>
          </table:table-cell>
          <table:table-cell/>
          <table:table-cell table:style-name="ce1" office:value-type="string" calcext:value-type="string">
            <text:p>2643-7171</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Conformance Checking and QoS Optimizing of Web Service Composition</text:p>
          </table:table-cell>
          <table:table-cell table:style-name="ce1" office:value-type="string" calcext:value-type="string">
            <text:p>Zhang, Guojun</text:p>
          </table:table-cell>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784-787</text:p>
          </table:table-cell>
          <table:table-cell/>
          <table:table-cell table:style-name="ce1"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table-cell table:style-name="ce1" office:value-type="string" calcext:value-type="string">
            <text:p>10.1109/CIS.2013.171</text:p>
          </table:table-cell>
          <table:table-cell table:number-columns-repeated="3"/>
          <table:table-cell table:style-name="ce1" office:value-type="string" calcext:value-type="string">
            <text:p>Quality of service;Business;Semantics;Educational institutions;Service-oriented architecture;Grammar</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conformance review strategy for regulating safety-critical software</text:p>
          </table:table-cell>
          <table:table-cell table:style-name="ce1" office:value-type="string" calcext:value-type="string">
            <text:p>Jetley, Raoul P.</text:p>
          </table:table-cell>
          <table:table-cell/>
          <table:table-cell table:style-name="ce1" office:value-type="float" office:value="2006" calcext:value-type="float">
            <text:p>2006</text:p>
          </table:table-cell>
          <table:table-cell table:style-name="ce1" office:value-type="string" calcext:value-type="string">
            <text:p>ACM Digital Library</text:p>
          </table:table-cell>
          <table:table-cell table:number-columns-repeated="2"/>
          <table:table-cell table:style-name="ce1"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number-columns-repeated="6"/>
          <table:table-cell table:style-name="ce1" office:value-type="string" calcext:value-type="string">
            <text:p>North Carolina State University</text:p>
          </table:table-cell>
          <table:table-cell table:number-columns-repeated="2"/>
          <table:table-cell table:style-name="ce1" office:value-type="string" calcext:value-type="string">
            <text:p>AAI3249688</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ercising control over the design of evolving software systems using an inverse application of reflexion modeling</text:p>
          </table:table-cell>
          <table:table-cell table:style-name="ce1" office:value-type="string" calcext:value-type="string">
            <text:p>Gear, Andrew Le and Buckley, Jim</text:p>
          </table:table-cell>
          <table:table-cell/>
          <table:table-cell table:style-name="ce1" office:value-type="float" office:value="2006" calcext:value-type="float">
            <text:p>2006</text:p>
          </table:table-cell>
          <table:table-cell table:style-name="ce1" office:value-type="string" calcext:value-type="string">
            <text:p>ACM Digital Library</text:p>
          </table:table-cell>
          <table:table-cell table:style-name="ce1" office:value-type="string" calcext:value-type="string">
            <text:p>37–es</text:p>
          </table:table-cell>
          <table:table-cell/>
          <table:table-cell table:style-name="ce1"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table-cell table:style-name="ce1" office:value-type="string" calcext:value-type="string">
            <text:p>10.1145/1188966.1189016</text:p>
          </table:table-cell>
          <table:table-cell table:style-name="ce3" office:value-type="string" calcext:value-type="string">
            <text:p><text:a xlink:href="https://doi.org/10.1145/1188966.1189016" xlink:type="simple">https://doi.org/10.1145/1188966.1189016</text:a></text:p>
          </table:table-cell>
          <table:table-cell table:number-columns-repeated="3"/>
          <table:table-cell table:style-name="ce1" office:value-type="string" calcext:value-type="string">
            <text:p>IBM Corp.</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Focus: A Light-Weight, Incremental Approach to Software Architecture Recovery and Evolution</text:p>
          </table:table-cell>
          <table:table-cell table:style-name="ce1" office:value-type="string" calcext:value-type="string">
            <text:p>Ding, Lei and Medvidovic, Nenad</text:p>
          </table:table-cell>
          <table:table-cell/>
          <table:table-cell table:style-name="ce1" office:value-type="float" office:value="2001" calcext:value-type="float">
            <text:p>2001</text:p>
          </table:table-cell>
          <table:table-cell table:style-name="ce1" office:value-type="string" calcext:value-type="string">
            <text:p>ACM Digital Library</text:p>
          </table:table-cell>
          <table:table-cell table:style-name="ce1" office:value-type="float" office:value="191" calcext:value-type="float">
            <text:p>191</text:p>
          </table:table-cell>
          <table:table-cell/>
          <table:table-cell table:style-name="ce1"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table-cell table:style-name="ce1" office:value-type="string" calcext:value-type="string">
            <text:p>10.1109/WICSA.2001.948429</text:p>
          </table:table-cell>
          <table:table-cell table:style-name="ce3" office:value-type="string" calcext:value-type="string">
            <text:p><text:a xlink:href="https://doi.org/10.1109/WICSA.2001.948429" xlink:type="simple">https://doi.org/10.1109/WICSA.2001.948429</text:a></text:p>
          </table:table-cell>
          <table:table-cell table:number-columns-repeated="2"/>
          <table:table-cell table:style-name="ce1" office:value-type="string" calcext:value-type="string">
            <text:p>GUI, OO, Software architecture, evolution, recovery</text:p>
          </table:table-cell>
          <table:table-cell table:style-name="ce1" office:value-type="string" calcext:value-type="string">
            <text:p>IEEE Computer Societ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TomTom for Business Process Management (TomTom4BPM)</text:p>
          </table:table-cell>
          <table:table-cell table:style-name="ce1" office:value-type="string" calcext:value-type="string">
            <text:p>Aalst, Wil M.</text:p>
          </table:table-cell>
          <table:table-cell/>
          <table:table-cell table:style-name="ce1" office:value-type="float" office:value="2009" calcext:value-type="float">
            <text:p>2009</text:p>
          </table:table-cell>
          <table:table-cell table:style-name="ce1" office:value-type="string" calcext:value-type="string">
            <text:p>ACM Digital Library</text:p>
          </table:table-cell>
          <table:table-cell table:style-name="ce1" office:value-type="string" calcext:value-type="string">
            <text:p>2–5</text:p>
          </table:table-cell>
          <table:table-cell/>
          <table:table-cell table:style-name="ce1"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table-cell table:style-name="ce1" office:value-type="string" calcext:value-type="string">
            <text:p>10.1007/978-3-642-02144-2_2</text:p>
          </table:table-cell>
          <table:table-cell table:style-name="ce3" office:value-type="string" calcext:value-type="string">
            <text:p><text:a xlink:href="https://doi.org/10.1007/978-3-642-02144-2_2" xlink:type="simple">https://doi.org/10.1007/978-3-642-02144-2_2</text:a></text:p>
          </table:table-cell>
          <table:table-cell table:number-columns-repeated="3"/>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Predicting Emergent Properties of Component Based Systems</text:p>
          </table:table-cell>
          <table:table-cell table:style-name="ce1" office:value-type="string" calcext:value-type="string">
            <text:p>Bhattacharya, Sutirtha and Perry, Dewayne E.</text:p>
          </table:table-cell>
          <table:table-cell/>
          <table:table-cell table:style-name="ce1" office:value-type="float" office:value="2007" calcext:value-type="float">
            <text:p>2007</text:p>
          </table:table-cell>
          <table:table-cell table:style-name="ce1" office:value-type="string" calcext:value-type="string">
            <text:p>ACM Digital Library</text:p>
          </table:table-cell>
          <table:table-cell table:style-name="ce1" office:value-type="string" calcext:value-type="string">
            <text:p>41–50</text:p>
          </table:table-cell>
          <table:table-cell/>
          <table:table-cell table:style-name="ce1"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table-cell table:style-name="ce1" office:value-type="string" calcext:value-type="string">
            <text:p>10.1109/ICCBSS.2007.25</text:p>
          </table:table-cell>
          <table:table-cell table:style-name="ce3" office:value-type="string" calcext:value-type="string">
            <text:p><text:a xlink:href="https://doi.org/10.1109/ICCBSS.2007.25" xlink:type="simple">https://doi.org/10.1109/ICCBSS.2007.25</text:a></text:p>
          </table:table-cell>
          <table:table-cell table:number-columns-repeated="3"/>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odel-Driven Evolution of Software Architectures</text:p>
          </table:table-cell>
          <table:table-cell table:style-name="ce1" office:value-type="string" calcext:value-type="string">
            <text:p>Graaf, Bas</text:p>
          </table:table-cell>
          <table:table-cell/>
          <table:table-cell table:style-name="ce1" office:value-type="float" office:value="2007" calcext:value-type="float">
            <text:p>2007</text:p>
          </table:table-cell>
          <table:table-cell table:style-name="ce1" office:value-type="string" calcext:value-type="string">
            <text:p>ACM Digital Library</text:p>
          </table:table-cell>
          <table:table-cell table:style-name="ce1" office:value-type="string" calcext:value-type="string">
            <text:p>357–360</text:p>
          </table:table-cell>
          <table:table-cell/>
          <table:table-cell table:style-name="ce1"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table-cell table:style-name="ce1" office:value-type="string" calcext:value-type="string">
            <text:p>10.1109/CSMR.2007.35</text:p>
          </table:table-cell>
          <table:table-cell table:style-name="ce3" office:value-type="string" calcext:value-type="string">
            <text:p><text:a xlink:href="https://doi.org/10.1109/CSMR.2007.35" xlink:type="simple">https://doi.org/10.1109/CSMR.2007.35</text:a></text:p>
          </table:table-cell>
          <table:table-cell table:number-columns-repeated="3"/>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Verifying Protocol Conformance Using Software Model Checking for the Model-Driven Development of Embedded Systems</text:p>
          </table:table-cell>
          <table:table-cell table:style-name="ce1" office:value-type="string" calcext:value-type="string">
            <text:p>Moffett, Yann and Dingel, Juergen and Beaulieu, Alain</text:p>
          </table:table-cell>
          <table:table-cell table:style-name="ce1" office:value-type="string" calcext:value-type="string">
            <text:p>IEEE Trans. Softw. Eng.</text:p>
          </table:table-cell>
          <table:table-cell table:style-name="ce1" office:value-type="float" office:value="2013" calcext:value-type="float">
            <text:p>2013</text:p>
          </table:table-cell>
          <table:table-cell table:style-name="ce1" office:value-type="string" calcext:value-type="string">
            <text:p>ACM Digital Library</text:p>
          </table:table-cell>
          <table:table-cell table:style-name="ce1" office:value-type="string" calcext:value-type="string">
            <text:p>1307–13256</text:p>
          </table:table-cell>
          <table:table-cell table:style-name="ce1" office:value-type="float" office:value="39" calcext:value-type="float">
            <text:p>39</text:p>
          </table:table-cell>
          <table:table-cell table:style-name="ce1"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table-cell table:style-name="ce1" office:value-type="string" calcext:value-type="string">
            <text:p>10.1109/TSE.2013.14</text:p>
          </table:table-cell>
          <table:table-cell table:style-name="ce3" office:value-type="string" calcext:value-type="string">
            <text:p><text:a xlink:href="https://doi.org/10.1109/TSE.2013.14" xlink:type="simple">https://doi.org/10.1109/TSE.2013.14</text:a></text:p>
          </table:table-cell>
          <table:table-cell table:number-columns-repeated="2"/>
          <table:table-cell table:style-name="ce1"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1" office:value-type="string" calcext:value-type="string">
            <text:p>IEEE Press</text:p>
          </table:table-cell>
          <table:table-cell table:style-name="ce1" office:value-type="string" calcext:value-type="string">
            <text:p>0098-5589</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utomated extraction and checking of property models from source code for robot swarms</text:p>
          </table:table-cell>
          <table:table-cell table:style-name="ce1" office:value-type="string" calcext:value-type="string">
            <text:p>Merlo, Ettore and Pinciroli, Carlo and Panerati, Jacopo and Famelis, Michalis and Beltrame, Giovanni</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47–54</text:p>
          </table:table-cell>
          <table:table-cell/>
          <table:table-cell table:style-name="ce1"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table-cell table:style-name="ce1" office:value-type="string" calcext:value-type="string">
            <text:p>10.1145/3526071.3527516</text:p>
          </table:table-cell>
          <table:table-cell table:style-name="ce3" office:value-type="string" calcext:value-type="string">
            <text:p><text:a xlink:href="https://doi.org/10.1145/3526071.3527516" xlink:type="simple">https://doi.org/10.1145/3526071.3527516</text:a></text:p>
          </table:table-cell>
          <table:table-cell table:number-columns-repeated="2"/>
          <table:table-cell table:style-name="ce1" office:value-type="string" calcext:value-type="string">
            <text:p>domain-specific languages, model checking, model extraction, safety, software engineering, swarm robotics</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utomated procedure clustering for reverse engineering PL/SQL programs</text:p>
          </table:table-cell>
          <table:table-cell table:style-name="ce1" office:value-type="string" calcext:value-type="string">
            <text:p>Altιnι\c{s}ιk, Metin and S\"{o}zer, Hasan</text:p>
          </table:table-cell>
          <table:table-cell/>
          <table:table-cell table:style-name="ce1" office:value-type="float" office:value="2016" calcext:value-type="float">
            <text:p>2016</text:p>
          </table:table-cell>
          <table:table-cell table:style-name="ce1" office:value-type="string" calcext:value-type="string">
            <text:p>ACM Digital Library</text:p>
          </table:table-cell>
          <table:table-cell table:style-name="ce1" office:value-type="string" calcext:value-type="string">
            <text:p>1440–1445</text:p>
          </table:table-cell>
          <table:table-cell/>
          <table:table-cell table:style-name="ce1"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table-cell table:style-name="ce1" office:value-type="string" calcext:value-type="string">
            <text:p>10.1145/2851613.2851781</text:p>
          </table:table-cell>
          <table:table-cell table:style-name="ce3" office:value-type="string" calcext:value-type="string">
            <text:p><text:a xlink:href="https://doi.org/10.1145/2851613.2851781" xlink:type="simple">https://doi.org/10.1145/2851613.2851781</text:a></text:p>
          </table:table-cell>
          <table:table-cell table:number-columns-repeated="2"/>
          <table:table-cell table:style-name="ce1" office:value-type="string" calcext:value-type="string">
            <text:p>PL/SQL programs, industrial case study, module clustering, refactoring, reverse engineer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ADDC: Multi-Scale Anomaly Detection, Diagnosis and Correction for Discrete Event Logs</text:p>
          </table:table-cell>
          <table:table-cell table:style-name="ce1" office:value-type="string" calcext:value-type="string">
            <text:p>Wang, Xiaolei and Yang, Lin and Li, Dongyang and Ma, Linru and He, Yongzhong and Xiao, Junchao and Liu, Jiyuan and Yang, Yuexiang</text:p>
          </table:table-cell>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style-name="ce1" office:value-type="string" calcext:value-type="string">
            <text:p>769–784</text:p>
          </table:table-cell>
          <table:table-cell/>
          <table:table-cell table:style-name="ce1"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table-cell table:style-name="ce1" office:value-type="string" calcext:value-type="string">
            <text:p>10.1145/3564625.3567972</text:p>
          </table:table-cell>
          <table:table-cell table:style-name="ce3" office:value-type="string" calcext:value-type="string">
            <text:p><text:a xlink:href="https://doi.org/10.1145/3564625.3567972" xlink:type="simple">https://doi.org/10.1145/3564625.3567972</text:a></text:p>
          </table:table-cell>
          <table:table-cell table:number-columns-repeated="2"/>
          <table:table-cell table:style-name="ce1" office:value-type="string" calcext:value-type="string">
            <text:p>Anomaly Detection, Anomaly Diagnosis, Deep Learning, Discrete Event Lo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icroservice Security Metrics for Secure Communication, Identity Management, and Observability</text:p>
          </table:table-cell>
          <table:table-cell table:style-name="ce1" office:value-type="string" calcext:value-type="string">
            <text:p>Zdun, Uwe and Queval, Pierre-Jean and Simhandl, Georg and Scandariato, Riccardo and Chakravarty, Somik and Jelic, Marjan and Jovanovic, Aleksandar</text:p>
          </table:table-cell>
          <table:table-cell table:style-name="ce1" office:value-type="string" calcext:value-type="string">
            <text:p>ACM Trans. Softw. Eng. Methodol.</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32" calcext:value-type="float">
            <text:p>32</text:p>
          </table:table-cell>
          <table:table-cell table:style-name="ce1"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table-cell table:style-name="ce1" office:value-type="string" calcext:value-type="string">
            <text:p>10.1145/3532183</text:p>
          </table:table-cell>
          <table:table-cell table:style-name="ce3" office:value-type="string" calcext:value-type="string">
            <text:p><text:a xlink:href="https://doi.org/10.1145/3532183" xlink:type="simple">https://doi.org/10.1145/3532183</text:a></text:p>
          </table:table-cell>
          <table:table-cell table:number-columns-repeated="2"/>
          <table:table-cell table:style-name="ce1" office:value-type="string" calcext:value-type="string">
            <text:p>Microservice architecture, microservice security, software architecture metrics, software architecture detectors</text:p>
          </table:table-cell>
          <table:table-cell table:style-name="ce1" office:value-type="string" calcext:value-type="string">
            <text:p>Association for Computing Machinery</text:p>
          </table:table-cell>
          <table:table-cell table:style-name="ce1" office:value-type="string" calcext:value-type="string">
            <text:p>1049-331X</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evolution of component-based architecture-model and object-oriented source code</text:p>
          </table:table-cell>
          <table:table-cell table:style-name="ce1" office:value-type="string" calcext:value-type="string">
            <text:p>Langhammer, Michael</text:p>
          </table:table-cell>
          <table:table-cell/>
          <table:table-cell table:style-name="ce1" office:value-type="float" office:value="2013" calcext:value-type="float">
            <text:p>2013</text:p>
          </table:table-cell>
          <table:table-cell table:style-name="ce1" office:value-type="string" calcext:value-type="string">
            <text:p>ACM Digital Library</text:p>
          </table:table-cell>
          <table:table-cell table:style-name="ce1" office:value-type="string" calcext:value-type="string">
            <text:p>37–42</text:p>
          </table:table-cell>
          <table:table-cell/>
          <table:table-cell table:style-name="ce1"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table-cell table:style-name="ce1" office:value-type="string" calcext:value-type="string">
            <text:p>10.1145/2465498.2465504</text:p>
          </table:table-cell>
          <table:table-cell table:style-name="ce3" office:value-type="string" calcext:value-type="string">
            <text:p><text:a xlink:href="https://doi.org/10.1145/2465498.2465504" xlink:type="simple">https://doi.org/10.1145/2465498.2465504</text:a></text:p>
          </table:table-cell>
          <table:table-cell table:number-columns-repeated="2"/>
          <table:table-cell table:style-name="ce1" office:value-type="string" calcext:value-type="string">
            <text:p>co-evolu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ype-Safe Dynamic Placement with First-Class Placed Values</text:p>
          </table:table-cell>
          <table:table-cell table:style-name="ce1" office:value-type="string" calcext:value-type="string">
            <text:p>Zakhour, George and Weisenburger, Pascal and Salvaneschi, Guido</text:p>
          </table:table-cell>
          <table:table-cell table:style-name="ce1" office:value-type="string" calcext:value-type="string">
            <text:p>Proc. ACM Program. Lang.</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7" calcext:value-type="float">
            <text:p>7</text:p>
          </table:table-cell>
          <table:table-cell table:style-name="ce1"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table-cell table:style-name="ce1" office:value-type="string" calcext:value-type="string">
            <text:p>10.1145/3622873</text:p>
          </table:table-cell>
          <table:table-cell table:style-name="ce3" office:value-type="string" calcext:value-type="string">
            <text:p><text:a xlink:href="https://doi.org/10.1145/3622873" xlink:type="simple">https://doi.org/10.1145/3622873</text:a></text:p>
          </table:table-cell>
          <table:table-cell table:number-columns-repeated="2"/>
          <table:table-cell table:style-name="ce1" office:value-type="string" calcext:value-type="string">
            <text:p>Distributed Programming, Dynamic Placement, Multitier Programming, Placement Types, Scala, Union Types</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Secure multicast for power grid communications</text:p>
          </table:table-cell>
          <table:table-cell table:style-name="ce1" office:value-type="string" calcext:value-type="string">
            <text:p>Zhang, Jianqing</text:p>
          </table:table-cell>
          <table:table-cell/>
          <table:table-cell table:style-name="ce1" office:value-type="float" office:value="2010" calcext:value-type="float">
            <text:p>2010</text:p>
          </table:table-cell>
          <table:table-cell table:style-name="ce1" office:value-type="string" calcext:value-type="string">
            <text:p>ACM Digital Library</text:p>
          </table:table-cell>
          <table:table-cell table:number-columns-repeated="2"/>
          <table:table-cell table:style-name="ce1"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number-columns-repeated="6"/>
          <table:table-cell table:style-name="ce1" office:value-type="string" calcext:value-type="string">
            <text:p>University of Illinois at Urbana-Champaign</text:p>
          </table:table-cell>
          <table:table-cell table:number-columns-repeated="2"/>
          <table:table-cell table:style-name="ce1" office:value-type="string" calcext:value-type="string">
            <text:p>AAI345590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Experimental Evaluation of Process Concept Drift Detection</text:p>
          </table:table-cell>
          <table:table-cell table:style-name="ce1" office:value-type="string" calcext:value-type="string">
            <text:p>Adams, Jan Niklas and Pitsch, Cameron and Brockhoff, Tobias and van der Aalst, Wil M. P.</text:p>
          </table:table-cell>
          <table:table-cell table:style-name="ce1" office:value-type="string" calcext:value-type="string">
            <text:p>Proc. VLDB Endow.</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856–1869</text:p>
          </table:table-cell>
          <table:table-cell table:style-name="ce1" office:value-type="float" office:value="16" calcext:value-type="float">
            <text:p>16</text:p>
          </table:table-cell>
          <table:table-cell table:style-name="ce1"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table-cell table:style-name="ce1" office:value-type="string" calcext:value-type="string">
            <text:p>10.14778/3594512.3594517</text:p>
          </table:table-cell>
          <table:table-cell table:style-name="ce3" office:value-type="string" calcext:value-type="string">
            <text:p><text:a xlink:href="https://doi.org/10.14778/3594512.3594517" xlink:type="simple">https://doi.org/10.14778/3594512.3594517</text:a></text:p>
          </table:table-cell>
          <table:table-cell table:number-columns-repeated="3"/>
          <table:table-cell table:style-name="ce1" office:value-type="string" calcext:value-type="string">
            <text:p>VLDB Endowment</text:p>
          </table:table-cell>
          <table:table-cell table:style-name="ce1" office:value-type="string" calcext:value-type="string">
            <text:p>2150-8097</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Consistency Management for Security Annotations for Continuous Verification</text:p>
          </table:table-cell>
          <table:table-cell table:style-name="ce1" office:value-type="string" calcext:value-type="string">
            <text:p>Reiche, Frederik and Weber, Thomas and Becker, Simeon and Weber, Sebastian and Heinrich, Robert and Burger, Erik</text:p>
          </table:table-cell>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style-name="ce1" office:value-type="string" calcext:value-type="string">
            <text:p>1096–1105</text:p>
          </table:table-cell>
          <table:table-cell/>
          <table:table-cell table:style-name="ce1"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table-cell table:style-name="ce1" office:value-type="string" calcext:value-type="string">
            <text:p>10.1145/3652620.3687821</text:p>
          </table:table-cell>
          <table:table-cell table:style-name="ce3" office:value-type="string" calcext:value-type="string">
            <text:p><text:a xlink:href="https://doi.org/10.1145/3652620.3687821" xlink:type="simple">https://doi.org/10.1145/3652620.3687821</text:a></text:p>
          </table:table-cell>
          <table:table-cell table:number-columns-repeated="2"/>
          <table:table-cell table:style-name="ce1" office:value-type="string" calcext:value-type="string">
            <text:p>model-based analysis, consistency management, development framework, early and continuous verifica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VED: A Tool for Graph Representation and Analysis of Uncertain Event Data</text:p>
          </table:table-cell>
          <table:table-cell table:style-name="ce1" office:value-type="string" calcext:value-type="string">
            <text:p>Pegoraro, Marco and Uysal, Merih Seran and van der Aalst, Wil M. P.</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476–486</text:p>
          </table:table-cell>
          <table:table-cell/>
          <table:table-cell table:style-name="ce1"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table-cell table:style-name="ce1" office:value-type="string" calcext:value-type="string">
            <text:p>10.1007/978-3-030-76983-3_24</text:p>
          </table:table-cell>
          <table:table-cell table:style-name="ce3" office:value-type="string" calcext:value-type="string">
            <text:p><text:a xlink:href="https://doi.org/10.1007/978-3-030-76983-3_24" xlink:type="simple">https://doi.org/10.1007/978-3-030-76983-3_24</text:a></text:p>
          </table:table-cell>
          <table:table-cell table:number-columns-repeated="2"/>
          <table:table-cell table:style-name="ce1" office:value-type="string" calcext:value-type="string">
            <text:p>Process mining, Uncertain data, Partial order, Petri net tool</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nalyzing Data Streams from Cyber-Physical-Systems: A Case Study</text:p>
          </table:table-cell>
          <table:table-cell table:style-name="ce1" office:value-type="string" calcext:value-type="string">
            <text:p>Beyel, Harry H. and Makke, Omar and Pourbafrani, Mahsa and Gusikhin, Oleg and van der Aalst, Wil M. P.</text:p>
          </table:table-cell>
          <table:table-cell table:style-name="ce1" office:value-type="string" calcext:value-type="string">
            <text:p>SN Comput. Sci.</text:p>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table-cell table:style-name="ce1" office:value-type="float" office:value="5" calcext:value-type="float">
            <text:p>5</text:p>
          </table:table-cell>
          <table:table-cell table:style-name="ce1"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table-cell table:style-name="ce1" office:value-type="string" calcext:value-type="string">
            <text:p>10.1007/s42979-024-03008-8</text:p>
          </table:table-cell>
          <table:table-cell table:style-name="ce3" office:value-type="string" calcext:value-type="string">
            <text:p><text:a xlink:href="https://doi.org/10.1007/s42979-024-03008-8" xlink:type="simple">https://doi.org/10.1007/s42979-024-03008-8</text:a></text:p>
          </table:table-cell>
          <table:table-cell table:number-columns-repeated="2"/>
          <table:table-cell table:style-name="ce1" office:value-type="string" calcext:value-type="string">
            <text:p>Process mining, Connected vehicles, Internet of Things, Cyber-physical systems</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Supporting Software Evolution by Integrating DSL-based Architectural Abstraction and Understandability Related Metrics</text:p>
          </table:table-cell>
          <table:table-cell table:style-name="ce1" office:value-type="string" calcext:value-type="string">
            <text:p>Stevanetic, Srdjan and Haitzer, Thomas and Zdun, Uwe</text:p>
          </table:table-cell>
          <table:table-cell/>
          <table:table-cell table:style-name="ce1" office:value-type="float" office:value="2014" calcext:value-type="float">
            <text:p>2014</text:p>
          </table:table-cell>
          <table:table-cell table:style-name="ce1" office:value-type="string" calcext:value-type="string">
            <text:p>ACM Digital Library</text:p>
          </table:table-cell>
          <table:table-cell table:number-columns-repeated="2"/>
          <table:table-cell table:style-name="ce1"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table-cell table:style-name="ce1" office:value-type="string" calcext:value-type="string">
            <text:p>10.1145/2642803.2642822</text:p>
          </table:table-cell>
          <table:table-cell table:style-name="ce3" office:value-type="string" calcext:value-type="string">
            <text:p><text:a xlink:href="https://doi.org/10.1145/2642803.2642822" xlink:type="simple">https://doi.org/10.1145/2642803.2642822</text:a></text:p>
          </table:table-cell>
          <table:table-cell table:number-columns-repeated="2"/>
          <table:table-cell table:style-name="ce1" office:value-type="string" calcext:value-type="string">
            <text:p>Architectural Abstraction, Architectural Component Views, DSL, Empirical Evaluation, Software Evolution, Software Metrics, Understandability</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supervised Learning and Process Analysis for Sensor Data Validation in the IIoT</text:p>
          </table:table-cell>
          <table:table-cell table:style-name="ce1" office:value-type="string" calcext:value-type="string">
            <text:p>Husom, Erik Johannes and Goknil, Arda and Mannhardt, Felix and Tverdal, Simeon and Sen, Sagar and Nguyen, Phu</text:p>
          </table:table-cell>
          <table:table-cell table:style-name="ce1" office:value-type="string" calcext:value-type="string">
            <text:p>ACM Trans. Internet Technol.</text:p>
          </table:table-cell>
          <table:table-cell table:style-name="ce1" office:value-type="float" office:value="2026" calcext:value-type="float">
            <text:p>2026</text:p>
          </table:table-cell>
          <table:table-cell table:style-name="ce1" office:value-type="string" calcext:value-type="string">
            <text:p>ACM Digital Library</text:p>
          </table:table-cell>
          <table:table-cell/>
          <table:table-cell table:style-name="ce1" office:value-type="float" office:value="26" calcext:value-type="float">
            <text:p>26</text:p>
          </table:table-cell>
          <table:table-cell table:style-name="ce1"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table-cell table:style-name="ce1" office:value-type="string" calcext:value-type="string">
            <text:p>10.1145/3777897</text:p>
          </table:table-cell>
          <table:table-cell table:style-name="ce3" office:value-type="string" calcext:value-type="string">
            <text:p><text:a xlink:href="https://doi.org/10.1145/3777897" xlink:type="simple">https://doi.org/10.1145/3777897</text:a></text:p>
          </table:table-cell>
          <table:table-cell table:number-columns-repeated="2"/>
          <table:table-cell table:style-name="ce1" office:value-type="string" calcext:value-type="string">
            <text:p>Unsupervised learning, IIoT, process mining, data reliability</text:p>
          </table:table-cell>
          <table:table-cell table:style-name="ce1" office:value-type="string" calcext:value-type="string">
            <text:p>Association for Computing Machinery</text:p>
          </table:table-cell>
          <table:table-cell table:style-name="ce1" office:value-type="string" calcext:value-type="string">
            <text:p>1533-5399</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owards integrating process mining with agent-based modeling and simulation: State of the art and outlook</text:p>
          </table:table-cell>
          <table:table-cell table:style-name="ce1" office:value-type="string" calcext:value-type="string">
            <text:p>Bemthuis, Rob H. and Lazarova-Molnar, Sanja</text:p>
          </table:table-cell>
          <table:table-cell table:style-name="ce1" office:value-type="string" calcext:value-type="string">
            <text:p>Expert Syst. Appl.</text:p>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table-cell table:style-name="ce1" office:value-type="float" office:value="281" calcext:value-type="float">
            <text:p>281</text:p>
          </table:table-cell>
          <table:table-cell table:style-name="ce1" office:value-type="string" calcext:value-type="string">
            <text:p>Agent-based modeling and simulation (ABMS) is a valuable tool for assessing complex socio-technical systems and is becoming increasingly advanced through the integration with data-driven capabilities. Process mining is an emerging data-driven discipline that combines elements from data mining and process modeling to gain insights into process execution through tasks such as process discovery, conformance checking, and process enhancement using event data. This study explores the role of process mining and its impact on the ABMS paradigm, identifying the current state of the art, gaps in the literature, and future directions for integrating process mining with ABMS. A systematic literature review is conducted to examine how ABMS and process mining techniques are jointly employed to address challenges reported in the literature. From an initial pool of 189 publications, a final set of 20 papers was synthesized, their primary contributions were discussed, and open issues and challenges for future research were identified. Although the integrated field of process mining and ABMS shows an upward trend in publications, it remains modest and requires further efforts to achieve synergistic improvements in socio-technical systems. The findings offer initial guidance for promising research directions.</text:p>
          </table:table-cell>
          <table:table-cell/>
          <table:table-cell table:style-name="ce1" office:value-type="string" calcext:value-type="string">
            <text:p>10.1016/j.eswa.2025.127571</text:p>
          </table:table-cell>
          <table:table-cell table:style-name="ce3" office:value-type="string" calcext:value-type="string">
            <text:p><text:a xlink:href="https://doi.org/10.1016/j.eswa.2025.127571" xlink:type="simple">https://doi.org/10.1016/j.eswa.2025.127571</text:a></text:p>
          </table:table-cell>
          <table:table-cell table:number-columns-repeated="2"/>
          <table:table-cell table:style-name="ce1" office:value-type="string" calcext:value-type="string">
            <text:p>Agent-based modeling, Agent-based simulation, Process mining, Systematic literature review</text:p>
          </table:table-cell>
          <table:table-cell table:style-name="ce1" office:value-type="string" calcext:value-type="string">
            <text:p>Pergamon Press, Inc.</text:p>
          </table:table-cell>
          <table:table-cell table:style-name="ce1" office:value-type="string" calcext:value-type="string">
            <text:p>0957-4174</text:p>
          </table:table-cell>
          <table:table-cell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Anomaly Classification to&amp;nbsp;Enable Self-healing in&amp;nbsp;Cyber Physical Systems Using Process Mining</text:p>
          </table:table-cell>
          <table:table-cell table:style-name="ce1" office:value-type="string" calcext:value-type="string">
            <text:p>Singh, Uphar and Gajjala, Deepak and Khondoker, Rahamatullah and Gupta, Harshit and Sinha, Ayush and Vyas, O. P.</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15</text:p>
          </table:table-cell>
          <table:table-cell/>
          <table:table-cell table:style-name="ce1"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table-cell table:style-name="ce1" office:value-type="string" calcext:value-type="string">
            <text:p>10.1007/978-3-031-44505-7_1</text:p>
          </table:table-cell>
          <table:table-cell table:style-name="ce3" office:value-type="string" calcext:value-type="string">
            <text:p><text:a xlink:href="https://doi.org/10.1007/978-3-031-44505-7_1" xlink:type="simple">https://doi.org/10.1007/978-3-031-44505-7_1</text:a></text:p>
          </table:table-cell>
          <table:table-cell table:number-columns-repeated="2"/>
          <table:table-cell table:style-name="ce1" office:value-type="string" calcext:value-type="string">
            <text:p>Cybersecurity, Process Mining, Cyber Physical Sytems, Anomaly Detection, Anomaly Classification, Self Healing</text:p>
          </table:table-cell>
          <table:table-cell table:style-name="ce1" office:value-type="string" calcext:value-type="string">
            <text:p>Springer-Verlag</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owards Trace Variant Explainability</text:p>
          </table:table-cell>
          <table:table-cell table:style-name="ce1" office:value-type="string" calcext:value-type="string">
            <text:p>Grigore, Iuliana Malina and Marques Tavares, Gabriel and Pasquadibisceglie, Vincenzo and Seidl, Thomas and Barbon Junior, Sylvio</text:p>
          </table:table-cell>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style-name="ce1" office:value-type="string" calcext:value-type="string">
            <text:p>95–110</text:p>
          </table:table-cell>
          <table:table-cell/>
          <table:table-cell table:style-name="ce1"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table-cell table:style-name="ce1" office:value-type="string" calcext:value-type="string">
            <text:p>10.1007/978-3-032-05281-0_7</text:p>
          </table:table-cell>
          <table:table-cell table:style-name="ce3" office:value-type="string" calcext:value-type="string">
            <text:p><text:a xlink:href="https://doi.org/10.1007/978-3-032-05281-0_7" xlink:type="simple">https://doi.org/10.1007/978-3-032-05281-0_7</text:a></text:p>
          </table:table-cell>
          <table:table-cell table:number-columns-repeated="2"/>
          <table:table-cell table:style-name="ce1" office:value-type="string" calcext:value-type="string">
            <text:p>Process mining, Conformance Checking, Clustering, Explainability, Variant analysis, Multi-perspective</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Monitoring Behavioral Compliance with Architectural Patterns Based on&amp;nbsp;Complex Event Processing</text:p>
          </table:table-cell>
          <table:table-cell table:style-name="ce1" office:value-type="string" calcext:value-type="string">
            <text:p>Krieger, Christoph and Breitenb\"{u}cher, Uwe and Falkenthal, Michael and Leymann, Frank and Yussupov, Vladimir and Zdun, Uwe</text:p>
          </table:table-cell>
          <table:table-cell/>
          <table:table-cell table:style-name="ce1" office:value-type="float" office:value="2020" calcext:value-type="float">
            <text:p>2020</text:p>
          </table:table-cell>
          <table:table-cell table:style-name="ce1" office:value-type="string" calcext:value-type="string">
            <text:p>ACM Digital Library</text:p>
          </table:table-cell>
          <table:table-cell table:style-name="ce1" office:value-type="string" calcext:value-type="string">
            <text:p>125–140</text:p>
          </table:table-cell>
          <table:table-cell/>
          <table:table-cell table:style-name="ce1"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table-cell table:style-name="ce1" office:value-type="string" calcext:value-type="string">
            <text:p>10.1007/978-3-030-44769-4_10</text:p>
          </table:table-cell>
          <table:table-cell table:style-name="ce3" office:value-type="string" calcext:value-type="string">
            <text:p><text:a xlink:href="https://doi.org/10.1007/978-3-030-44769-4_10" xlink:type="simple">https://doi.org/10.1007/978-3-030-44769-4_10</text:a></text:p>
          </table:table-cell>
          <table:table-cell table:number-columns-repeated="2"/>
          <table:table-cell table:style-name="ce1" office:value-type="string" calcext:value-type="string">
            <text:p>Architecture compliance, Architectural patterns, Behavioral compliance monitoring, Complex event processing</text:p>
          </table:table-cell>
          <table:table-cell table:style-name="ce1" office:value-type="string" calcext:value-type="string">
            <text:p>Springer-Verlag</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Replaying history on process models for conformance checking and performance analysis</text:p>
          </table:table-cell>
          <table:table-cell table:style-name="ce1" office:value-type="string" calcext:value-type="string">
            <text:p>van der Aalst, Wil and Adriansyah, Arya and van Dongen, Boudewijn</text:p>
          </table:table-cell>
          <table:table-cell table:style-name="ce1" office:value-type="string" calcext:value-type="string">
            <text:p>Wiley Int. Rev. Data Min. and Knowl. Disc.</text:p>
          </table:table-cell>
          <table:table-cell table:style-name="ce1" office:value-type="float" office:value="2012" calcext:value-type="float">
            <text:p>2012</text:p>
          </table:table-cell>
          <table:table-cell table:style-name="ce1" office:value-type="string" calcext:value-type="string">
            <text:p>ACM Digital Library</text:p>
          </table:table-cell>
          <table:table-cell table:style-name="ce1" office:value-type="string" calcext:value-type="string">
            <text:p>182–192</text:p>
          </table:table-cell>
          <table:table-cell table:style-name="ce1" office:value-type="float" office:value="2" calcext:value-type="float">
            <text:p>2</text:p>
          </table:table-cell>
          <table:table-cell table:style-name="ce1"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table-cell table:style-name="ce1" office:value-type="string" calcext:value-type="string">
            <text:p>10.1002/widm.1045</text:p>
          </table:table-cell>
          <table:table-cell table:style-name="ce3" office:value-type="string" calcext:value-type="string">
            <text:p><text:a xlink:href="https://doi.org/10.1002/widm.1045" xlink:type="simple">https://doi.org/10.1002/widm.1045</text:a></text:p>
          </table:table-cell>
          <table:table-cell table:number-columns-repeated="2"/>
          <table:table-cell table:style-name="ce1" office:value-type="string" calcext:value-type="string">
            <text:p>Association Rules, Business and Industry, Data Concepts, Spatial and Temporal Data Mining</text:p>
          </table:table-cell>
          <table:table-cell table:style-name="ce1" office:value-type="string" calcext:value-type="string">
            <text:p>John Wiley &amp;amp; Sons, Inc.</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Checking conformance of applications against GUI policies</text:p>
          </table:table-cell>
          <table:table-cell table:style-name="ce1" office:value-type="string" calcext:value-type="string">
            <text:p>Zhang, Zhen and Feng, Yu and Ernst, Michael D. and Porst, Sebastian and Dillig, Isil</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95–106</text:p>
          </table:table-cell>
          <table:table-cell/>
          <table:table-cell table:style-name="ce1"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table-cell table:style-name="ce1" office:value-type="string" calcext:value-type="string">
            <text:p>10.1145/3468264.3468561</text:p>
          </table:table-cell>
          <table:table-cell table:style-name="ce3" office:value-type="string" calcext:value-type="string">
            <text:p><text:a xlink:href="https://doi.org/10.1145/3468264.3468561" xlink:type="simple">https://doi.org/10.1145/3468264.3468561</text:a></text:p>
          </table:table-cell>
          <table:table-cell table:number-columns-repeated="2"/>
          <table:table-cell table:style-name="ce1" office:value-type="string" calcext:value-type="string">
            <text:p>Android, ad fraud, mobile app, static analysis, user interface</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fficient Optimal Alignment Between Dynamic Condition Response Graphs and&amp;nbsp;Traces</text:p>
          </table:table-cell>
          <table:table-cell table:style-name="ce1" office:value-type="string" calcext:value-type="string">
            <text:p>Christfort, Axel Kjeld Fjelrad and Slaats, Tijs</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3–19</text:p>
          </table:table-cell>
          <table:table-cell/>
          <table:table-cell table:style-name="ce1"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table-cell table:style-name="ce1" office:value-type="string" calcext:value-type="string">
            <text:p>10.1007/978-3-031-41620-0_1</text:p>
          </table:table-cell>
          <table:table-cell table:style-name="ce3" office:value-type="string" calcext:value-type="string">
            <text:p><text:a xlink:href="https://doi.org/10.1007/978-3-031-41620-0_1" xlink:type="simple">https://doi.org/10.1007/978-3-031-41620-0_1</text:a></text:p>
          </table:table-cell>
          <table:table-cell table:number-columns-repeated="2"/>
          <table:table-cell table:style-name="ce1" office:value-type="string" calcext:value-type="string">
            <text:p>Trace alignment, DCR graphs, Conformance checking, Declarative process models, Test-driven Modell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ssessing architectural drift in commercial software development: a case study</text:p>
          </table:table-cell>
          <table:table-cell table:style-name="ce1" office:value-type="string" calcext:value-type="string">
            <text:p>Rosik, Jacek and Le Gear, Andrew and Buckley, Jim and Babar, Muhammad Ali and Connolly, Dave</text:p>
          </table:table-cell>
          <table:table-cell table:style-name="ce1" office:value-type="string" calcext:value-type="string">
            <text:p>Softw. Pract. Exper.</text:p>
          </table:table-cell>
          <table:table-cell table:style-name="ce1" office:value-type="float" office:value="2011" calcext:value-type="float">
            <text:p>2011</text:p>
          </table:table-cell>
          <table:table-cell table:style-name="ce1" office:value-type="string" calcext:value-type="string">
            <text:p>ACM Digital Library</text:p>
          </table:table-cell>
          <table:table-cell table:style-name="ce1" office:value-type="string" calcext:value-type="string">
            <text:p>63–86</text:p>
          </table:table-cell>
          <table:table-cell table:style-name="ce1" office:value-type="float" office:value="41" calcext:value-type="float">
            <text:p>41</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table-cell table:style-name="ce1" office:value-type="string" calcext:value-type="string">
            <text:p>10.1002/spe.999</text:p>
          </table:table-cell>
          <table:table-cell table:style-name="ce3" office:value-type="string" calcext:value-type="string">
            <text:p><text:a xlink:href="https://doi.org/10.1002/spe.999" xlink:type="simple">https://doi.org/10.1002/spe.999</text:a></text:p>
          </table:table-cell>
          <table:table-cell table:number-columns-repeated="2"/>
          <table:table-cell table:style-name="ce1" office:value-type="string" calcext:value-type="string">
            <text:p>architecture consistency, architecture degeneration, reflection models, software/program verification</text:p>
          </table:table-cell>
          <table:table-cell table:style-name="ce1" office:value-type="string" calcext:value-type="string">
            <text:p>John Wiley &amp;amp; Sons, Inc.</text:p>
          </table:table-cell>
          <table:table-cell table:style-name="ce1" office:value-type="string" calcext:value-type="string">
            <text:p>0038-0644</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industrial case study of architecture conformance</text:p>
          </table:table-cell>
          <table:table-cell table:style-name="ce1" office:value-type="string" calcext:value-type="string">
            <text:p>Rosik, Jacek and Le Gear, Andrew and Buckley, Jim and Ali Babar, Muhammad</text:p>
          </table:table-cell>
          <table:table-cell/>
          <table:table-cell table:style-name="ce1" office:value-type="float" office:value="2008" calcext:value-type="float">
            <text:p>2008</text:p>
          </table:table-cell>
          <table:table-cell table:style-name="ce1" office:value-type="string" calcext:value-type="string">
            <text:p>ACM Digital Library</text:p>
          </table:table-cell>
          <table:table-cell table:style-name="ce1" office:value-type="string" calcext:value-type="string">
            <text:p>80–89</text:p>
          </table:table-cell>
          <table:table-cell/>
          <table:table-cell table:style-name="ce1"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table-cell table:style-name="ce1" office:value-type="string" calcext:value-type="string">
            <text:p>10.1145/1414004.1414019</text:p>
          </table:table-cell>
          <table:table-cell table:style-name="ce3" office:value-type="string" calcext:value-type="string">
            <text:p><text:a xlink:href="https://doi.org/10.1145/1414004.1414019" xlink:type="simple">https://doi.org/10.1145/1414004.1414019</text:a></text:p>
          </table:table-cell>
          <table:table-cell table:number-columns-repeated="2"/>
          <table:table-cell table:style-name="ce1" office:value-type="string" calcext:value-type="string">
            <text:p>architectural drift, architecture conformance, industrial experience, reflexion modell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tecting deviations in the code using architecture view-based drift analysis</text:p>
          </table:table-cell>
          <table:table-cell table:style-name="ce1" office:value-type="string" calcext:value-type="string">
            <text:p>Uzun, Burak and Tekinerdogan, Bedir</text:p>
          </table:table-cell>
          <table:table-cell table:style-name="ce1" office:value-type="string" calcext:value-type="string">
            <text:p>Comput. Stand. Interfaces</text:p>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table-cell table:style-name="ce1" office:value-type="float" office:value="87" calcext:value-type="float">
            <text:p>87</text:p>
          </table:table-cell>
          <table:table-cell table:number-columns-repeated="2"/>
          <table:table-cell table:style-name="ce1" office:value-type="string" calcext:value-type="string">
            <text:p>10.1016/j.csi.2023.103774</text:p>
          </table:table-cell>
          <table:table-cell table:style-name="ce3" office:value-type="string" calcext:value-type="string">
            <text:p><text:a xlink:href="https://doi.org/10.1016/j.csi.2023.103774" xlink:type="simple">https://doi.org/10.1016/j.csi.2023.103774</text:a></text:p>
          </table:table-cell>
          <table:table-cell table:number-columns-repeated="2"/>
          <table:table-cell table:style-name="ce1" office:value-type="string" calcext:value-type="string">
            <text:p>Software architecture reconstruction, Model-driven development, Architecture drift analysis, Architecture drift</text:p>
          </table:table-cell>
          <table:table-cell table:style-name="ce1" office:value-type="string" calcext:value-type="string">
            <text:p>Elsevier Science Publishers B. V.</text:p>
          </table:table-cell>
          <table:table-cell table:style-name="ce1" office:value-type="string" calcext:value-type="string">
            <text:p>0920-5489</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checking and performance improvement in scheduled processes</text:p>
          </table:table-cell>
          <table:table-cell table:style-name="ce1" office:value-type="string" calcext:value-type="string">
            <text:p>Senderovich, Arik and Weidlich, Matthias and Yedidsion, Liron and Gal, Avigdor and Mandelbaum, Avishai and Kadish, Sarah and Bunnell, Craig A.</text:p>
          </table:table-cell>
          <table:table-cell table:style-name="ce1" office:value-type="string" calcext:value-type="string">
            <text:p>Inf. Syst.</text:p>
          </table:table-cell>
          <table:table-cell table:style-name="ce1" office:value-type="float" office:value="2016" calcext:value-type="float">
            <text:p>2016</text:p>
          </table:table-cell>
          <table:table-cell table:style-name="ce1" office:value-type="string" calcext:value-type="string">
            <text:p>ACM Digital Library</text:p>
          </table:table-cell>
          <table:table-cell table:style-name="ce1" office:value-type="string" calcext:value-type="string">
            <text:p>185–206</text:p>
          </table:table-cell>
          <table:table-cell table:style-name="ce1" office:value-type="float" office:value="62" calcext:value-type="float">
            <text:p>62</text:p>
          </table:table-cell>
          <table:table-cell table:style-name="ce1"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table-cell table:style-name="ce1" office:value-type="string" calcext:value-type="string">
            <text:p>10.1016/j.is.2016.01.002</text:p>
          </table:table-cell>
          <table:table-cell table:style-name="ce3" office:value-type="string" calcext:value-type="string">
            <text:p><text:a xlink:href="https://doi.org/10.1016/j.is.2016.01.002" xlink:type="simple">https://doi.org/10.1016/j.is.2016.01.002</text:a></text:p>
          </table:table-cell>
          <table:table-cell table:number-columns-repeated="2"/>
          <table:table-cell table:style-name="ce1" office:value-type="string" calcext:value-type="string">
            <text:p>Conformance checking, Process improvement, Process mining, Queueing networks, Scheduled processes, Scheduling, Statistical inference</text:p>
          </table:table-cell>
          <table:table-cell table:style-name="ce1" office:value-type="string" calcext:value-type="string">
            <text:p>Elsevier Science Ltd.</text:p>
          </table:table-cell>
          <table:table-cell table:style-name="ce1" office:value-type="string" calcext:value-type="string">
            <text:p>0306-4379</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Complementing model-driven development for the detection of software architecture erosion</text:p>
          </table:table-cell>
          <table:table-cell table:style-name="ce1" office:value-type="string" calcext:value-type="string">
            <text:p>Herold, Sebastian and Rausch, Andreas</text:p>
          </table:table-cell>
          <table:table-cell/>
          <table:table-cell table:style-name="ce1" office:value-type="float" office:value="2013" calcext:value-type="float">
            <text:p>2013</text:p>
          </table:table-cell>
          <table:table-cell table:style-name="ce1" office:value-type="string" calcext:value-type="string">
            <text:p>ACM Digital Library</text:p>
          </table:table-cell>
          <table:table-cell table:style-name="ce1" office:value-type="string" calcext:value-type="string">
            <text:p>24–30</text:p>
          </table:table-cell>
          <table:table-cell/>
          <table:table-cell table:style-name="ce1"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number-columns-repeated="5"/>
          <table:table-cell table:style-name="ce1" office:value-type="string" calcext:value-type="string">
            <text:p>architecture conformance checking, inter-model consistency, software architecture, software architecture erosion</text:p>
          </table:table-cell>
          <table:table-cell table:style-name="ce1" office:value-type="string" calcext:value-type="string">
            <text:p>IEEE Press</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Global conformance checking measures using shallow representation and deep learning</text:p>
          </table:table-cell>
          <table:table-cell table:style-name="ce1" office:value-type="string" calcext:value-type="string">
            <text:p>Peeperkorn, Jari and vanden Broucke, Seppe and De Weerdt, Jochen</text:p>
          </table:table-cell>
          <table:table-cell table:style-name="ce1" office:value-type="string" calcext:value-type="string">
            <text:p>Eng. Appl. Artif. Intell.</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123" calcext:value-type="float">
            <text:p>123</text:p>
          </table:table-cell>
          <table:table-cell table:style-name="ce1" office:value-type="string" calcext:value-type="string">
            <text:p>Conformance checking refers to techniques that can compare normative process behavior, typically captured by process models, and observed process behavior, usually captured in an event log. Recently, machine and deep learning methods have been proposed to tackle multiple problems in process mining, mostly for predictive process monitoring purposes. In this work, we propose two different neural network-based conformance checking techniques, allowing for a fully data-driven approach. Concretely, two approaches for measuring fitness and precision are introduced, using techniques from representation learning and deep learning respectively. The first approach relies on computing the distances between process traces coming from both an event log and a process model by means of vector representations extracted from a shallow neural network trained in a self-supervised setting. The second approach uses a recurrent neural network trained on an event log and a log containing artificially created counterfactuals. The first setup of these methods is tested on a proof-of-concept artificial event log, a plethora of artificially generated process models, and 4 real-life data sets. Our approaches exhibit generally promising and interesting results and in this way provide fully data-driven alternatives to other conformance checking techniques, which are usually model-driven. Moreover, they allow for a possible combination of different purposes, when already using neural networks for process discovery or predictive process monitoring.</text:p>
          </table:table-cell>
          <table:table-cell/>
          <table:table-cell table:style-name="ce1" office:value-type="string" calcext:value-type="string">
            <text:p>10.1016/j.engappai.2023.106393</text:p>
          </table:table-cell>
          <table:table-cell table:style-name="ce3" office:value-type="string" calcext:value-type="string">
            <text:p><text:a xlink:href="https://doi.org/10.1016/j.engappai.2023.106393" xlink:type="simple">https://doi.org/10.1016/j.engappai.2023.106393</text:a></text:p>
          </table:table-cell>
          <table:table-cell table:number-columns-repeated="2"/>
          <table:table-cell table:style-name="ce1" office:value-type="string" calcext:value-type="string">
            <text:p>Process mining, Conformance checking, Recurrent neural networks, LSTM, Representation learning, Word2vec</text:p>
          </table:table-cell>
          <table:table-cell table:style-name="ce1" office:value-type="string" calcext:value-type="string">
            <text:p>Pergamon Press, Inc.</text:p>
          </table:table-cell>
          <table:table-cell table:style-name="ce1" office:value-type="string" calcext:value-type="string">
            <text:p>0952-1976</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Model-Driven Software Architecture Conformance Analysis</text:p>
          </table:table-cell>
          <table:table-cell table:style-name="ce1" office:value-type="string" calcext:value-type="string">
            <text:p>Uzun, Burak and M., Ak\c{s}it, and M., Chaudron, and H., Vangheluwe, and J, Pennings,</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number-columns-repeated="2"/>
          <table:table-cell table:style-name="ce1"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number-columns-repeated="6"/>
          <table:table-cell table:style-name="ce1" office:value-type="string" calcext:value-type="string">
            <text:p>Wageningen University and Research</text:p>
          </table:table-cell>
          <table:table-cell table:number-columns-repeated="2"/>
          <table:table-cell table:style-name="ce1" office:value-type="string" calcext:value-type="string">
            <text:p>AAI2882054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perimental Conformance Evaluation onUBER ATG Safety Case Framework withANSI/UL 4600</text:p>
          </table:table-cell>
          <table:table-cell table:style-name="ce1" office:value-type="string" calcext:value-type="string">
            <text:p>Taguchi, Kenji and Ishikawa, Fuyuki</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272–283</text:p>
          </table:table-cell>
          <table:table-cell/>
          <table:table-cell table:style-name="ce1"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table-cell table:style-name="ce1" office:value-type="string" calcext:value-type="string">
            <text:p>10.1007/978-3-030-83906-2_22</text:p>
          </table:table-cell>
          <table:table-cell table:style-name="ce3" office:value-type="string" calcext:value-type="string">
            <text:p><text:a xlink:href="https://doi.org/10.1007/978-3-030-83906-2_22" xlink:type="simple">https://doi.org/10.1007/978-3-030-83906-2_22</text:a></text:p>
          </table:table-cell>
          <table:table-cell table:number-columns-repeated="2"/>
          <table:table-cell table:style-name="ce1" office:value-type="string" calcext:value-type="string">
            <text:p>Safety, Self-driving vehicles, Safety case, Uber ATS’s safety case framework, ANSI/UL 4600, Regulatory compliance</text:p>
          </table:table-cell>
          <table:table-cell table:style-name="ce1" office:value-type="string" calcext:value-type="string">
            <text:p>Springer-Verlag</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Software Architecture Recovery with Information Fusion</text:p>
          </table:table-cell>
          <table:table-cell table:style-name="ce1" office:value-type="string" calcext:value-type="string">
            <text:p>Zhang, Yiran and Xu, Zhengzi and Liu, Chengwei and Chen, Hongxu and Sun, Jianwen and Qiu, Dong and Liu, Yang</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535–1547</text:p>
          </table:table-cell>
          <table:table-cell/>
          <table:table-cell table:style-name="ce1"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table-cell table:style-name="ce1" office:value-type="string" calcext:value-type="string">
            <text:p>10.1145/3611643.3616285</text:p>
          </table:table-cell>
          <table:table-cell table:style-name="ce3" office:value-type="string" calcext:value-type="string">
            <text:p><text:a xlink:href="https://doi.org/10.1145/3611643.3616285" xlink:type="simple">https://doi.org/10.1145/3611643.3616285</text:a></text:p>
          </table:table-cell>
          <table:table-cell table:number-columns-repeated="2"/>
          <table:table-cell table:style-name="ce1" office:value-type="string" calcext:value-type="string">
            <text:p>architecture comparison, reverse engineering, software architecture recovery, software module cluster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A Data-Driven Framework to Test Validity of the Discovered Clinical Process Based on Selected Patient Outcomes</text:p>
          </table:table-cell>
          <table:table-cell table:style-name="ce1" office:value-type="string" calcext:value-type="string">
            <text:p>Chen, Qifan and Lu, Yang and Tam, Charmaine S. and Poon, Simon K.</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248–251</text:p>
          </table:table-cell>
          <table:table-cell/>
          <table:table-cell table:style-name="ce1"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table-cell table:style-name="ce1" office:value-type="string" calcext:value-type="string">
            <text:p>10.1145/3579375.3579414</text:p>
          </table:table-cell>
          <table:table-cell table:style-name="ce3" office:value-type="string" calcext:value-type="string">
            <text:p><text:a xlink:href="https://doi.org/10.1145/3579375.3579414" xlink:type="simple">https://doi.org/10.1145/3579375.3579414</text:a></text:p>
          </table:table-cell>
          <table:table-cell table:number-columns-repeated="2"/>
          <table:table-cell table:style-name="ce1" office:value-type="string" calcext:value-type="string">
            <text:p>Healthcare process, Process mining, Process valida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A Framework for Secure Service Composition</text:p>
          </table:table-cell>
          <table:table-cell table:style-name="ce1" office:value-type="string" calcext:value-type="string">
            <text:p>Brucker, Achim D. and Malmignati, Francesco and Merabti, Madjid and Shi, Qi and Zhou, Bo</text:p>
          </table:table-cell>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647-652</text:p>
          </table:table-cell>
          <table:table-cell/>
          <table:table-cell table:style-name="ce1"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table-cell table:style-name="ce1" office:value-type="string" calcext:value-type="string">
            <text:p>10.1109/SocialCom.2013.97</text:p>
          </table:table-cell>
          <table:table-cell table:number-columns-repeated="3"/>
          <table:table-cell table:style-name="ce1" office:value-type="string" calcext:value-type="string">
            <text:p>Security;Availability;Business;Runtime;Service-oriented architecture;Biological system modeling;secure service composition;BPMN;service modelling;service availability</text:p>
          </table:table-cell>
          <table:table-cell table:number-columns-repeated="4"/>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Enabling smarter compliance architecture using social networks and cognitive agents</text:p>
          </table:table-cell>
          <table:table-cell table:style-name="ce1" office:value-type="string" calcext:value-type="string">
            <text:p>Azua, M. and Goodman, B. D.</text:p>
          </table:table-cell>
          <table:table-cell table:style-name="ce1" office:value-type="string" calcext:value-type="string">
            <text:p>IBM Journal of Research and Development</text:p>
          </table:table-cell>
          <table:table-cell table:style-name="ce1" office:value-type="float" office:value="2011" calcext:value-type="float">
            <text:p>2011</text:p>
          </table:table-cell>
          <table:table-cell table:style-name="ce1" office:value-type="string" calcext:value-type="string">
            <text:p>IEEE Digital Library</text:p>
          </table:table-cell>
          <table:table-cell table:style-name="ce1" office:value-type="string" calcext:value-type="string">
            <text:p>11:1-11:11</text:p>
          </table:table-cell>
          <table:table-cell table:style-name="ce1" office:value-type="float" office:value="55" calcext:value-type="float">
            <text:p>55</text:p>
          </table:table-cell>
          <table:table-cell table:style-name="ce1"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table-cell table:style-name="ce1" office:value-type="string" calcext:value-type="string">
            <text:p>10.1147/JRD.2011.2165680</text:p>
          </table:table-cell>
          <table:table-cell table:number-columns-repeated="3"/>
          <table:table-cell table:style-name="ce1" office:value-type="string" calcext:value-type="string">
            <text:p>Cloud computing;Investments;Cognitive informatics;Computational modeling;Information services;Electronic publishing;User interfaces</text:p>
          </table:table-cell>
          <table:table-cell/>
          <table:table-cell table:style-name="ce1" office:value-type="string" calcext:value-type="string">
            <text:p>0018-8646</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sign for configurability: rethinking interdomain routing policies from the ground up</text:p>
          </table:table-cell>
          <table:table-cell table:style-name="ce1" office:value-type="string" calcext:value-type="string">
            <text:p>Wang, Yi and Avramopoulos, Ioannis and Rexford, Jennifer</text:p>
          </table:table-cell>
          <table:table-cell table:style-name="ce1" office:value-type="string" calcext:value-type="string">
            <text:p>IEEE Journal on Selected Areas in Communications</text:p>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1" office:value-type="string" calcext:value-type="string">
            <text:p>336-348</text:p>
          </table:table-cell>
          <table:table-cell table:style-name="ce1" office:value-type="float" office:value="27" calcext:value-type="float">
            <text:p>27</text:p>
          </table:table-cell>
          <table:table-cell table:style-name="ce1"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table-cell table:style-name="ce1" office:value-type="string" calcext:value-type="string">
            <text:p>10.1109/JSAC.2009.090409</text:p>
          </table:table-cell>
          <table:table-cell table:number-columns-repeated="3"/>
          <table:table-cell table:style-name="ce1"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table-cell table:style-name="ce1" office:value-type="string" calcext:value-type="string">
            <text:p>1558-0008</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SLA-Driven Clustering of QoS-Aware Application Servers</text:p>
          </table:table-cell>
          <table:table-cell table:style-name="ce1" office:value-type="string" calcext:value-type="string">
            <text:p>Lodi, Giorgia and Panzieri, Fabio and Rossi, Davide and Turrini, Elisa</text:p>
          </table:table-cell>
          <table:table-cell table:style-name="ce1" office:value-type="string" calcext:value-type="string">
            <text:p>IEEE Transactions on Software Engineering</text:p>
          </table:table-cell>
          <table:table-cell table:style-name="ce1" office:value-type="float" office:value="2007" calcext:value-type="float">
            <text:p>2007</text:p>
          </table:table-cell>
          <table:table-cell table:style-name="ce1" office:value-type="string" calcext:value-type="string">
            <text:p>IEEE Digital Library</text:p>
          </table:table-cell>
          <table:table-cell table:style-name="ce1" office:value-type="string" calcext:value-type="string">
            <text:p>186-197</text:p>
          </table:table-cell>
          <table:table-cell table:style-name="ce1" office:value-type="float" office:value="33" calcext:value-type="float">
            <text:p>33</text:p>
          </table:table-cell>
          <table:table-cell table:style-name="ce1"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table-cell table:style-name="ce1" office:value-type="string" calcext:value-type="string">
            <text:p>10.1109/TSE.2007.28</text:p>
          </table:table-cell>
          <table:table-cell table:number-columns-repeated="3"/>
          <table:table-cell table:style-name="ce1"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table-cell table:style-name="ce1" office:value-type="string" calcext:value-type="string">
            <text:p>1939-3520</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PROS: A Plug-in for Routability Optimization applied in theState-of-the-art commercial EDA tool using deep learning</text:p>
          </table:table-cell>
          <table:table-cell table:style-name="ce1" office:value-type="string" calcext:value-type="string">
            <text:p>Chen, Jingsong and Kuang, Jian and Zhao, Guowei and Huang, Dennis J-Hand Young, Evangeline F. Y.</text:p>
          </table:table-cell>
          <table:table-cell/>
          <table:table-cell table:style-name="ce1" office:value-type="float" office:value="2020" calcext:value-type="float">
            <text:p>2020</text:p>
          </table:table-cell>
          <table:table-cell table:style-name="ce1" office:value-type="string" calcext:value-type="string">
            <text:p>ISI Web of Science</text:p>
          </table:table-cell>
          <table:table-cell table:number-columns-repeated="2"/>
          <table:table-cell table:style-name="ce1" office:value-type="string" calcext:value-type="string">
            <text:p>Recently the topic of routability optimization with prior knowledge</text:p>
            <text:p>obtained by machine learning techniques has been widely studied.</text:p>
            <text:p>However, limited by the prediction accuracy, the predictors of the</text:p>
            <text:p>existing related works can hardly be applied in a real-world EDA tool</text:p>
            <text:p>without extra runtime overhead for feature preparation. In this paper,</text:p>
            <text:p>we revisit this topic and propose a practical plug-in for routability</text:p>
            <text:p>optimization named PROS which can be applied in the state-of-the-art</text:p>
            <text:p>commercial EDA tool with negligible runtime overhead. PROS consists of</text:p>
            <text:p>an effective fully convolutional network (FCN) based predictor that only</text:p>
            <text:p>utilizes the data from placement result to forecast global routing (GR)</text:p>
            <text:p>congestion and a parameter optimizer that can reasonably adjust GR cost</text:p>
            <text:p>parameters based on prediction result to generate a better GR solution</text:p>
            <text:p>for detailed routing. Experiments on 19 industrial designs in advanced</text:p>
            <text:p>technology node show that PROS can achieve high accuracy of GR</text:p>
            <text:p>congestion prediction and significantly reduce design rule checking</text:p>
            <text:p>(DRC) violations by 11.65\% on average.</text:p>
          </table:table-cell>
          <table:table-cell table:style-name="ce1" office:value-type="string" calcext:value-type="string">
            <text:p>Proceedings Paper</text:p>
          </table:table-cell>
          <table:table-cell table:style-name="ce1" office:value-type="string" calcext:value-type="string">
            <text:p>10.1145/3400302.3415662</text:p>
          </table:table-cell>
          <table:table-cell/>
          <table:table-cell table:style-name="ce1" office:value-type="string" calcext:value-type="string">
            <text:p>Chen, JS (Corresponding Author), Chinese Univ Hong Kong, Hong Kong, Peoples R China.Chen, Jingsong; Young, Evangeline F. Y., Chinese Univ Hong Kong, Hong Kong, Peoples R China.Kuang, Jian; Zhao, Guowei; Huang, Dennis J-H, Cadence Design Syst, San Jose, CA USA.</text:p>
          </table:table-cell>
          <table:table-cell table:number-columns-repeated="2"/>
          <table:table-cell table:style-name="ce1" office:value-type="string" calcext:value-type="string">
            <text:p>IEEE</text:p>
          </table:table-cell>
          <table:table-cell table:style-name="ce1" office:value-type="string" calcext:value-type="string">
            <text:p>1933-7760</text:p>
          </table:table-cell>
          <table:table-cell table:style-name="ce1" office:value-type="string" calcext:value-type="string">
            <text:p>English</text:p>
          </table:table-cell>
          <table:table-cell table:style-name="ce1" office:value-type="string" calcext:value-type="string">
            <text:p>39th IEEE/ACM International Conference On Computer Aided Design (ICCAD),ELECTR NETWORK, NOV 02-05, 2020</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is a secondary study (SLR, SMS, survey).</text:p>
          </table:table-cell>
          <table:table-cell table:number-columns-repeated="1003"/>
        </table:table-row>
        <table:table-row table:style-name="ro1">
          <table:table-cell table:style-name="ce1" office:value-type="string" calcext:value-type="string">
            <text:p>A Standard Deviation Incorporated Attention Module Enhanced U-Net forRoutability Prediction</text:p>
          </table:table-cell>
          <table:table-cell table:style-name="ce1" office:value-type="string" calcext:value-type="string">
            <text:p>Chen, Yinjie and Zhang, Di and Chen, Hua</text:p>
          </table:table-cell>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671-674</text:p>
          </table:table-cell>
          <table:table-cell/>
          <table:table-cell table:style-name="ce1" office:value-type="string" calcext:value-type="string">
            <text:p>With the remarkable increase in the complexity of Very Large-Scale</text:p>
            <text:p>Integration (VLSI) designs, the integration of artificial intelligence</text:p>
            <text:p>(AI) into electronic design automation (EDA) has become indispensable,</text:p>
            <text:p>particularly in the realm of back-end design tasks like Routing</text:p>
            <text:p>Congestion (RC) prediction and Design Rule Checking (DRC) hotspot map</text:p>
            <text:p>prediction. In this paper, we introduce an innovative variant of the</text:p>
            <text:p>U-Net model, enhanced by an attention module, to accurately predict</text:p>
            <text:p>routability. The attention module incorporates standard deviation</text:p>
            <text:p>operation to extract more comprehensive distribution information from</text:p>
            <text:p>the features, enabling mitigate the adverse effects of data imbalance.</text:p>
            <text:p>Our proposed model outperforms existing models, particularly with rate</text:p>
            <text:p>reductions of 1.5\% (RC) and 4.6\% (DRC) in Avg-NRMSE when compared to</text:p>
            <text:p>the prior model ibUnet, as evidenced by experimental results on the</text:p>
            <text:p>CircuitNet dataset. Furthermore, it outperforms the ibUnet on model size</text:p>
            <text:p>which exhibits a significant improvement of over 50\% rate reduction.</text:p>
          </table:table-cell>
          <table:table-cell table:style-name="ce1" office:value-type="string" calcext:value-type="string">
            <text:p>Proceedings Paper</text:p>
          </table:table-cell>
          <table:table-cell table:style-name="ce1" office:value-type="string" calcext:value-type="string">
            <text:p>10.1109/ICETIS61828.2024.10593700</text:p>
          </table:table-cell>
          <table:table-cell/>
          <table:table-cell table:style-name="ce1" office:value-type="string" calcext:value-type="string">
            <text:p>Chen, H (Corresponding Author), Zhejiang Univ, Sch Aeronaut \&amp; Astronaut, Hangzhou, Peoples R China.Chen, Yinjie, Zhejiang Univ, Coll Informat Sci \&amp; Elect Engn, Hangzhou, Peoples R China.Zhang, Di; Chen, Hua, Zhejiang Univ, Sch Aeronaut \&amp; Astronaut, Hangzhou, Peoples R China.</text:p>
          </table:table-cell>
          <table:table-cell/>
          <table:table-cell table:style-name="ce1" office:value-type="string" calcext:value-type="string">
            <text:p>Very Large-Scale Integration (VLSI) designs; Routability Prediction;Artificial Intelligence; Electronic Design Automation (EDA); U-Net</text:p>
          </table:table-cell>
          <table:table-cell table:style-name="ce1" office:value-type="string" calcext:value-type="string">
            <text:p>IEEE</text:p>
          </table:table-cell>
          <table:table-cell/>
          <table:table-cell table:style-name="ce1" office:value-type="string" calcext:value-type="string">
            <text:p>English</text:p>
          </table:table-cell>
          <table:table-cell table:style-name="ce1" office:value-type="string" calcext:value-type="string">
            <text:p>9th International Conference on Electronic Technology and InformationScience (ICETIS), Hangzhou, PEOPLES R CHINA, MAY 17-19, 2024</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Study discusses software architecture without addressing conformance or compliance.</text:p>
          </table:table-cell>
          <table:table-cell table:number-columns-repeated="1003"/>
        </table:table-row>
        <table:table-row table:style-name="ro1">
          <table:table-cell table:style-name="ce1" office:value-type="string" calcext:value-type="string">
            <text:p>MCFRoute 2.0: A Redundant Via Insertion Enhanced Concurrent DetailedRouter</text:p>
          </table:table-cell>
          <table:table-cell table:style-name="ce1" office:value-type="string" calcext:value-type="string">
            <text:p>Jia, Xiaotao and Cai, Yici and Zhou, Qiang and Yu, Bei</text:p>
          </table:table-cell>
          <table:table-cell/>
          <table:table-cell table:style-name="ce1" office:value-type="float" office:value="2016" calcext:value-type="float">
            <text:p>2016</text:p>
          </table:table-cell>
          <table:table-cell table:style-name="ce1" office:value-type="string" calcext:value-type="string">
            <text:p>ISI Web of Science</text:p>
          </table:table-cell>
          <table:table-cell table:style-name="ce1" office:value-type="string" calcext:value-type="string">
            <text:p>87-92</text:p>
          </table:table-cell>
          <table:table-cell/>
          <table:table-cell table:style-name="ce1" office:value-type="string" calcext:value-type="string">
            <text:p>In modern VLSI design, manufacturing yield and chip performance are</text:p>
            <text:p>seriously affected by via failure. Redundant via insertion is an</text:p>
            <text:p>effective technique recommended by foundries to deal with the via</text:p>
            <text:p>failure. However, due to the extreme scaling of feature size, it is more</text:p>
            <text:p>and more difficult to resolve redundant via insertion (RVI) with limited</text:p>
            <text:p>routing resource while obeying complicated design rules. In this paper,</text:p>
            <text:p>we propose an RVI enhanced concurrent detailed router, MCFRoute 2.0,</text:p>
            <text:p>which effectively avoids design rule violations through a compact</text:p>
            <text:p>integer linear programming (ILP) model. The proposed router can not only</text:p>
            <text:p>route all nets simultaneously but also search for redundant via</text:p>
            <text:p>positions for all via simultaneously during routing stage. In addition,</text:p>
            <text:p>it proposes an RVI aware pin access allocation to further improve the</text:p>
            <text:p>routing performance. Experimental results show that our detailed router</text:p>
            <text:p>outperforms an industry EDA tool that it improves the redundant via</text:p>
            <text:p>insertion rate by 21\%, while reducing design rule checking violation</text:p>
            <text:p>count, total wire length and via count by 47\%, 4\% and 14\%,</text:p>
            <text:p>respectively.</text:p>
          </table:table-cell>
          <table:table-cell table:style-name="ce1" office:value-type="string" calcext:value-type="string">
            <text:p>Proceedings Paper</text:p>
          </table:table-cell>
          <table:table-cell table:style-name="ce1" office:value-type="string" calcext:value-type="string">
            <text:p>10.1145/2902961.2902966</text:p>
          </table:table-cell>
          <table:table-cell/>
          <table:table-cell table:style-name="ce1" office:value-type="string" calcext:value-type="string">
            <text:p>Jia, XT (Corresponding Author), Tsinghua Univ, Dept Comp Sci Technol, Beijing, Peoples R China.Jia, XT (Corresponding Author), Chinese Univ Hong Kong, CSE Dept, Hong Kong, NT, Peoples R China.Jia, Xiaotao; Cai, Yici; Zhou, Qiang, Tsinghua Natl Lab, Informat Sci \&amp; Technol, Beijing, Peoples R China.Jia, Xiaotao; Cai, Yici; Zhou, Qiang, Tsinghua Univ, Dept Comp Sci Technol, Beijing, Peoples R China.Jia, Xiaotao; Yu, Bei, Chinese Univ Hong Kong, CSE Dept, Hong Kong, NT, Peoples R China.</text:p>
          </table:table-cell>
          <table:table-cell/>
          <table:table-cell table:style-name="ce1" office:value-type="string" calcext:value-type="string">
            <text:p>Detailed Routing; ILP; Redundant Via Insertion; Design Rule</text:p>
          </table:table-cell>
          <table:table-cell table:style-name="ce1" office:value-type="string" calcext:value-type="string">
            <text:p>IEEE</text:p>
          </table:table-cell>
          <table:table-cell/>
          <table:table-cell table:style-name="ce1" office:value-type="string" calcext:value-type="string">
            <text:p>English</text:p>
          </table:table-cell>
          <table:table-cell table:style-name="ce1" office:value-type="string" calcext:value-type="string">
            <text:p>26th ACM Great Lakes Symposium on VLSI (GLSVLSI), Boston Univ, Dept Elect \&amp; Comp Engn, Boston, MA, MAY 18-20, 2016</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Feasibility Prediction for Rapid IC Design Space Exploration</text:p>
          </table:table-cell>
          <table:table-cell table:style-name="ce1" office:value-type="string" calcext:value-type="string">
            <text:p>Islam, Riadul</text:p>
          </table:table-cell>
          <table:table-cell table:style-name="ce1" office:value-type="string" calcext:value-type="string">
            <text:p>ELECTRONICS</text:p>
          </table:table-cell>
          <table:table-cell table:style-name="ce1" office:value-type="float" office:value="2022" calcext:value-type="float">
            <text:p>2022</text:p>
          </table:table-cell>
          <table:table-cell table:style-name="ce1" office:value-type="string" calcext:value-type="string">
            <text:p>ISI Web of Science</text:p>
          </table:table-cell>
          <table:table-cell/>
          <table:table-cell table:style-name="ce1" office:value-type="float" office:value="11" calcext:value-type="float">
            <text:p>11</text:p>
          </table:table-cell>
          <table:table-cell table:style-name="ce1" office:value-type="string" calcext:value-type="string">
            <text:p>The DARPA POSH program echoes with the research community and identifies</text:p>
            <text:p>that engineering productivity has fallen behind Moore's law, resulting</text:p>
            <text:p>in the prohibitive increase in IC design cost at leading technology</text:p>
            <text:p>nodes. The primary reason is that it requires many computing resources,</text:p>
            <text:p>expensive tools, and even many days to complete a design implementation.</text:p>
            <text:p>However, at the end of this process, some designs could not meet the</text:p>
            <text:p>design constraints and become unroutable, creating a vicious circuit</text:p>
            <text:p>design cycle. As a result, designers have to re-run the whole process</text:p>
            <text:p>after design modification. This research applied a machine learning</text:p>
            <text:p>approach to automatically identify design constraints and design rule</text:p>
            <text:p>checking (DRC) violation issues and help the designer identify design</text:p>
            <text:p>constraints with optimal DRCs before the long detailed routing process</text:p>
            <text:p>through iterative greedy search. The proposed algorithm achieved up to</text:p>
            <text:p>99.99\% design constraint prediction accuracy and reduced 98.4\% DRC</text:p>
            <text:p>violations with only a 6.9\% area penalty.</text:p>
          </table:table-cell>
          <table:table-cell table:style-name="ce1" office:value-type="string" calcext:value-type="string">
            <text:p>Article</text:p>
          </table:table-cell>
          <table:table-cell table:style-name="ce1" office:value-type="string" calcext:value-type="string">
            <text:p>10.3390/electronics11071161</text:p>
          </table:table-cell>
          <table:table-cell/>
          <table:table-cell table:style-name="ce1" office:value-type="string" calcext:value-type="string">
            <text:p>Islam, R (Corresponding Author), Univ Maryland Baltimore Cty, Dept Comp Sci \&amp; Elect Engn, Baltimore, MD 21250 USA.Islam, Riadul, Univ Maryland Baltimore Cty, Dept Comp Sci \&amp; Elect Engn, Baltimore, MD 21250 USA.</text:p>
          </table:table-cell>
          <table:table-cell/>
          <table:table-cell table:style-name="ce1" office:value-type="string" calcext:value-type="string">
            <text:p>design rule check; electronic design automation (EDA); decision tree; ICdesign; design constraints</text:p>
          </table:table-cell>
          <table:table-cell table:style-name="ce1" office:value-type="string" calcext:value-type="string">
            <text:p>MDPI</text:p>
          </table:table-cell>
          <table:table-cell table:style-name="ce1" office:value-type="string" calcext:value-type="string">
            <text:p>2079-9292</text:p>
          </table:table-cell>
          <table:table-cell table:style-name="ce1" office:value-type="string" calcext:value-type="string">
            <text:p>English</text:p>
          </table:table-cell>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Fast, accurate assembly-level physical verification of 3DIC packages</text:p>
          </table:table-cell>
          <table:table-cell table:style-name="ce1" office:value-type="string" calcext:value-type="string">
            <text:p>Hossam, Nermeen and Ferguson, John</text:p>
          </table:table-cell>
          <table:table-cell/>
          <table:table-cell table:style-name="ce1" office:value-type="float" office:value="2023" calcext:value-type="float">
            <text:p>2023</text:p>
          </table:table-cell>
          <table:table-cell table:style-name="ce1" office:value-type="string" calcext:value-type="string">
            <text:p>ISI Web of Science</text:p>
          </table:table-cell>
          <table:table-cell table:number-columns-repeated="2"/>
          <table:table-cell table:style-name="ce1" office:value-type="string" calcext:value-type="string">
            <text:p>Advanced packaging techniques are critical to ensuring product</text:p>
            <text:p>performance, function, and cost in the semiconductor industry.</text:p>
            <text:p>Three-dimensional integrated circuits (3DICs) offer the ultimate</text:p>
            <text:p>flexibility in product design. However, they are not without their</text:p>
            <text:p>challenges, bringing packaging technologies to the forefront for</text:p>
            <text:p>innovation. 3DICs contain multiple stacked die that achieve the required</text:p>
            <text:p>connectivity through traces on an interposer, or with special vias or</text:p>
            <text:p>bumps. Independently verifying the physical and connectivity accuracy of</text:p>
            <text:p>these discrete dies and substrates per their process rules does not</text:p>
            <text:p>ensure that the overall 2.5D/3D package assembly is correct, or will</text:p>
            <text:p>perform as expected.</text:p>
            <text:p>The Calibre 3DSTACK electronic design automation (EDA) tool provides</text:p>
            <text:p>fast, accurate, assembly-level verification of diedie or die-interposer</text:p>
            <text:p>interfaces in 3DIC designs. It operates on the interface geometries</text:p>
            <text:p>between chip designs from multiple process nodes to perform both design</text:p>
            <text:p>rule checking (DRC) alignment verification and layout vs. schematic</text:p>
            <text:p>(LVS) connectivity checking of the complete multi-die 2.5D or 3DIC</text:p>
            <text:p>system. Design engineers can also use the Calibre 3DSTACK tool to</text:p>
            <text:p>prepare the data required for coupling capacitance extraction, if</text:p>
            <text:p>required.</text:p>
            <text:p>In this paper, we explain the differences between traditional 3DIC</text:p>
            <text:p>physical verification techniques and Calibre 3DSTACK 3DIC assembly</text:p>
            <text:p>verification, and demonstrate how Calibre 3DSTACK functionality can be</text:p>
            <text:p>used to resolve many of the challenges of 3DIC physical verification</text:p>
            <text:p>while ensuring the accuracy and performance of the complete 3DIC design.</text:p>
          </table:table-cell>
          <table:table-cell table:style-name="ce1" office:value-type="string" calcext:value-type="string">
            <text:p>Proceedings Paper</text:p>
          </table:table-cell>
          <table:table-cell table:style-name="ce1" office:value-type="string" calcext:value-type="string">
            <text:p>10.1109/3DIC57175.2023.10155000</text:p>
          </table:table-cell>
          <table:table-cell/>
          <table:table-cell table:style-name="ce1" office:value-type="string" calcext:value-type="string">
            <text:p>Hossam, N (Corresponding Author), Siemens Digital Ind Software, Calibre Design Solut, Cairo, Egypt.Hossam, Nermeen; Ferguson, John, Siemens Digital Ind Software, Calibre Design Solut, Cairo, Egypt.</text:p>
          </table:table-cell>
          <table:table-cell/>
          <table:table-cell table:style-name="ce1" office:value-type="string" calcext:value-type="string">
            <text:p>3DIC; chiplet; IC; SoC; IP; physical verification</text:p>
          </table:table-cell>
          <table:table-cell table:style-name="ce1" office:value-type="string" calcext:value-type="string">
            <text:p>IEEE</text:p>
          </table:table-cell>
          <table:table-cell table:style-name="ce1" office:value-type="string" calcext:value-type="string">
            <text:p>2164-0157</text:p>
          </table:table-cell>
          <table:table-cell table:style-name="ce1" office:value-type="string" calcext:value-type="string">
            <text:p>English</text:p>
          </table:table-cell>
          <table:table-cell table:style-name="ce1" office:value-type="string" calcext:value-type="string">
            <text:p>IEEE International 3D Systems Integration Conference (3DIC), Univ CollCork, Cork, IRELAND, MAY 10-12, 202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Novel Architecture That Examines Network Activity in a Docker-Based Multitenant to Verify Zero Trust Container Architecture (ZTCA) Compliance</text:p>
          </table:table-cell>
          <table:table-cell table:style-name="ce1" office:value-type="string" calcext:value-type="string">
            <text:p>Jackson, Lethia and Teymourlouei, Haydar and Stone, Daryl Bryant and Latson, Velma and Cobbs, Malik and Ramos, Jefry Jesus and Olayinka, Jamiu and Paja, John</text:p>
          </table:table-cell>
          <table:table-cell table:style-name="ce1" office:value-type="string" calcext:value-type="string">
            <text:p>Communications in Computer and Information Science</text:p>
          </table:table-cell>
          <table:table-cell table:style-name="ce1" office:value-type="float" office:value="2025" calcext:value-type="float">
            <text:p>2025</text:p>
          </table:table-cell>
          <table:table-cell table:style-name="ce1" office:value-type="string" calcext:value-type="string">
            <text:p>Scopus</text:p>
          </table:table-cell>
          <table:table-cell table:style-name="ce1" office:value-type="string" calcext:value-type="string">
            <text:p>52 - 64</text:p>
          </table:table-cell>
          <table:table-cell table:style-name="ce1" office:value-type="string" calcext:value-type="string">
            <text:p>2263 CCIS</text:p>
          </table:table-cell>
          <table:table-cell table:style-name="ce1"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1" office:value-type="string" calcext:value-type="string">
            <text:p>Conference paper</text:p>
          </table:table-cell>
          <table:table-cell table:style-name="ce1" office:value-type="string" calcext:value-type="string">
            <text:p>10.1007/978-3-031-86644-9_4</text:p>
          </table:table-cell>
          <table:table-cell table:style-name="ce3" office:value-type="string" calcext:value-type="string">
            <text:p><text:a xlink:href="https://www.scopus.com/inward/record.uri?eid=2-s2.0-105003622903&amp;doi=10.1007%2F978-3-031-86644-9_4&amp;partnerID=40&amp;md5=d992a4b83d1df47fb9c819882708b1d3" xlink:type="simple">https://www.scopus.com/inward/record.uri?eid=2-s2.0-105003622903&amp;doi=10.1007%2F978-3-031-86644-9_4&amp;partnerID=40&amp;md5=d992a4b83d1df47fb9c819882708b1d3</text:a></text:p>
          </table:table-cell>
          <table:table-cell/>
          <table:table-cell table:style-name="ce1" office:value-type="string" calcext:value-type="string">
            <text:p>access control; Docker container; microservices; multitenant environments; Zero Trust Container Architecture (ZTCA)</text:p>
          </table:table-cell>
          <table:table-cell table:style-name="ce1"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approach to variability management in service-oriented product lines</text:p>
          </table:table-cell>
          <table:table-cell table:style-name="ce1" office:value-type="string" calcext:value-type="string">
            <text:p>Khoshnevis, Sedigheh</text:p>
          </table:table-cell>
          <table:table-cell table:style-name="ce1" office:value-type="string" calcext:value-type="string">
            <text:p>Proceedings - International Conference on Software Engineering</text:p>
          </table:table-cell>
          <table:table-cell table:style-name="ce1" office:value-type="float" office:value="2012" calcext:value-type="float">
            <text:p>2012</text:p>
          </table:table-cell>
          <table:table-cell table:style-name="ce1" office:value-type="string" calcext:value-type="string">
            <text:p>Scopus</text:p>
          </table:table-cell>
          <table:table-cell table:style-name="ce1" office:value-type="string" calcext:value-type="string">
            <text:p>1483 - 1486</text:p>
          </table:table-cell>
          <table:table-cell/>
          <table:table-cell table:style-name="ce1"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1" office:value-type="string" calcext:value-type="string">
            <text:p>Conference paper</text:p>
          </table:table-cell>
          <table:table-cell table:style-name="ce1" office:value-type="string" calcext:value-type="string">
            <text:p>10.1109/ICSE.2012.6227056</text:p>
          </table:table-cell>
          <table:table-cell table:style-name="ce3" office:value-type="string" calcext:value-type="string">
            <text:p><text:a xlink:href="https://www.scopus.com/inward/record.uri?eid=2-s2.0-84864236994&amp;doi=10.1109%2FICSE.2012.6227056&amp;partnerID=40&amp;md5=9148e41c6836598b5d1e14fd2025bec6" xlink:type="simple">https://www.scopus.com/inward/record.uri?eid=2-s2.0-84864236994&amp;doi=10.1109%2FICSE.2012.6227056&amp;partnerID=40&amp;md5=9148e41c6836598b5d1e14fd2025bec6</text:a></text:p>
          </table:table-cell>
          <table:table-cell/>
          <table:table-cell table:style-name="ce1" office:value-type="string" calcext:value-type="string">
            <text:p>Conformance Checking; Service-Oriented Product Line; Variability Management; Variability Modeling</text:p>
          </table:table-cell>
          <table:table-cell table:style-name="ce1"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utomatic component protocol generation and verification of components</text:p>
          </table:table-cell>
          <table:table-cell table:style-name="ce1" office:value-type="string" calcext:value-type="string">
            <text:p>Both, Andreas and Richter, Dirk</text:p>
          </table:table-cell>
          <table:table-cell/>
          <table:table-cell table:style-name="ce1" office:value-type="float" office:value="2010" calcext:value-type="float">
            <text:p>2010</text:p>
          </table:table-cell>
          <table:table-cell table:style-name="ce1" office:value-type="string" calcext:value-type="string">
            <text:p>Scopus</text:p>
          </table:table-cell>
          <table:table-cell table:style-name="ce1" office:value-type="string" calcext:value-type="string">
            <text:p>94 - 101</text:p>
          </table:table-cell>
          <table:table-cell/>
          <table:table-cell table:style-name="ce1"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1" office:value-type="string" calcext:value-type="string">
            <text:p>Conference paper</text:p>
          </table:table-cell>
          <table:table-cell table:style-name="ce1" office:value-type="string" calcext:value-type="string">
            <text:p>10.1109/SEAA.2010.30</text:p>
          </table:table-cell>
          <table:table-cell table:style-name="ce3" office:value-type="string" calcext:value-type="string">
            <text:p><text:a xlink:href="https://www.scopus.com/inward/record.uri?eid=2-s2.0-78449290381&amp;doi=10.1109%2FSEAA.2010.30&amp;partnerID=40&amp;md5=3faff80c698791b7d85b796a0dd13147" xlink:type="simple">https://www.scopus.com/inward/record.uri?eid=2-s2.0-78449290381&amp;doi=10.1109%2FSEAA.2010.30&amp;partnerID=40&amp;md5=3faff80c698791b7d85b796a0dd13147</text:a></text:p>
          </table:table-cell>
          <table:table-cell/>
          <table:table-cell table:style-name="ce1" office:value-type="string" calcext:value-type="string">
            <text:p>Component composition; Component-based software engineering; Model checking; Protocol conformance checking; Protocol generation; Verification</text:p>
          </table:table-cell>
          <table:table-cell table:style-name="ce1"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number-columns-repeated="3"/>
          <table:table-cell table:style-name="ce1" office:value-type="string" calcext:value-type="string">
            <text:p>Cited by: 1</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edicting Architectural Styles from Component Specifications</text:p>
          </table:table-cell>
          <table:table-cell table:style-name="ce1" office:value-type="string" calcext:value-type="string">
            <text:p>Bhattacharya, Sutirtha and Perry, Dewayne E.</text:p>
          </table:table-cell>
          <table:table-cell/>
          <table:table-cell table:style-name="ce1" office:value-type="float" office:value="2005" calcext:value-type="float">
            <text:p>2005</text:p>
          </table:table-cell>
          <table:table-cell table:style-name="ce1" office:value-type="string" calcext:value-type="string">
            <text:p>ACM Digital Library</text:p>
          </table:table-cell>
          <table:table-cell table:style-name="ce1" office:value-type="string" calcext:value-type="string">
            <text:p>231–232</text:p>
          </table:table-cell>
          <table:table-cell/>
          <table:table-cell table:style-name="ce1"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table-cell table:style-name="ce1" office:value-type="string" calcext:value-type="string">
            <text:p>10.1109/WICSA.2005.50</text:p>
          </table:table-cell>
          <table:table-cell table:style-name="ce3" office:value-type="string" calcext:value-type="string">
            <text:p><text:a xlink:href="https://doi.org/10.1109/WICSA.2005.50" xlink:type="simple">https://doi.org/10.1109/WICSA.2005.50</text:a></text:p>
          </table:table-cell>
          <table:table-cell table:number-columns-repeated="2"/>
          <table:table-cell table:style-name="ce1" office:value-type="string" calcext:value-type="string">
            <text:p>Architectural Style, Component Based Software Engineering, Reuse, System Composition</text:p>
          </table:table-cell>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Video transcoder architectures for networked multimedia applications</text:p>
          </table:table-cell>
          <table:table-cell table:style-name="ce1" office:value-type="string" calcext:value-type="string">
            <text:p>Youn, Jeongnam and Sun, Ming-Ting</text:p>
          </table:table-cell>
          <table:table-cell/>
          <table:table-cell table:style-name="ce1" office:value-type="float" office:value="2000" calcext:value-type="float">
            <text:p>2000</text:p>
          </table:table-cell>
          <table:table-cell table:style-name="ce1" office:value-type="string" calcext:value-type="string">
            <text:p>ACM Digital Library</text:p>
          </table:table-cell>
          <table:table-cell table:number-columns-repeated="2"/>
          <table:table-cell table:style-name="ce1"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number-columns-repeated="6"/>
          <table:table-cell table:style-name="ce1" office:value-type="string" calcext:value-type="string">
            <text:p>University of Washington</text:p>
          </table:table-cell>
          <table:table-cell table:number-columns-repeated="2"/>
          <table:table-cell table:style-name="ce1" office:value-type="string" calcext:value-type="string">
            <text:p>AAI996430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itle page]</text:p>
          </table:table-cell>
          <table:table-cell table:number-columns-repeated="2"/>
          <table:table-cell table:style-name="ce1" office:value-type="float" office:value="2011" calcext:value-type="float">
            <text:p>2011</text:p>
          </table:table-cell>
          <table:table-cell table:style-name="ce1" office:value-type="string" calcext:value-type="string">
            <text:p>IEEE Digital Library</text:p>
          </table:table-cell>
          <table:table-cell table:style-name="ce2" office:value-type="date" office:date-value="2026-05-01" calcext:value-type="date">
            <text:p>1-5</text:p>
          </table:table-cell>
          <table:table-cell/>
          <table:table-cell table:style-name="ce1"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table-cell table:style-name="ce1" office:value-type="string" calcext:value-type="string">
            <text:p>10.1109/ICSESS.2011.5982490</text:p>
          </table:table-cell>
          <table:table-cell table:number-columns-repeated="5"/>
          <table:table-cell table:style-name="ce1" office:value-type="string" calcext:value-type="string">
            <text:p>2327-0594</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Joint Post-Proceedings of the 3rd and 4th International Conference on Microservices, Microservices 2020 and 2022</text:p>
          </table:table-cell>
          <table:table-cell/>
          <table:table-cell table:style-name="ce1" office:value-type="string" calcext:value-type="string">
            <text:p>OpenAccess Series in Informatics</text:p>
          </table:table-cell>
          <table:table-cell table:style-name="ce1" office:value-type="float" office:value="2023" calcext:value-type="float">
            <text:p>2023</text:p>
          </table:table-cell>
          <table:table-cell table:style-name="ce1" office:value-type="string" calcext:value-type="string">
            <text:p>Scopus</text:p>
          </table:table-cell>
          <table:table-cell/>
          <table:table-cell table:style-name="ce1" office:value-type="float" office:value="111" calcext:value-type="float">
            <text:p>111</text:p>
          </table:table-cell>
          <table:table-cell table:style-name="ce1"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82378572&amp;partnerID=40&amp;md5=849b5f6896ac09bbafa5a6feda531999" xlink:type="simple">https://www.scopus.com/inward/record.uri?eid=2-s2.0-85182378572&amp;partnerID=40&amp;md5=849b5f6896ac09bbafa5a6feda531999</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BS 2023 - Proceedings of the 17th ACM International Conference on Distributed and Event-based Systems</text:p>
          </table:table-cell>
          <table:table-cell table:number-columns-repeated="2"/>
          <table:table-cell table:style-name="ce1" office:value-type="float" office:value="2023" calcext:value-type="float">
            <text:p>2023</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70088550&amp;partnerID=40&amp;md5=75a480b5d42a46613f181ad7f467bcfd" xlink:type="simple">https://www.scopus.com/inward/record.uri?eid=2-s2.0-85170088550&amp;partnerID=40&amp;md5=75a480b5d42a46613f181ad7f467bcfd</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does not address Architectural Conformance Checking as a central topic.</text:p>
          </table:table-cell>
          <table:table-cell table:number-columns-repeated="1003"/>
        </table:table-row>
        <table:table-row table:style-name="ro1">
          <table:table-cell table:style-name="ce1"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table-cell table:style-name="ce1" office:value-type="string" calcext:value-type="string">
            <text:p>CEUR Workshop Proceedings</text:p>
          </table:table-cell>
          <table:table-cell table:style-name="ce1" office:value-type="float" office:value="2023" calcext:value-type="float">
            <text:p>2023</text:p>
          </table:table-cell>
          <table:table-cell table:style-name="ce1" office:value-type="string" calcext:value-type="string">
            <text:p>Scopus</text:p>
          </table:table-cell>
          <table:table-cell/>
          <table:table-cell table:style-name="ce1" office:value-type="float" office:value="3430" calcext:value-type="float">
            <text:p>3430</text:p>
          </table:table-cell>
          <table:table-cell table:style-name="ce1"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66011676&amp;partnerID=40&amp;md5=d3dc221326e3ec101e81e4fad30d135c" xlink:type="simple">https://www.scopus.com/inward/record.uri?eid=2-s2.0-85166011676&amp;partnerID=40&amp;md5=d3dc221326e3ec101e81e4fad30d135c</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16th European Conference on Software Architecture, ECSA 2022</text:p>
          </table:table-cell>
          <table:table-cell/>
          <table:table-cell table:style-name="ce1" office:value-type="string" calcext:value-type="string">
            <text:p>Lecture Notes in Computer Science</text:p>
          </table:table-cell>
          <table:table-cell table:style-name="ce1" office:value-type="float" office:value="2022" calcext:value-type="float">
            <text:p>2022</text:p>
          </table:table-cell>
          <table:table-cell table:style-name="ce1" office:value-type="string" calcext:value-type="string">
            <text:p>Scopus</text:p>
          </table:table-cell>
          <table:table-cell/>
          <table:table-cell table:style-name="ce1" office:value-type="string" calcext:value-type="string">
            <text:p>13444 LNCS</text:p>
          </table:table-cell>
          <table:table-cell table:style-name="ce1"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9007817&amp;partnerID=40&amp;md5=2b850fa0894ee8300360e6882f4f81a6" xlink:type="simple">https://www.scopus.com/inward/record.uri?eid=2-s2.0-85139007817&amp;partnerID=40&amp;md5=2b850fa0894ee8300360e6882f4f81a6</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45th International Conference on Application and Theory of Petri Nets and Concurrency, Petri Nets 2024</text:p>
          </table:table-cell>
          <table:table-cell/>
          <table:table-cell table:style-name="ce1" office:value-type="string" calcext:value-type="string">
            <text:p>Lecture Notes in Computer Science</text:p>
          </table:table-cell>
          <table:table-cell table:style-name="ce1" office:value-type="float" office:value="2024" calcext:value-type="float">
            <text:p>2024</text:p>
          </table:table-cell>
          <table:table-cell table:style-name="ce1" office:value-type="string" calcext:value-type="string">
            <text:p>Scopus</text:p>
          </table:table-cell>
          <table:table-cell/>
          <table:table-cell table:style-name="ce1" office:value-type="string" calcext:value-type="string">
            <text:p>14628 LNCS</text:p>
          </table:table-cell>
          <table:table-cell table:style-name="ce1"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97262642&amp;partnerID=40&amp;md5=8a17c892858fef08aa7f0b80aa63894d" xlink:type="simple">https://www.scopus.com/inward/record.uri?eid=2-s2.0-85197262642&amp;partnerID=40&amp;md5=8a17c892858fef08aa7f0b80aa63894d</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table-cell table:style-name="ce1" office:value-type="string" calcext:value-type="string">
            <text:p>Lecture Notes in Computer Science</text:p>
          </table:table-cell>
          <table:table-cell table:style-name="ce1" office:value-type="float" office:value="2022" calcext:value-type="float">
            <text:p>2022</text:p>
          </table:table-cell>
          <table:table-cell table:style-name="ce1" office:value-type="string" calcext:value-type="string">
            <text:p>Scopus</text:p>
          </table:table-cell>
          <table:table-cell/>
          <table:table-cell table:style-name="ce1" office:value-type="string" calcext:value-type="string">
            <text:p>13365 LNCS</text:p>
          </table:table-cell>
          <table:table-cell table:style-name="ce1"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7000762&amp;partnerID=40&amp;md5=f5db01f01875a8b8a47e461266505a6d" xlink:type="simple">https://www.scopus.com/inward/record.uri?eid=2-s2.0-85137000762&amp;partnerID=40&amp;md5=f5db01f01875a8b8a47e461266505a6d</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IEEE 18th International Conference on Software Architecture, ICSA 2021</text:p>
          </table:table-cell>
          <table:table-cell table:number-columns-repeated="2"/>
          <table:table-cell table:style-name="ce1" office:value-type="float" office:value="2021" calcext:value-type="float">
            <text:p>2021</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06998243&amp;partnerID=40&amp;md5=ca10de04345a35215d1f875dd4752c49" xlink:type="simple">https://www.scopus.com/inward/record.uri?eid=2-s2.0-85106998243&amp;partnerID=40&amp;md5=ca10de04345a35215d1f875dd4752c49</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19th International Conference on Service-Oriented Computing, ICSOC 2021</text:p>
          </table:table-cell>
          <table:table-cell/>
          <table:table-cell table:style-name="ce1" office:value-type="string" calcext:value-type="string">
            <text:p>Lecture Notes in Computer Science</text:p>
          </table:table-cell>
          <table:table-cell table:style-name="ce1" office:value-type="float" office:value="2021" calcext:value-type="float">
            <text:p>2021</text:p>
          </table:table-cell>
          <table:table-cell table:style-name="ce1" office:value-type="string" calcext:value-type="string">
            <text:p>Scopus</text:p>
          </table:table-cell>
          <table:table-cell/>
          <table:table-cell table:style-name="ce1" office:value-type="string" calcext:value-type="string">
            <text:p>13121 LNCS</text:p>
          </table:table-cell>
          <table:table-cell table:style-name="ce1"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20568278&amp;partnerID=40&amp;md5=138bde8667c39b18ad69f8fb6ea7c6be" xlink:type="simple">https://www.scopus.com/inward/record.uri?eid=2-s2.0-85120568278&amp;partnerID=40&amp;md5=138bde8667c39b18ad69f8fb6ea7c6be</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EUR Workshop Proceedings</text:p>
          </table:table-cell>
          <table:table-cell/>
          <table:table-cell table:style-name="ce1" office:value-type="string" calcext:value-type="string">
            <text:p>CEUR Workshop Proceedings</text:p>
          </table:table-cell>
          <table:table-cell table:style-name="ce1" office:value-type="float" office:value="2017" calcext:value-type="float">
            <text:p>2017</text:p>
          </table:table-cell>
          <table:table-cell table:style-name="ce1" office:value-type="string" calcext:value-type="string">
            <text:p>Scopus</text:p>
          </table:table-cell>
          <table:table-cell/>
          <table:table-cell table:style-name="ce1" office:value-type="float" office:value="1920" calcext:value-type="float">
            <text:p>1920</text:p>
          </table:table-cell>
          <table:table-cell table:style-name="ce1"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30089077&amp;partnerID=40&amp;md5=72d0b2179cd6f72db9c86d224bcebb16" xlink:type="simple">https://www.scopus.com/inward/record.uri?eid=2-s2.0-85030089077&amp;partnerID=40&amp;md5=72d0b2179cd6f72db9c86d224bcebb16</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9</text:p>
          </table:table-cell>
          <table:table-cell table:style-name="ce1" office:value-type="string" calcext:value-type="string">
            <text:p>Study focuses on business process conformance rather than architectural conformance.</text:p>
          </table:table-cell>
          <table:table-cell table:number-columns-repeated="1003"/>
        </table:table-row>
        <table:table-row table:style-name="ro1">
          <table:table-cell table:style-name="ce1" office:value-type="string" calcext:value-type="string">
            <text:p>11th European Conference on Software Architecture, ECSA 2017</text:p>
          </table:table-cell>
          <table:table-cell/>
          <table:table-cell table:style-name="ce1" office:value-type="string" calcext:value-type="string">
            <text:p>Lecture Notes in Computer Science</text:p>
          </table:table-cell>
          <table:table-cell table:style-name="ce1" office:value-type="float" office:value="2017" calcext:value-type="float">
            <text:p>2017</text:p>
          </table:table-cell>
          <table:table-cell table:style-name="ce1" office:value-type="string" calcext:value-type="string">
            <text:p>Scopus</text:p>
          </table:table-cell>
          <table:table-cell table:style-name="ce1" office:value-type="string" calcext:value-type="string">
            <text:p>1 - 215</text:p>
          </table:table-cell>
          <table:table-cell table:style-name="ce1" office:value-type="string" calcext:value-type="string">
            <text:p>10475 LNCS</text:p>
          </table:table-cell>
          <table:table-cell table:style-name="ce1"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28982397&amp;partnerID=40&amp;md5=3660de41cf1dc6714b6b9f4fe5fcbfc9" xlink:type="simple">https://www.scopus.com/inward/record.uri?eid=2-s2.0-85028982397&amp;partnerID=40&amp;md5=3660de41cf1dc6714b6b9f4fe5fcbfc9</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3rd International Symposium on Engineering Secure Software and Systems, ESSoS 2011</text:p>
          </table:table-cell>
          <table:table-cell/>
          <table:table-cell table:style-name="ce1" office:value-type="string" calcext:value-type="string">
            <text:p>Lecture Notes in Computer Science</text:p>
          </table:table-cell>
          <table:table-cell table:style-name="ce1" office:value-type="float" office:value="2011" calcext:value-type="float">
            <text:p>2011</text:p>
          </table:table-cell>
          <table:table-cell table:style-name="ce1" office:value-type="string" calcext:value-type="string">
            <text:p>Scopus</text:p>
          </table:table-cell>
          <table:table-cell/>
          <table:table-cell table:style-name="ce1" office:value-type="string" calcext:value-type="string">
            <text:p>6542 LNCS</text:p>
          </table:table-cell>
          <table:table-cell table:style-name="ce1"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37716892&amp;partnerID=40&amp;md5=1b92caee72d5d1f8b6b78191bcda9219" xlink:type="simple">https://www.scopus.com/inward/record.uri?eid=2-s2.0-85037716892&amp;partnerID=40&amp;md5=1b92caee72d5d1f8b6b78191bcda9219</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Web Services and Formal Methods - Third International Workshop, WS-FM 2006, Proceedings</text:p>
          </table:table-cell>
          <table:table-cell/>
          <table:table-cell table:style-name="ce1" office:value-type="string" calcext:value-type="string">
            <text:p>Lecture Notes in Computer Science</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string" calcext:value-type="string">
            <text:p>4184 LNCS</text:p>
          </table:table-cell>
          <table:table-cell table:style-name="ce1"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941181272&amp;partnerID=40&amp;md5=8f439d33ad00107421c7862182f32e90" xlink:type="simple">https://www.scopus.com/inward/record.uri?eid=2-s2.0-84941181272&amp;partnerID=40&amp;md5=8f439d33ad00107421c7862182f32e90</text:a></text:p>
          </table:table-cell>
          <table:table-cell table:number-columns-repeated="2"/>
          <table:table-cell table:style-name="ce1" office:value-type="string" calcext:value-type="string">
            <text:p>Information services; Petri nets; Quality of service; Semantics; Telecommunication services; Asynchronous communications; Service chreographies; Web services composition; World Wide Web</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2017 IEEE International Conference on Software Architecture, ICSA 2017</text:p>
          </table:table-cell>
          <table:table-cell table:number-columns-repeated="2"/>
          <table:table-cell table:style-name="ce1" office:value-type="float" office:value="2017" calcext:value-type="float">
            <text:p>2017</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21426692&amp;partnerID=40&amp;md5=85341f583a96ebc36c08f17bbd96a9c0" xlink:type="simple">https://www.scopus.com/inward/record.uri?eid=2-s2.0-85021426692&amp;partnerID=40&amp;md5=85341f583a96ebc36c08f17bbd96a9c0</text:a></text:p>
          </table:table-cell>
          <table:table-cell table:number-columns-repeated="6"/>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2" table:number-rows-repeated="1048413">
          <table:table-cell table:number-columns-repeated="1024"/>
        </table:table-row>
        <table:table-row table:style-name="ro2">
          <table:table-cell table:number-columns-repeated="1024"/>
        </table:table-row>
        <table:named-expressions>
          <table:named-range table:name="_xlnm._FilterDatabase" table:base-cell-address="$claude_sonnet_45_screening_results.$A$1" table:cell-range-address="$claude_sonnet_45_screening_results.$A$1:.$X$162"/>
        </table:named-expressions>
      </table:table>
      <table:named-expressions/>
      <table:database-ranges>
        <table:database-range table:name="__Anonymous_Sheet_DB__0" table:target-range-address="claude_sonnet_45_screening_results.A1:claude_sonnet_45_screening_results.X16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laude_5f_sonnet_5f_45_5f_screening_5f_results" style:display-name="PageStyle_claude_sonnet_45_screening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80" meta:object-count="0"/>
    <meta:generator>LibreOfficeDev/6.0.5.2$Linux_X86_64 LibreOffice_project/</meta:generator>
  </office:meta>
</office:document-meta>
</file>