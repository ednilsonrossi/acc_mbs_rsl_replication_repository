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number-columns-repeated="1004"/>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6-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text:p>
          </table:table-cell>
          <table:table-cell table:style-name="ce2"/>
          <table:table-cell table:style-name="ce2" office:value-type="string" calcext:value-type="string">
            <text:p>10.1109/ICSA51549.2021.00012</text:p>
          </table:table-cell>
          <table:table-cell table:style-name="ce2" table:number-columns-repeated="3"/>
          <table:table-cell table:style-name="ce2" office:value-type="string" calcext:value-type="string">
            <text:p>Feedback loop;Software architecture;Conferences;Computer architecture;System analysis and design;Best practices;Microservices;patterns;best practices;continuous architecture improvement;feedback loop</text:p>
          </table:table-cell>
          <table:table-cell table:style-name="ce2" table:number-columns-repeated="5"/>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6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825756&amp;partnerID=40&amp;md5=c603b8efd68dc5cf0210e494adbbcb5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9–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text:p>
          </table:table-cell>
          <table:table-cell table:style-name="ce2"/>
          <table:table-cell table:style-name="ce2" office:value-type="string" calcext:value-type="string">
            <text:p>10.1145/3583678.3596887</text:p>
          </table:table-cell>
          <table:table-cell table:style-name="ce2" office:value-type="string" calcext:value-type="string">
            <text:p>https://doi.org/10.1145/3583678.3596887</text:p>
          </table:table-cell>
          <table:table-cell table:style-name="ce2" table:number-columns-repeated="2"/>
          <table:table-cell table:style-name="ce2" office:value-type="string" calcext:value-type="string">
            <text:p>online conformance checking, event-based business process management, prefix-alignments, data stream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Jean and Simhandl, Georg and Scandariato, Riccardo and Chakravarty, Somik and Jelić, Marjan and Jovanović, Aleksandar</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257-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text:p>
          </table:table-cell>
          <table:table-cell table:style-name="ce2"/>
          <table:table-cell table:style-name="ce2" office:value-type="string" calcext:value-type="string">
            <text:p>10.1109/TDSC.2023.3276487</text:p>
          </table:table-cell>
          <table:table-cell table:style-name="ce2" table:number-columns-repeated="3"/>
          <table:table-cell table:style-name="ce2" office:value-type="string" calcext:value-type="string">
            <text:p>Security;Microservice architectures;Measurement;Authorization;Data models;Computer architecture;Codes;Conformance checking;detection strategies;metrics;microservice architecture security;microservices</text:p>
          </table:table-cell>
          <table:table-cell table:style-name="ce2"/>
          <table:table-cell table:style-name="ce2" office:value-type="string" calcext:value-type="string">
            <text:p>1941-0018</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text:p>
            <text:p>Chao and Liu, Xiaodong and Li, Shanshan</text:p>
          </table:table-cell>
          <table:table-cell table:style-name="ce2" office:value-type="string" calcext:value-type="string">
            <text:p>SOFTWARE-PRACTICE \&amp; EXPERIENCE</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95-616</text:p>
          </table:table-cell>
          <table:table-cell table:style-name="ce2" office:value-type="string" calcext:value-type="string">
            <text:p>54</text:p>
          </table:table-cell>
          <table:table-cell table:style-name="ce2" office:value-type="string" calcext:value-type="string">
            <text:p>As a predominant design method for microsservices architecture (MSA),</text:p>
            <text:p>domain-driven design (DDD) utilizes a series of standard patterns in</text:p>
            <text:p>both models and implementations to effectively support the design of</text:p>
            <text:p>architectural elements. However, an implementation may deviate from its</text:p>
            <text:p>original domain model that uses certain patterns. The deviation between</text:p>
            <text:p>a domain model and its implementation is a type of architectural drift,</text:p>
            <text:p>which needs to be detected promptly. This paper proposes an approach,</text:p>
            <text:p>namely DOMICO, to check the conformance between the domain model and its</text:p>
            <text:p>implementation, by which the conformance is formalized by defining eight</text:p>
            <text:p>common structural patterns of domain modeling and their representations</text:p>
            <text:p>in both models and the corresponding source code. Based on the</text:p>
            <text:p>formalization, our approach can not only identify the discrepancies</text:p>
            <text:p>(e.g., divergence, absence, and modification) with respect to pattern</text:p>
            <text:p>elements, but also detect possible violations of 24 compliance rules</text:p>
            <text:p>imposed by the patterns. To validate DOMICO, we performed a case study</text:p>
            <text:p>to investigate its use in a supply chain project and its performance.</text:p>
            <text:p>The results show that DOMICO can accurately identify 100\% inconsistency</text:p>
            <text:p>issues in the cases examined. As the first conformance checking approach</text:p>
            <text:p>for DDD, DOMICO can be integrated into the regular domain modeling</text:p>
            <text:p>process and help ensure the conformity of microservice implementations</text:p>
            <text:p>to models.</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table:table-cell table:style-name="ce2" office:value-type="string" calcext:value-type="string">
            <text:p>Li, SS (Corresponding Author), Nanjing Univ, State Key Lab Novel Software Technol, Nanjing, Jiangsu, Peoples R China.</text:p>
            <text:p>Zhong, Chenxing; Zhang, He; Chen, Zhikun; Li, Chao; Liu, Xiaodong; Li, Shanshan, Nanjing Univ, Software Inst, Nanjing, Jiangsu, Peoples R China.</text:p>
            <text:p>Zhong, Chenxing; Zhang, He; Chen, Zhikun; Li, Chao; Liu, Xiaodong; Li, Shanshan, Nanjing Univ, State Key Lab Novel Software Technol, Nanjing, Jiangsu, Peoples R China.</text:p>
            <text:p>Huang, Huang, State Grid Nanjng Power Supply Co, Nanjing, Jiangsu, Pe</text:p>
          </table:table-cell>
          <table:table-cell table:style-name="ce2"/>
          <table:table-cell table:style-name="ce2" office:value-type="string" calcext:value-type="string">
            <text:p>architectural drift; architecture conformance checking; code</text:p>
            <text:p>implementation; domain model; domain-driven design; microservices</text:p>
            <text:p>architecture</text:p>
          </table:table-cell>
          <table:table-cell table:style-name="ce2" office:value-type="string" calcext:value-type="string">
            <text:p>WILEY</text:p>
          </table:table-cell>
          <table:table-cell table:style-name="ce2" office:value-type="string" calcext:value-type="string">
            <text:p>0038-0644</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table:number-columns-repeated="3"/>
          <table:table-cell table:style-name="ce2" office:value-type="string" calcext:value-type="string">
            <text:p>Analytical models;Petri nets;Buildings;Microservice architectures;Distributed databases;Data visualization;Data models;Distributed Tracing;Process Model;Process Mining;Petri nets;Conformance Checking</text:p>
          </table:table-cell>
          <table:table-cell table:style-name="ce2"/>
          <table:table-cell table:style-name="ce2" office:value-type="string" calcext:value-type="string">
            <text:p>2374-9709</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structing a service process model based on distributed tracing for</text:p>
            <text:p>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In recent years, microservices architectures have become widespread,</text:p>
            <text:p>where services are divided into smaller pieces, communicate with each</text:p>
            <text:p>other, and operate in chains. Distributed tracing, which tracks the</text:p>
            <text:p>processing of user requests, is used to analyze and visualize</text:p>
            <text:p>microservices. In this paper, the trace data obtained from the</text:p>
            <text:p>distributed tracing is divided based on the parent-child relationship</text:p>
            <text:p>and converted into an event log. In addition, process discovery is</text:p>
            <text:p>performed on each of the split event logs to estimate the relationships</text:p>
            <text:p>between microservice processes. Then, generate a normal Petri net model</text:p>
            <text:p>that can reproduce each event log. Finally, the test trace data is used</text:p>
            <text:p>to verify the suitability of the Petri net model. We constructed a</text:p>
            <text:p>service model for two sample microservices with different scales and</text:p>
            <text:p>distributed tracing implementations and demonstrated the proposed</text:p>
            <text:p>method's feasibility through conformance checking using test trace data.</text:p>
          </table:table-cell>
          <table:table-cell table:style-name="ce2" office:value-type="string" calcext:value-type="string">
            <text:p>Proceedings Paper</text:p>
          </table:table-cell>
          <table:table-cell table:style-name="ce2" office:value-type="string" calcext:value-type="string">
            <text:p>10.1109/NOMS54207.2022.9789804</text:p>
          </table:table-cell>
          <table:table-cell table:style-name="ce2"/>
          <table:table-cell table:style-name="ce2" office:value-type="string" calcext:value-type="string">
            <text:p>Sakai, M (Corresponding Author), NTT Corp, NTT Network Innovat Ctr, Tokyo, Japan.</text:p>
            <text:p>Sakai, Masaru; Takahashi, Kensuke, NTT Corp, NTT Network Innovat Ctr, Tokyo, Japan.</text:p>
          </table:table-cell>
          <table:table-cell table:style-name="ce2"/>
          <table:table-cell table:style-name="ce2" office:value-type="string" calcext:value-type="string">
            <text:p>Distributed Tracing; Process Model; Process Mining; Petri nets;</text:p>
            <text:p>Conformance Checking</text:p>
          </table:table-cell>
          <table:table-cell table:style-name="ce2" office:value-type="string" calcext:value-type="string">
            <text:p>IEEE</text:p>
          </table:table-cell>
          <table:table-cell table:style-name="ce2" office:value-type="string" calcext:value-type="string">
            <text:p>1542-1201</text:p>
          </table:table-cell>
          <table:table-cell table:style-name="ce2" office:value-type="string" calcext:value-type="string">
            <text:p>English</text:p>
          </table:table-cell>
          <table:table-cell table:style-name="ce2" office:value-type="string" calcext:value-type="string">
            <text:p>IEEE/IFIP Network Operations and Management Symposium, ELECTR NETWORK,</text:p>
            <text:p>APR 25-29, 202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3–20</text:p>
          </table:table-cell>
          <table:table-cell table:style-name="ce2"/>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text:p>
          </table:table-cell>
          <table:table-cell table:style-name="ce2"/>
          <table:table-cell table:style-name="ce2" office:value-type="string" calcext:value-type="string">
            <text:p>10.1007/978-3-030-58923-3_1</text:p>
          </table:table-cell>
          <table:table-cell table:style-name="ce2" office:value-type="string" calcext:value-type="string">
            <text:p>https://doi.org/10.1007/978-3-030-58923-3_1</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office:value-type="string" calcext:value-type="string">
            <text:p>https://doi.org/10.1109/WICSA.2014.22</text:p>
          </table:table-cell>
          <table:table-cell table:style-name="ce2" table:number-columns-repeated="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23-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text:p>
          </table:table-cell>
          <table:table-cell table:style-name="ce2"/>
          <table:table-cell table:style-name="ce2" office:value-type="string" calcext:value-type="string">
            <text:p>10.1109/SCC55611.2022.00029</text:p>
          </table:table-cell>
          <table:table-cell table:style-name="ce2" table:number-columns-repeated="3"/>
          <table:table-cell table:style-name="ce2" office:value-type="string" calcext:value-type="string">
            <text:p>Measurement;Codes;Service computing;Microservice architectures;Computer architecture;Traffic control;Software;Infrastructure as code;metrics;software architecture;modeling;best practices</text:p>
          </table:table-cell>
          <table:table-cell table:style-name="ce2"/>
          <table:table-cell table:style-name="ce2" office:value-type="string" calcext:value-type="string">
            <text:p>2474-2473</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 Coupling-Related</text:p>
            <text:p>Infrastructure-as-Code Best Practices: Metrics and Case Studies</text:p>
          </table:table-cell>
          <table:table-cell table:style-name="ce2" office:value-type="string" calcext:value-type="string">
            <text:p>Ntentos, Evangelos and Zdun, Uwe and Soldani, Jacopo and Brogi, Antonio</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101-116</text:p>
          </table:table-cell>
          <table:table-cell table:style-name="ce2" office:value-type="string" calcext:value-type="string">
            <text:p>13444</text:p>
          </table:table-cell>
          <table:table-cell table:style-name="ce2" office:value-type="string" calcext:value-type="string">
            <text:p>Infrastructure as Code (IaC) is an IT practice that facilitates the</text:p>
            <text:p>management of the underlying infrastructure as software. It enables</text:p>
            <text:p>developers or operations teams to automatically manage, monitor, and</text:p>
            <text:p>provision resources rather than organize them manually. In many</text:p>
            <text:p>industries, this practice is widespread and has already been fully</text:p>
            <text:p>adopted. However, few studies provide techniques for evaluating</text:p>
            <text:p>architectural conformance in IaC deployments and, in particular, aspects</text:p>
            <text:p>such as loose coupling. This paper focuses on coupling-related patterns</text:p>
            <text:p>and practices such as deployment strategies and the structuring of IaC</text:p>
            <text:p>elements. Many best practices are documented in gray literature sources,</text:p>
            <text:p>such as practitioner books, blogs, and public repositories. Still, there</text:p>
            <text:p>are no approaches yet to automatically check conformance with such best</text:p>
            <text:p>practices. We propose an approach based on generic,</text:p>
            <text:p>technology-independent metrics tied to typical architectural design</text:p>
            <text:p>decisions for IaC-based practices in microservice deployments to support</text:p>
            <text:p>architecting in the context of continuous delivery practices. We present</text:p>
            <text:p>three case studies based on open-source microservice architectures to</text:p>
            <text:p>validate our approach.</text:p>
          </table:table-cell>
          <table:table-cell table:style-name="ce2" office:value-type="string" calcext:value-type="string">
            <text:p>Proceedings Paper</text:p>
          </table:table-cell>
          <table:table-cell table:style-name="ce2" office:value-type="string" calcext:value-type="string">
            <text:p>10.1007/978-3-031-16697-6\_7</text:p>
          </table:table-cell>
          <table:table-cell table:style-name="ce2"/>
          <table:table-cell table:style-name="ce2" office:value-type="string" calcext:value-type="string">
            <text:p>Ntentos, E (Corresponding Author), Univ Vienna, Fac Comp Sci, Res Grp Software Architecture, Vienna, Austria.</text:p>
            <text:p>Ntentos, Evangelos; Zdun, Uwe, Univ Vienna, Fac Comp Sci, Res Grp Software Architecture, Vienna, Austria.</text:p>
            <text:p>Soldani, Jacopo; Brogi, Antonio, Univ Pisa, Fac Comp Sci, Pisa, Italy.</text:p>
          </table:table-cell>
          <table:table-cell table:style-name="ce2"/>
          <table:table-cell table:style-name="ce2" office:value-type="string" calcext:value-type="string">
            <text:p>Infrastructure as Code; metrics; software architecture; architecture</text:p>
            <text:p>conformance; IaC best practices</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6th European Conference on Software Architecture (ECSA), Prague, CZECH</text:p>
            <text:p>REPUBLIC, SEP 19-23, 202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i}ndola, \'{A}lvaro M. and Garcia, Vinicius Cardoso and Terra, Ricardo</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such as Kubernetes, Terraform, and Docker Compose---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text:p>
          </table:table-cell>
          <table:table-cell table:style-name="ce2"/>
          <table:table-cell table:style-name="ce2" office:value-type="string" calcext:value-type="string">
            <text:p>10.1145/3425269.3425270</text:p>
          </table:table-cell>
          <table:table-cell table:style-name="ce2" office:value-type="string" calcext:value-type="string">
            <text:p>https://doi.org/10.1145/3425269.3425270</text:p>
          </table:table-cell>
          <table:table-cell table:style-name="ce2" table:number-columns-repeated="3"/>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IEEE Digital Library</text:p>
          </table:table-cell>
          <table:table-cell table:style-name="ce2" office:value-type="string" calcext:value-type="string">
            <text:p>94-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text:p>
          </table:table-cell>
          <table:table-cell table:style-name="ce2"/>
          <table:table-cell table:style-name="ce2" office:value-type="string" calcext:value-type="string">
            <text:p>10.1109/SEAA.2010.30</text:p>
          </table:table-cell>
          <table:table-cell table:style-name="ce2" table:number-columns-repeated="3"/>
          <table:table-cell table:style-name="ce2" office:value-type="string" calcext:value-type="string">
            <text:p>Protocols;Java;Contracts;Computational modeling;Software;Unified modeling language;Motorcycles;component-based software engineering;protocol generation;protocol conformance checking;verification;model checking;component composition</text:p>
          </table:table-cell>
          <table:table-cell table:style-name="ce2"/>
          <table:table-cell table:style-name="ce2" office:value-type="string" calcext:value-type="string">
            <text:p>2376-9505</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 Security-Related Practices in</text:p>
            <text:p>Infrastructure as Code Based Deployments</text:p>
          </table:table-cell>
          <table:table-cell table:style-name="ce2" office:value-type="string" calcext:value-type="string">
            <text:p>Ntentos, Evangelos and Zdun, Uwe and Falazi, Ghareeb and Breitenbuecher,</text:p>
            <text:p>Uwe and Leymann, Frank</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123-133</text:p>
          </table:table-cell>
          <table:table-cell table:style-name="ce2"/>
          <table:table-cell table:style-name="ce2" office:value-type="string" calcext:value-type="string">
            <text:p>Infrastructure as Code (IaC) enables developers and operations teams to</text:p>
            <text:p>automatically deploy and manage an IT infrastructure via software. Among</text:p>
            <text:p>other uses, IaC is widely used in the context of continuously released</text:p>
            <text:p>deployments such as those of microservice and other cloud-based systems.</text:p>
            <text:p>Although IaC-based deployments have been utilized by many companies,</text:p>
            <text:p>there are no approaches on checking their conformance to architectural</text:p>
            <text:p>aspects yet. In this paper, we focus on security-related practices</text:p>
            <text:p>including observability, access control, and traffic control in</text:p>
            <text:p>IaC-based deployments. While best practices for this topic have been</text:p>
            <text:p>documented in some gray literature sources such as practitioners' blogs</text:p>
            <text:p>and public repositories, approaches enabling automated checking of</text:p>
            <text:p>conformance to such best practices do not yet exist. We propose a</text:p>
            <text:p>model-based approach based on generic, technology-independent metrics,</text:p>
            <text:p>tied to typical architectural design decisions on IaC-based deployments.</text:p>
            <text:p>With this approach, we can measure conformance to security-related</text:p>
            <text:p>practices. We demonstrate and assess the validity and appropriateness of</text:p>
            <text:p>these metrics in assessing a system's conformance to practices through</text:p>
            <text:p>regression analysis.</text:p>
          </table:table-cell>
          <table:table-cell table:style-name="ce2" office:value-type="string" calcext:value-type="string">
            <text:p>Proceedings Paper</text:p>
          </table:table-cell>
          <table:table-cell table:style-name="ce2" office:value-type="string" calcext:value-type="string">
            <text:p>10.1109/SCC55611.2022.00029</text:p>
          </table:table-cell>
          <table:table-cell table:style-name="ce2"/>
          <table:table-cell table:style-name="ce2" office:value-type="string" calcext:value-type="string">
            <text:p>Ntentos, E (Corresponding Author), Univ Vienna, Fac Comp Sci, Res Grp Software Architecture, Vienna, Austria.</text:p>
            <text:p>Ntentos, Evangelos; Zdun, Uwe, Univ Vienna, Fac Comp Sci, Res Grp Software Architecture, Vienna, Austria.</text:p>
            <text:p>Falazi, Ghareeb; Breitenbuecher, Uwe; Leymann, Frank, Univ Stuttgart, Inst Architecture Applicat Syst, Stuttgart, Germany.</text:p>
          </table:table-cell>
          <table:table-cell table:style-name="ce2"/>
          <table:table-cell table:style-name="ce2" office:value-type="string" calcext:value-type="string">
            <text:p>Infrastructure as code; metrics; software architecture; modeling; best</text:p>
            <text:p>practices</text:p>
          </table:table-cell>
          <table:table-cell table:style-name="ce2" office:value-type="string" calcext:value-type="string">
            <text:p>IEEE COMPUTER SOC</text:p>
          </table:table-cell>
          <table:table-cell table:style-name="ce2" office:value-type="string" calcext:value-type="string">
            <text:p>2474-8137</text:p>
          </table:table-cell>
          <table:table-cell table:style-name="ce2" office:value-type="string" calcext:value-type="string">
            <text:p>English</text:p>
          </table:table-cell>
          <table:table-cell table:style-name="ce2" office:value-type="string" calcext:value-type="string">
            <text:p>IEEE International Conference on Services Computing (IEEE SCC),</text:p>
            <text:p>Barcelona, SPAIN, JUL 11-15, 202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 Coupling-Related Patterns and</text:p>
            <text:p>Practices in Microservices</text:p>
          </table:table-cell>
          <table:table-cell table:style-name="ce2" office:value-type="string" calcext:value-type="string">
            <text:p>Ntentos, Evangelos and Zdun, Uwe and Plakidas, Konstantinos and Meixner,</text:p>
            <text:p>Sebastian and Geiger, Sebastian</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3-20</text:p>
          </table:table-cell>
          <table:table-cell table:style-name="ce2" office:value-type="string" calcext:value-type="string">
            <text:p>12292</text:p>
          </table:table-cell>
          <table:table-cell table:style-name="ce2" office:value-type="string" calcext:value-type="string">
            <text:p>Microservices are the go-to architectural style for building</text:p>
            <text:p>applications that are polyglot, support high scalability, independent</text:p>
            <text:p>development and deployment, and are rapidly adaptable to changes. Among</text:p>
            <text:p>the core tenets for a successful microservice architecture is high</text:p>
            <text:p>independence of the individual microservices, i.e. loose coupling. A</text:p>
            <text:p>number of patterns and best practices are well-established in the</text:p>
            <text:p>literature, but most actual microservice-based systems do not, as a</text:p>
            <text:p>whole or in part, conform to them. Assessing this conformance manually</text:p>
            <text:p>is not realistically possible for large-scale systems. This study aims</text:p>
            <text:p>to provide the foundations for an automated approach for assessing</text:p>
            <text:p>conformance to coupling-related patterns and practices specific for</text:p>
            <text:p>microservice architectures. We propose a model-based assessment based on</text:p>
            <text:p>generic, technology-independent metrics, connected to typical design</text:p>
            <text:p>decisions encountered in microservice architectures. We demonstrate and</text:p>
            <text:p>assess the validity and appropriateness of these metrics by performing</text:p>
            <text:p>an assessment of the conformance of real-world systems to patterns</text:p>
            <text:p>through statistical methods.</text:p>
          </table:table-cell>
          <table:table-cell table:style-name="ce2" office:value-type="string" calcext:value-type="string">
            <text:p>Proceedings Paper</text:p>
          </table:table-cell>
          <table:table-cell table:style-name="ce2" office:value-type="string" calcext:value-type="string">
            <text:p>10.1007/978-3-030-58923-3\_1</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Meixner, Sebastian; 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4th European Conference on Software Architecture (ECSA), ELECTR</text:p>
            <text:p>NETWORK, SEP 14-18, 2020</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 toolset for conformance testing against UML sequence diagrams based on</text:p>
            <text:p>event-driven colored Petri nets</text:p>
          </table:table-cell>
          <table:table-cell table:style-name="ce2" office:value-type="string" calcext:value-type="string">
            <text:p>Faria, Joao Pascoal and Paiva, Ana C. 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285-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text:p>
            <text:p>the conformance of software implementations against partial behavioral</text:p>
            <text:p>models constituted by a set of parameterized UML sequence diagrams,</text:p>
            <text:p>describing both external interactions with users or client applications</text:p>
            <text:p>and internal interactions between objects in the system. Test code is</text:p>
            <text:p>automatically generated from the sequence diagrams and executed on the</text:p>
            <text:p>implementation under test, and test results and coverage information are</text:p>
            <text:p>presented back visually in the model. A runtime test library handles</text:p>
            <text:p>internal interaction checking, test stubs, and user interaction testing,</text:p>
            <text:p>taking advantage of aspect-oriented programming techniques. Incremental</text:p>
            <text:p>conformance checking is achieved by first translating sequence diagrams</text:p>
            <text:p>to Extended Petri Nets that combine the characteristics of Colored Petri</text:p>
            <text:p>Nets and Event-Driven Petri Nets.</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table:table-cell table:style-name="ce2" office:value-type="string" calcext:value-type="string">
            <text:p>Paiva, ACR (Corresponding Author), Univ Porto, Fac Engn, INESC TEC, Rua Campo Alegre 823, P-4100 Oporto, Portugal.</text:p>
            <text:p>Paiva, ACR (Corresponding Author), Univ Porto, Fac Engn, Dept Informat Engn, Rua Campo Alegre 823, P-4100 Oporto, Portugal.</text:p>
            <text:p>Faria, Joao Pascoal; Paiva, Ana C. R., Univ Porto, Fac Engn, INESC TEC, Rua Campo Alegre 823, P-4100 Oporto, Portugal.</text:p>
            <text:p>Faria, Joao Pascoal; Paiva, Ana C. R., Univ Porto, Fac Engn, Dept Informat Engn, Rua Campo Alegre 823, P-4100 Oporto, Portugal.</text:p>
          </table:table-cell>
          <table:table-cell table:style-name="ce2"/>
          <table:table-cell table:style-name="ce2" office:value-type="string" calcext:value-type="string">
            <text:p>Sequence diagrams; Conformance testing; Petri nets</text:p>
          </table:table-cell>
          <table:table-cell table:style-name="ce2" office:value-type="string" calcext:value-type="string">
            <text:p>SPRINGER HEIDELBERG</text:p>
          </table:table-cell>
          <table:table-cell table:style-name="ce2" office:value-type="string" calcext:value-type="string">
            <text:p>1433-2779</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933–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text:p>
          </table:table-cell>
          <table:table-cell table:style-name="ce2"/>
          <table:table-cell table:style-name="ce2" office:value-type="string" calcext:value-type="string">
            <text:p>10.1007/s00607-022-01139-5</text:p>
          </table:table-cell>
          <table:table-cell table:style-name="ce2" office:value-type="string" calcext:value-type="string">
            <text:p>https://doi.org/10.1007/s00607-022-01139-5</text:p>
          </table:table-cell>
          <table:table-cell table:style-name="ce2" table:number-columns-repeated="2"/>
          <table:table-cell table:style-name="ce2" office:value-type="string" calcext:value-type="string">
            <text:p>Distributed systems, Microservices, Scalability, Load balancing</text:p>
          </table:table-cell>
          <table:table-cell table:style-name="ce2" office:value-type="string" calcext:value-type="string">
            <text:p>Springer-Verlag</text:p>
          </table:table-cell>
          <table:table-cell table:style-name="ce2" office:value-type="string" calcext:value-type="string">
            <text:p>0010-485X</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ISI Web of Science</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text:p>
            <text:p>lines, in which, the products are developed based on services and</text:p>
            <text:p>service-oriented architecture. Although there are similarities between</text:p>
            <text:p>components and services, there are important differences so that we</text:p>
            <text:p>cannot use component-based product line engineering methods and</text:p>
            <text:p>techniques for SOPL engineering. These differences emerge from the fact</text:p>
            <text:p>that, services can be discovered as black box elements from external</text:p>
            <text:p>repositories. Moreover, services can be dynamically bound and are</text:p>
            <text:p>business-aligned. Therefore, analyzing the conformance of discovered</text:p>
            <text:p>external services with the variability of services in the SOPL -which</text:p>
            <text:p>must be aligned to the variable business needs-is necessary. Variability</text:p>
            <text:p>must be managed, that is, it must be represented (modeled), used</text:p>
            <text:p>(instantiated and capable of conformance checking) and maintained</text:p>
            <text:p>(evolved) over time. Feature Models are insufficient for modeling</text:p>
            <text:p>variability in SOPL, because, services cannot be simply mapped to one or</text:p>
            <text:p>more features, and identification of the mapping depends on knowing the</text:p>
            <text:p>detailed implementation of the services. This research aims at providing</text:p>
            <text:p>an approach to managing the variability in SOPLs so that external</text:p>
            <text:p>services can be involved in the SOPL engineering. This paper presents an</text:p>
            <text:p>overview of the proposal.</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Khoshnevis, S (Corresponding Author), Shahid Beheshti Univ, Fac Elect \&amp; Comp Engn, Dept Comp Engn, GC, Tehran, Iran.</text:p>
            <text:p>Shahid Beheshti Univ, Fac Elect \&amp; Comp Engn, Dept Comp Engn, GC, Tehran, Iran.</text:p>
          </table:table-cell>
          <table:table-cell table:style-name="ce2"/>
          <table:table-cell table:style-name="ce2" office:value-type="string" calcext:value-type="string">
            <text:p>Service-Oriented Product Line; Variability Management; Variability</text:p>
            <text:p>Modeling; Conformance Checking</text:p>
          </table:table-cell>
          <table:table-cell table:style-name="ce2" office:value-type="string" calcext:value-type="string">
            <text:p>IEEE</text:p>
          </table:table-cell>
          <table:table-cell table:style-name="ce2" office:value-type="string" calcext:value-type="string">
            <text:p>0270-5257</text:p>
          </table:table-cell>
          <table:table-cell table:style-name="ce2" office:value-type="string" calcext:value-type="string">
            <text:p>English</text:p>
          </table:table-cell>
          <table:table-cell table:style-name="ce2" office:value-type="string" calcext:value-type="string">
            <text:p>34th International Conference on Software Engineering (ICSE), Zurich,</text:p>
            <text:p>SWITZERLAND, JUN 02-09, 201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59-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text:p>
          </table:table-cell>
          <table:table-cell table:style-name="ce2"/>
          <table:table-cell table:style-name="ce2" office:value-type="string" calcext:value-type="string">
            <text:p>10.1109/SOSE55356.2022.00013</text:p>
          </table:table-cell>
          <table:table-cell table:style-name="ce2" table:number-columns-repeated="3"/>
          <table:table-cell table:style-name="ce2" office:value-type="string" calcext:value-type="string">
            <text:p>Privacy;Codes;Automation;Service-oriented systems engineering;Microservice architectures;Manuals;Machine learning;API Design;ADD;Architecture Conformance Assessment;DDD;Microservice Architecture</text:p>
          </table:table-cell>
          <table:table-cell table:style-name="ce2"/>
          <table:table-cell table:style-name="ce2" office:value-type="string" calcext:value-type="string">
            <text:p>2642-6587</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a}o Pascoal and Paiva, Ana C.</text:p>
          </table:table-cell>
          <table:table-cell table:style-name="ce2" office:value-type="string" calcext:value-type="string">
            <text:p>Int. J. Softw. Tools Technol. Transf.</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285–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table:style-name="ce2"/>
          <table:table-cell table:style-name="ce2" office:value-type="string" calcext:value-type="string">
            <text:p>10.1007/s10009-014-0354-x</text:p>
          </table:table-cell>
          <table:table-cell table:style-name="ce2" office:value-type="string" calcext:value-type="string">
            <text:p>https://doi.org/10.1007/s10009-014-0354-x</text:p>
          </table:table-cell>
          <table:table-cell table:style-name="ce2" table:number-columns-repeated="2"/>
          <table:table-cell table:style-name="ce2" office:value-type="string" calcext:value-type="string">
            <text:p>Conformance testing, Petri nets, Sequence diagrams</text:p>
          </table:table-cell>
          <table:table-cell table:style-name="ce2" office:value-type="string" calcext:value-type="string">
            <text:p>Springer-Verlag</text:p>
          </table:table-cell>
          <table:table-cell table:style-name="ce2" office:value-type="string" calcext:value-type="string">
            <text:p>1433-2779</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n architectural style for scalable choreography-based</text:p>
            <text:p>microservice-oriented distributed systems</text:p>
          </table:table-cell>
          <table:table-cell table:style-name="ce2" office:value-type="string" calcext:value-type="string">
            <text:p>Filippone, Gianluca and Pompilio, Claudio and Autili, Marco and Tivoli,</text:p>
            <text:p>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933-1956</text:p>
          </table:table-cell>
          <table:table-cell table:style-name="ce2" office:value-type="string" calcext:value-type="string">
            <text:p>105</text:p>
          </table:table-cell>
          <table:table-cell table:style-name="ce2" office:value-type="string" calcext:value-type="string">
            <text:p>Service choreographies are a versatile approach for building</text:p>
            <text:p>service-based distributed systems. Many approaches can be found in the</text:p>
            <text:p>literature tackling different aspects of service choreographies, such as</text:p>
            <text:p>choreography realizability and conformance checking, distributed</text:p>
            <text:p>coordination, formal choreographic languages, and scalability. As of</text:p>
            <text:p>today, choreography scalability has not been specifically addressed</text:p>
            <text:p>through approaches that also consider coordination issues while still</text:p>
            <text:p>decoupling these two related aspects. Scalability is one of the most</text:p>
            <text:p>important properties to be considered when building distributed systems.</text:p>
            <text:p>It enhances the user-perceived performances and influences the overall</text:p>
            <text:p>dependability of the system. In particular, load scalability allows</text:p>
            <text:p>distributed service-oriented systems to effectively handle varying loads</text:p>
            <text:p>without suffering performance degradation. In this direction,</text:p>
            <text:p>microservice-based systems are able to scale thanks to the possibility</text:p>
            <text:p>of replicating those microservices exposed to growing loads,</text:p>
            <text:p>distributing their workload among different instances. By leveraging on</text:p>
            <text:p>our experience in coordinating service choreographies, in this paper, we</text:p>
            <text:p>propose a layered architectural style that allows to realize scalable</text:p>
            <text:p>microservice-oriented choreographies. The architecture integrates a</text:p>
            <text:p>fully-distributed coordination layer capable of ensuring the correct</text:p>
            <text:p>interactions and a load-balancing layer that allows to balance of</text:p>
            <text:p>coordinated requests. We discuss the properties of the proposed</text:p>
            <text:p>architectural style and evaluate its benefits on user-perceived</text:p>
            <text:p>performances.</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table:table-cell table:style-name="ce2" office:value-type="string" calcext:value-type="string">
            <text:p>Filippone, G (Corresponding Author), Univ Laquila, Dept Informat Engn Comp Sci \&amp; Math, Via Vetoio, I-67100 Laquila, Italy.</text:p>
            <text:p>Filippone, Gianluca; Pompilio, Claudio; Autili, Marco; Tivoli, Massimo, Univ Laquila, Dept Informat Engn Comp Sci \&amp; Math, Via Vetoio, I-67100 Laquila, Italy.</text:p>
          </table:table-cell>
          <table:table-cell table:style-name="ce2"/>
          <table:table-cell table:style-name="ce2" office:value-type="string" calcext:value-type="string">
            <text:p>Distributed systems; Microservices; Scalability; Load balancing</text:p>
          </table:table-cell>
          <table:table-cell table:style-name="ce2" office:value-type="string" calcext:value-type="string">
            <text:p>SPRINGER WIEN</text:p>
          </table:table-cell>
          <table:table-cell table:style-name="ce2" office:value-type="string" calcext:value-type="string">
            <text:p>0010-485X</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table-cell table:style-name="ce2" office:value-type="string" calcext:value-type="string">
            <text:p>10.1109/ICSE.2012.6227056</text:p>
          </table:table-cell>
          <table:table-cell table:style-name="ce2" table:number-columns-repeated="3"/>
          <table:table-cell table:style-name="ce2" office:value-type="string" calcext:value-type="string">
            <text:p>Business;Support vector machines;Modeling;Service oriented architecture;Biological system modeling;Computers;Service-Oriented Product Line;Variability Management;Variability Modeling;Conformance Checking</text:p>
          </table:table-cell>
          <table:table-cell table:style-name="ce2"/>
          <table:table-cell table:style-name="ce2" office:value-type="string" calcext:value-type="string">
            <text:p>1558-1225</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PI Description-Based Conformance Assessment of Architectural Design</text:p>
            <text:p>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59-68</text:p>
          </table:table-cell>
          <table:table-cell table:style-name="ce2"/>
          <table:table-cell table:style-name="ce2" office:value-type="string" calcext:value-type="string">
            <text:p>Microservice APIs are often designed based on Domain-Driven Design. It</text:p>
            <text:p>can be challenging to judge the quality of the relation between such a</text:p>
            <text:p>design and the implemented API, especially when facing frequent releases</text:p>
            <text:p>and changes in an API and its design models. Manual conformance</text:p>
            <text:p>assessment of this relation is time-intensive and error prone. This</text:p>
            <text:p>paper proposes a novel approach for automated conformance assessment of</text:p>
            <text:p>API designs in relation to API design decisions. Our approach aims to</text:p>
            <text:p>provide the first fully automated conformance assessment approach based</text:p>
            <text:p>solely on the code of API Descriptions such as OpenAPI. We applied and</text:p>
            <text:p>exemplified our approach for checking conformance to the patterns and</text:p>
            <text:p>practices in an API design decision for mapping links in a system's</text:p>
            <text:p>domain model to API representations. The total accuracy score</text:p>
            <text:p>(F1-measure) for decision option identification in our multi-case study</text:p>
            <text:p>for this decision is 97.22\%.</text:p>
          </table:table-cell>
          <table:table-cell table:style-name="ce2" office:value-type="string" calcext:value-type="string">
            <text:p>Proceedings Paper</text:p>
          </table:table-cell>
          <table:table-cell table:style-name="ce2" office:value-type="string" calcext:value-type="string">
            <text:p>10.1109/SOSE55356.2022.00013</text:p>
          </table:table-cell>
          <table:table-cell table:style-name="ce2"/>
          <table:table-cell table:style-name="ce2" office:value-type="string" calcext:value-type="string">
            <text:p>Singjai, A (Corresponding Author), Univ Vienna, Res Grp Software Architecture, Vienna, Austria.</text:p>
            <text:p>Singjai, Apitchaka; Zdun, Uwe, Univ Vienna, Res Grp Software Architecture, Vienna, Austria.</text:p>
          </table:table-cell>
          <table:table-cell table:style-name="ce2"/>
          <table:table-cell table:style-name="ce2" office:value-type="string" calcext:value-type="string">
            <text:p>API Design; ADD; Architecture Conformance Assessment; DDD; Microservice</text:p>
            <text:p>Architecture</text:p>
          </table:table-cell>
          <table:table-cell table:style-name="ce2" office:value-type="string" calcext:value-type="string">
            <text:p>IEEE COMPUTER SOC</text:p>
          </table:table-cell>
          <table:table-cell table:style-name="ce2" office:value-type="string" calcext:value-type="string">
            <text:p>2642-6587</text:p>
          </table:table-cell>
          <table:table-cell table:style-name="ce2" office:value-type="string" calcext:value-type="string">
            <text:p>English</text:p>
          </table:table-cell>
          <table:table-cell table:style-name="ce2" office:value-type="string" calcext:value-type="string">
            <text:p>16th IEEE International Conference on Service-Oriented System</text:p>
            <text:p>Engineering (SOSE), San Francisco, CA, AUG 15-18, 202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 formal and visual modeling approach to choreography based web services</text:p>
            <text:p>composition and conformance verification</text:p>
          </table:table-cell>
          <table:table-cell table:style-name="ce2" office:value-type="string" calcext:value-type="string">
            <text:p>Yeung, W. L.</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ISI Web of Science</text:p>
          </table:table-cell>
          <table:table-cell table:style-name="ce2" office:value-type="string" calcext:value-type="string">
            <text:p>12772-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text:p>
            <text:p>architecture that supports not only enterprise application integration</text:p>
            <text:p>(EAI) and business process management (BPM) within an organization but</text:p>
            <text:p>also B2B collaboration based on business process integration. The web</text:p>
            <text:p>services choreography approach to B2B process integration allows</text:p>
            <text:p>business partners to orchestrate their own web services privately, while</text:p>
            <text:p>conforming with an agreed specification of the common ordering</text:p>
            <text:p>conditions and constraints under which messages are exchanged among</text:p>
            <text:p>partners' web services. In this approach, choreography conformance is an</text:p>
            <text:p>essential requirement for the successful implementation of collaborative</text:p>
            <text:p>processes. A formal approach to web services composition and conformance</text:p>
            <text:p>verification based on WS-CDL and WS-BPEL is presented. This approach</text:p>
            <text:p>involves model checking as an automated means of verifying choreography</text:p>
            <text:p>conformance. The main contributions include a precise notion of</text:p>
            <text:p>choreography conformance on which verification is based as well as</text:p>
            <text:p>support for the complementary use of visual modeling (e.g. UML) and</text:p>
            <text:p>standard WS-{*} notations in composition. (C) 2011 Elsevier Ltd. All</text:p>
            <text:p>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table:table-cell table:style-name="ce2" office:value-type="string" calcext:value-type="string">
            <text:p>Yeung, WL (Corresponding Author), Lingnan Univ, Dept Comp \&amp; Decis Sci, Hong Kong, Hong Kong, Peoples R China.</text:p>
            <text:p>Lingnan Univ, Dept Comp \&amp; Decis Sci, Hong Kong, Hong Kong, Peoples R China.</text:p>
          </table:table-cell>
          <table:table-cell table:style-name="ce2"/>
          <table:table-cell table:style-name="ce2" office:value-type="string" calcext:value-type="string">
            <text:p>Web services; Orchestration; Choreography; Conformance verification;</text:p>
            <text:p>Model checking; Contract negotiation</text:p>
          </table:table-cell>
          <table:table-cell table:style-name="ce2" office:value-type="string" calcext:value-type="string">
            <text:p>PERGAMON-ELSEVIER SCIENCE LTD</text:p>
          </table:table-cell>
          <table:table-cell table:style-name="ce2" office:value-type="string" calcext:value-type="string">
            <text:p>0957-4174</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L.</text:p>
          </table:table-cell>
          <table:table-cell table:style-name="ce2" office:value-type="string" calcext:value-type="string">
            <text:p>Expert Syst. Appl.</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12772–12785</text:p>
          </table:table-cell>
          <table:table-cell table:style-name="ce2" office:value-type="string" calcext:value-type="string">
            <text:p>38</text:p>
          </table:table-cell>
          <table:table-cell table:style-name="ce2" table:number-columns-repeated="2"/>
          <table:table-cell table:style-name="ce2" office:value-type="string" calcext:value-type="string">
            <text:p>10.1016/j.eswa.2011.04.068</text:p>
          </table:table-cell>
          <table:table-cell table:style-name="ce2" office:value-type="string" calcext:value-type="string">
            <text:p>https://doi.org/10.1016/j.eswa.2011.04.068</text:p>
          </table:table-cell>
          <table:table-cell table:style-name="ce2" table:number-columns-repeated="2"/>
          <table:table-cell table:style-name="ce2" office:value-type="string" calcext:value-type="string">
            <text:p>Web services, Orchestration, Choreography, Conformance verification, Model checking, Contract negotiation</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 Decomposition and Metric-Based Evaluation Framework for Microservices</text:p>
          </table:table-cell>
          <table:table-cell table:style-name="ce2" office:value-type="string" calcext:value-type="string">
            <text:p>Taibi, Davide and Systa, Kari</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33-149</text:p>
          </table:table-cell>
          <table:table-cell table:style-name="ce2" office:value-type="string" calcext:value-type="string">
            <text:p>1218</text:p>
          </table:table-cell>
          <table:table-cell table:style-name="ce2" office:value-type="string" calcext:value-type="string">
            <text:p>Migrating from monolithic systems into microservice is a very complex</text:p>
            <text:p>task. Companies are commonly decomposing the monolithic system manually,</text:p>
            <text:p>analyzing dependencies of the monolith and then assessing different</text:p>
            <text:p>decomposition options. The goal of our work is two-folded: 1) we provide</text:p>
            <text:p>a microservice measurement framework to objectively evaluate and compare</text:p>
            <text:p>the quality of microservices-based systems; 2) we propose a</text:p>
            <text:p>decomposition system based on business process mining. The microservice</text:p>
            <text:p>measurement framework can be applied independently from the</text:p>
            <text:p>decomposition process adopted, but is also useful to continuously</text:p>
            <text:p>evaluate the architectural evolution of a system. Results show that the</text:p>
            <text:p>decomposition framework helps companies to easily identify the different</text:p>
            <text:p>decomposition options. The measurement framework can help to decrease</text:p>
            <text:p>the subjectivity of the decision between different decomposition options</text:p>
            <text:p>and to evaluate architectural erosion in existing systems.</text:p>
          </table:table-cell>
          <table:table-cell table:style-name="ce2" office:value-type="string" calcext:value-type="string">
            <text:p>Proceedings Paper</text:p>
          </table:table-cell>
          <table:table-cell table:style-name="ce2" office:value-type="string" calcext:value-type="string">
            <text:p>10.1007/978-3-030-49432-2\_7</text:p>
          </table:table-cell>
          <table:table-cell table:style-name="ce2"/>
          <table:table-cell table:style-name="ce2" office:value-type="string" calcext:value-type="string">
            <text:p>Taibi, D; Systä, K (Corresponding Author), Tampere Univ, TASE Tampere Software Engn Res Grp, Tampere, Finland.</text:p>
            <text:p>Taibi, Davide; Systa, Kari, Tampere Univ, TASE Tampere Software Engn Res Grp, Tampere, Finland.</text:p>
          </table:table-cell>
          <table:table-cell table:style-name="ce2"/>
          <table:table-cell table:style-name="ce2" office:value-type="string" calcext:value-type="string">
            <text:p>Microservices; Cloud-native; Microservice slicing; Microservice</text:p>
            <text:p>decomposition; Microservice migration</text:p>
          </table:table-cell>
          <table:table-cell table:style-name="ce2" office:value-type="string" calcext:value-type="string">
            <text:p>SPRINGER INTERNATIONAL PUBLISHING AG</text:p>
          </table:table-cell>
          <table:table-cell table:style-name="ce2" office:value-type="string" calcext:value-type="string">
            <text:p>1865-0929</text:p>
          </table:table-cell>
          <table:table-cell table:style-name="ce2" office:value-type="string" calcext:value-type="string">
            <text:p>English</text:p>
          </table:table-cell>
          <table:table-cell table:style-name="ce2" office:value-type="string" calcext:value-type="string">
            <text:p>9th International Conference on Cloud Computing and Services Science</text:p>
            <text:p>(CLOSER), Heraklion, GREECE, MAY 02-04, 2019</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94-101</text:p>
          </table:table-cell>
          <table:table-cell table:style-name="ce2"/>
          <table:table-cell table:style-name="ce2" office:value-type="string" calcext:value-type="string">
            <text:p>In several works a method was suggested to overcome the lack of</text:p>
            <text:p>signature-based composition currently enabled in component-based and</text:p>
            <text:p>service-oriented architectures (SOA). Several approaches allow to encode</text:p>
            <text:p>non-functional properties of a single component in a contract (component</text:p>
            <text:p>protocol) where the remote calls to a component are taken into</text:p>
            <text:p>consideration. Component protocols ensures that bugs or unsafe behavior</text:p>
            <text:p>caused interaction sequences are obeyed. Encoding business rules works</text:p>
            <text:p>fine as these contracts can be derived from human knowledge only and</text:p>
            <text:p>have to be defined manually, too.</text:p>
            <text:p>In this work we will show, how such unsafe behavior within source code</text:p>
            <text:p>can be discovered and prevented by automatic component protocol</text:p>
            <text:p>generation and model checking techniques.</text:p>
          </table:table-cell>
          <table:table-cell table:style-name="ce2" office:value-type="string" calcext:value-type="string">
            <text:p>Proceedings Paper</text:p>
          </table:table-cell>
          <table:table-cell table:style-name="ce2" office:value-type="string" calcext:value-type="string">
            <text:p>10.1109/SEAA.2010.30</text:p>
          </table:table-cell>
          <table:table-cell table:style-name="ce2"/>
          <table:table-cell table:style-name="ce2" office:value-type="string" calcext:value-type="string">
            <text:p>Both, A (Corresponding Author), Univ Halle, Inst Comp Sci, D-06120 Halle, Saale, Germany.</text:p>
            <text:p>Both, Andreas; Richter, Dirk, Univ Halle, Inst Comp Sci, D-06120 Halle, Saale, Germany.</text:p>
          </table:table-cell>
          <table:table-cell table:style-name="ce2"/>
          <table:table-cell table:style-name="ce2" office:value-type="string" calcext:value-type="string">
            <text:p>component-based software engineering; protocol generation; protocol</text:p>
            <text:p>conformance checking; verification; model checking; component</text:p>
            <text:p>composition</text:p>
          </table:table-cell>
          <table:table-cell table:style-name="ce2" office:value-type="string" calcext:value-type="string">
            <text:p>IEEE COMPUTER SOC</text:p>
          </table:table-cell>
          <table:table-cell table:style-name="ce2" office:value-type="string" calcext:value-type="string">
            <text:p>1089-6503</text:p>
          </table:table-cell>
          <table:table-cell table:style-name="ce2" office:value-type="string" calcext:value-type="string">
            <text:p>English</text:p>
          </table:table-cell>
          <table:table-cell table:style-name="ce2" office:value-type="string" calcext:value-type="string">
            <text:p>36th EUROMICRO Conference on Software Engineering and Advanced</text:p>
            <text:p>Applications (SEAA2010), Univ Lille Nord France, Polytechn Grad Engn</text:p>
            <text:p>Sch, Lille, FRANCE, SEP 01-03, 2010</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I Will Survive: An Event-driven Conformance Checking Approach Over</text:p>
            <text:p>Process Streams</text:p>
          </table:table-cell>
          <table:table-cell table:style-name="ce2" office:value-type="string" calcext:value-type="string">
            <text:p>Raun, Kristo and Tommassini, Riccardo and Awad, Ahmed</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49-60</text:p>
          </table:table-cell>
          <table:table-cell table:style-name="ce2"/>
          <table:table-cell table:style-name="ce2" office:value-type="string" calcext:value-type="string">
            <text:p>Online conformance checking deals with finding discrepancies between</text:p>
            <text:p>real-life and modeled behavior on data streams. The current</text:p>
            <text:p>state-of-the-art output of online conformance checking is a</text:p>
            <text:p>prefixalignment, which is used for pinpointing the exact deviations in</text:p>
            <text:p>terms of the trace and the model while accommodating a trace's unknown</text:p>
            <text:p>termination in an online setting. Current methods for producing</text:p>
            <text:p>prefix-alignments are computationally expensive and hinder the</text:p>
            <text:p>applicability in real-life settings. This paper introduces a new</text:p>
            <text:p>approximate algorithm - I Will Survive (IWS). The algorithm utilizes the</text:p>
            <text:p>trie data structure to improve the calculation speed, while remaining</text:p>
            <text:p>memory-efficient. Comparative analysis on real-life and synthetic</text:p>
            <text:p>datasets shows that the IWS algorithm can achieve an order of magnitude</text:p>
            <text:p>faster execution time while having a smaller error cost, compared to the</text:p>
            <text:p>current state of the art. In extreme cases, the IWS finds</text:p>
            <text:p>prefixalignments roughly three orders of magnitude faster than previous</text:p>
            <text:p>approximate methods. The IWS algorithm includes a discounted decay time</text:p>
            <text:p>setting for more efficient memory usage and a lookahead limit for</text:p>
            <text:p>improving computation time. Finally, the algorithm is stress tested for</text:p>
            <text:p>performance using a simulation of high-traffic event streams.</text:p>
          </table:table-cell>
          <table:table-cell table:style-name="ce2" office:value-type="string" calcext:value-type="string">
            <text:p>Proceedings Paper</text:p>
          </table:table-cell>
          <table:table-cell table:style-name="ce2" office:value-type="string" calcext:value-type="string">
            <text:p>10.1145/3583678.3596887</text:p>
          </table:table-cell>
          <table:table-cell table:style-name="ce2"/>
          <table:table-cell table:style-name="ce2" office:value-type="string" calcext:value-type="string">
            <text:p>Raun, K (Corresponding Author), Univ Tartu, Tartu, Estonia.</text:p>
            <text:p>Raun, Kristo; Tommassini, Riccardo; Awad, Ahmed, Univ Tartu, Tartu, Estonia.</text:p>
            <text:p>Tommassini, Riccardo, INSA Lyon, LIRIS Lab, Lyon, France.</text:p>
            <text:p>Awad, Ahmed, Cairo Univ, Giza, Egypt.</text:p>
          </table:table-cell>
          <table:table-cell table:style-name="ce2"/>
          <table:table-cell table:style-name="ce2" office:value-type="string" calcext:value-type="string">
            <text:p>online conformance checking; event-based business process management;</text:p>
            <text:p>prefix-alignments; data streams</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17th International Conference on Distributed and Event Based</text:p>
            <text:p>Systems-DEBS, Neuchatel, SWITZERLAND, JUN 27-30, 2023</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Detecting and Resolving Coupling-Related Infrastructure as Code Based</text:p>
            <text:p>Architecture Smells in Microservice Deployments</text:p>
          </table:table-cell>
          <table:table-cell table:style-name="ce2" office:value-type="string" calcext:value-type="string">
            <text:p>Ntentos, Evangelos and Zdun, Uwe and Falazi, Ghareeb and Breitenbucher,</text:p>
            <text:p>Uwe and Leymann, Frank</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201-211</text:p>
          </table:table-cell>
          <table:table-cell table:style-name="ce2"/>
          <table:table-cell table:style-name="ce2" office:value-type="string" calcext:value-type="string">
            <text:p>The Infrastructure as Code (IaC) concept enables IT infrastructure to be</text:p>
            <text:p>managed as software: resources can be managed, monitored, and</text:p>
            <text:p>provisioned automatically instead of manually by developers or</text:p>
            <text:p>operations teams. Many industries have already embraced this concept</text:p>
            <text:p>widely. However, research on IaC-based deployments, particularly</text:p>
            <text:p>research focusing on loose coupling, often does not offer methods for</text:p>
            <text:p>evaluating architectural conformance, spotting architecture smells, and</text:p>
            <text:p>support for correcting the found smells. Our work strives to provide an</text:p>
            <text:p>automatic method for continuously developing microservice-based systems</text:p>
            <text:p>and the associated infrastructure. We aim to offer an automated</text:p>
            <text:p>architectural refactoring method that checks if IaC-based deployments</text:p>
            <text:p>adhere to patterns and best practices and do not contain potential</text:p>
            <text:p>architectural smells. We provide architects with viable options for</text:p>
            <text:p>enhancing architectural conformance during microservice development. In</text:p>
            <text:p>short, by continuously detecting architectural smells and suggesting</text:p>
            <text:p>possible fixes, we aim to support architecture evolution within the</text:p>
            <text:p>framework of continuous delivery practices. We evaluate our approach</text:p>
            <text:p>using three case studies and variants based on open-source microservice</text:p>
            <text:p>architectures.</text:p>
          </table:table-cell>
          <table:table-cell table:style-name="ce2" office:value-type="string" calcext:value-type="string">
            <text:p>Proceedings Paper</text:p>
          </table:table-cell>
          <table:table-cell table:style-name="ce2" office:value-type="string" calcext:value-type="string">
            <text:p>10.1109/CLOUD60044.2023.00031</text:p>
          </table:table-cell>
          <table:table-cell table:style-name="ce2"/>
          <table:table-cell table:style-name="ce2" office:value-type="string" calcext:value-type="string">
            <text:p>Ntentos, E (Corresponding Author), Univ Vienna, Software Architecture Grp, Vienna, Austria.</text:p>
            <text:p>Ntentos, E (Corresponding Author), Univ Vienna, Doctoral Sch Comp Sci, Vienna, Austria.</text:p>
            <text:p>Ntentos, Evangelos, Univ Vienna, Software Architecture Grp, Vienna, Austria.</text:p>
            <text:p>Ntentos, Evangelos, Univ Vienna, Doctoral Sch Comp Sci, Vienna, Austria.</text:p>
            <text:p>Zdun, Uwe, Univ Vienna, Software Architecture Grp, Vienna, Austria.</text:p>
            <text:p>Falazi, Ghareeb; Breitenbucher, Uwe; Leymann, Frank, Univ Stuttgart, Inst Architecture Applicat Syst, </text:p>
          </table:table-cell>
          <table:table-cell table:style-name="ce2"/>
          <table:table-cell table:style-name="ce2" office:value-type="string" calcext:value-type="string">
            <text:p>Infrastructure as code; metrics; architecture smells; modeling; best</text:p>
            <text:p>practices</text:p>
          </table:table-cell>
          <table:table-cell table:style-name="ce2" office:value-type="string" calcext:value-type="string">
            <text:p>IEEE COMPUTER SOC</text:p>
          </table:table-cell>
          <table:table-cell table:style-name="ce2" office:value-type="string" calcext:value-type="string">
            <text:p>2159-6182</text:p>
          </table:table-cell>
          <table:table-cell table:style-name="ce2" office:value-type="string" calcext:value-type="string">
            <text:p>English</text:p>
          </table:table-cell>
          <table:table-cell table:style-name="ce2" office:value-type="string" calcext:value-type="string">
            <text:p>IEEE 16th International Conference on Cloud Computing (IEEE CLOUD),</text:p>
            <text:p>Chicago, IL, JUL 02-08, 2023</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xploring Architectural Evolution in Microservice Systems Using</text:p>
            <text:p>Repository Mining Techniques and Static Code Analysis</text:p>
          </table:table-cell>
          <table:table-cell table:style-name="ce2" office:value-type="string" calcext:value-type="string">
            <text:p>Genfer, Patric and Zdun, Uwe</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57-173</text:p>
          </table:table-cell>
          <table:table-cell table:style-name="ce2" office:value-type="string" calcext:value-type="string">
            <text:p>14889</text:p>
          </table:table-cell>
          <table:table-cell table:style-name="ce2" office:value-type="string" calcext:value-type="string">
            <text:p>Microservices have gained popularity for isolating service functionality</text:p>
            <text:p>and mitigating issues such as architectural erosion and technical debt.</text:p>
            <text:p>However, their decentralized nature and rapid development often obscure</text:p>
            <text:p>the holistic view of the system and lead developers to lose sight of the</text:p>
            <text:p>overarching architecture. Our work addresses this challenge by proposing</text:p>
            <text:p>a novel approach to track and assess the evolution of microservice</text:p>
            <text:p>architectures through static source code analysis. We combine source</text:p>
            <text:p>code repository mining techniques with architectural reconstruction to</text:p>
            <text:p>measure various metrics throughout a system's development history. Our</text:p>
            <text:p>approach uses a formal API-based decomposition model that can easily be</text:p>
            <text:p>adapted for different scenarios by choosing various architectural</text:p>
            <text:p>metrics. We validated our method's scalability and robustness through a</text:p>
            <text:p>case study on an extensive open-source microservice reference system</text:p>
            <text:p>with more than 40 individual services written in different languages and</text:p>
            <text:p>more than 400 commits. Our research provides software architects with a</text:p>
            <text:p>powerful tool to identify and monitor problematic architectural trends</text:p>
            <text:p>before they become imminent threats, enabling the evolution of</text:p>
            <text:p>microservice-based systems while maintaining architectural coherence and</text:p>
            <text:p>integrity.</text:p>
          </table:table-cell>
          <table:table-cell table:style-name="ce2" office:value-type="string" calcext:value-type="string">
            <text:p>Proceedings Paper</text:p>
          </table:table-cell>
          <table:table-cell table:style-name="ce2" office:value-type="string" calcext:value-type="string">
            <text:p>10.1007/978-3-031-70797-1\_10</text:p>
          </table:table-cell>
          <table:table-cell table:style-name="ce2"/>
          <table:table-cell table:style-name="ce2" office:value-type="string" calcext:value-type="string">
            <text:p>Genfer, P (Corresponding Author), Univ Vienna, Res Grp Software Architecture, Fac Comp Sci, Vienna, Austria.</text:p>
            <text:p>Genfer, P (Corresponding Author), Univ Vienna, Univ Doctoral Sch Comp Sci DoCS, Vienna, Austria.</text:p>
            <text:p>Genfer, Patric; Zdun, Uwe, Univ Vienna, Res Grp Software Architecture, Fac Comp Sci, Vienna, Austria.</text:p>
            <text:p>Genfer, Patric, Univ Vienna, Univ Doctoral Sch Comp Sci DoCS, Vienna, Austria.</text:p>
          </table:table-cell>
          <table:table-cell table:style-name="ce2"/>
          <table:table-cell table:style-name="ce2" office:value-type="string" calcext:value-type="string">
            <text:p>Microservice API; evolution; source code repository mining; metrics;</text:p>
            <text:p>source code detectors</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8th European Conference on Software Architecture (ECSA), Luxembourg</text:p>
            <text:p>City, LUXEMBOURG, SEP 03-06, 2024</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Leveraging Petri Nets for Workflow Anomaly Detection in Microservice</text:p>
            <text:p>Architectures</text:p>
          </table:table-cell>
          <table:table-cell table:style-name="ce2" office:value-type="string" calcext:value-type="string">
            <text:p>Kamboj, Priyanka and Artho, Cyrille and Guanciale, Roberto and</text:p>
            <text:p>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219-241</text:p>
          </table:table-cell>
          <table:table-cell table:style-name="ce2" office:value-type="string" calcext:value-type="string">
            <text:p>15714</text:p>
          </table:table-cell>
          <table:table-cell table:style-name="ce2" office:value-type="string" calcext:value-type="string">
            <text:p>Modern microservice architectures pose challenges in understanding and</text:p>
            <text:p>managing the complex workflows within these decentralized services. In</text:p>
            <text:p>particular, it is difficult to identify anomalous behavior that could</text:p>
            <text:p>indicate a bug or attack. We use traces of microservice application</text:p>
            <text:p>activity (requests and responses) to infer a model of the application's</text:p>
            <text:p>normal behavior. Our approach mines Petri nets to formally represent</text:p>
            <text:p>concurrent operations and their temporal dependencies with a targeted</text:p>
            <text:p>delay injection approach that accurately and efficiently learns these</text:p>
            <text:p>dependencies. The models produced are both explainable and easy to</text:p>
            <text:p>inspect, which offers more transparency and control. Our evaluation</text:p>
            <text:p>shows that injecting delays during model training allows us to achieve</text:p>
            <text:p>perfect model and log fitness (Move-Model and Move-Log fitness of 1)</text:p>
            <text:p>with just 29 traces. In contrast, a straightforward approach requires</text:p>
            <text:p>over 10,000 traces to achieve similar accuracy. Our models successfully</text:p>
            <text:p>identify anomalies in various experiments, such as traces with one</text:p>
            <text:p>missing or multiple missing activities, and reordered sequences to</text:p>
            <text:p>simulate issues in real-world scenarios. Our approach outperforms the</text:p>
            <text:p>state-of-the-art method, demonstrating higher accuracy.</text:p>
          </table:table-cell>
          <table:table-cell table:style-name="ce2" office:value-type="string" calcext:value-type="string">
            <text:p>Proceedings Paper</text:p>
          </table:table-cell>
          <table:table-cell table:style-name="ce2" office:value-type="string" calcext:value-type="string">
            <text:p>10.1007/978-3-031-94634-9\_11</text:p>
          </table:table-cell>
          <table:table-cell table:style-name="ce2"/>
          <table:table-cell table:style-name="ce2" office:value-type="string" calcext:value-type="string">
            <text:p>Guanciale, R (Corresponding Author), KTH Royal Inst Technol Univ, Stockholm, Sweden.</text:p>
            <text:p>Kamboj, Priyanka; Artho, Cyrille; Guanciale, Roberto, KTH Royal Inst Technol Univ, Stockholm, Sweden.</text:p>
            <text:p>Jabbarvand, Reyhaneh; Godfrey, Brighten, Univ Illinois, Chicago, IL USA.</text:p>
          </table:table-cell>
          <table:table-cell table:style-name="ce2"/>
          <table:table-cell table:style-name="ce2" office:value-type="string" calcext:value-type="string">
            <text:p>Alignments; Cost function; Delay; Microservices; Process mining; Process</text:p>
            <text:p>discovery; Conformance Checking</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46th International Conference on Application and Theory of Petri Nets</text:p>
            <text:p>and Concurrency-PETRI NETS-Annual, FRANCE, JUN 22-27, 2025</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IntelliGOV - A Semantic Approach for Compliance Validation of</text:p>
            <text:p>Service-Oriented Architectures</text:p>
          </table:table-cell>
          <table:table-cell table:style-name="ce2" office:value-type="string" calcext:value-type="string">
            <text:p>Teixeira Filho, Haroldo Maria and Azevedo, Leonardo Guerreiro and Matsui</text:p>
            <text:p>Siqueira, Sean Wolfgand</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1048-1071</text:p>
          </table:table-cell>
          <table:table-cell table:style-name="ce2" office:value-type="string" calcext:value-type="string">
            <text:p>22</text:p>
          </table:table-cell>
          <table:table-cell table:style-name="ce2" office:value-type="string" calcext:value-type="string">
            <text:p>Organizations are adopting Service-Oriented Architecture (SOA) to</text:p>
            <text:p>increase operation's efficiency and flexibility. To accomplish these</text:p>
            <text:p>goals, it is necessary to ensure that the architecture and its evolution</text:p>
            <text:p>are compliant with business goals, best practices, legal and regulatory</text:p>
            <text:p>requirements. However, the diversity of domains and stakeholders</text:p>
            <text:p>involved in SOA solutions demands complex and expensive work to validate</text:p>
            <text:p>the architecture compliance. Hence, it can result in high costs and low</text:p>
            <text:p>quality assessment if the organization does not use an effective</text:p>
            <text:p>approach in this scenario. In addition, it would be important to</text:p>
            <text:p>consider standards and open solutions in order to promote</text:p>
            <text:p>interoperability and reuse of available tools, making it easier to</text:p>
            <text:p>spread throughout the organizations. We propose intelliGov, an</text:p>
            <text:p>architecture that aims to solve these problems by using ontologies,</text:p>
            <text:p>semantic rules and queries in order to simplify the compliance</text:p>
            <text:p>validation process. The architecture employs open standards - OWL, SWRL</text:p>
            <text:p>and SQWRL - in its implementation. A case study, executed in a global</text:p>
            <text:p>energy company that is currently adopting SOA, demonstrates gains in</text:p>
            <text:p>quality and costs of the compliance assessment process using the</text:p>
            <text:p>proposed architecture.</text:p>
          </table:table-cell>
          <table:table-cell table:style-name="ce2" office:value-type="string" calcext:value-type="string">
            <text:p>Article</text:p>
          </table:table-cell>
          <table:table-cell table:style-name="ce2" table:number-columns-repeated="2"/>
          <table:table-cell table:style-name="ce2" office:value-type="string" calcext:value-type="string">
            <text:p>Teixeira, HM (Corresponding Author), Fed Univ State Rio de Janeiro UNIRIO, Rio De Janeiro, Brazil.</text:p>
            <text:p>Teixeira Filho, Haroldo Maria; Azevedo, Leonardo Guerreiro; Matsui Siqueira, Sean Wolfgand, Fed Univ State Rio de Janeiro UNIRIO, Rio De Janeiro, Brazil.</text:p>
            <text:p>Azevedo, Leonardo Guerreiro, IBM Res, Rio De Janeiro, Brazil.</text:p>
          </table:table-cell>
          <table:table-cell table:style-name="ce2"/>
          <table:table-cell table:style-name="ce2" office:value-type="string" calcext:value-type="string">
            <text:p>Service-Oriented Architecture (SOA); Governance; Ontology; Semantic</text:p>
            <text:p>Rules; Semantic Queries</text:p>
          </table:table-cell>
          <table:table-cell table:style-name="ce2" office:value-type="string" calcext:value-type="string">
            <text:p>GRAZ UNIV TECHNOLGOY, INST INFORMATION SYSTEMS COMPUTER MEDIA-IICM</text:p>
          </table:table-cell>
          <table:table-cell table:style-name="ce2" office:value-type="string" calcext:value-type="string">
            <text:p>0948-695X</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formance Assessment of Architectural Design Decisions on the Mapping</text:p>
            <text:p>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76-83</text:p>
          </table:table-cell>
          <table:table-cell table:style-name="ce2"/>
          <table:table-cell table:style-name="ce2" office:value-type="string" calcext:value-type="string">
            <text:p>Microservice APIs are often identified and designed based on</text:p>
            <text:p>Domain-Driven Design (DDD). To help in the continuous analysis of</text:p>
            <text:p>mappings of domain model elements to APIs and API endpoints, we aim to</text:p>
            <text:p>automate the assessment of conformance to Architectural Design Decision</text:p>
            <text:p>(ADD) options. The ADDs, their decision options, and relevant decision</text:p>
            <text:p>drivers studied in this paper originate from an empirical study on the</text:p>
            <text:p>mapping of domain model elements to APIs and API endpoints in practice.</text:p>
            <text:p>We propose automated detectors to detect the decision options of the</text:p>
            <text:p>ADDs taken in a given microservice API model, and an assessment scoring</text:p>
            <text:p>scheme based on the empirical knowledge codified in the ADDs. We</text:p>
            <text:p>evaluate our work, by first manually creating a ground truth for 14</text:p>
            <text:p>cases in a multi-case study, and then comparing the results of our</text:p>
            <text:p>automated detectors to the ground truth for each of the 14 cases. In the</text:p>
            <text:p>cases we were able to identify 86\% of the decision points correctly,</text:p>
            <text:p>and a statistical analysis of our data shows only a negligible effect</text:p>
            <text:p>size for differences to the ground truth.</text:p>
          </table:table-cell>
          <table:table-cell table:style-name="ce2" office:value-type="string" calcext:value-type="string">
            <text:p>Proceedings Paper</text:p>
          </table:table-cell>
          <table:table-cell table:style-name="ce2" office:value-type="string" calcext:value-type="string">
            <text:p>10.1109/ICSA-C54293.2022.00058</text:p>
          </table:table-cell>
          <table:table-cell table:style-name="ce2"/>
          <table:table-cell table:style-name="ce2" office:value-type="string" calcext:value-type="string">
            <text:p>Singjai, A (Corresponding Author), Univ Vienna, Res Grp Software Architecture, Vienna, Austria.</text:p>
            <text:p>Singjai, Apitchaka; Zdun, Uwe, Univ Vienna, Res Grp Software Architecture, Vienna, Austria.</text:p>
          </table:table-cell>
          <table:table-cell table:style-name="ce2"/>
          <table:table-cell table:style-name="ce2" office:value-type="string" calcext:value-type="string">
            <text:p>Microservice Architecture; API Design; DDD; Conformance Assessment;</text:p>
            <text:p>Architectural Design Decision</text:p>
          </table:table-cell>
          <table:table-cell table:style-name="ce2" office:value-type="string" calcext:value-type="string">
            <text:p>IEEE COMPUTER SOC</text:p>
          </table:table-cell>
          <table:table-cell table:style-name="ce2"/>
          <table:table-cell table:style-name="ce2" office:value-type="string" calcext:value-type="string">
            <text:p>English</text:p>
          </table:table-cell>
          <table:table-cell table:style-name="ce2" office:value-type="string" calcext:value-type="string">
            <text:p>19th IEEE International Conference on Software Architecture (ICSA),</text:p>
            <text:p>ELECTR NETWORK, MAR 12-15, 2022</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Semi-automatic Feedback for Improving Architecture Conformance to</text:p>
            <text:p>Microservice Patterns and Practices</text:p>
          </table:table-cell>
          <table:table-cell table:style-name="ce2" office:value-type="string" calcext:value-type="string">
            <text:p>Ntentos, Evangelos and Zdun, Uwe and Plakidas, Konstantinos and Geiger,</text:p>
            <text:p>Sebastian</text:p>
          </table:table-cell>
          <table:table-cell table:style-name="ce2"/>
          <table:table-cell table:style-name="ce2" office:value-type="string" calcext:value-type="string">
            <text:p>2021</text:p>
          </table:table-cell>
          <table:table-cell table:style-name="ce2" office:value-type="string" calcext:value-type="string">
            <text:p>ISI Web of Science</text:p>
          </table:table-cell>
          <table:table-cell table:style-name="ce2" office:value-type="string" calcext:value-type="string">
            <text:p>36-46</text:p>
          </table:table-cell>
          <table:table-cell table:style-name="ce2"/>
          <table:table-cell table:style-name="ce2" office:value-type="string" calcext:value-type="string">
            <text:p>Microservices are one of the most recommended architectural styles for</text:p>
            <text:p>distributed applications that support independent development and</text:p>
            <text:p>deployment, enable rapid release, and are highly scalable and polyglot.</text:p>
            <text:p>Many well-established patterns and best practices have been documented</text:p>
            <text:p>in the literature. As there are many such guidances, they have numerous</text:p>
            <text:p>interdependencies, and system designs must adhere to many other</text:p>
            <text:p>architecture constraints, too, implementations do not always conform to</text:p>
            <text:p>those guidances. In complex or large systems, it can be hard and tedious</text:p>
            <text:p>to spot violations. Our work aims to offer automated support for</text:p>
            <text:p>architecting during the continuous evolution of microservice-based</text:p>
            <text:p>systems. More specifically we aim to provide the foundations for an</text:p>
            <text:p>automated approach for architecture reconstruction, assessing</text:p>
            <text:p>conformance to patterns and practices specific for microservice</text:p>
            <text:p>architectures, and detect possible violations. Based on this, we provide</text:p>
            <text:p>actionable options to architects for improving architecture conformance</text:p>
            <text:p>as part of a continuous feedback loop. That is, our goal is to support</text:p>
            <text:p>architecting in the context of continuous delivery practices, where</text:p>
            <text:p>architecture violations are continuously analyzed and fix options are</text:p>
            <text:p>continuously suggested.</text:p>
          </table:table-cell>
          <table:table-cell table:style-name="ce2" office:value-type="string" calcext:value-type="string">
            <text:p>Proceedings Paper</text:p>
          </table:table-cell>
          <table:table-cell table:style-name="ce2" office:value-type="string" calcext:value-type="string">
            <text:p>10.1109/ICSA51549.2021.00012</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Geiger, Sebastian, Siemens Corp Technol, Vienna, Austria.</text:p>
          </table:table-cell>
          <table:table-cell table:style-name="ce2"/>
          <table:table-cell table:style-name="ce2" office:value-type="string" calcext:value-type="string">
            <text:p>Microservices; patterns; best practices; continuous architecture</text:p>
            <text:p>improvement; feedback loop</text:p>
          </table:table-cell>
          <table:table-cell table:style-name="ce2" office:value-type="string" calcext:value-type="string">
            <text:p>IEEE COMPUTER SOC</text:p>
          </table:table-cell>
          <table:table-cell table:style-name="ce2"/>
          <table:table-cell table:style-name="ce2" office:value-type="string" calcext:value-type="string">
            <text:p>English</text:p>
          </table:table-cell>
          <table:table-cell table:style-name="ce2" office:value-type="string" calcext:value-type="string">
            <text:p>18th IEEE International Conference on Software Architecture (ICSA),</text:p>
            <text:p>Infos e V, ELECTR NETWORK, MAR 22-26, 2021</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WEB SERVICE CHOREOGRAPHY CONFORMANCE VERIFICATION THROUGH THE piX-MODEL</text:p>
          </table:table-cell>
          <table:table-cell table:style-name="ce2" office:value-type="string" calcext:value-type="string">
            <text:p>Van Seghbroeck, Gregory and Volckaert, Bruno and De Turck, Filip and</text:p>
            <text:p>Dhoedt, Bart and Demeester, Piet</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text:p>
          </table:table-cell>
          <table:table-cell table:style-name="ce2" office:value-type="string" calcext:value-type="string">
            <text:p>19</text:p>
          </table:table-cell>
          <table:table-cell table:style-name="ce2" office:value-type="string" calcext:value-type="string">
            <text:p>As the adoption of the Service Oriented Architecture paradigm has</text:p>
            <text:p>dramatically increased over the past few years, proper coordination of</text:p>
            <text:p>loosely coupled services becomes an important issue when building</text:p>
            <text:p>state-of-the-art applications. This coordination is typically organized</text:p>
            <text:p>through orchestration (requiring a central coordinating entity) or</text:p>
            <text:p>through choreographies. While the latter approach allows for a fully</text:p>
            <text:p>distributed coordination, the need also arises for a distributed</text:p>
            <text:p>conformance check, ensuring that each participant of the choreography</text:p>
            <text:p>behaves according to the general choreography.</text:p>
            <text:p>In this paper, a formalism is presented to ensure this conformance at</text:p>
            <text:p>design time, with possible extensions to deploy time and to runtime</text:p>
            <text:p>conformance checking. This formalism is referred to as the piX-model and</text:p>
            <text:p>it will be shown that the approach taken is inherently less complex,</text:p>
            <text:p>both in time and space, than the conventional p-calculus-based approach,</text:p>
            <text:p>whilst offering the same conformance guarantees. This gain in</text:p>
            <text:p>performance allows for a small design turnaround time, and also opens</text:p>
            <text:p>the avenue to runtime conformance checking by resource constrained</text:p>
            <text:p>devices.</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table:table-cell table:style-name="ce2" office:value-type="string" calcext:value-type="string">
            <text:p>Van Seghbroeck, G (Corresponding Author), Univ Ghent, Dept Informat Technol INTEC, IBBT, Gaston Crommenlaan 8 Bus 201, B-9050 Ghent, Belgium.</text:p>
            <text:p>Van Seghbroeck, Gregory; Volckaert, Bruno; De Turck, Filip; Dhoedt, Bart; Demeester, Piet, Univ Ghent, Dept Informat Technol INTEC, IBBT, B-9050 Ghent, Belgium.</text:p>
          </table:table-cell>
          <table:table-cell table:style-name="ce2"/>
          <table:table-cell table:style-name="ce2" office:value-type="string" calcext:value-type="string">
            <text:p>Web services; choreography; WS-CDL; open bisimulation</text:p>
          </table:table-cell>
          <table:table-cell table:style-name="ce2" office:value-type="string" calcext:value-type="string">
            <text:p>WORLD SCIENTIFIC PUBL CO PTE LTD</text:p>
          </table:table-cell>
          <table:table-cell table:style-name="ce2" office:value-type="string" calcext:value-type="string">
            <text:p>0218-8430</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valuating and Improving Microservice Architecture Conformance to</text:p>
            <text:p>Architectural Design Decisions</text:p>
          </table:table-cell>
          <table:table-cell table:style-name="ce2" office:value-type="string" calcext:value-type="string">
            <text:p>Ntentos, Evangelos and Zdun, Uwe and Plakidas, Konstantinos and Geiger,</text:p>
            <text:p>Sebastian</text:p>
          </table:table-cell>
          <table:table-cell table:style-name="ce2"/>
          <table:table-cell table:style-name="ce2" office:value-type="string" calcext:value-type="string">
            <text:p>2021</text:p>
          </table:table-cell>
          <table:table-cell table:style-name="ce2" office:value-type="string" calcext:value-type="string">
            <text:p>ISI Web of Science</text:p>
          </table:table-cell>
          <table:table-cell table:style-name="ce2" office:value-type="string" calcext:value-type="string">
            <text:p>188-203</text:p>
          </table:table-cell>
          <table:table-cell table:style-name="ce2" office:value-type="string" calcext:value-type="string">
            <text:p>13121</text:p>
          </table:table-cell>
          <table:table-cell table:style-name="ce2" office:value-type="string" calcext:value-type="string">
            <text:p>Microservices are a commonly used architectural style targeting</text:p>
            <text:p>independent development, deployment, and release of services, as well as</text:p>
            <text:p>supporting polyglot capabilities and rapid release strategies. This</text:p>
            <text:p>depends on the presence of certain software architecture qualities. A</text:p>
            <text:p>number of architecture patterns and best practices that support the</text:p>
            <text:p>required qualities have been proposed in the literature, but usually in</text:p>
            <text:p>isolation of one another. Additionally, in real-world systems, assessing</text:p>
            <text:p>conformance to these patterns and practices and detecting possible</text:p>
            <text:p>violations is a significant challenge. For small-scale systems of a few</text:p>
            <text:p>services, a manual assessment and violation detection by an expert is</text:p>
            <text:p>probably both accurate and sufficient. However, for industrial-scale</text:p>
            <text:p>systems of several hundred or more services, manual assessment and</text:p>
            <text:p>violation detection is laborious and likely leads to inaccurate results.</text:p>
            <text:p>Furthermore, manual assessment is impractical for rapidly evolving and</text:p>
            <text:p>frequently released system architectures. In this work we examine a</text:p>
            <text:p>subset of microservice-relevant patterns, and propose a method for the</text:p>
            <text:p>semi-automatic detection and resolution of conformance violations. Our</text:p>
            <text:p>aim is to assist the software architect by providing a set of possible</text:p>
            <text:p>fix options and generating models of ``fixed{''} architectures.</text:p>
          </table:table-cell>
          <table:table-cell table:style-name="ce2" office:value-type="string" calcext:value-type="string">
            <text:p>Proceedings Paper</text:p>
          </table:table-cell>
          <table:table-cell table:style-name="ce2" office:value-type="string" calcext:value-type="string">
            <text:p>10.1007/978-3-030-91431-8\_12</text:p>
          </table:table-cell>
          <table:table-cell table:style-name="ce2"/>
          <table:table-cell table:style-name="ce2" office:value-type="string" calcext:value-type="string">
            <text:p>Ntentos, E (Corresponding Author), Univ Vienna, Res Grp Software Architecture, Fac Comp Sci, Vienna, Austria.</text:p>
            <text:p>Ntentos, Evangelos; Zdun, Uwe; Plakidas, Konstantinos, Univ Vienna, Res Grp Software Architecture, Fac Comp Sci, Vienna, Austria.</text:p>
            <text:p>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9th International Conference on Service-Oriented Computing (ICSOC),</text:p>
            <text:p>ELECTR NETWORK, NOV 22-25, 2021</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Ferreyra, Nicolas E. Diaz and</text:p>
            <text:p>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text:p>
            <text:p>functionality of their software system into multiple smaller services.</text:p>
            <text:p>However, this architectural style also makes it harder for them to debug</text:p>
            <text:p>and assess whether the system's deployment conforms to its</text:p>
            <text:p>implementation. We present CATMA, an automated tool that detects</text:p>
            <text:p>non-conformances between the system's deployment and implementation. It</text:p>
            <text:p>automatically visualizes and generates potential interpretations for the</text:p>
            <text:p>detected discrepancies. Our evaluation of CATMA shows promising results</text:p>
            <text:p>in terms of performance and providing useful insights. CATMA is</text:p>
            <text:p>available at https://cyber-analytics.nl/catma.github.io/, and a</text:p>
            <text:p>demonstration video is available at https://youtu.be/WKP1hG-TDKc.</text:p>
          </table:table-cell>
          <table:table-cell table:style-name="ce2" office:value-type="string" calcext:value-type="string">
            <text:p>Proceedings Paper</text:p>
          </table:table-cell>
          <table:table-cell table:style-name="ce2" office:value-type="string" calcext:value-type="string">
            <text:p>10.1145/3639478.3640022</text:p>
          </table:table-cell>
          <table:table-cell table:style-name="ce2"/>
          <table:table-cell table:style-name="ce2" office:value-type="string" calcext:value-type="string">
            <text:p>Cao, C (Corresponding Author), Delft Univ Technol, Delft, Netherlands.</text:p>
            <text:p>Cao, Clinton; Verwer, Sicco; Panichella, Annibale, Delft Univ Technol, Delft, Netherlands.</text:p>
            <text:p>Schneider, Simon; Ferreyra, Nicolas E. Diaz; Scandariato, Riccardo, Hamburg Univ Technol, Hamburg, Germany.</text:p>
          </table:table-cell>
          <table:table-cell table:style-name="ce2"/>
          <table:table-cell table:style-name="ce2" office:value-type="string" calcext:value-type="string">
            <text:p>microservices; static analysis; dynamic analysis; software testing;</text:p>
            <text:p>empirical software engineering</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44th International Conference on Software Engineering: Companion</text:p>
            <text:p>Proceedings, Lisbon, PORTUGAL, APR 14-20, 2024</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Metrics for Assessing Architecture Conformance to Microservice</text:p>
            <text:p>Architecture Patterns and Practices</text:p>
          </table:table-cell>
          <table:table-cell table:style-name="ce2" office:value-type="string" calcext:value-type="string">
            <text:p>Ntentos, Evangelos and Zdun, Uwe and Plakidas, Konstantinos and Meixner,</text:p>
            <text:p>Sebastian and Geiger, Sebastian</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580-596</text:p>
          </table:table-cell>
          <table:table-cell table:style-name="ce2" office:value-type="string" calcext:value-type="string">
            <text:p>12571</text:p>
          </table:table-cell>
          <table:table-cell table:style-name="ce2" office:value-type="string" calcext:value-type="string">
            <text:p>Many contemporary service-based systems follow the microservice</text:p>
            <text:p>approach, particularly in DevOps or continuous delivery contexts. They</text:p>
            <text:p>share a set of important tenets such as independent development and</text:p>
            <text:p>deployment, high releasability, polyglot technology support, and loose</text:p>
            <text:p>coupling. A number of best practices for microservice architectures have</text:p>
            <text:p>been codified as patterns, which embody those tenets. However, no</text:p>
            <text:p>real-world microservices system can support all patterns and practices</text:p>
            <text:p>well, but rather architectural decisions making trade-offs among them</text:p>
            <text:p>are needed. Conformance to the patterns and practices selected in such</text:p>
            <text:p>decisions is hard to ensure and assess automatically, especially in</text:p>
            <text:p>large-scale, complex, and evolving systems. In this work, we propose a</text:p>
            <text:p>model-based approach based on generic, technology-independent metrics,</text:p>
            <text:p>tied to typical architectural design decisions in the microservice</text:p>
            <text:p>domain. With this approach we can measure conformance to the patterns</text:p>
            <text:p>and related tenets. We demonstrate and assess the validity and</text:p>
            <text:p>appropriateness of these metrics in performing an assessment of a</text:p>
            <text:p>system's conformance to patterns through statistical methods.</text:p>
          </table:table-cell>
          <table:table-cell table:style-name="ce2" office:value-type="string" calcext:value-type="string">
            <text:p>Proceedings Paper</text:p>
          </table:table-cell>
          <table:table-cell table:style-name="ce2" office:value-type="string" calcext:value-type="string">
            <text:p>10.1007/978-3-030-65310-1\_42</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Meixner, Sebastian; 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8th International Conference on Service-Oriented Computing (ICSOC),</text:p>
            <text:p>ELECTR NETWORK, DEC 14-17, 2020</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Jean and Simhandl, Georg and Scandariato,</text:p>
            <text:p>Riccardo and Chakravarty, Somik and Jelic, Marjan and Jovanovic,</text:p>
            <text:p>Aleksandar</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257-1273</text:p>
          </table:table-cell>
          <table:table-cell table:style-name="ce2" office:value-type="string" calcext:value-type="string">
            <text:p>21</text:p>
          </table:table-cell>
          <table:table-cell table:style-name="ce2" office:value-type="string" calcext:value-type="string">
            <text:p>Microservice architectures are widely used today to implement</text:p>
            <text:p>distributed systems. Securing microservice architectures is challenging</text:p>
            <text:p>because of their polyglot nature, continuous evolution, and various</text:p>
            <text:p>security concerns relevant to such architectures. This article proposes</text:p>
            <text:p>a novel, model-based approach providing detection strategies to address</text:p>
            <text:p>the automated detection of security tactics (or patterns and best</text:p>
            <text:p>practices) in a given microservice architecture decomposition model. Our</text:p>
            <text:p>novel detection strategies are metrics-based rules that decide</text:p>
            <text:p>conformance to a security recommendation based on a statistical</text:p>
            <text:p>predictor. The proposed approach models this recommendation using</text:p>
            <text:p>Architectural Design Decisions (ADDs). We apply our approach for four</text:p>
            <text:p>different security-related ADDs on access management, traffic control,</text:p>
            <text:p>and avoiding plaintext sensitive data in the context of microservice</text:p>
            <text:p>systems. We then apply our approach to a model data set of 10</text:p>
            <text:p>open-source microservice systems and 20 variants of those systems. Our</text:p>
            <text:p>results are detection strategies showing a very low bias, a very high</text:p>
            <text:p>correlation, and a low prediction error in our model data set.</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table:table-cell table:style-name="ce2" office:value-type="string" calcext:value-type="string">
            <text:p>Zdun, U (Corresponding Author), Univ Vienna, Fac Comp Sci, Res Grp Software Architecture, A-1010 Vienna, Austria.</text:p>
            <text:p>Zdun, Uwe; Queval, Pierre-Jean; Simhandl, Georg, Univ Vienna, Fac Comp Sci, Res Grp Software Architecture, A-1010 Vienna, Austria.</text:p>
            <text:p>Scandariato, Riccardo, Hamburg Univ Technol TUHH, D-21073 Hamburg, Germany.</text:p>
            <text:p>Chakravarty, Somik; Jelic, Marjan; Jovanovic, Aleksandar, European Risk \&amp; Resilience Inst EU VRi, D-70599 Stuttgart, Germany.</text:p>
          </table:table-cell>
          <table:table-cell table:style-name="ce2"/>
          <table:table-cell table:style-name="ce2" office:value-type="string" calcext:value-type="string">
            <text:p>Security; Microservice architectures; Measurement; Authorization; Data</text:p>
            <text:p>models; Computer architecture; Codes; Conformance checking; detection</text:p>
            <text:p>strategies; metrics; microservice architecture security; microservices</text:p>
          </table:table-cell>
          <table:table-cell table:style-name="ce2" office:value-type="string" calcext:value-type="string">
            <text:p>IEEE COMPUTER SOC</text:p>
          </table:table-cell>
          <table:table-cell table:style-name="ce2" office:value-type="string" calcext:value-type="string">
            <text:p>1545-5971</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nsuring and Assessing Architecture Conformance to Microservice</text:p>
            <text:p>Decomposition Patterns</text:p>
          </table:table-cell>
          <table:table-cell table:style-name="ce2" office:value-type="string" calcext:value-type="string">
            <text:p>Zdun, Uwe and Navarro, Elena and Leymann, Frank</text:p>
          </table:table-cell>
          <table:table-cell table:style-name="ce2"/>
          <table:table-cell table:style-name="ce2" office:value-type="string" calcext:value-type="string">
            <text:p>2017</text:p>
          </table:table-cell>
          <table:table-cell table:style-name="ce2" office:value-type="string" calcext:value-type="string">
            <text:p>ISI Web of Science</text:p>
          </table:table-cell>
          <table:table-cell table:style-name="ce2" office:value-type="string" calcext:value-type="string">
            <text:p>411-429</text:p>
          </table:table-cell>
          <table:table-cell table:style-name="ce2" office:value-type="string" calcext:value-type="string">
            <text:p>10601</text:p>
          </table:table-cell>
          <table:table-cell table:style-name="ce2" office:value-type="string" calcext:value-type="string">
            <text:p>Microservice-based software architecture design has been widely</text:p>
            <text:p>discussed, and best practices have been published as architecture design</text:p>
            <text:p>patterns. However, conformance to those patterns is hard to ensure and</text:p>
            <text:p>assess automatically, leading to problems such as architectural drift</text:p>
            <text:p>and erosion, especially in the context of continued software evolution</text:p>
            <text:p>or large-scale microservice systems. In addition, not much in the</text:p>
            <text:p>component and connector architecture models is specific (only) to the</text:p>
            <text:p>microservices approach, whereas other aspects really specific to that</text:p>
            <text:p>approach, such as independent deployment of microservices, are usually</text:p>
            <text:p>modeled in other views or not at all. We suggest a set of constraints to</text:p>
            <text:p>check and metrics to assess architecture conformance to microservice</text:p>
            <text:p>patterns. In comparison to expert judgment derived from the patterns, a</text:p>
            <text:p>subset of these constraints and metrics shows a good relative</text:p>
            <text:p>performance and potential for automation.</text:p>
          </table:table-cell>
          <table:table-cell table:style-name="ce2" office:value-type="string" calcext:value-type="string">
            <text:p>Proceedings Paper</text:p>
          </table:table-cell>
          <table:table-cell table:style-name="ce2" office:value-type="string" calcext:value-type="string">
            <text:p>10.1007/978-3-319-69035-3\_29</text:p>
          </table:table-cell>
          <table:table-cell table:style-name="ce2"/>
          <table:table-cell table:style-name="ce2" office:value-type="string" calcext:value-type="string">
            <text:p>Zdun, U (Corresponding Author), Univ Vienna, Fac Comp Sci, Res Grp Software Architecture, Vienna, Austria.</text:p>
            <text:p>Zdun, Uwe, Univ Vienna, Fac Comp Sci, Res Grp Software Architecture, Vienna, Austria.</text:p>
            <text:p>Navarro, Elena, Univ Castilla La Mancha, Comp Syst Dept, Lab User Interact \&amp; Software Engn, Albacete, Spain.</text:p>
            <text:p>Leymann, Frank, Univ Stuttgart, Inst Architecture Applicat Syst, Stuttgart, Germany.</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5th International Conference on Service-Oriented Computing (ICSOC),</text:p>
            <text:p>Malaga, SPAIN, NOV 13-16, 2017</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formance assessment of Architectural Design Decisions on API endpoint</text:p>
            <text:p>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text:p>
            <text:p>microservices. A crucial aspect of microservice design is API design,</text:p>
            <text:p>which includes the design of API endpoints.</text:p>
            <text:p>Objective: Our objective is to automate the assessment of conformance to</text:p>
            <text:p>Architectural Design Decisions (ADDs) on the interrelation of DDD and</text:p>
            <text:p>APIs. In particular, we studied link mapping, API operation design, and</text:p>
            <text:p>resource segregation as API endpoint design issues that are linked to</text:p>
            <text:p>domain model design. We particularly aim to address conformance checking</text:p>
            <text:p>in the context of frequent release practices, as frequent manual</text:p>
            <text:p>conformance checking is difficult or infeasible.</text:p>
            <text:p>Methods: We suggest a new approach for the automated assessment of</text:p>
            <text:p>conformance to ADD options. The approach suggests automated detectors to</text:p>
            <text:p>detect ADD options selected in a given API endpoint design, as well as</text:p>
            <text:p>an assessment scoring scheme based on empirical results. For the</text:p>
            <text:p>evaluation of our approach, we first manually created a ground truth for</text:p>
            <text:p>12 cases in a multi-case study, and then compared the results of our</text:p>
            <text:p>automated detectors to the ground truth for each of those cases.</text:p>
            <text:p>Results: With our approach, all ADD options in our multi-case study</text:p>
            <text:p>possibly can be automatically detected. Without further improvements,</text:p>
            <text:p>our approach identifies 83\% of the decision points in the multi-case</text:p>
            <text:p>study correctly. A statistical analysis of our data shows only a</text:p>
            <text:p>negligible effect size for differences to the ground truth.</text:p>
            <text:p>Conclusion: Our new approach provides a pragmatic method for automated</text:p>
            <text:p>detection of conformance to ADDs on the interrelation of DDD and APIs.</text:p>
            <text:p>The approach can support the continuous analysis of API endpoint</text:p>
            <text:p>designs. (c) 2022 The Authors. Published by Elsevier Inc. This is an</text:p>
            <text:p>open access article under the CC BY license</text:p>
            <text:p>(http://creativecommons.org/licenses/by/4.0/).</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table:table-cell table:style-name="ce2" office:value-type="string" calcext:value-type="string">
            <text:p>Singjai, A (Corresponding Author), Univ Vienna, Res Grp Software Architecture, Fac Comp Sci, Vienna, Austria.</text:p>
            <text:p>Singjai, Apitchaka; Zdun, Uwe, Univ Vienna, Res Grp Software Architecture, Fac Comp Sci, Vienna, Austria.</text:p>
          </table:table-cell>
          <table:table-cell table:style-name="ce2"/>
          <table:table-cell table:style-name="ce2" office:value-type="string" calcext:value-type="string">
            <text:p>Microservice architecture; API design; Domain driven design;</text:p>
            <text:p>Architecture conformance assessment</text:p>
          </table:table-cell>
          <table:table-cell table:style-name="ce2" office:value-type="string" calcext:value-type="string">
            <text:p>ELSEVIER SCIENCE INC</text:p>
          </table:table-cell>
          <table:table-cell table:style-name="ce2" office:value-type="string" calcext:value-type="string">
            <text:p>0164-1212</text:p>
          </table:table-cell>
          <table:table-cell table:style-name="ce2" office:value-type="string" calcext:value-type="string">
            <text:p>English</text:p>
          </table:table-cell>
          <table:table-cell table:style-name="ce2" table:number-columns-repeated="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xtracting the Architecture of Microservices: An Approach for</text:p>
            <text:p>Explainability and Traceability</text:p>
          </table:table-cell>
          <table:table-cell table:style-name="ce2" office:value-type="string" calcext:value-type="string">
            <text:p>Queval, Pierre-Jean and Zdun, Uwe</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346-353</text:p>
          </table:table-cell>
          <table:table-cell table:style-name="ce2" office:value-type="string" calcext:value-type="string">
            <text:p>14212</text:p>
          </table:table-cell>
          <table:table-cell table:style-name="ce2" office:value-type="string" calcext:value-type="string">
            <text:p>The polyglot nature of microservice architectures and the need for high</text:p>
            <text:p>reliability in security analyses pose unique challenges that existing</text:p>
            <text:p>approaches to automatic architecture recovery often fail to address.</text:p>
            <text:p>This article proposes an approach for extracting detailed architecture</text:p>
            <text:p>models from polyglot microservice source code focusing on explainability</text:p>
            <text:p>and traceability. The approach involves abstracting code navigation as a</text:p>
            <text:p>tree structure, using an exploratory algorithm to detect architectural</text:p>
            <text:p>aspects, and providing a set of generic detectors as input. The</text:p>
            <text:p>architecture models are automatically annotated with detailed</text:p>
            <text:p>information that makes them useful for architecture conformance checking</text:p>
            <text:p>and violation fixing. Our case studies of microservice software systems</text:p>
            <text:p>validate the usefulness of our approach, providing insights into its</text:p>
            <text:p>completeness, accuracy, and effectiveness for software architecture</text:p>
            <text:p>tasks.</text:p>
          </table:table-cell>
          <table:table-cell table:style-name="ce2" office:value-type="string" calcext:value-type="string">
            <text:p>Proceedings Paper</text:p>
          </table:table-cell>
          <table:table-cell table:style-name="ce2" office:value-type="string" calcext:value-type="string">
            <text:p>10.1007/978-3-031-42592-9\_24</text:p>
          </table:table-cell>
          <table:table-cell table:style-name="ce2"/>
          <table:table-cell table:style-name="ce2" office:value-type="string" calcext:value-type="string">
            <text:p>Quéval, PJ (Corresponding Author), Univ Vienna, Vienna, Austria.</text:p>
            <text:p>Quéval, PJ (Corresponding Author), Doctoral Sch Comp Sci, Vienna, Austria.</text:p>
            <text:p>Queval, Pierre-Jean; Zdun, Uwe, Univ Vienna, Vienna, Austria.</text:p>
            <text:p>Queval, Pierre-Jean, Doctoral Sch Comp Sci, Vienna, Austria.</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7th European Conference on Software Architecture (ECSA), Istanbul,</text:p>
            <text:p>TURKEY, SEP 18-22, 2023</text:p>
          </table:table-cell>
          <table:table-cell table:style-name="ce2"/>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3</text:p>
          </table:table-cell>
          <table:table-cell table:style-name="ce2" office:value-type="string" calcext:value-type="string">
            <text:p>IEEE Digital Library</text:p>
          </table:table-cell>
          <table:table-cell table:style-name="ce2" office:value-type="string" calcext:value-type="string">
            <text:p>201-211</text:p>
          </table:table-cell>
          <table:table-cell table:style-name="ce2"/>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text:p>
          </table:table-cell>
          <table:table-cell table:style-name="ce2"/>
          <table:table-cell table:style-name="ce2" office:value-type="string" calcext:value-type="string">
            <text:p>10.1109/CLOUD60044.2023.00031</text:p>
          </table:table-cell>
          <table:table-cell table:style-name="ce2" table:number-columns-repeated="3"/>
          <table:table-cell table:style-name="ce2" office:value-type="string" calcext:value-type="string">
            <text:p>Industries;Couplings;Cloud computing;Codes;Microservice architectures;Focusing;Computer architecture;Infrastructure as code;metrics;architecture smells;modeling;best practices</text:p>
          </table:table-cell>
          <table:table-cell table:style-name="ce2"/>
          <table:table-cell table:style-name="ce2" office:value-type="string" calcext:value-type="string">
            <text:p>2159-6190</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76-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text:p>
          </table:table-cell>
          <table:table-cell table:style-name="ce2"/>
          <table:table-cell table:style-name="ce2" office:value-type="string" calcext:value-type="string">
            <text:p>10.1109/ICSA-C54293.2022.00058</text:p>
          </table:table-cell>
          <table:table-cell table:style-name="ce2" table:number-columns-repeated="3"/>
          <table:table-cell table:style-name="ce2" office:value-type="string" calcext:value-type="string">
            <text:p>Adaptation models;Automation;Statistical analysis;Software architecture;Conferences;Microservice architectures;Detectors;Microservice Architecture;API Design;DDD;Conformance Assessment;Architectural Design Decision</text:p>
          </table:table-cell>
          <table:table-cell table:style-name="ce2"/>
          <table:table-cell table:style-name="ce2" office:value-type="string" calcext:value-type="string">
            <text:p>2768-4288</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table:number-columns-repeated="3"/>
          <table:table-cell table:style-name="ce2" office:value-type="string" calcext:value-type="string">
            <text:p>Visualization;Microservice architectures;Computer architecture;Software systems;Software engineering;microservices;static analysis;dynamic analysis;software testing;empirical software engineering</text:p>
          </table:table-cell>
          <table:table-cell table:style-name="ce2"/>
          <table:table-cell table:style-name="ce2" office:value-type="string" calcext:value-type="string">
            <text:p>2574-1934</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IEEE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table:number-columns-repeated="3"/>
          <table:table-cell table:style-name="ce2" office:value-type="string" calcext:value-type="string">
            <text:p>Computer architecture;Service-oriented architecture;Unified modeling language;Object oriented modeling;Protocols;Software systems;software architecture;reference architecture;conformance checking;service-oriented architecture (SOA)</text:p>
          </table:table-cell>
          <table:table-cell table:style-name="ce2" table:number-columns-repeated="5"/>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number-columns-repeated="6"/>
          <table:table-cell table:style-name="ce2" office:value-type="string" calcext:value-type="string">
            <text:p>IEEE Press</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a}rio, Daniel Rodrigo and de Fran\c{c}a, Breno Bernard Nicolau</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71–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text:p>
          </table:table-cell>
          <table:table-cell table:style-name="ce2"/>
          <table:table-cell table:style-name="ce2" office:value-type="string" calcext:value-type="string">
            <text:p>10.1145/3425269.3425273</text:p>
          </table:table-cell>
          <table:table-cell table:style-name="ce2" office:value-type="string" calcext:value-type="string">
            <text:p>https://doi.org/10.1145/3425269.3425273</text:p>
          </table:table-cell>
          <table:table-cell table:style-name="ce2" table:number-columns-repeated="2"/>
          <table:table-cell table:style-name="ce2" office:value-type="string" calcext:value-type="string">
            <text:p>coupling metrics, maintainability, microservices, software 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xploring Architectural Evolution in&amp;nbsp;Microservice Systems Using Repository Mining Techniques and&amp;nbsp;Static Code Analysis</text:p>
          </table:table-cell>
          <table:table-cell table:style-name="ce2" office:value-type="string" calcext:value-type="string">
            <text:p>Genfer, Patric and Zdun, Uwe</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57–173</text:p>
          </table:table-cell>
          <table:table-cell table:style-name="ce2"/>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text:p>
          </table:table-cell>
          <table:table-cell table:style-name="ce2"/>
          <table:table-cell table:style-name="ce2" office:value-type="string" calcext:value-type="string">
            <text:p>10.1007/978-3-031-70797-1_10</text:p>
          </table:table-cell>
          <table:table-cell table:style-name="ce2" office:value-type="string" calcext:value-type="string">
            <text:p>https://doi.org/10.1007/978-3-031-70797-1_10</text:p>
          </table:table-cell>
          <table:table-cell table:style-name="ce2" table:number-columns-repeated="2"/>
          <table:table-cell table:style-name="ce2" office:value-type="string" calcext:value-type="string">
            <text:p>Microservice API, evolution, source code repository mining, metrics, source code detector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xtracting the&amp;nbsp;Architecture of&amp;nbsp;Microservices: An Approach for&amp;nbsp;Explainability and&amp;nbsp;Traceability</text:p>
          </table:table-cell>
          <table:table-cell table:style-name="ce2" office:value-type="string" calcext:value-type="string">
            <text:p>Qu\'{e}val, Pierre-Jean and Zdun, Uw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46–353</text:p>
          </table:table-cell>
          <table:table-cell table:style-name="ce2"/>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text:p>
          </table:table-cell>
          <table:table-cell table:style-name="ce2"/>
          <table:table-cell table:style-name="ce2" office:value-type="string" calcext:value-type="string">
            <text:p>10.1007/978-3-031-42592-9_24</text:p>
          </table:table-cell>
          <table:table-cell table:style-name="ce2" office:value-type="string" calcext:value-type="string">
            <text:p>https://doi.org/10.1007/978-3-031-42592-9_24</text:p>
          </table:table-cell>
          <table:table-cell table:style-name="ce2" table:number-columns-repeated="2"/>
          <table:table-cell table:style-name="ce2" office:value-type="string" calcext:value-type="string">
            <text:p>Architecture, Explainability, Microservices, Polyglot</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580–596</text:p>
          </table:table-cell>
          <table:table-cell table:style-name="ce2"/>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text:p>
          </table:table-cell>
          <table:table-cell table:style-name="ce2"/>
          <table:table-cell table:style-name="ce2" office:value-type="string" calcext:value-type="string">
            <text:p>10.1007/978-3-030-65310-1_42</text:p>
          </table:table-cell>
          <table:table-cell table:style-name="ce2" office:value-type="string" calcext:value-type="string">
            <text:p>https://doi.org/10.1007/978-3-030-65310-1_4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and Leymann, Frank</text:p>
          </table:table-cell>
          <table:table-cell table:style-name="ce2"/>
          <table:table-cell table:style-name="ce2" office:value-type="string" calcext:value-type="string">
            <text:p>2017</text:p>
          </table:table-cell>
          <table:table-cell table:style-name="ce2" office:value-type="string" calcext:value-type="string">
            <text:p>ACM Digital Library</text:p>
          </table:table-cell>
          <table:table-cell table:style-name="ce2" office:value-type="string" calcext:value-type="string">
            <text:p>411–429</text:p>
          </table:table-cell>
          <table:table-cell table:style-name="ce2"/>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text:p>
          </table:table-cell>
          <table:table-cell table:style-name="ce2"/>
          <table:table-cell table:style-name="ce2" office:value-type="string" calcext:value-type="string">
            <text:p>10.1007/978-3-319-69035-3_29</text:p>
          </table:table-cell>
          <table:table-cell table:style-name="ce2" office:value-type="string" calcext:value-type="string">
            <text:p>https://doi.org/10.1007/978-3-319-69035-3_29</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188–203</text:p>
          </table:table-cell>
          <table:table-cell table:style-name="ce2"/>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text:p>
          </table:table-cell>
          <table:table-cell table:style-name="ce2"/>
          <table:table-cell table:style-name="ce2" office:value-type="string" calcext:value-type="string">
            <text:p>10.1007/978-3-030-91431-8_12</text:p>
          </table:table-cell>
          <table:table-cell table:style-name="ce2" office:value-type="string" calcext:value-type="string">
            <text:p>https://doi.org/10.1007/978-3-030-91431-8_1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office:value-type="string" calcext:value-type="string">
            <text:p>https://doi.org/10.1109/NOMS54207.2022.9789804</text:p>
          </table:table-cell>
          <table:table-cell table:style-name="ce2" table:number-columns-repeated="3"/>
          <table:table-cell table:style-name="ce2" office:value-type="string" calcext:value-type="string">
            <text:p>IEEE Press</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Assessing Architecture Conformance to&amp;nbsp;Coupling-Related Infrastructure-as-Code Best Practices: Metrics and&amp;nbsp;Case Studies</text:p>
          </table:table-cell>
          <table:table-cell table:style-name="ce2" office:value-type="string" calcext:value-type="string">
            <text:p>Ntentos, Evangelos and Zdun, Uwe and Soldani, Jacopo and Brogi, Antonio</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01–116</text:p>
          </table:table-cell>
          <table:table-cell table:style-name="ce2"/>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text:p>
          </table:table-cell>
          <table:table-cell table:style-name="ce2"/>
          <table:table-cell table:style-name="ce2" office:value-type="string" calcext:value-type="string">
            <text:p>10.1007/978-3-031-16697-6_7</text:p>
          </table:table-cell>
          <table:table-cell table:style-name="ce2" office:value-type="string" calcext:value-type="string">
            <text:p>https://doi.org/10.1007/978-3-031-16697-6_7</text:p>
          </table:table-cell>
          <table:table-cell table:style-name="ce2" table:number-columns-repeated="2"/>
          <table:table-cell table:style-name="ce2" office:value-type="string" calcext:value-type="string">
            <text:p>Infrastructure as Code, metrics, software architecture, architecture conformance, IaC best practice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Ferreyra, Nicolas E. Diaz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office:value-type="string" calcext:value-type="string">
            <text:p>https://doi.org/10.1145/3639478.3640022</text:p>
          </table:table-cell>
          <table:table-cell table:style-name="ce2" table:number-columns-repeated="2"/>
          <table:table-cell table:style-name="ce2" office:value-type="string" calcext:value-type="string">
            <text:p>microservices, static analysis, dynamic analysis, software testing, empirical software engine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Duplicated</text:p>
          </table:table-cell>
          <table:table-cell table:number-columns-repeated="1004"/>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 Syst. Softw.</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93</text:p>
          </table:table-cell>
          <table:table-cell table:style-name="ce2" table:number-columns-repeated="2"/>
          <table:table-cell table:style-name="ce2" office:value-type="string" calcext:value-type="string">
            <text:p>10.1016/j.jss.2022.111433</text:p>
          </table:table-cell>
          <table:table-cell table:style-name="ce2" office:value-type="string" calcext:value-type="string">
            <text:p>https://doi.org/10.1016/j.jss.2022.111433</text:p>
          </table:table-cell>
          <table:table-cell table:style-name="ce2" table:number-columns-repeated="2"/>
          <table:table-cell table:style-name="ce2" office:value-type="string" calcext:value-type="string">
            <text:p>Microservice architecture, API design, Domain driven design, Architecture conformance assessment</text:p>
          </table:table-cell>
          <table:table-cell table:style-name="ce2" office:value-type="string" calcext:value-type="string">
            <text:p>Elsevier Science Inc.</text:p>
          </table:table-cell>
          <table:table-cell table:style-name="ce2" office:value-type="string" calcext:value-type="string">
            <text:p>0164-1212</text:p>
          </table:table-cell>
          <table:table-cell table:style-name="ce2" table:number-columns-repeated="3"/>
          <table:table-cell table:style-name="ce2" office:value-type="string" calcext:value-type="string">
            <text:p>Duplicated</text:p>
          </table:table-cell>
          <table:table-cell table:number-columns-repeated="1004"/>
        </table:table-row>
        <table:table-row table:style-name="ro2" table:number-rows-repeated="781">
          <table:table-cell table:number-columns-repeated="1024"/>
        </table:table-row>
        <table:table-row table:style-name="ro3" table:number-rows-repeated="1047736">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T$58"/>
        </table:named-expressions>
      </table:table>
      <table:named-expressions/>
      <table:database-ranges>
        <table:database-range table:name="__Anonymous_Sheet_DB__0" table:target-range-address="Articles.A1:Articles.T5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48" meta:object-count="0"/>
    <meta:generator>LibreOfficeDev/6.0.5.2$Linux_X86_64 LibreOffice_project/</meta:generator>
  </office:meta>
</office:document-meta>
</file>