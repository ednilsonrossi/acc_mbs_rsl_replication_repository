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ibtex_key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ocument_typ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author_keywords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election_criteri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Fast, accurate assembly-level physical verification of 3DIC packages</text:p>
          </table:table-cell>
          <table:table-cell table:style-name="ce2" office:value-type="string" calcext:value-type="string">
            <text:p>Hossam, Nermeen and Ferguson, John</text:p>
          </table:table-cell>
          <table:table-cell table:style-name="ce2"/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table:number-columns-repeated="2"/>
          <table:table-cell table:style-name="ce2" office:value-type="string" calcext:value-type="string">
            <text:p>Advanced packaging techniques are critical to ensuring product</text:p>
            <text:p>performance, function, and cost in the semiconductor industry.</text:p>
            <text:p>Three-dimensional integrated circuits (3DICs) offer the ultimate</text:p>
            <text:p>flexibility in product design. However, they are not without their</text:p>
            <text:p>challenges, bringing packaging technologies to the forefront for</text:p>
            <text:p>innovation. 3DICs contain multiple stacked die that achieve the required</text:p>
            <text:p>connectivity through traces on an interposer, or with special vias or</text:p>
            <text:p>bumps. Independently verifying the physical and connectivity accuracy of</text:p>
            <text:p>these discrete dies and substrates per their process rules does not</text:p>
            <text:p>ensure that the overall 2.5D/3D package assembly is correct, or will</text:p>
            <text:p>perform as expected.</text:p>
            <text:p>The Calibre 3DSTACK electronic design automation (EDA) tool provides</text:p>
            <text:p>fast, accurate, assembly-level verification of diedie or die-interposer</text:p>
            <text:p>interfaces in 3DIC designs. It operates on the interface geometries</text:p>
            <text:p>between chip designs from multiple process nodes to perform both design</text:p>
            <text:p>rule checking (DRC) alignment verification and layout vs. schematic</text:p>
            <text:p>(LVS) connectivity checking of the complete multi-die 2.5D or 3DIC</text:p>
            <text:p>system. Design engineers can also use the Calibre 3DSTACK tool to</text:p>
            <text:p>prepare the data required for coupling capacitance extraction, if</text:p>
            <text:p>required.</text:p>
            <text:p>In this paper, we explain the differences between traditional 3DIC</text:p>
            <text:p>physical verification techniques and Calibre 3DSTACK 3DIC assembly</text:p>
            <text:p>verification, and demonstrate how Calibre 3DSTACK functionality can be</text:p>
            <text:p>used to resolve many of the challenges of 3DIC physical verification</text:p>
            <text:p>while ensuring the accuracy and performance of the complete 3DIC design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3DIC57175.2023.10155000</text:p>
          </table:table-cell>
          <table:table-cell table:style-name="ce2"/>
          <table:table-cell table:style-name="ce2" office:value-type="string" calcext:value-type="string">
            <text:p>Hossam, N (Corresponding Author), Siemens Digital Ind Software, Calibre Design Solut, Cairo, Egypt.</text:p>
            <text:p>Hossam, Nermeen; Ferguson, John, Siemens Digital Ind Software, Calibre Design Solut, Cairo, Egypt.</text:p>
          </table:table-cell>
          <table:table-cell table:style-name="ce2"/>
          <table:table-cell table:style-name="ce2" office:value-type="string" calcext:value-type="string">
            <text:p>3DIC; chiplet; IC; SoC; IP; physical verification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2164-015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IEEE International 3D Systems Integration Conference (3DIC), Univ Coll</text:p>
            <text:p>Cork, Cork, IRELAND, MAY 10-12, 2023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complete design flow for silicon photonics</text:p>
          </table:table-cell>
          <table:table-cell table:style-name="ce2" office:value-type="string" calcext:value-type="string">
            <text:p>Pond, James and Cone, Chris and Chrostowski, Lukas and Klein, Jackson</text:p>
            <text:p>and Flueckiger, Jonas and Liu, Amy and McGuire, Dylan and Wang, Xu</text:p>
          </table:table-cell>
          <table:table-cell table:style-name="ce2"/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ISI Web of Science</text:p>
          </table:table-cell>
          <table:table-cell table:style-name="ce2"/>
          <table:table-cell table:style-name="ce2" office:value-type="string" calcext:value-type="string">
            <text:p>9133</text:p>
          </table:table-cell>
          <table:table-cell table:style-name="ce2" office:value-type="string" calcext:value-type="string">
            <text:p>Broad adoption of silicon photonics technology for photonic integrated</text:p>
            <text:p>circuits requires standardized design flows that are similar to what is</text:p>
            <text:p>available for analog and mixed signal electrical circuit design. We have</text:p>
            <text:p>developed a design flow that combines mature electronic design</text:p>
            <text:p>automation (EDA) software with optical simulation software.</text:p>
            <text:p>An essential component of any design flow, whether electrical or</text:p>
            <text:p>photonic, is the ability to accurately simulate large-scale circuits.</text:p>
            <text:p>This is particularly important when the behavior of the circuit is not</text:p>
            <text:p>trivially related to the individual component performance. While this is</text:p>
            <text:p>clearly the case for electronic circuits consisting of hundreds to</text:p>
            <text:p>billions of transistors, it is already becoming important in photonic</text:p>
            <text:p>circuits such as WDM transmitters, where signal cross talk needs to be</text:p>
            <text:p>considered, as well as optical cross-connect switches. In addition,</text:p>
            <text:p>optical routing to connect different components requires the</text:p>
            <text:p>introduction of additional waveguide sections, waveguide bends, and</text:p>
            <text:p>waveguide crossings, which affect the overall circuit performance.</text:p>
            <text:p>Manufacturing variability can also have dramatic circuit-level</text:p>
            <text:p>consequences that need to be simulated. Circuit simulations must rely on</text:p>
            <text:p>compact models that can accurately represent the behavior of each</text:p>
            <text:p>component, and the compact model parameters must be extracted from</text:p>
            <text:p>physical level simulation and experimental results.</text:p>
            <text:p>We show how large scale circuits can be simulated in both the time and</text:p>
            <text:p>frequency domains, including the effects of bidirectional and, where</text:p>
            <text:p>appropriate, multimode and multichannel photonic waveguides. We also</text:p>
            <text:p>show how active, passive and nonlinear individual components such as</text:p>
            <text:p>grating couplers, waveguides, splitters, filters, electro-optical</text:p>
            <text:p>modulators and detectors can be simulated using a combination of</text:p>
            <text:p>electrical and optical algorithms, and good agreement with experimental</text:p>
            <text:p>results can be obtained. We then show how parameters, with inclusion of</text:p>
            <text:p>fabrication process variations, can be extracted for use in the circuit</text:p>
            <text:p>level simulations. Ultimately, we show how a multi-channel WDM</text:p>
            <text:p>transceiver can be created, from schematic design to tapeout, using key</text:p>
            <text:p>features of EDA design flows such as schematic driven layout, design</text:p>
            <text:p>rule checking and layout versus schematic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17/12.2052050</text:p>
          </table:table-cell>
          <table:table-cell table:style-name="ce2"/>
          <table:table-cell table:style-name="ce2" office:value-type="string" calcext:value-type="string">
            <text:p>Pond, J (Corresponding Author), Lumer Solut Inc, 535 Thurlow St, Vancouver, BC V6E 3L2, Canada.</text:p>
            <text:p>Pond, James; Klein, Jackson; Liu, Amy; McGuire, Dylan; Wang, Xu, Lumer Solut Inc, 535 Thurlow St, Vancouver, BC V6E 3L2, Canada.</text:p>
            <text:p>Cone, Chris, Mentor Graph Corp, Wilsonville, OR 97070 USA.</text:p>
            <text:p>Chrostowski, Lukas, Univ British Columbia, Electr \&amp; Comp Engn, Vancouver, BC V6T IZ4, Canada.</text:p>
          </table:table-cell>
          <table:table-cell table:style-name="ce2"/>
          <table:table-cell table:style-name="ce2" office:value-type="string" calcext:value-type="string">
            <text:p>photonics; simulation; silicon photonics; photonic integrated circuits;</text:p>
            <text:p>electronic design automation (EDA); design flow; process design kit</text:p>
            <text:p>(PDK); photonic circuit simulation</text:p>
          </table:table-cell>
          <table:table-cell table:style-name="ce2" office:value-type="string" calcext:value-type="string">
            <text:p>SPIE-INT SOC OPTICAL ENGINEERING</text:p>
          </table:table-cell>
          <table:table-cell table:style-name="ce2" office:value-type="string" calcext:value-type="string">
            <text:p>0277-786X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4th Conference on Silicon Photonics and Photonic Integrated Circuits,</text:p>
            <text:p>Brussels, BELGIUM, APR 14-17, 2014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DRC Violation Prediction After Global Route Through Convolutional Neural</text:p>
            <text:p>Network</text:p>
          </table:table-cell>
          <table:table-cell table:style-name="ce2" office:value-type="string" calcext:value-type="string">
            <text:p>Hung, Wei-Tse and Chen, Yu-Guang and Lin, Jhen-Gang and Yang, Yun-Wei</text:p>
            <text:p>and Tsai, Cheng-Hong and Chao, Mango Chia-Tso</text:p>
          </table:table-cell>
          <table:table-cell table:style-name="ce2" office:value-type="string" calcext:value-type="string">
            <text:p>IEEE TRANSACTIONS ON VERY LARGE SCALE INTEGRATION (VLSI) SYSTEMS</text:p>
          </table:table-cell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425-1438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Design rule checking (DRC) violation (DRV) prediction with early stage</text:p>
            <text:p>design information can help to reduce the iterations of design procedure</text:p>
            <text:p>and can speed up the physical-design closure. It is known that</text:p>
            <text:p>accurately predicting detailed routing-level DRV with information</text:p>
            <text:p>obtained at global route (GR) stage can significantly speed up the</text:p>
            <text:p>design closure. However, without sufficient prediction accuracy, the</text:p>
            <text:p>result may lead to suboptimal design or even longer design time.</text:p>
            <text:p>Therefore, in this article, we propose two machine-learning frameworks</text:p>
            <text:p>to predict the detailed routing-level DRV map of a given design. The</text:p>
            <text:p>first framework is based on the congestion report obtained at global</text:p>
            <text:p>routing stage, and the second framework considers both the placement</text:p>
            <text:p>information and the congestion report of global routing. We then compare</text:p>
            <text:p>the runtime and accuracy of the two models. The proposed frameworks</text:p>
            <text:p>utilize convolutional neural network as the core technique to train</text:p>
            <text:p>these prediction models. The training dataset is collected from 15</text:p>
            <text:p>industrial designs using a leading commercial automatic placement and</text:p>
            <text:p>routing (APR) tool, and the total number of collected training samples</text:p>
            <text:p>exceeds 26M. A specialized under-sampling technique is also proposed to</text:p>
            <text:p>select important training samples for learning, compensate for the</text:p>
            <text:p>inaccuracy misled by a highly imbalanced training dataset, and speed up</text:p>
            <text:p>the entire training process. The experimental results demonstrate that</text:p>
            <text:p>our both models can result in not only a significantly higher accuracy</text:p>
            <text:p>than previous related works, but also a DRV map visually matching the</text:p>
            <text:p>actual ones closely. The average runtime of using our learned model from</text:p>
            <text:p>the first framework to generate a DRV map is only 3\% of global routing,</text:p>
            <text:p>and the prediction accuracy of our learned model from the second</text:p>
            <text:p>framework can improve 7.6\% compared to the one from the first</text:p>
            <text:p>framework. Our proposed framework can be viewed as a simple add-on tool</text:p>
            <text:p>to a current commercial placement and global router that can efficiently</text:p>
            <text:p>and effectively generate a more realistic DRV map without really</text:p>
            <text:p>applying detailed routing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109/TVLSI.2023.3271932</text:p>
          </table:table-cell>
          <table:table-cell table:style-name="ce2"/>
          <table:table-cell table:style-name="ce2" office:value-type="string" calcext:value-type="string">
            <text:p>Chen, YG (Corresponding Author), Natl Cent Univ, Dept Elect Engn, Taoyuan 32001, Taiwan.</text:p>
            <text:p>Hung, Wei-Tse; Lin, Jhen-Gang; Chao, Mango Chia-Tso, Natl Yang Ming Chiao Tung Univ, Inst Elect, Hsinchu 300, Taiwan.</text:p>
            <text:p>Chen, Yu-Guang; Yang, Yun-Wei, Natl Cent Univ, Dept Elect Engn, Taoyuan 32001, Taiwan.</text:p>
            <text:p>Tsai, Cheng-Hong, Global Unichip Corp, Hsinchu 300, Taiwan.</text:p>
          </table:table-cell>
          <table:table-cell table:style-name="ce2"/>
          <table:table-cell table:style-name="ce2" office:value-type="string" calcext:value-type="string">
            <text:p>Design rule checking (DRC); neural networks; physical design (EDA);</text:p>
            <text:p>physical verification; supervised learning by classification</text:p>
          </table:table-cell>
          <table:table-cell table:style-name="ce2" office:value-type="string" calcext:value-type="string">
            <text:p>IEEE-INST ELECTRICAL ELECTRONICS ENGINEERS INC</text:p>
          </table:table-cell>
          <table:table-cell table:style-name="ce2" office:value-type="string" calcext:value-type="string">
            <text:p>1063-8210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dvanced manufacturing rules check (MRC) for fully-automated assessment</text:p>
            <text:p>of complex reticle designs - Part II</text:p>
          </table:table-cell>
          <table:table-cell table:style-name="ce2" office:value-type="string" calcext:value-type="string">
            <text:p>Straub, J. A. and Aguilar, D. and Buck, P. D. and Dawkins, D. and</text:p>
            <text:p>Gladhill, R. and Nolke, S. and Riddick, J.</text:p>
          </table:table-cell>
          <table:table-cell table:style-name="ce2"/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ISI Web of Science</text:p>
          </table:table-cell>
          <table:table-cell table:style-name="ce2"/>
          <table:table-cell table:style-name="ce2" office:value-type="string" calcext:value-type="string">
            <text:p>6349</text:p>
          </table:table-cell>
          <table:table-cell table:style-name="ce2" office:value-type="string" calcext:value-type="string">
            <text:p>Advanced electronic design automation (EDA) tools, with their</text:p>
            <text:p>simulation, modeling, design rule checking, and optical proximity</text:p>
            <text:p>correction capabilities, have facilitated the improvement of first pass</text:p>
            <text:p>wafer yields. While the data produced by these tools may have been</text:p>
            <text:p>processed for optimal wafer manufacturing, it is possible for the same</text:p>
            <text:p>data to be far from ideal for photomask manufacturing, particularly at</text:p>
            <text:p>lithography and inspection stages, resulting in production delays and</text:p>
            <text:p>increased costs. The same EDA tools used to produce the data can be used</text:p>
            <text:p>to detect potential problems for photomask manufacturing in the data.</text:p>
            <text:p>In the previous paper(1), it was shown how photomask MRC is used to</text:p>
            <text:p>uncover data related problems prior to automated defect inspection. It</text:p>
            <text:p>was demonstrated how jobs which are likely to have problems at</text:p>
            <text:p>inspection could be identified and separated from those which are not.</text:p>
            <text:p>The use of photomask MRC in production was shown to reduce time lost to</text:p>
            <text:p>aborted runs and troubleshooting due to data issues.</text:p>
            <text:p>In this paper, the effectiveness of this photomask MRC program in a high</text:p>
            <text:p>volume photomask factory over the course of a year as applied to more</text:p>
            <text:p>than ten thousand jobs will be shown. Statistics on the results of the</text:p>
            <text:p>MRC runs will be presented along with the associated impact to the</text:p>
            <text:p>automated defect inspection process. Common design problems will be</text:p>
            <text:p>shown as well as their impact to mask manufacturing throughput and</text:p>
            <text:p>productivity. Finally, solutions to the most common and most severe</text:p>
            <text:p>problems will be offered and discussed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17/12.686134</text:p>
          </table:table-cell>
          <table:table-cell table:style-name="ce2"/>
          <table:table-cell table:style-name="ce2" office:value-type="string" calcext:value-type="string">
            <text:p>Straub, JA (Corresponding Author), Toppan Photomasks Inc, 400 Texas Ave, Round Rock, TX 78664 USA.</text:p>
            <text:p>Straub, J. A.; Aguilar, D.; Dawkins, D.; Riddick, J., Toppan Photomasks Inc, 400 Texas Ave, Round Rock, TX 78664 USA.</text:p>
            <text:p>Buck, P. D.; Gladhill, R.; Nolke, S., Toppan Photomasks Inc, Gresham, OR 97030 USA.</text:p>
          </table:table-cell>
          <table:table-cell table:style-name="ce2"/>
          <table:table-cell table:style-name="ce2" office:value-type="string" calcext:value-type="string">
            <text:p>manufacturing rules check; MRC; mask data inspection; mask data</text:p>
            <text:p>preparation; defect inspection; design for manufacturing</text:p>
          </table:table-cell>
          <table:table-cell table:style-name="ce2" office:value-type="string" calcext:value-type="string">
            <text:p>SPIE-INT SOC OPTICAL ENGINEERING</text:p>
          </table:table-cell>
          <table:table-cell table:style-name="ce2" office:value-type="string" calcext:value-type="string">
            <text:p>0277-786X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6th Annual BACUS Symposium on Photomask Technology, Monterey, CA, SEP</text:p>
            <text:p>19-22, 2006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MCFRoute 2.0: A Redundant Via Insertion Enhanced Concurrent Detailed</text:p>
            <text:p>Router</text:p>
          </table:table-cell>
          <table:table-cell table:style-name="ce2" office:value-type="string" calcext:value-type="string">
            <text:p>Jia, Xiaotao and Cai, Yici and Zhou, Qiang and Yu, Bei</text:p>
          </table:table-cell>
          <table:table-cell table:style-name="ce2"/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87-92</text:p>
          </table:table-cell>
          <table:table-cell table:style-name="ce2"/>
          <table:table-cell table:style-name="ce2" office:value-type="string" calcext:value-type="string">
            <text:p>In modern VLSI design, manufacturing yield and chip performance are</text:p>
            <text:p>seriously affected by via failure. Redundant via insertion is an</text:p>
            <text:p>effective technique recommended by foundries to deal with the via</text:p>
            <text:p>failure. However, due to the extreme scaling of feature size, it is more</text:p>
            <text:p>and more difficult to resolve redundant via insertion (RVI) with limited</text:p>
            <text:p>routing resource while obeying complicated design rules. In this paper,</text:p>
            <text:p>we propose an RVI enhanced concurrent detailed router, MCFRoute 2.0,</text:p>
            <text:p>which effectively avoids design rule violations through a compact</text:p>
            <text:p>integer linear programming (ILP) model. The proposed router can not only</text:p>
            <text:p>route all nets simultaneously but also search for redundant via</text:p>
            <text:p>positions for all via simultaneously during routing stage. In addition,</text:p>
            <text:p>it proposes an RVI aware pin access allocation to further improve the</text:p>
            <text:p>routing performance. Experimental results show that our detailed router</text:p>
            <text:p>outperforms an industry EDA tool that it improves the redundant via</text:p>
            <text:p>insertion rate by 21\%, while reducing design rule checking violation</text:p>
            <text:p>count, total wire length and via count by 47\%, 4\% and 14\%,</text:p>
            <text:p>respectively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45/2902961.2902966</text:p>
          </table:table-cell>
          <table:table-cell table:style-name="ce2"/>
          <table:table-cell table:style-name="ce2" office:value-type="string" calcext:value-type="string">
            <text:p>Jia, XT (Corresponding Author), Tsinghua Univ, Dept Comp Sci Technol, Beijing, Peoples R China.</text:p>
            <text:p>Jia, XT (Corresponding Author), Chinese Univ Hong Kong, CSE Dept, Hong Kong, NT, Peoples R China.</text:p>
            <text:p>Jia, Xiaotao; Cai, Yici; Zhou, Qiang, Tsinghua Natl Lab, Informat Sci \&amp; Technol, Beijing, Peoples R China.</text:p>
            <text:p>Jia, Xiaotao; Cai, Yici; Zhou, Qiang, Tsinghua Univ, Dept Comp Sci Technol, Beijing, Peoples R China.</text:p>
            <text:p>Jia, Xiaotao; Yu, Bei, Chinese Univ Hong Kong, CSE Dept, Hong Kong, NT, Peoples R China.</text:p>
          </table:table-cell>
          <table:table-cell table:style-name="ce2"/>
          <table:table-cell table:style-name="ce2" office:value-type="string" calcext:value-type="string">
            <text:p>Detailed Routing; ILP; Redundant Via Insertion; Design Rule</text:p>
          </table:table-cell>
          <table:table-cell table:style-name="ce2" office:value-type="string" calcext:value-type="string">
            <text:p>IEEE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6th ACM Great Lakes Symposium on VLSI (GLSVLSI), Boston Univ, Dept </text:p>
            <text:p>Elect \&amp; Comp Engn, Boston, MA, MAY 18-20, 2016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ssessing Architecture Conformance to Security-Related Practices in</text:p>
            <text:p>Infrastructure as Code Based Deployments</text:p>
          </table:table-cell>
          <table:table-cell table:style-name="ce2" office:value-type="string" calcext:value-type="string">
            <text:p>Ntentos, Evangelos and Zdun, Uwe and Falazi, Ghareeb and Breitenbuecher,</text:p>
            <text:p>Uwe and Leymann, Frank</text:p>
          </table:table-cell>
          <table:table-cell table:style-name="ce2"/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23-133</text:p>
          </table:table-cell>
          <table:table-cell table:style-name="ce2"/>
          <table:table-cell table:style-name="ce2" office:value-type="string" calcext:value-type="string">
            <text:p>Infrastructure as Code (IaC) enables developers and operations teams to</text:p>
            <text:p>automatically deploy and manage an IT infrastructure via software. Among</text:p>
            <text:p>other uses, IaC is widely used in the context of continuously released</text:p>
            <text:p>deployments such as those of microservice and other cloud-based systems.</text:p>
            <text:p>Although IaC-based deployments have been utilized by many companies,</text:p>
            <text:p>there are no approaches on checking their conformance to architectural</text:p>
            <text:p>aspects yet. In this paper, we focus on security-related practices</text:p>
            <text:p>including observability, access control, and traffic control in</text:p>
            <text:p>IaC-based deployments. While best practices for this topic have been</text:p>
            <text:p>documented in some gray literature sources such as practitioners' blogs</text:p>
            <text:p>and public repositories, approaches enabling automated checking of</text:p>
            <text:p>conformance to such best practices do not yet exist. We propose a</text:p>
            <text:p>model-based approach based on generic, technology-independent metrics,</text:p>
            <text:p>tied to typical architectural design decisions on IaC-based deployments.</text:p>
            <text:p>With this approach, we can measure conformance to security-related</text:p>
            <text:p>practices. We demonstrate and assess the validity and appropriateness of</text:p>
            <text:p>these metrics in assessing a system's conformance to practices through</text:p>
            <text:p>regression analysi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SCC55611.2022.00029</text:p>
          </table:table-cell>
          <table:table-cell table:style-name="ce2"/>
          <table:table-cell table:style-name="ce2" office:value-type="string" calcext:value-type="string">
            <text:p>Ntentos, E (Corresponding Author), Univ Vienna, Fac Comp Sci, Res Grp Software Architecture, Vienna, Austria.</text:p>
            <text:p>Ntentos, Evangelos; Zdun, Uwe, Univ Vienna, Fac Comp Sci, Res Grp Software Architecture, Vienna, Austria.</text:p>
            <text:p>Falazi, Ghareeb; Breitenbuecher, Uwe; Leymann, Frank, Univ Stuttgart, Inst Architecture Applicat Syst, Stuttgart, Germany.</text:p>
          </table:table-cell>
          <table:table-cell table:style-name="ce2"/>
          <table:table-cell table:style-name="ce2" office:value-type="string" calcext:value-type="string">
            <text:p>Infrastructure as code; metrics; software architecture; modeling; best</text:p>
            <text:p>practices</text:p>
          </table:table-cell>
          <table:table-cell table:style-name="ce2" office:value-type="string" calcext:value-type="string">
            <text:p>IEEE COMPUTER SOC</text:p>
          </table:table-cell>
          <table:table-cell table:style-name="ce2" office:value-type="string" calcext:value-type="string">
            <text:p>2474-813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IEEE International Conference on Services Computing (IEEE SCC),</text:p>
            <text:p>Barcelona, SPAIN, JUL 11-15, 2022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Framework for the Generation of Monitor and Plant Model From Event</text:p>
            <text:p>Logs Using Process Mining for Formal Verification of Event-Driven</text:p>
            <text:p>Systems</text:p>
          </table:table-cell>
          <table:table-cell table:style-name="ce2" office:value-type="string" calcext:value-type="string">
            <text:p>Xavier, Midhun and Dubinin, Victor and Patil, Sandeep and Vyatkin,</text:p>
            <text:p>Valeriy</text:p>
          </table:table-cell>
          <table:table-cell table:style-name="ce2" office:value-type="string" calcext:value-type="string">
            <text:p>IEEE OPEN JOURNAL OF THE INDUSTRIAL ELECTRONICS SOCIETY</text:p>
          </table:table-cell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517-53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This article proposes a method for the automatic generation of a plant</text:p>
            <text:p>model and monitoring using process mining algorithms based on recorded</text:p>
            <text:p>event logs. The behavioral traces of the system are captured by</text:p>
            <text:p>recording event logs during plant operation in either manual control</text:p>
            <text:p>mode or with an automatic controller. Process discovery algorithms are</text:p>
            <text:p>then applied to extract the logic of the process behavior properties</text:p>
            <text:p>from the recorded event logs. The result is represented as a Petri net,</text:p>
            <text:p>which is used to construct the state machine of the plant model and</text:p>
            <text:p>monitor and is in accordance with the IEC 61499 Standard. The monitor is</text:p>
            <text:p>implemented as a function block and can be deployed in real time to</text:p>
            <text:p>trigger an error signal whenever there is a deviation from the actual</text:p>
            <text:p>process scenario. The plant model and controller are connected in a</text:p>
            <text:p>closed loop and are used for the formal verification of the system with</text:p>
            <text:p>the help of the ``fb2smv{''} converter and symbolic model checking tool</text:p>
            <text:p>NuSMV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109/OJIES.2024.3406059</text:p>
          </table:table-cell>
          <table:table-cell table:style-name="ce2"/>
          <table:table-cell table:style-name="ce2" office:value-type="string" calcext:value-type="string">
            <text:p>Vyatkin, V (Corresponding Author), Aalto Univ, Helsinki 02150, Finland.</text:p>
            <text:p>Xavier, Midhun, Lulea Univ Technol, dependable Commun \&amp; computat Syst, Lulea, Sweden.</text:p>
            <text:p>Dubinin, Victor; Patil, Sandeep; Vyatkin, Valeriy, Lulea Univ Technol, Lulea, Sweden.</text:p>
            <text:p>Vyatkin, Valeriy, Aalto Univ, Helsinki 02150, Finland.</text:p>
          </table:table-cell>
          <table:table-cell table:style-name="ce2"/>
          <table:table-cell table:style-name="ce2" office:value-type="string" calcext:value-type="string">
            <text:p>IEC 61499; formal verification; plant model generation; process mining</text:p>
          </table:table-cell>
          <table:table-cell table:style-name="ce2" office:value-type="string" calcext:value-type="string">
            <text:p>IEEE-INST ELECTRICAL ELECTRONICS ENGINEERS INC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Feasibility Prediction for Rapid IC Design Space Exploration</text:p>
          </table:table-cell>
          <table:table-cell table:style-name="ce2" office:value-type="string" calcext:value-type="string">
            <text:p>Islam, Riadul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/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The DARPA POSH program echoes with the research community and identifies</text:p>
            <text:p>that engineering productivity has fallen behind Moore's law, resulting</text:p>
            <text:p>in the prohibitive increase in IC design cost at leading technology</text:p>
            <text:p>nodes. The primary reason is that it requires many computing resources,</text:p>
            <text:p>expensive tools, and even many days to complete a design implementation.</text:p>
            <text:p>However, at the end of this process, some designs could not meet the</text:p>
            <text:p>design constraints and become unroutable, creating a vicious circuit</text:p>
            <text:p>design cycle. As a result, designers have to re-run the whole process</text:p>
            <text:p>after design modification. This research applied a machine learning</text:p>
            <text:p>approach to automatically identify design constraints and design rule</text:p>
            <text:p>checking (DRC) violation issues and help the designer identify design</text:p>
            <text:p>constraints with optimal DRCs before the long detailed routing process</text:p>
            <text:p>through iterative greedy search. The proposed algorithm achieved up to</text:p>
            <text:p>99.99\% design constraint prediction accuracy and reduced 98.4\% DRC</text:p>
            <text:p>violations with only a 6.9\% area penalty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3390/electronics11071161</text:p>
          </table:table-cell>
          <table:table-cell table:style-name="ce2"/>
          <table:table-cell table:style-name="ce2" office:value-type="string" calcext:value-type="string">
            <text:p>Islam, R (Corresponding Author), Univ Maryland Baltimore Cty, Dept Comp Sci \&amp; Elect Engn, Baltimore, MD 21250 USA.</text:p>
            <text:p>Islam, Riadul, Univ Maryland Baltimore Cty, Dept Comp Sci \&amp; Elect Engn, Baltimore, MD 21250 USA.</text:p>
          </table:table-cell>
          <table:table-cell table:style-name="ce2"/>
          <table:table-cell table:style-name="ce2" office:value-type="string" calcext:value-type="string">
            <text:p>design rule check; electronic design automation (EDA); decision tree; IC</text:p>
            <text:p>design; design constraints</text:p>
          </table:table-cell>
          <table:table-cell table:style-name="ce2" office:value-type="string" calcext:value-type="string">
            <text:p>MDPI</text:p>
          </table:table-cell>
          <table:table-cell table:style-name="ce2" office:value-type="string" calcext:value-type="string">
            <text:p>2079-9292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Increased reliability in SOA environments through registry-based</text:p>
            <text:p>conformance testing of Web services</text:p>
          </table:table-cell>
          <table:table-cell table:style-name="ce2" office:value-type="string" calcext:value-type="string">
            <text:p>Kourtesis, D. and Ramollari, E. and Dranidis, D. and Paraskakis, I.</text:p>
          </table:table-cell>
          <table:table-cell table:style-name="ce2" office:value-type="string" calcext:value-type="string">
            <text:p>PRODUCTION PLANNING \&amp; CONTROL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30-144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Organisations wishing to engage in industrial collaborative networks</text:p>
            <text:p>will typically seek some guarantees concerning the reliability of their</text:p>
            <text:p>prospective partners before committing to cooperation. Evaluating</text:p>
            <text:p>reliability can encompass several aspects, but one of the most crucial</text:p>
            <text:p>things to consider from a cooperation perspective is whether the</text:p>
            <text:p>software systems that support the business processes of some</text:p>
            <text:p>collaborator actually behave as expected. For organisations that rely on</text:p>
            <text:p>a service-oriented computing infrastructure, this amounts to checking</text:p>
            <text:p>whether the functionality of the respective services is conformant to a</text:p>
            <text:p>given behavioural specification. Today's state of the art lacks</text:p>
            <text:p>standardised methods for creating behavioural specifications of Web</text:p>
            <text:p>services, and also lacks tools for automating the process of behavioural</text:p>
            <text:p>conformance checking through testing. This paper presents a concrete</text:p>
            <text:p>method for creating formal specifications of Web service behaviour and</text:p>
            <text:p>utilising them within service registries for automated testing of</text:p>
            <text:p>service implementations in order to verify and certify their</text:p>
            <text:p>conformance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080/09537280903441922</text:p>
          </table:table-cell>
          <table:table-cell table:style-name="ce2"/>
          <table:table-cell table:style-name="ce2" office:value-type="string" calcext:value-type="string">
            <text:p>Kourtesis, D (Corresponding Author), Univ Sheffield, Res Ctr, SEERC, 24 Proxenou Koromila Str, Thessaloniki 54622, Greece.</text:p>
            <text:p>Kourtesis, D.; Ramollari, E.; Dranidis, D.; Paraskakis, I., Univ Sheffield, Res Ctr, SEERC, Thessaloniki 54622, Greece.</text:p>
            <text:p>Kourtesis, D.; Ramollari, E.; Dranidis, D.; Paraskakis, I., CITY Coll, Thessaloniki 54622, Greece.</text:p>
            <text:p>Dranidis, D., Univ Sheffield, Int Fac, Dept Comp Sci, CITY Coll, Thessaloniki 54626, Greece.</text:p>
          </table:table-cell>
          <table:table-cell table:style-name="ce2"/>
          <table:table-cell table:style-name="ce2" office:value-type="string" calcext:value-type="string">
            <text:p>Web services; registry; behavioural conformance; testing</text:p>
          </table:table-cell>
          <table:table-cell table:style-name="ce2" office:value-type="string" calcext:value-type="string">
            <text:p>TAYLOR \&amp; FRANCIS LTD</text:p>
          </table:table-cell>
          <table:table-cell table:style-name="ce2" office:value-type="string" calcext:value-type="string">
            <text:p>0953-7287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PROS 2.0: A Plug-In for Routability Optimization and Routed Wirelength</text:p>
            <text:p>Estimation Using Deep Learning</text:p>
          </table:table-cell>
          <table:table-cell table:style-name="ce2" office:value-type="string" calcext:value-type="string">
            <text:p>Chen, Jingsong and Kuang, Jian and Zhao, Guowei and Huang, Dennis J. -H.</text:p>
            <text:p>and Young, Evangeline F. Y.</text:p>
          </table:table-cell>
          <table:table-cell table:style-name="ce2" office:value-type="string" calcext:value-type="string">
            <text:p>IEEE TRANSACTIONS ON COMPUTER-AIDED DESIGN OF INTEGRATED CIRCUITS AND</text:p>
            <text:p>SYSTEMS</text:p>
          </table:table-cell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64-177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Recently, the topic of how to utilize prior knowledge obtained by</text:p>
            <text:p>machine-learning (ML) techniques during the EDA flow has been widely</text:p>
            <text:p>studied. In this article, we study this topic and propose a practical</text:p>
            <text:p>plug-in named PROS for both routability optimization and routed</text:p>
            <text:p>wirelength estimation which can be applied in the state-of-the-art</text:p>
            <text:p>commercial EDA tool or an academic EDA flow with negligible runtime</text:p>
            <text:p>overhead. PROS consists of three parts: 1) an effective fully</text:p>
            <text:p>convolutional network (FCN)-based predictor that only utilizes the data</text:p>
            <text:p>from placement result to forecast global routing (GR) congestion; 2) a</text:p>
            <text:p>parameter optimizer that can reasonably adjust GR cost parameters based</text:p>
            <text:p>on the prediction result to generate a better GR solution for detailed</text:p>
            <text:p>routing (DR); and 3) a convolutional neural network (CNN)-based</text:p>
            <text:p>wirelength estimator which can report accurate routed wirelength at the</text:p>
            <text:p>placement stage by using the predicted GR congestion. Experiments show</text:p>
            <text:p>that on the industrial benchmark suite in the advanced technology node,</text:p>
            <text:p>PROS can achieve high accuracy of GR congestion prediction and</text:p>
            <text:p>significantly reduce design rule checking (DRC) violations by 11.65\% on</text:p>
            <text:p>average, and on the DAC-2012 benchmark suite, PROS can achieve a very</text:p>
            <text:p>low error rate (1.82\%) for wirelength estimation which greatly</text:p>
            <text:p>outperforms that of FLUTE (21.52\%) by 19.70\%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109/TCAD.2022.3168259</text:p>
          </table:table-cell>
          <table:table-cell table:style-name="ce2"/>
          <table:table-cell table:style-name="ce2" office:value-type="string" calcext:value-type="string">
            <text:p>Chen, JS (Corresponding Author), Chinese Univ Hong Kong, Dept Comp Sci \&amp; Engn, Hong Kong, Peoples R China.</text:p>
            <text:p>Chen, Jingsong; Young, Evangeline F. Y., Chinese Univ Hong Kong, Dept Comp Sci \&amp; Engn, Hong Kong, Peoples R China.</text:p>
            <text:p>Kuang, Jian; Zhao, Guowei; Huang, Dennis J. -H., Cadence Design Syst, Digital \&amp; Signoff Grp, San Jose, CA 95134 USA.</text:p>
          </table:table-cell>
          <table:table-cell table:style-name="ce2"/>
          <table:table-cell table:style-name="ce2" office:value-type="string" calcext:value-type="string">
            <text:p>Circuit optimization; design automation; deep learning; routing</text:p>
          </table:table-cell>
          <table:table-cell table:style-name="ce2" office:value-type="string" calcext:value-type="string">
            <text:p>IEEE-INST ELECTRICAL ELECTRONICS ENGINEERS INC</text:p>
          </table:table-cell>
          <table:table-cell table:style-name="ce2" office:value-type="string" calcext:value-type="string">
            <text:p>0278-0070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Pre-Global Routing DRC Violation Prediction Using Unsupervised Learning</text:p>
          </table:table-cell>
          <table:table-cell table:style-name="ce2" office:value-type="string" calcext:value-type="string">
            <text:p>Islam, Riadul and Challagundla, Dhandeep</text:p>
          </table:table-cell>
          <table:table-cell table:style-name="ce2"/>
          <table:table-cell table:style-name="ce2" office:value-type="string" calcext:value-type="string">
            <text:p>2025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450-454</text:p>
          </table:table-cell>
          <table:table-cell table:style-name="ce2"/>
          <table:table-cell table:style-name="ce2" office:value-type="string" calcext:value-type="string">
            <text:p>Leveraging artificial intelligence (AI)-driven electronic design and</text:p>
            <text:p>automation (EDA) tools, high-performance computing, and parallelized</text:p>
            <text:p>algorithms are essential for next-generation microprocessor innovation,</text:p>
            <text:p>ensuring continued progress in computing, AI, and semiconductor</text:p>
            <text:p>technology. Machine learning-based design rule checking (DRC) and</text:p>
            <text:p>lithography hotspot detection can improve first-pass silicon success.</text:p>
            <text:p>However, conventional ML and neural network (NN)-based models use</text:p>
            <text:p>supervised learning and require a large balanced dataset (in terms of</text:p>
            <text:p>positive and negative classes) and training time. This research</text:p>
            <text:p>addresses those key challenges by proposing the first-ever unsupervised</text:p>
            <text:p>DRC violation prediction methodology. The proposed model can be built</text:p>
            <text:p>using any unbalanced dataset using only one class and set a threshold</text:p>
            <text:p>for it, then fitting any new data querying if they are within the</text:p>
            <text:p>boundary of the model for classification. This research verified the</text:p>
            <text:p>proposed model by implementing different computational cores using CMOS</text:p>
            <text:p>28 nm technology and Synopsys Design Compiler and IC Compiler II tools.</text:p>
            <text:p>Then, layouts were divided into virtual grids to collect about 60k data</text:p>
            <text:p>for analysis and verification. The proposed method has 99.95\%</text:p>
            <text:p>prediction test accuracy, while the existing support vector machine</text:p>
            <text:p>(SVM) and neural network (NN) models have 85.44\% and 98.74\% accuracy,</text:p>
            <text:p>respectively. In addition, the proposed methodology has about 26.3x and</text:p>
            <text:p>up to 6003x lower training times compared to SVM and NN-models,</text:p>
            <text:p>respectively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NEWCAS64648.2025.11107147</text:p>
          </table:table-cell>
          <table:table-cell table:style-name="ce2"/>
          <table:table-cell table:style-name="ce2" office:value-type="string" calcext:value-type="string">
            <text:p>Islam, R (Corresponding Author), Univ Maryland Baltimore Cty, Dept Comp Sci \&amp; Elect Engn, Baltimore, MD 21228 USA.</text:p>
            <text:p>Islam, Riadul; Challagundla, Dhandeep, Univ Maryland Baltimore Cty, Dept Comp Sci \&amp; Elect Engn, Baltimore, MD 21228 USA.</text:p>
          </table:table-cell>
          <table:table-cell table:style-name="ce2"/>
          <table:table-cell table:style-name="ce2" office:value-type="string" calcext:value-type="string">
            <text:p>Machine learning; Layout; Unsupervised learning; Physical design flow;</text:p>
            <text:p>Design Rule Checking (DRC); Neural networks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2472-467X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3rd Interregional NEWCAS Conference-NEWCAS, FRANCE, JUN 22-25, 2025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Enhancing extensibility of the design rule checker of an EDA tool by</text:p>
            <text:p>object-oriented modeling</text:p>
          </table:table-cell>
          <table:table-cell table:style-name="ce2" office:value-type="string" calcext:value-type="string">
            <text:p>Khwaja, AA</text:p>
          </table:table-cell>
          <table:table-cell table:style-name="ce2"/>
          <table:table-cell table:style-name="ce2" office:value-type="string" calcext:value-type="string">
            <text:p>1997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04-108</text:p>
          </table:table-cell>
          <table:table-cell table:style-name="ce2"/>
          <table:table-cell table:style-name="ce2" office:value-type="string" calcext:value-type="string">
            <text:p>Design rule checking systems are an integral part of electronic design</text:p>
            <text:p>automation toots. Rapid advances and continuous change in the</text:p>
            <text:p>semi-conductor technology requires that these DRC systems also change</text:p>
            <text:p>accordingly. This paper presents the architecture and mechanism of the</text:p>
            <text:p>DRC module of an IC package design toot. Design goals were identified</text:p>
            <text:p>far the module to allow easy addition, removal, and modification of</text:p>
            <text:p>rules and to minimize the effect of changes among others.</text:p>
            <text:p>Object-oriented modeling technique facilitates in the accomplishment of</text:p>
            <text:p>these goats by supporting concepts such as abstraction, encapsulation,</text:p>
            <text:p>inheritance, and dynamic binding. The paper puts these concepts in</text:p>
            <text:p>perspective within the context of the architecture and mechanism of the</text:p>
            <text:p>DRC module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CMPSAC.1997.624771</text:p>
          </table:table-cell>
          <table:table-cell table:style-name="ce2"/>
          <table:table-cell table:style-name="ce2" office:value-type="string" calcext:value-type="string">
            <text:p>Khwaja, AA (Corresponding Author), INTEL CORP,5000 W CHANDLER BLVD,CHANDLER,AZ 85226, USA.</text:p>
          </table:table-cell>
          <table:table-cell table:style-name="ce2" table:number-columns-repeated="2"/>
          <table:table-cell table:style-name="ce2" office:value-type="string" calcext:value-type="string">
            <text:p>I E E E, COMPUTER SOC PRESS</text:p>
          </table:table-cell>
          <table:table-cell table:style-name="ce2" office:value-type="string" calcext:value-type="string">
            <text:p>0730-315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1st Annual International Computer Software and Applications Conference</text:p>
            <text:p>(COMPSAC 97), WASHINGTON, DC, AUG 13-15, 1997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utomatic Component Protocol Generation and Verification of Components</text:p>
          </table:table-cell>
          <table:table-cell table:style-name="ce2" office:value-type="string" calcext:value-type="string">
            <text:p>Both, Andreas and Richter, Dirk</text:p>
          </table:table-cell>
          <table:table-cell table:style-name="ce2"/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94-101</text:p>
          </table:table-cell>
          <table:table-cell table:style-name="ce2"/>
          <table:table-cell table:style-name="ce2" office:value-type="string" calcext:value-type="string">
            <text:p>In several works a method was suggested to overcome the lack of</text:p>
            <text:p>signature-based composition currently enabled in component-based and</text:p>
            <text:p>service-oriented architectures (SOA). Several approaches allow to encode</text:p>
            <text:p>non-functional properties of a single component in a contract (component</text:p>
            <text:p>protocol) where the remote calls to a component are taken into</text:p>
            <text:p>consideration. Component protocols ensures that bugs or unsafe behavior</text:p>
            <text:p>caused interaction sequences are obeyed. Encoding business rules works</text:p>
            <text:p>fine as these contracts can be derived from human knowledge only and</text:p>
            <text:p>have to be defined manually, too.</text:p>
            <text:p>In this work we will show, how such unsafe behavior within source code</text:p>
            <text:p>can be discovered and prevented by automatic component protocol</text:p>
            <text:p>generation and model checking technique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SEAA.2010.30</text:p>
          </table:table-cell>
          <table:table-cell table:style-name="ce2"/>
          <table:table-cell table:style-name="ce2" office:value-type="string" calcext:value-type="string">
            <text:p>Both, A (Corresponding Author), Univ Halle, Inst Comp Sci, D-06120 Halle, Saale, Germany.</text:p>
            <text:p>Both, Andreas; Richter, Dirk, Univ Halle, Inst Comp Sci, D-06120 Halle, Saale, Germany.</text:p>
          </table:table-cell>
          <table:table-cell table:style-name="ce2"/>
          <table:table-cell table:style-name="ce2" office:value-type="string" calcext:value-type="string">
            <text:p>component-based software engineering; protocol generation; protocol</text:p>
            <text:p>conformance checking; verification; model checking; component</text:p>
            <text:p>composition</text:p>
          </table:table-cell>
          <table:table-cell table:style-name="ce2" office:value-type="string" calcext:value-type="string">
            <text:p>IEEE COMPUTER SOC</text:p>
          </table:table-cell>
          <table:table-cell table:style-name="ce2" office:value-type="string" calcext:value-type="string">
            <text:p>1089-650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36th EUROMICRO Conference on Software Engineering and Advanced</text:p>
            <text:p>Applications (SEAA2010), Univ Lille Nord France, Polytechn Grad Engn</text:p>
            <text:p>Sch, Lille, FRANCE, SEP 01-03, 2010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Standard Deviation Incorporated Attention Module Enhanced U-Net for</text:p>
            <text:p>Routability Prediction</text:p>
          </table:table-cell>
          <table:table-cell table:style-name="ce2" office:value-type="string" calcext:value-type="string">
            <text:p>Chen, Yinjie and Zhang, Di and Chen, Hua</text:p>
          </table:table-cell>
          <table:table-cell table:style-name="ce2"/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671-674</text:p>
          </table:table-cell>
          <table:table-cell table:style-name="ce2"/>
          <table:table-cell table:style-name="ce2" office:value-type="string" calcext:value-type="string">
            <text:p>With the remarkable increase in the complexity of Very Large-Scale</text:p>
            <text:p>Integration (VLSI) designs, the integration of artificial intelligence</text:p>
            <text:p>(AI) into electronic design automation (EDA) has become indispensable,</text:p>
            <text:p>particularly in the realm of back-end design tasks like Routing</text:p>
            <text:p>Congestion (RC) prediction and Design Rule Checking (DRC) hotspot map</text:p>
            <text:p>prediction. In this paper, we introduce an innovative variant of the</text:p>
            <text:p>U-Net model, enhanced by an attention module, to accurately predict</text:p>
            <text:p>routability. The attention module incorporates standard deviation</text:p>
            <text:p>operation to extract more comprehensive distribution information from</text:p>
            <text:p>the features, enabling mitigate the adverse effects of data imbalance.</text:p>
            <text:p>Our proposed model outperforms existing models, particularly with rate</text:p>
            <text:p>reductions of 1.5\% (RC) and 4.6\% (DRC) in Avg-NRMSE when compared to</text:p>
            <text:p>the prior model ibUnet, as evidenced by experimental results on the</text:p>
            <text:p>CircuitNet dataset. Furthermore, it outperforms the ibUnet on model size</text:p>
            <text:p>which exhibits a significant improvement of over 50\% rate reduction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ICETIS61828.2024.10593700</text:p>
          </table:table-cell>
          <table:table-cell table:style-name="ce2"/>
          <table:table-cell table:style-name="ce2" office:value-type="string" calcext:value-type="string">
            <text:p>Chen, H (Corresponding Author), Zhejiang Univ, Sch Aeronaut \&amp; Astronaut, Hangzhou, Peoples R China.</text:p>
            <text:p>Chen, Yinjie, Zhejiang Univ, Coll Informat Sci \&amp; Elect Engn, Hangzhou, Peoples R China.</text:p>
            <text:p>Zhang, Di; Chen, Hua, Zhejiang Univ, Sch Aeronaut \&amp; Astronaut, Hangzhou, Peoples R China.</text:p>
          </table:table-cell>
          <table:table-cell table:style-name="ce2"/>
          <table:table-cell table:style-name="ce2" office:value-type="string" calcext:value-type="string">
            <text:p>Very Large-Scale Integration (VLSI) designs; Routability Prediction;</text:p>
            <text:p>Artificial Intelligence; Electronic Design Automation (EDA); U-Net</text:p>
          </table:table-cell>
          <table:table-cell table:style-name="ce2" office:value-type="string" calcext:value-type="string">
            <text:p>IEEE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9th International Conference on Electronic Technology and Information</text:p>
            <text:p>Science (ICETIS), Hangzhou, PEOPLES R CHINA, MAY 17-19, 2024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PROS: A Plug-in for Routability Optimization applied in the</text:p>
            <text:p>State-of-the-art commercial EDA tool using deep learning</text:p>
          </table:table-cell>
          <table:table-cell table:style-name="ce2" office:value-type="string" calcext:value-type="string">
            <text:p>Chen, Jingsong and Kuang, Jian and Zhao, Guowei and Huang, Dennis J-H</text:p>
            <text:p>and Young, Evangeline F. Y.</text:p>
          </table:table-cell>
          <table:table-cell table:style-name="ce2"/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ISI Web of Science</text:p>
          </table:table-cell>
          <table:table-cell table:style-name="ce2" table:number-columns-repeated="2"/>
          <table:table-cell table:style-name="ce2" office:value-type="string" calcext:value-type="string">
            <text:p>Recently the topic of routability optimization with prior knowledge</text:p>
            <text:p>obtained by machine learning techniques has been widely studied.</text:p>
            <text:p>However, limited by the prediction accuracy, the predictors of the</text:p>
            <text:p>existing related works can hardly be applied in a real-world EDA tool</text:p>
            <text:p>without extra runtime overhead for feature preparation. In this paper,</text:p>
            <text:p>we revisit this topic and propose a practical plug-in for routability</text:p>
            <text:p>optimization named PROS which can be applied in the state-of-the-art</text:p>
            <text:p>commercial EDA tool with negligible runtime overhead. PROS consists of</text:p>
            <text:p>an effective fully convolutional network (FCN) based predictor that only</text:p>
            <text:p>utilizes the data from placement result to forecast global routing (GR)</text:p>
            <text:p>congestion and a parameter optimizer that can reasonably adjust GR cost</text:p>
            <text:p>parameters based on prediction result to generate a better GR solution</text:p>
            <text:p>for detailed routing. Experiments on 19 industrial designs in advanced</text:p>
            <text:p>technology node show that PROS can achieve high accuracy of GR</text:p>
            <text:p>congestion prediction and significantly reduce design rule checking</text:p>
            <text:p>(DRC) violations by 11.65\% on average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45/3400302.3415662</text:p>
          </table:table-cell>
          <table:table-cell table:style-name="ce2"/>
          <table:table-cell table:style-name="ce2" office:value-type="string" calcext:value-type="string">
            <text:p>Chen, JS (Corresponding Author), Chinese Univ Hong Kong, Hong Kong, Peoples R China.</text:p>
            <text:p>Chen, Jingsong; Young, Evangeline F. Y., Chinese Univ Hong Kong, Hong Kong, Peoples R China.</text:p>
            <text:p>Kuang, Jian; Zhao, Guowei; Huang, Dennis J-H, Cadence Design Syst, San Jose, CA USA.</text:p>
          </table:table-cell>
          <table:table-cell table:style-name="ce2" table:number-columns-repeated="2"/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1933-7760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39th IEEE/ACM International Conference On Computer Aided Design (ICCAD),</text:p>
            <text:p>ELECTR NETWORK, NOV 02-05, 2020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Physical Verification at Advanced Technology Nodes and the Road Ahead</text:p>
          </table:table-cell>
          <table:table-cell table:style-name="ce2" office:value-type="string" calcext:value-type="string">
            <text:p>Rey, Juan C.</text:p>
          </table:table-cell>
          <table:table-cell table:style-name="ce2"/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43</text:p>
          </table:table-cell>
          <table:table-cell table:style-name="ce2"/>
          <table:table-cell table:style-name="ce2" office:value-type="string" calcext:value-type="string">
            <text:p>In spite of ``doomsday{''} expectations, Moore's Law is alive and well.</text:p>
            <text:p>Semiconductor manufacturing and design companies, as well as the</text:p>
            <text:p>Electronic Design Automation (EDA) industry have been pushing ahead to</text:p>
            <text:p>bring more functionality to satisfy more aggressive</text:p>
            <text:p>space/power/performance requirements.</text:p>
            <text:p>Physical verification occupies a unique space in the ecosystem as one of</text:p>
            <text:p>the key bridges between design and manufacturing. As such, the</text:p>
            <text:p>traditional space of design rule checking (DRC) and layout versus</text:p>
            <text:p>schematic (LVS) have expanded into electrical verification and yield</text:p>
            <text:p>enabling technologies such as optical proximity correction, critical</text:p>
            <text:p>area analysis, multi-patterning decomposition and automated filling.</text:p>
            <text:p>To achieve the expected accuracy and performance demanded by the design</text:p>
            <text:p>and manufacturing community, it is necessary to consider the physical</text:p>
            <text:p>effects of the manufacturing processes and electronic devices and to use</text:p>
            <text:p>the most advanced software engineering technology and computational</text:p>
            <text:p>capabilitie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45/3372780.3378168</text:p>
          </table:table-cell>
          <table:table-cell table:style-name="ce2"/>
          <table:table-cell table:style-name="ce2" office:value-type="string" calcext:value-type="string">
            <text:p>Rey, JC (Corresponding Author), Mentor, Fremont, CA 94538 USA.</text:p>
            <text:p>Rey, Juan C., Mentor, Fremont, CA 94538 USA.</text:p>
          </table:table-cell>
          <table:table-cell table:style-name="ce2"/>
          <table:table-cell table:style-name="ce2" office:value-type="string" calcext:value-type="string">
            <text:p>Electronic Design Automation (EDA); Semiconductor Manufacturing Moore's</text:p>
            <text:p>Law; Layout Versus Schematics (LVS); Optical Proximity Correction (OPC)</text:p>
          </table:table-cell>
          <table:table-cell table:style-name="ce2" office:value-type="string" calcext:value-type="string">
            <text:p>ASSOC COMPUTING MACHINERY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ACM International Symposium on Physical Design (ISPD), Taipei, TAIWAN,</text:p>
            <text:p>MAR 29-APR 01, 2020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Enabling alternating phase shifted mask designs for a full logic gate</text:p>
            <text:p>level: Design rules and design rule checking</text:p>
          </table:table-cell>
          <table:table-cell table:style-name="ce2" office:value-type="string" calcext:value-type="string">
            <text:p>Liebmann, L and Lund, J and Heng, FL and Graur, I</text:p>
          </table:table-cell>
          <table:table-cell table:style-name="ce2"/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79-84</text:p>
          </table:table-cell>
          <table:table-cell table:style-name="ce2"/>
          <table:table-cell table:style-name="ce2" office:value-type="string" calcext:value-type="string">
            <text:p>The International Technology Roadmap for Semiconductors lists F2 (lambda</text:p>
            <text:p>= 157 mn) optical lithography and extreme ultraviolet next generation</text:p>
            <text:p>lithography as the two most feasible lithography solutions for the 70 mn</text:p>
            <text:p>technology node. It is likely that both of these solutions will be late,</text:p>
            <text:p>forcing ArF (lambda = 193 mn) lithography to operate at unprecedented</text:p>
            <text:p>resolution levels. Theoretically, alternating phase shifted masks</text:p>
            <text:p>({''}altPSM{''}) can achieve the resolution required to manufacture 70</text:p>
            <text:p>mn logic products with ArF lithography equipment, but technical and</text:p>
            <text:p>logistical challenges associated with the broad implementation of altPSM</text:p>
            <text:p>require novel and invasive EDA solutions which have caused the industry</text:p>
            <text:p>to shy away from altPSM in the past. One of the biggest such challenges</text:p>
            <text:p>is the creation of robust design rule checking (DRC) tools which can</text:p>
            <text:p>predict whether a given layout has a valid, manufacturable altPSM</text:p>
            <text:p>solution. This paper takes a detailed look at the technical and</text:p>
            <text:p>practical issues associated with altPSM design rules and DRC.</text:p>
          </table:table-cell>
          <table:table-cell table:style-name="ce2" office:value-type="string" calcext:value-type="string">
            <text:p>Proceedings Paper</text:p>
          </table:table-cell>
          <table:table-cell table:style-name="ce2" table:number-columns-repeated="2"/>
          <table:table-cell table:style-name="ce2" office:value-type="string" calcext:value-type="string">
            <text:p>Liebmann, L (Corresponding Author), IBM Corp, Microelect, Fishkill, NY USA.</text:p>
            <text:p>IBM Corp, Microelect, Fishkill, NY USA.</text:p>
          </table:table-cell>
          <table:table-cell table:style-name="ce2" table:number-columns-repeated="2"/>
          <table:table-cell table:style-name="ce2" office:value-type="string" calcext:value-type="string">
            <text:p>ASSOC COMPUTING MACHINERY</text:p>
          </table:table-cell>
          <table:table-cell table:style-name="ce2" office:value-type="string" calcext:value-type="string">
            <text:p>0738-100X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38th Design Automation Conference (DAC), LAS VEGAS, NV, JUN 18-22, 2001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toolset for conformance testing against UML sequence diagrams based on</text:p>
            <text:p>event-driven colored Petri nets</text:p>
          </table:table-cell>
          <table:table-cell table:style-name="ce2" office:value-type="string" calcext:value-type="string">
            <text:p>Faria, Joao Pascoal and Paiva, Ana C. R.</text:p>
          </table:table-cell>
          <table:table-cell table:style-name="ce2" office:value-type="string" calcext:value-type="string">
            <text:p>INTERNATIONAL JOURNAL ON SOFTWARE TOOLS FOR TECHNOLOGY TRANSFER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285-30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Novel techniques and a toolset are presented for automatically testing</text:p>
            <text:p>the conformance of software implementations against partial behavioral</text:p>
            <text:p>models constituted by a set of parameterized UML sequence diagrams,</text:p>
            <text:p>describing both external interactions with users or client applications</text:p>
            <text:p>and internal interactions between objects in the system. Test code is</text:p>
            <text:p>automatically generated from the sequence diagrams and executed on the</text:p>
            <text:p>implementation under test, and test results and coverage information are</text:p>
            <text:p>presented back visually in the model. A runtime test library handles</text:p>
            <text:p>internal interaction checking, test stubs, and user interaction testing,</text:p>
            <text:p>taking advantage of aspect-oriented programming techniques. Incremental</text:p>
            <text:p>conformance checking is achieved by first translating sequence diagrams</text:p>
            <text:p>to Extended Petri Nets that combine the characteristics of Colored Petri</text:p>
            <text:p>Nets and Event-Driven Petri Nets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007/s10009-014-0354-x</text:p>
          </table:table-cell>
          <table:table-cell table:style-name="ce2"/>
          <table:table-cell table:style-name="ce2" office:value-type="string" calcext:value-type="string">
            <text:p>Paiva, ACR (Corresponding Author), Univ Porto, Fac Engn, INESC TEC, Rua Campo Alegre 823, P-4100 Oporto, Portugal.</text:p>
            <text:p>Paiva, ACR (Corresponding Author), Univ Porto, Fac Engn, Dept Informat Engn, Rua Campo Alegre 823, P-4100 Oporto, Portugal.</text:p>
            <text:p>Faria, Joao Pascoal; Paiva, Ana C. R., Univ Porto, Fac Engn, INESC TEC, Rua Campo Alegre 823, P-4100 Oporto, Portugal.</text:p>
            <text:p>Faria, Joao Pascoal; Paiva, Ana C. R., Univ Porto, Fac Engn, Dept Informat Engn, Rua Campo Alegre 823, P-4100 Oporto, Portugal.</text:p>
          </table:table-cell>
          <table:table-cell table:style-name="ce2"/>
          <table:table-cell table:style-name="ce2" office:value-type="string" calcext:value-type="string">
            <text:p>Sequence diagrams; Conformance testing; Petri nets</text:p>
          </table:table-cell>
          <table:table-cell table:style-name="ce2" office:value-type="string" calcext:value-type="string">
            <text:p>SPRINGER HEIDELBERG</text:p>
          </table:table-cell>
          <table:table-cell table:style-name="ce2" office:value-type="string" calcext:value-type="string">
            <text:p>1433-2779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Dynamic checking improves MEMS design methodology.</text:p>
          </table:table-cell>
          <table:table-cell table:style-name="ce2" office:value-type="string" calcext:value-type="string">
            <text:p>Marín, X and Carrabina, J and Bausells, J</text:p>
          </table:table-cell>
          <table:table-cell table:style-name="ce2"/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266-271</text:p>
          </table:table-cell>
          <table:table-cell table:style-name="ce2" office:value-type="string" calcext:value-type="string">
            <text:p>4019</text:p>
          </table:table-cell>
          <table:table-cell table:style-name="ce2" office:value-type="string" calcext:value-type="string">
            <text:p>Design verification methodologies and tools such as DRC (Design rule</text:p>
            <text:p>checking) and ERC (Electrical Rule Checking) used on MEMS design have</text:p>
            <text:p>been inherited from the transistor based analog and digital full custom</text:p>
            <text:p>design flows. However the devices are defined on a 2D layout, they have</text:p>
            <text:p>a 3D structure. Thus, current tools do not have into account the new</text:p>
            <text:p>features that appear in MEMS design, especially those related with</text:p>
            <text:p>device micromachining. The main consequence on it is that it is</text:p>
            <text:p>necessary to include information of the vertical (the normal of the</text:p>
            <text:p>wafer plane) parameters on the DRC, what is not at all usual in</text:p>
            <text:p>classical design. We claim that the inclusion of such information</text:p>
            <text:p>together with the consequent improvement of tools for DRC, ERC and</text:p>
            <text:p>device parameter extraction, can reduce design and simulation efforts as</text:p>
            <text:p>well as improve the manufacturing yield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17/12.382310</text:p>
          </table:table-cell>
          <table:table-cell table:style-name="ce2"/>
          <table:table-cell table:style-name="ce2" office:value-type="string" calcext:value-type="string">
            <text:p>Marín, X (Corresponding Author), CSIC, IMB, Ctr Nacl Microelect, Campus UAB, Bellaterra 08193, Spain.</text:p>
            <text:p>CSIC, IMB, Ctr Nacl Microelect, Bellaterra 08193, Spain.</text:p>
          </table:table-cell>
          <table:table-cell table:style-name="ce2"/>
          <table:table-cell table:style-name="ce2" office:value-type="string" calcext:value-type="string">
            <text:p>design verification; EDA tools for MEMS; design rule checking</text:p>
          </table:table-cell>
          <table:table-cell table:style-name="ce2" office:value-type="string" calcext:value-type="string">
            <text:p>SPIE-INT SOC OPTICAL ENGINEERING</text:p>
          </table:table-cell>
          <table:table-cell table:style-name="ce2" office:value-type="string" calcext:value-type="string">
            <text:p>0277-786X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Symposium on Design, Test, Integration, and Packaging of MEMS/MOEMS,</text:p>
            <text:p>PARIS, FRANCE, MAY 09-11, 2000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Lightweight Inception Boosted U-Net Neural Network for Routability</text:p>
            <text:p>Prediction</text:p>
          </table:table-cell>
          <table:table-cell table:style-name="ce2" office:value-type="string" calcext:value-type="string">
            <text:p>Li, Hailiang and Huo, Yan and Wang, Yan and Yang, Xu and Hao, Miaohui</text:p>
            <text:p>and Wang, Xiao</text:p>
          </table:table-cell>
          <table:table-cell table:style-name="ce2"/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648-653</text:p>
          </table:table-cell>
          <table:table-cell table:style-name="ce2"/>
          <table:table-cell table:style-name="ce2" office:value-type="string" calcext:value-type="string">
            <text:p>As the modern CPU, GPU, and NPU chip's design complexity and transistor</text:p>
            <text:p>counts keep increasing, and with the relentless shrinking of</text:p>
            <text:p>semiconductor technology node to nearly 1 nanometer, the placement and</text:p>
            <text:p>routing have gradually become the two most pivotal processes in modern</text:p>
            <text:p>very-large-scale-integrated (VLSI) circuit back-end design. How to</text:p>
            <text:p>evaluate routability efficiently and accurately in advance (at the</text:p>
            <text:p>placement and global routing stages) has grown into a crucial research</text:p>
            <text:p>area in the field of artificial intelligence (AI) assisted electronic</text:p>
            <text:p>design automation (EDA). In this paper, we propose a novel U-Net variant</text:p>
            <text:p>model boosted by an Inception embedded module to predict Routing</text:p>
            <text:p>Congestion (RC) and Design Rule Checking (DRC) hotspots. Experimental</text:p>
            <text:p>results on the recently published CircuitNet dataset benchmark show that</text:p>
            <text:p>our proposed method achieves up to 5\% (RC) and 20\% (DRC) rate</text:p>
            <text:p>reduction in terms of Avg-NRMSE (Average Normalized Root Mean Square</text:p>
            <text:p>Error) compared to the classic architecture. Furthermore, our approach</text:p>
            <text:p>consistently outperforms the prior model on the SSIM (Structural</text:p>
            <text:p>Similarity Index Measure) metric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ISEDA62518.2024.10617987</text:p>
          </table:table-cell>
          <table:table-cell table:style-name="ce2"/>
          <table:table-cell table:style-name="ce2" office:value-type="string" calcext:value-type="string">
            <text:p>Li, HL (Corresponding Author), Hong Kong Appl Sci \&amp; Technol Res Inst Co Ltd ASTR, Adv Elect Components \&amp; Syst AECS Div, Integrated Circuit Enabling Technol ICET Grp, Hong Kong, Peoples R China.</text:p>
            <text:p>Li, Hailiang; Huo, Yan; Wang, Yan; Yang, Xu; Hao, Miaohui; Wang, Xiao, Hong Kong Appl Sci \&amp; Technol Res Inst Co Ltd ASTR, Adv Elect Components \&amp; Syst AECS Div, Integrated Circuit Enabling Technol ICET Grp, Hong Kong, Peoples R China.</text:p>
          </table:table-cell>
          <table:table-cell table:style-name="ce2"/>
          <table:table-cell table:style-name="ce2" office:value-type="string" calcext:value-type="string">
            <text:p>Routing Congestion Prediction; Design Rule Checking (DRC) Hotspot</text:p>
            <text:p>Prediction; Artificial Intelligence for Electronic Design Automation</text:p>
            <text:p>(EDA); Deep Learning Model; Inception Module based Network</text:p>
          </table:table-cell>
          <table:table-cell table:style-name="ce2" office:value-type="string" calcext:value-type="string">
            <text:p>IEEE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nd International Symposium of Electronics Design Automation (ISEDA),</text:p>
            <text:p>Xian, PEOPLES R CHINA, MAY 10-13, 2024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n Approach to Variability Management in Service-Oriented Product Lines</text:p>
          </table:table-cell>
          <table:table-cell table:style-name="ce2" office:value-type="string" calcext:value-type="string">
            <text:p>Khoshnevis, Sedigheh</text:p>
          </table:table-cell>
          <table:table-cell table:style-name="ce2"/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483-1486</text:p>
          </table:table-cell>
          <table:table-cell table:style-name="ce2"/>
          <table:table-cell table:style-name="ce2" office:value-type="string" calcext:value-type="string">
            <text:p>Service-Oriented product lines (SOPLs) are dynamic software product</text:p>
            <text:p>lines, in which, the products are developed based on services and</text:p>
            <text:p>service-oriented architecture. Although there are similarities between</text:p>
            <text:p>components and services, there are important differences so that we</text:p>
            <text:p>cannot use component-based product line engineering methods and</text:p>
            <text:p>techniques for SOPL engineering. These differences emerge from the fact</text:p>
            <text:p>that, services can be discovered as black box elements from external</text:p>
            <text:p>repositories. Moreover, services can be dynamically bound and are</text:p>
            <text:p>business-aligned. Therefore, analyzing the conformance of discovered</text:p>
            <text:p>external services with the variability of services in the SOPL -which</text:p>
            <text:p>must be aligned to the variable business needs-is necessary. Variability</text:p>
            <text:p>must be managed, that is, it must be represented (modeled), used</text:p>
            <text:p>(instantiated and capable of conformance checking) and maintained</text:p>
            <text:p>(evolved) over time. Feature Models are insufficient for modeling</text:p>
            <text:p>variability in SOPL, because, services cannot be simply mapped to one or</text:p>
            <text:p>more features, and identification of the mapping depends on knowing the</text:p>
            <text:p>detailed implementation of the services. This research aims at providing</text:p>
            <text:p>an approach to managing the variability in SOPLs so that external</text:p>
            <text:p>services can be involved in the SOPL engineering. This paper presents an</text:p>
            <text:p>overview of the proposal.</text:p>
          </table:table-cell>
          <table:table-cell table:style-name="ce2" office:value-type="string" calcext:value-type="string">
            <text:p>Proceedings Paper</text:p>
          </table:table-cell>
          <table:table-cell table:style-name="ce2" table:number-columns-repeated="2"/>
          <table:table-cell table:style-name="ce2" office:value-type="string" calcext:value-type="string">
            <text:p>Khoshnevis, S (Corresponding Author), Shahid Beheshti Univ, Fac Elect \&amp; Comp Engn, Dept Comp Engn, GC, Tehran, Iran.</text:p>
            <text:p>Shahid Beheshti Univ, Fac Elect \&amp; Comp Engn, Dept Comp Engn, GC, Tehran, Iran.</text:p>
          </table:table-cell>
          <table:table-cell table:style-name="ce2"/>
          <table:table-cell table:style-name="ce2" office:value-type="string" calcext:value-type="string">
            <text:p>Service-Oriented Product Line; Variability Management; Variability</text:p>
            <text:p>Modeling; Conformance Checking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0270-525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34th International Conference on Software Engineering (ICSE), Zurich,</text:p>
            <text:p>SWITZERLAND, JUN 02-09, 2012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Metamodel and Model-based Design Rule Checking DSL for Verification</text:p>
            <text:p>and Validation of Electronic Circuit Designs</text:p>
          </table:table-cell>
          <table:table-cell table:style-name="ce2" office:value-type="string" calcext:value-type="string">
            <text:p>Rumpold, Adrian and Bauer, Bernhard</text:p>
          </table:table-cell>
          <table:table-cell table:style-name="ce2"/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315-322</text:p>
          </table:table-cell>
          <table:table-cell table:style-name="ce2"/>
          <table:table-cell table:style-name="ce2" office:value-type="string" calcext:value-type="string">
            <text:p>Development of embedded systems depends on both software and hardware</text:p>
            <text:p>design activities. Quality management of development artifacts is of</text:p>
            <text:p>crucial importance for the overall function and safety of the final</text:p>
            <text:p>product. This paper introduces a metamodel and model-based approach and</text:p>
            <text:p>accompanying domain-specific language for validation of electronic</text:p>
            <text:p>circuit designs. The solution does not depend on any particular</text:p>
            <text:p>electronic design automation (EDA) software, instead we propose a</text:p>
            <text:p>workflow that is integrated into a modular, general-purpose model</text:p>
            <text:p>analysis framework. The paper illustrates both the underlying concepts</text:p>
            <text:p>as well as possible application scenarios for the developed validation</text:p>
            <text:p>domain-specific language, MBDRC (Model-Based Design Rule Checking). It</text:p>
            <text:p>also discusses fields for further research and transfer of the initial</text:p>
            <text:p>result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5220/0007381303150322</text:p>
          </table:table-cell>
          <table:table-cell table:style-name="ce2"/>
          <table:table-cell table:style-name="ce2" office:value-type="string" calcext:value-type="string">
            <text:p>Rumpold, A (Corresponding Author), Univ Augsburg, Inst Comp Sci, Augsburg, Germany.</text:p>
            <text:p>Rumpold, Adrian; Bauer, Bernhard, Univ Augsburg, Inst Comp Sci, Augsburg, Germany.</text:p>
          </table:table-cell>
          <table:table-cell table:style-name="ce2"/>
          <table:table-cell table:style-name="ce2" office:value-type="string" calcext:value-type="string">
            <text:p>Domain-specific Modeling; Model-based Analysis; Model-based Testing and</text:p>
            <text:p>Validation; Systems Engineering; Electronic Design Automation; Design</text:p>
            <text:p>Rule Checking</text:p>
          </table:table-cell>
          <table:table-cell table:style-name="ce2" office:value-type="string" calcext:value-type="string">
            <text:p>SCITEPRESS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7th International Conference on Model-Driven Engineering and Software</text:p>
            <text:p>Development (MODELSWARD), Prague, CZECH REPUBLIC, FEB 20-22, 2019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I Will Survive: An Event-driven Conformance Checking Approach Over</text:p>
            <text:p>Process Streams</text:p>
          </table:table-cell>
          <table:table-cell table:style-name="ce2" office:value-type="string" calcext:value-type="string">
            <text:p>Raun, Kristo and Tommassini, Riccardo and Awad, Ahmed</text:p>
          </table:table-cell>
          <table:table-cell table:style-name="ce2"/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49-60</text:p>
          </table:table-cell>
          <table:table-cell table:style-name="ce2"/>
          <table:table-cell table:style-name="ce2" office:value-type="string" calcext:value-type="string">
            <text:p>Online conformance checking deals with finding discrepancies between</text:p>
            <text:p>real-life and modeled behavior on data streams. The current</text:p>
            <text:p>state-of-the-art output of online conformance checking is a</text:p>
            <text:p>prefixalignment, which is used for pinpointing the exact deviations in</text:p>
            <text:p>terms of the trace and the model while accommodating a trace's unknown</text:p>
            <text:p>termination in an online setting. Current methods for producing</text:p>
            <text:p>prefix-alignments are computationally expensive and hinder the</text:p>
            <text:p>applicability in real-life settings. This paper introduces a new</text:p>
            <text:p>approximate algorithm - I Will Survive (IWS). The algorithm utilizes the</text:p>
            <text:p>trie data structure to improve the calculation speed, while remaining</text:p>
            <text:p>memory-efficient. Comparative analysis on real-life and synthetic</text:p>
            <text:p>datasets shows that the IWS algorithm can achieve an order of magnitude</text:p>
            <text:p>faster execution time while having a smaller error cost, compared to the</text:p>
            <text:p>current state of the art. In extreme cases, the IWS finds</text:p>
            <text:p>prefixalignments roughly three orders of magnitude faster than previous</text:p>
            <text:p>approximate methods. The IWS algorithm includes a discounted decay time</text:p>
            <text:p>setting for more efficient memory usage and a lookahead limit for</text:p>
            <text:p>improving computation time. Finally, the algorithm is stress tested for</text:p>
            <text:p>performance using a simulation of high-traffic event stream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45/3583678.3596887</text:p>
          </table:table-cell>
          <table:table-cell table:style-name="ce2"/>
          <table:table-cell table:style-name="ce2" office:value-type="string" calcext:value-type="string">
            <text:p>Raun, K (Corresponding Author), Univ Tartu, Tartu, Estonia.</text:p>
            <text:p>Raun, Kristo; Tommassini, Riccardo; Awad, Ahmed, Univ Tartu, Tartu, Estonia.</text:p>
            <text:p>Tommassini, Riccardo, INSA Lyon, LIRIS Lab, Lyon, France.</text:p>
            <text:p>Awad, Ahmed, Cairo Univ, Giza, Egypt.</text:p>
          </table:table-cell>
          <table:table-cell table:style-name="ce2"/>
          <table:table-cell table:style-name="ce2" office:value-type="string" calcext:value-type="string">
            <text:p>online conformance checking; event-based business process management;</text:p>
            <text:p>prefix-alignments; data streams</text:p>
          </table:table-cell>
          <table:table-cell table:style-name="ce2" office:value-type="string" calcext:value-type="string">
            <text:p>ASSOC COMPUTING MACHINERY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7th International Conference on Distributed and Event Based</text:p>
            <text:p>Systems-DEBS, Neuchatel, SWITZERLAND, JUN 27-30, 2023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formal and visual modeling approach to choreography based web services</text:p>
            <text:p>composition and conformance verification</text:p>
          </table:table-cell>
          <table:table-cell table:style-name="ce2" office:value-type="string" calcext:value-type="string">
            <text:p>Yeung, W. L.</text:p>
          </table:table-cell>
          <table:table-cell table:style-name="ce2" office:value-type="string" calcext:value-type="string">
            <text:p>EXPERT SYSTEMS WITH APPLICATIONS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2772-12785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Web services have emerged as the building blocks of a service-oriented</text:p>
            <text:p>architecture that supports not only enterprise application integration</text:p>
            <text:p>(EAI) and business process management (BPM) within an organization but</text:p>
            <text:p>also B2B collaboration based on business process integration. The web</text:p>
            <text:p>services choreography approach to B2B process integration allows</text:p>
            <text:p>business partners to orchestrate their own web services privately, while</text:p>
            <text:p>conforming with an agreed specification of the common ordering</text:p>
            <text:p>conditions and constraints under which messages are exchanged among</text:p>
            <text:p>partners' web services. In this approach, choreography conformance is an</text:p>
            <text:p>essential requirement for the successful implementation of collaborative</text:p>
            <text:p>processes. A formal approach to web services composition and conformance</text:p>
            <text:p>verification based on WS-CDL and WS-BPEL is presented. This approach</text:p>
            <text:p>involves model checking as an automated means of verifying choreography</text:p>
            <text:p>conformance. The main contributions include a precise notion of</text:p>
            <text:p>choreography conformance on which verification is based as well as</text:p>
            <text:p>support for the complementary use of visual modeling (e.g. UML) and</text:p>
            <text:p>standard WS-{*} notations in composition. (C) 2011 Elsevier Ltd. All</text:p>
            <text:p>rights reserved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016/j.eswa.2011.04.068</text:p>
          </table:table-cell>
          <table:table-cell table:style-name="ce2"/>
          <table:table-cell table:style-name="ce2" office:value-type="string" calcext:value-type="string">
            <text:p>Yeung, WL (Corresponding Author), Lingnan Univ, Dept Comp \&amp; Decis Sci, Hong Kong, Hong Kong, Peoples R China.</text:p>
            <text:p>Lingnan Univ, Dept Comp \&amp; Decis Sci, Hong Kong, Hong Kong, Peoples R China.</text:p>
          </table:table-cell>
          <table:table-cell table:style-name="ce2"/>
          <table:table-cell table:style-name="ce2" office:value-type="string" calcext:value-type="string">
            <text:p>Web services; Orchestration; Choreography; Conformance verification;</text:p>
            <text:p>Model checking; Contract negotiation</text:p>
          </table:table-cell>
          <table:table-cell table:style-name="ce2" office:value-type="string" calcext:value-type="string">
            <text:p>PERGAMON-ELSEVIER SCIENCE LTD</text:p>
          </table:table-cell>
          <table:table-cell table:style-name="ce2" office:value-type="string" calcext:value-type="string">
            <text:p>0957-4174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utomata applications in chip-design software</text:p>
          </table:table-cell>
          <table:table-cell table:style-name="ce2" office:value-type="string" calcext:value-type="string">
            <text:p>Watson, Bruce W.</text:p>
          </table:table-cell>
          <table:table-cell table:style-name="ce2"/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24-26</text:p>
          </table:table-cell>
          <table:table-cell table:style-name="ce2" office:value-type="string" calcext:value-type="string">
            <text:p>4783</text:p>
          </table:table-cell>
          <table:table-cell table:style-name="ce2" office:value-type="string" calcext:value-type="string">
            <text:p>In this paper, I present several new automata applications in software</text:p>
            <text:p>for electronic design automation (EDA) - chip design. EDA software has</text:p>
            <text:p>typically been implemented by and for microelectronic engineers, and the</text:p>
            <text:p>associated algorithmics remains underdeveloped. In several cases, overly</text:p>
            <text:p>complex algorithms have been used whereas automata could have been</text:p>
            <text:p>applied after abstracting from the problem details.</text:p>
          </table:table-cell>
          <table:table-cell table:style-name="ce2" office:value-type="string" calcext:value-type="string">
            <text:p>Proceedings Paper</text:p>
          </table:table-cell>
          <table:table-cell table:style-name="ce2" table:number-columns-repeated="2"/>
          <table:table-cell table:style-name="ce2" office:value-type="string" calcext:value-type="string">
            <text:p>Watson, BW (Corresponding Author), Univ Pretoria, FASTAR, ZA-0002 Pretoria, South Africa.</text:p>
            <text:p>Watson, Bruce W., Univ Pretoria, FASTAR, ZA-0002 Pretoria, South Africa.</text:p>
          </table:table-cell>
          <table:table-cell table:style-name="ce2"/>
          <table:table-cell table:style-name="ce2" office:value-type="string" calcext:value-type="string">
            <text:p>EDA; integrated circuit layout; pattern matching; design rule checking;</text:p>
            <text:p>chip design</text:p>
          </table:table-cell>
          <table:table-cell table:style-name="ce2" office:value-type="string" calcext:value-type="string">
            <text:p>SPRINGER-VERLAG BERLIN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2th International Conference on Implementation and Application of</text:p>
            <text:p>Automata, Czech Tech Univ, Prague, CZECH REPUBLIC, JUL 16-18, 2007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Detecting and Resolving Coupling-Related Infrastructure as Code Based</text:p>
            <text:p>Architecture Smells in Microservice Deployments</text:p>
          </table:table-cell>
          <table:table-cell table:style-name="ce2" office:value-type="string" calcext:value-type="string">
            <text:p>Ntentos, Evangelos and Zdun, Uwe and Falazi, Ghareeb and Breitenbucher,</text:p>
            <text:p>Uwe and Leymann, Frank</text:p>
          </table:table-cell>
          <table:table-cell table:style-name="ce2"/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201-211</text:p>
          </table:table-cell>
          <table:table-cell table:style-name="ce2"/>
          <table:table-cell table:style-name="ce2" office:value-type="string" calcext:value-type="string">
            <text:p>The Infrastructure as Code (IaC) concept enables IT infrastructure to be</text:p>
            <text:p>managed as software: resources can be managed, monitored, and</text:p>
            <text:p>provisioned automatically instead of manually by developers or</text:p>
            <text:p>operations teams. Many industries have already embraced this concept</text:p>
            <text:p>widely. However, research on IaC-based deployments, particularly</text:p>
            <text:p>research focusing on loose coupling, often does not offer methods for</text:p>
            <text:p>evaluating architectural conformance, spotting architecture smells, and</text:p>
            <text:p>support for correcting the found smells. Our work strives to provide an</text:p>
            <text:p>automatic method for continuously developing microservice-based systems</text:p>
            <text:p>and the associated infrastructure. We aim to offer an automated</text:p>
            <text:p>architectural refactoring method that checks if IaC-based deployments</text:p>
            <text:p>adhere to patterns and best practices and do not contain potential</text:p>
            <text:p>architectural smells. We provide architects with viable options for</text:p>
            <text:p>enhancing architectural conformance during microservice development. In</text:p>
            <text:p>short, by continuously detecting architectural smells and suggesting</text:p>
            <text:p>possible fixes, we aim to support architecture evolution within the</text:p>
            <text:p>framework of continuous delivery practices. We evaluate our approach</text:p>
            <text:p>using three case studies and variants based on open-source microservice</text:p>
            <text:p>architecture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CLOUD60044.2023.00031</text:p>
          </table:table-cell>
          <table:table-cell table:style-name="ce2"/>
          <table:table-cell table:style-name="ce2" office:value-type="string" calcext:value-type="string">
            <text:p>Ntentos, E (Corresponding Author), Univ Vienna, Software Architecture Grp, Vienna, Austria.</text:p>
            <text:p>Ntentos, E (Corresponding Author), Univ Vienna, Doctoral Sch Comp Sci, Vienna, Austria.</text:p>
            <text:p>Ntentos, Evangelos, Univ Vienna, Software Architecture Grp, Vienna, Austria.</text:p>
            <text:p>Ntentos, Evangelos, Univ Vienna, Doctoral Sch Comp Sci, Vienna, Austria.</text:p>
            <text:p>Zdun, Uwe, Univ Vienna, Software Architecture Grp, Vienna, Austria.</text:p>
            <text:p>Falazi, Ghareeb; Breitenbucher, Uwe; Leymann, Frank, Univ Stuttgart, Inst Architecture Applicat Syst, </text:p>
          </table:table-cell>
          <table:table-cell table:style-name="ce2"/>
          <table:table-cell table:style-name="ce2" office:value-type="string" calcext:value-type="string">
            <text:p>Infrastructure as code; metrics; architecture smells; modeling; best</text:p>
            <text:p>practices</text:p>
          </table:table-cell>
          <table:table-cell table:style-name="ce2" office:value-type="string" calcext:value-type="string">
            <text:p>IEEE COMPUTER SOC</text:p>
          </table:table-cell>
          <table:table-cell table:style-name="ce2" office:value-type="string" calcext:value-type="string">
            <text:p>2159-6182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IEEE 16th International Conference on Cloud Computing (IEEE CLOUD),</text:p>
            <text:p>Chicago, IL, JUL 02-08, 2023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Exploring Architectural Evolution in Microservice Systems Using</text:p>
            <text:p>Repository Mining Techniques and Static Code Analysis</text:p>
          </table:table-cell>
          <table:table-cell table:style-name="ce2" office:value-type="string" calcext:value-type="string">
            <text:p>Genfer, Patric and Zdun, Uwe</text:p>
          </table:table-cell>
          <table:table-cell table:style-name="ce2"/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57-173</text:p>
          </table:table-cell>
          <table:table-cell table:style-name="ce2" office:value-type="string" calcext:value-type="string">
            <text:p>14889</text:p>
          </table:table-cell>
          <table:table-cell table:style-name="ce2" office:value-type="string" calcext:value-type="string">
            <text:p>Microservices have gained popularity for isolating service functionality</text:p>
            <text:p>and mitigating issues such as architectural erosion and technical debt.</text:p>
            <text:p>However, their decentralized nature and rapid development often obscure</text:p>
            <text:p>the holistic view of the system and lead developers to lose sight of the</text:p>
            <text:p>overarching architecture. Our work addresses this challenge by proposing</text:p>
            <text:p>a novel approach to track and assess the evolution of microservice</text:p>
            <text:p>architectures through static source code analysis. We combine source</text:p>
            <text:p>code repository mining techniques with architectural reconstruction to</text:p>
            <text:p>measure various metrics throughout a system's development history. Our</text:p>
            <text:p>approach uses a formal API-based decomposition model that can easily be</text:p>
            <text:p>adapted for different scenarios by choosing various architectural</text:p>
            <text:p>metrics. We validated our method's scalability and robustness through a</text:p>
            <text:p>case study on an extensive open-source microservice reference system</text:p>
            <text:p>with more than 40 individual services written in different languages and</text:p>
            <text:p>more than 400 commits. Our research provides software architects with a</text:p>
            <text:p>powerful tool to identify and monitor problematic architectural trends</text:p>
            <text:p>before they become imminent threats, enabling the evolution of</text:p>
            <text:p>microservice-based systems while maintaining architectural coherence and</text:p>
            <text:p>integrity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1-70797-1\_10</text:p>
          </table:table-cell>
          <table:table-cell table:style-name="ce2"/>
          <table:table-cell table:style-name="ce2" office:value-type="string" calcext:value-type="string">
            <text:p>Genfer, P (Corresponding Author), Univ Vienna, Res Grp Software Architecture, Fac Comp Sci, Vienna, Austria.</text:p>
            <text:p>Genfer, P (Corresponding Author), Univ Vienna, Univ Doctoral Sch Comp Sci DoCS, Vienna, Austria.</text:p>
            <text:p>Genfer, Patric; Zdun, Uwe, Univ Vienna, Res Grp Software Architecture, Fac Comp Sci, Vienna, Austria.</text:p>
            <text:p>Genfer, Patric, Univ Vienna, Univ Doctoral Sch Comp Sci DoCS, Vienna, Austria.</text:p>
          </table:table-cell>
          <table:table-cell table:style-name="ce2"/>
          <table:table-cell table:style-name="ce2" office:value-type="string" calcext:value-type="string">
            <text:p>Microservice API; evolution; source code repository mining; metrics;</text:p>
            <text:p>source code detectors</text:p>
          </table:table-cell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8th European Conference on Software Architecture (ECSA), Luxembourg</text:p>
            <text:p>City, LUXEMBOURG, SEP 03-06, 2024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Leveraging Petri Nets for Workflow Anomaly Detection in Microservice</text:p>
            <text:p>Architectures</text:p>
          </table:table-cell>
          <table:table-cell table:style-name="ce2" office:value-type="string" calcext:value-type="string">
            <text:p>Kamboj, Priyanka and Artho, Cyrille and Guanciale, Roberto and</text:p>
            <text:p>Jabbarvand, Reyhaneh and Godfrey, Brighten</text:p>
          </table:table-cell>
          <table:table-cell table:style-name="ce2"/>
          <table:table-cell table:style-name="ce2" office:value-type="string" calcext:value-type="string">
            <text:p>2025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219-241</text:p>
          </table:table-cell>
          <table:table-cell table:style-name="ce2" office:value-type="string" calcext:value-type="string">
            <text:p>15714</text:p>
          </table:table-cell>
          <table:table-cell table:style-name="ce2" office:value-type="string" calcext:value-type="string">
            <text:p>Modern microservice architectures pose challenges in understanding and</text:p>
            <text:p>managing the complex workflows within these decentralized services. In</text:p>
            <text:p>particular, it is difficult to identify anomalous behavior that could</text:p>
            <text:p>indicate a bug or attack. We use traces of microservice application</text:p>
            <text:p>activity (requests and responses) to infer a model of the application's</text:p>
            <text:p>normal behavior. Our approach mines Petri nets to formally represent</text:p>
            <text:p>concurrent operations and their temporal dependencies with a targeted</text:p>
            <text:p>delay injection approach that accurately and efficiently learns these</text:p>
            <text:p>dependencies. The models produced are both explainable and easy to</text:p>
            <text:p>inspect, which offers more transparency and control. Our evaluation</text:p>
            <text:p>shows that injecting delays during model training allows us to achieve</text:p>
            <text:p>perfect model and log fitness (Move-Model and Move-Log fitness of 1)</text:p>
            <text:p>with just 29 traces. In contrast, a straightforward approach requires</text:p>
            <text:p>over 10,000 traces to achieve similar accuracy. Our models successfully</text:p>
            <text:p>identify anomalies in various experiments, such as traces with one</text:p>
            <text:p>missing or multiple missing activities, and reordered sequences to</text:p>
            <text:p>simulate issues in real-world scenarios. Our approach outperforms the</text:p>
            <text:p>state-of-the-art method, demonstrating higher accuracy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1-94634-9\_11</text:p>
          </table:table-cell>
          <table:table-cell table:style-name="ce2"/>
          <table:table-cell table:style-name="ce2" office:value-type="string" calcext:value-type="string">
            <text:p>Guanciale, R (Corresponding Author), KTH Royal Inst Technol Univ, Stockholm, Sweden.</text:p>
            <text:p>Kamboj, Priyanka; Artho, Cyrille; Guanciale, Roberto, KTH Royal Inst Technol Univ, Stockholm, Sweden.</text:p>
            <text:p>Jabbarvand, Reyhaneh; Godfrey, Brighten, Univ Illinois, Chicago, IL USA.</text:p>
          </table:table-cell>
          <table:table-cell table:style-name="ce2"/>
          <table:table-cell table:style-name="ce2" office:value-type="string" calcext:value-type="string">
            <text:p>Alignments; Cost function; Delay; Microservices; Process mining; Process</text:p>
            <text:p>discovery; Conformance Checking</text:p>
          </table:table-cell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46th International Conference on Application and Theory of Petri Nets</text:p>
            <text:p>and Concurrency-PETRI NETS-Annual, FRANCE, JUN 22-27, 2025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D2D-GPT: Leveraging Incremental Learning GPT for Seamless Design Rule</text:p>
            <text:p>Conversion Across EDA Tools</text:p>
          </table:table-cell>
          <table:table-cell table:style-name="ce2" office:value-type="string" calcext:value-type="string">
            <text:p>Wang, Chao and Zhang, Yunxiang and Lu, Wangzilu and Huang, Jiajie and</text:p>
            <text:p>Zhang, Qing and Yin, Minghui and Zhang, Yuhang and Li, Zhiqiang and Li,</text:p>
            <text:p>Yongfu</text:p>
          </table:table-cell>
          <table:table-cell table:style-name="ce2"/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10-114</text:p>
          </table:table-cell>
          <table:table-cell table:style-name="ce2"/>
          <table:table-cell table:style-name="ce2" office:value-type="string" calcext:value-type="string">
            <text:p>This paper investigates the use of fine-tuned ChatGPT, in Electronic</text:p>
            <text:p>Design Automation (EDA) for Design Rule Checking (DRC). As integrated</text:p>
            <text:p>circuits grow in complexity, so do the design rules, exacerbated by the</text:p>
            <text:p>diversity of EDA tools with unique DRC specifications. We introduce</text:p>
            <text:p>D2D-GPT, a unified tool leveraging ChatGPT's language capabilities to</text:p>
            <text:p>translate DRC specifications across different EDA platforms. This</text:p>
            <text:p>research focuses on optimizing input datasets - native DRC rules - to</text:p>
            <text:p>improve ChatGPT's translation accuracy and efficiency. Our objective is</text:p>
            <text:p>to streamline the EDA workflow, bridge gaps between various tools, and</text:p>
            <text:p>pave the way for more cohesive design processes in the semiconductor</text:p>
            <text:p>industry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APCCAS62602.2024.10808537</text:p>
          </table:table-cell>
          <table:table-cell table:style-name="ce2"/>
          <table:table-cell table:style-name="ce2" office:value-type="string" calcext:value-type="string">
            <text:p>Wang, C; Li, YF (Corresponding Author), Shanghai Jiao Tong Univ, Shanghai, Peoples R China.</text:p>
            <text:p>Li, ZQ (Corresponding Author), Chinese Acad Sci, Inst Microelect, Beijing, Peoples R China.</text:p>
            <text:p>Wang, Chao; Zhang, Yunxiang; Lu, Wangzilu; Huang, Jiajie; Zhang, Qing; Zhang, Yuhang; Li, Yongfu, Shanghai Jiao Tong Univ, Shanghai, Peoples R China.</text:p>
            <text:p>Yin, Minghui; Li, Zhiqiang, Chinese Acad Sci, Inst Microelect, Beijing, Peoples R China.</text:p>
          </table:table-cell>
          <table:table-cell table:style-name="ce2"/>
          <table:table-cell table:style-name="ce2" office:value-type="string" calcext:value-type="string">
            <text:p>Electronic Design Automation; Design Rule Checking; ChatGPT;</text:p>
            <text:p>Semiconductor Industry; Machine Learning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2837-4576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0th Asia-Pacific Conference on Circuits and Systems, Taipei, TAIWAN,</text:p>
            <text:p>NOV 07-09, 2024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IntelliGOV - A Semantic Approach for Compliance Validation of</text:p>
            <text:p>Service-Oriented Architectures</text:p>
          </table:table-cell>
          <table:table-cell table:style-name="ce2" office:value-type="string" calcext:value-type="string">
            <text:p>Teixeira Filho, Haroldo Maria and Azevedo, Leonardo Guerreiro and Matsui</text:p>
            <text:p>Siqueira, Sean Wolfgand</text:p>
          </table:table-cell>
          <table:table-cell table:style-name="ce2" office:value-type="string" calcext:value-type="string">
            <text:p>JOURNAL OF UNIVERSAL COMPUTER SCIENCE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048-107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Organizations are adopting Service-Oriented Architecture (SOA) to</text:p>
            <text:p>increase operation's efficiency and flexibility. To accomplish these</text:p>
            <text:p>goals, it is necessary to ensure that the architecture and its evolution</text:p>
            <text:p>are compliant with business goals, best practices, legal and regulatory</text:p>
            <text:p>requirements. However, the diversity of domains and stakeholders</text:p>
            <text:p>involved in SOA solutions demands complex and expensive work to validate</text:p>
            <text:p>the architecture compliance. Hence, it can result in high costs and low</text:p>
            <text:p>quality assessment if the organization does not use an effective</text:p>
            <text:p>approach in this scenario. In addition, it would be important to</text:p>
            <text:p>consider standards and open solutions in order to promote</text:p>
            <text:p>interoperability and reuse of available tools, making it easier to</text:p>
            <text:p>spread throughout the organizations. We propose intelliGov, an</text:p>
            <text:p>architecture that aims to solve these problems by using ontologies,</text:p>
            <text:p>semantic rules and queries in order to simplify the compliance</text:p>
            <text:p>validation process. The architecture employs open standards - OWL, SWRL</text:p>
            <text:p>and SQWRL - in its implementation. A case study, executed in a global</text:p>
            <text:p>energy company that is currently adopting SOA, demonstrates gains in</text:p>
            <text:p>quality and costs of the compliance assessment process using the</text:p>
            <text:p>proposed architecture.</text:p>
          </table:table-cell>
          <table:table-cell table:style-name="ce2" office:value-type="string" calcext:value-type="string">
            <text:p>Article</text:p>
          </table:table-cell>
          <table:table-cell table:style-name="ce2" table:number-columns-repeated="2"/>
          <table:table-cell table:style-name="ce2" office:value-type="string" calcext:value-type="string">
            <text:p>Teixeira, HM (Corresponding Author), Fed Univ State Rio de Janeiro UNIRIO, Rio De Janeiro, Brazil.</text:p>
            <text:p>Teixeira Filho, Haroldo Maria; Azevedo, Leonardo Guerreiro; Matsui Siqueira, Sean Wolfgand, Fed Univ State Rio de Janeiro UNIRIO, Rio De Janeiro, Brazil.</text:p>
            <text:p>Azevedo, Leonardo Guerreiro, IBM Res, Rio De Janeiro, Brazil.</text:p>
          </table:table-cell>
          <table:table-cell table:style-name="ce2"/>
          <table:table-cell table:style-name="ce2" office:value-type="string" calcext:value-type="string">
            <text:p>Service-Oriented Architecture (SOA); Governance; Ontology; Semantic</text:p>
            <text:p>Rules; Semantic Queries</text:p>
          </table:table-cell>
          <table:table-cell table:style-name="ce2" office:value-type="string" calcext:value-type="string">
            <text:p>GRAZ UNIV TECHNOLGOY, INST INFORMATION SYSTEMS COMPUTER MEDIA-IICM</text:p>
          </table:table-cell>
          <table:table-cell table:style-name="ce2" office:value-type="string" calcext:value-type="string">
            <text:p>0948-695X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n architectural style for scalable choreography-based</text:p>
            <text:p>microservice-oriented distributed systems</text:p>
          </table:table-cell>
          <table:table-cell table:style-name="ce2" office:value-type="string" calcext:value-type="string">
            <text:p>Filippone, Gianluca and Pompilio, Claudio and Autili, Marco and Tivoli,</text:p>
            <text:p>Massimo</text:p>
          </table:table-cell>
          <table:table-cell table:style-name="ce2" office:value-type="string" calcext:value-type="string">
            <text:p>COMPUTING</text:p>
          </table:table-cell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933-1956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Service choreographies are a versatile approach for building</text:p>
            <text:p>service-based distributed systems. Many approaches can be found in the</text:p>
            <text:p>literature tackling different aspects of service choreographies, such as</text:p>
            <text:p>choreography realizability and conformance checking, distributed</text:p>
            <text:p>coordination, formal choreographic languages, and scalability. As of</text:p>
            <text:p>today, choreography scalability has not been specifically addressed</text:p>
            <text:p>through approaches that also consider coordination issues while still</text:p>
            <text:p>decoupling these two related aspects. Scalability is one of the most</text:p>
            <text:p>important properties to be considered when building distributed systems.</text:p>
            <text:p>It enhances the user-perceived performances and influences the overall</text:p>
            <text:p>dependability of the system. In particular, load scalability allows</text:p>
            <text:p>distributed service-oriented systems to effectively handle varying loads</text:p>
            <text:p>without suffering performance degradation. In this direction,</text:p>
            <text:p>microservice-based systems are able to scale thanks to the possibility</text:p>
            <text:p>of replicating those microservices exposed to growing loads,</text:p>
            <text:p>distributing their workload among different instances. By leveraging on</text:p>
            <text:p>our experience in coordinating service choreographies, in this paper, we</text:p>
            <text:p>propose a layered architectural style that allows to realize scalable</text:p>
            <text:p>microservice-oriented choreographies. The architecture integrates a</text:p>
            <text:p>fully-distributed coordination layer capable of ensuring the correct</text:p>
            <text:p>interactions and a load-balancing layer that allows to balance of</text:p>
            <text:p>coordinated requests. We discuss the properties of the proposed</text:p>
            <text:p>architectural style and evaluate its benefits on user-perceived</text:p>
            <text:p>performances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007/s00607-022-01139-5</text:p>
          </table:table-cell>
          <table:table-cell table:style-name="ce2"/>
          <table:table-cell table:style-name="ce2" office:value-type="string" calcext:value-type="string">
            <text:p>Filippone, G (Corresponding Author), Univ Laquila, Dept Informat Engn Comp Sci \&amp; Math, Via Vetoio, I-67100 Laquila, Italy.</text:p>
            <text:p>Filippone, Gianluca; Pompilio, Claudio; Autili, Marco; Tivoli, Massimo, Univ Laquila, Dept Informat Engn Comp Sci \&amp; Math, Via Vetoio, I-67100 Laquila, Italy.</text:p>
          </table:table-cell>
          <table:table-cell table:style-name="ce2"/>
          <table:table-cell table:style-name="ce2" office:value-type="string" calcext:value-type="string">
            <text:p>Distributed systems; Microservices; Scalability; Load balancing</text:p>
          </table:table-cell>
          <table:table-cell table:style-name="ce2" office:value-type="string" calcext:value-type="string">
            <text:p>SPRINGER WIEN</text:p>
          </table:table-cell>
          <table:table-cell table:style-name="ce2" office:value-type="string" calcext:value-type="string">
            <text:p>0010-485X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Conformance Assessment of Architectural Design Decisions on the Mapping</text:p>
            <text:p>of Domain Model Elements to APIs and API Endpoints</text:p>
          </table:table-cell>
          <table:table-cell table:style-name="ce2" office:value-type="string" calcext:value-type="string">
            <text:p>Singjai, Apitchaka and Zdun, Uwe</text:p>
          </table:table-cell>
          <table:table-cell table:style-name="ce2"/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76-83</text:p>
          </table:table-cell>
          <table:table-cell table:style-name="ce2"/>
          <table:table-cell table:style-name="ce2" office:value-type="string" calcext:value-type="string">
            <text:p>Microservice APIs are often identified and designed based on</text:p>
            <text:p>Domain-Driven Design (DDD). To help in the continuous analysis of</text:p>
            <text:p>mappings of domain model elements to APIs and API endpoints, we aim to</text:p>
            <text:p>automate the assessment of conformance to Architectural Design Decision</text:p>
            <text:p>(ADD) options. The ADDs, their decision options, and relevant decision</text:p>
            <text:p>drivers studied in this paper originate from an empirical study on the</text:p>
            <text:p>mapping of domain model elements to APIs and API endpoints in practice.</text:p>
            <text:p>We propose automated detectors to detect the decision options of the</text:p>
            <text:p>ADDs taken in a given microservice API model, and an assessment scoring</text:p>
            <text:p>scheme based on the empirical knowledge codified in the ADDs. We</text:p>
            <text:p>evaluate our work, by first manually creating a ground truth for 14</text:p>
            <text:p>cases in a multi-case study, and then comparing the results of our</text:p>
            <text:p>automated detectors to the ground truth for each of the 14 cases. In the</text:p>
            <text:p>cases we were able to identify 86\% of the decision points correctly,</text:p>
            <text:p>and a statistical analysis of our data shows only a negligible effect</text:p>
            <text:p>size for differences to the ground truth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ICSA-C54293.2022.00058</text:p>
          </table:table-cell>
          <table:table-cell table:style-name="ce2"/>
          <table:table-cell table:style-name="ce2" office:value-type="string" calcext:value-type="string">
            <text:p>Singjai, A (Corresponding Author), Univ Vienna, Res Grp Software Architecture, Vienna, Austria.</text:p>
            <text:p>Singjai, Apitchaka; Zdun, Uwe, Univ Vienna, Res Grp Software Architecture, Vienna, Austria.</text:p>
          </table:table-cell>
          <table:table-cell table:style-name="ce2"/>
          <table:table-cell table:style-name="ce2" office:value-type="string" calcext:value-type="string">
            <text:p>Microservice Architecture; API Design; DDD; Conformance Assessment;</text:p>
            <text:p>Architectural Design Decision</text:p>
          </table:table-cell>
          <table:table-cell table:style-name="ce2" office:value-type="string" calcext:value-type="string">
            <text:p>IEEE COMPUTER SOC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9th IEEE International Conference on Software Architecture (ICSA),</text:p>
            <text:p>ELECTR NETWORK, MAR 12-15, 2022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ssessing Architecture Conformance to Coupling-Related</text:p>
            <text:p>Infrastructure-as-Code Best Practices: Metrics and Case Studies</text:p>
          </table:table-cell>
          <table:table-cell table:style-name="ce2" office:value-type="string" calcext:value-type="string">
            <text:p>Ntentos, Evangelos and Zdun, Uwe and Soldani, Jacopo and Brogi, Antonio</text:p>
          </table:table-cell>
          <table:table-cell table:style-name="ce2"/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01-116</text:p>
          </table:table-cell>
          <table:table-cell table:style-name="ce2" office:value-type="string" calcext:value-type="string">
            <text:p>13444</text:p>
          </table:table-cell>
          <table:table-cell table:style-name="ce2" office:value-type="string" calcext:value-type="string">
            <text:p>Infrastructure as Code (IaC) is an IT practice that facilitates the</text:p>
            <text:p>management of the underlying infrastructure as software. It enables</text:p>
            <text:p>developers or operations teams to automatically manage, monitor, and</text:p>
            <text:p>provision resources rather than organize them manually. In many</text:p>
            <text:p>industries, this practice is widespread and has already been fully</text:p>
            <text:p>adopted. However, few studies provide techniques for evaluating</text:p>
            <text:p>architectural conformance in IaC deployments and, in particular, aspects</text:p>
            <text:p>such as loose coupling. This paper focuses on coupling-related patterns</text:p>
            <text:p>and practices such as deployment strategies and the structuring of IaC</text:p>
            <text:p>elements. Many best practices are documented in gray literature sources,</text:p>
            <text:p>such as practitioner books, blogs, and public repositories. Still, there</text:p>
            <text:p>are no approaches yet to automatically check conformance with such best</text:p>
            <text:p>practices. We propose an approach based on generic,</text:p>
            <text:p>technology-independent metrics tied to typical architectural design</text:p>
            <text:p>decisions for IaC-based practices in microservice deployments to support</text:p>
            <text:p>architecting in the context of continuous delivery practices. We present</text:p>
            <text:p>three case studies based on open-source microservice architectures to</text:p>
            <text:p>validate our approach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1-16697-6\_7</text:p>
          </table:table-cell>
          <table:table-cell table:style-name="ce2"/>
          <table:table-cell table:style-name="ce2" office:value-type="string" calcext:value-type="string">
            <text:p>Ntentos, E (Corresponding Author), Univ Vienna, Fac Comp Sci, Res Grp Software Architecture, Vienna, Austria.</text:p>
            <text:p>Ntentos, Evangelos; Zdun, Uwe, Univ Vienna, Fac Comp Sci, Res Grp Software Architecture, Vienna, Austria.</text:p>
            <text:p>Soldani, Jacopo; Brogi, Antonio, Univ Pisa, Fac Comp Sci, Pisa, Italy.</text:p>
          </table:table-cell>
          <table:table-cell table:style-name="ce2"/>
          <table:table-cell table:style-name="ce2" office:value-type="string" calcext:value-type="string">
            <text:p>Infrastructure as Code; metrics; software architecture; architecture</text:p>
            <text:p>conformance; IaC best practices</text:p>
          </table:table-cell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6th European Conference on Software Architecture (ECSA), Prague, CZECH</text:p>
            <text:p>REPUBLIC, SEP 19-23, 2022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Semi-automatic Feedback for Improving Architecture Conformance to</text:p>
            <text:p>Microservice Patterns and Practices</text:p>
          </table:table-cell>
          <table:table-cell table:style-name="ce2" office:value-type="string" calcext:value-type="string">
            <text:p>Ntentos, Evangelos and Zdun, Uwe and Plakidas, Konstantinos and Geiger,</text:p>
            <text:p>Sebastian</text:p>
          </table:table-cell>
          <table:table-cell table:style-name="ce2"/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36-46</text:p>
          </table:table-cell>
          <table:table-cell table:style-name="ce2"/>
          <table:table-cell table:style-name="ce2" office:value-type="string" calcext:value-type="string">
            <text:p>Microservices are one of the most recommended architectural styles for</text:p>
            <text:p>distributed applications that support independent development and</text:p>
            <text:p>deployment, enable rapid release, and are highly scalable and polyglot.</text:p>
            <text:p>Many well-established patterns and best practices have been documented</text:p>
            <text:p>in the literature. As there are many such guidances, they have numerous</text:p>
            <text:p>interdependencies, and system designs must adhere to many other</text:p>
            <text:p>architecture constraints, too, implementations do not always conform to</text:p>
            <text:p>those guidances. In complex or large systems, it can be hard and tedious</text:p>
            <text:p>to spot violations. Our work aims to offer automated support for</text:p>
            <text:p>architecting during the continuous evolution of microservice-based</text:p>
            <text:p>systems. More specifically we aim to provide the foundations for an</text:p>
            <text:p>automated approach for architecture reconstruction, assessing</text:p>
            <text:p>conformance to patterns and practices specific for microservice</text:p>
            <text:p>architectures, and detect possible violations. Based on this, we provide</text:p>
            <text:p>actionable options to architects for improving architecture conformance</text:p>
            <text:p>as part of a continuous feedback loop. That is, our goal is to support</text:p>
            <text:p>architecting in the context of continuous delivery practices, where</text:p>
            <text:p>architecture violations are continuously analyzed and fix options are</text:p>
            <text:p>continuously suggested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ICSA51549.2021.00012</text:p>
          </table:table-cell>
          <table:table-cell table:style-name="ce2"/>
          <table:table-cell table:style-name="ce2" office:value-type="string" calcext:value-type="string">
            <text:p>Ntentos, E (Corresponding Author), Univ Vienna, Fac Comp Sci, Res Grp Software Architecture, Vienna, Austria.</text:p>
            <text:p>Ntentos, Evangelos; Zdun, Uwe; Plakidas, Konstantinos, Univ Vienna, Fac Comp Sci, Res Grp Software Architecture, Vienna, Austria.</text:p>
            <text:p>Geiger, Sebastian, Siemens Corp Technol, Vienna, Austria.</text:p>
          </table:table-cell>
          <table:table-cell table:style-name="ce2"/>
          <table:table-cell table:style-name="ce2" office:value-type="string" calcext:value-type="string">
            <text:p>Microservices; patterns; best practices; continuous architecture</text:p>
            <text:p>improvement; feedback loop</text:p>
          </table:table-cell>
          <table:table-cell table:style-name="ce2" office:value-type="string" calcext:value-type="string">
            <text:p>IEEE COMPUTER SOC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8th IEEE International Conference on Software Architecture (ICSA),</text:p>
            <text:p>Infos e V, ELECTR NETWORK, MAR 22-26, 2021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WEB SERVICE CHOREOGRAPHY CONFORMANCE VERIFICATION THROUGH THE piX-MODEL</text:p>
          </table:table-cell>
          <table:table-cell table:style-name="ce2" office:value-type="string" calcext:value-type="string">
            <text:p>Van Seghbroeck, Gregory and Volckaert, Bruno and De Turck, Filip and</text:p>
            <text:p>Dhoedt, Bart and Demeester, Piet</text:p>
          </table:table-cell>
          <table:table-cell table:style-name="ce2" office:value-type="string" calcext:value-type="string">
            <text:p>INTERNATIONAL JOURNAL OF COOPERATIVE INFORMATION SYSTEMS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-3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As the adoption of the Service Oriented Architecture paradigm has</text:p>
            <text:p>dramatically increased over the past few years, proper coordination of</text:p>
            <text:p>loosely coupled services becomes an important issue when building</text:p>
            <text:p>state-of-the-art applications. This coordination is typically organized</text:p>
            <text:p>through orchestration (requiring a central coordinating entity) or</text:p>
            <text:p>through choreographies. While the latter approach allows for a fully</text:p>
            <text:p>distributed coordination, the need also arises for a distributed</text:p>
            <text:p>conformance check, ensuring that each participant of the choreography</text:p>
            <text:p>behaves according to the general choreography.</text:p>
            <text:p>In this paper, a formalism is presented to ensure this conformance at</text:p>
            <text:p>design time, with possible extensions to deploy time and to runtime</text:p>
            <text:p>conformance checking. This formalism is referred to as the piX-model and</text:p>
            <text:p>it will be shown that the approach taken is inherently less complex,</text:p>
            <text:p>both in time and space, than the conventional p-calculus-based approach,</text:p>
            <text:p>whilst offering the same conformance guarantees. This gain in</text:p>
            <text:p>performance allows for a small design turnaround time, and also opens</text:p>
            <text:p>the avenue to runtime conformance checking by resource constrained</text:p>
            <text:p>devices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142/S0218843010002097</text:p>
          </table:table-cell>
          <table:table-cell table:style-name="ce2"/>
          <table:table-cell table:style-name="ce2" office:value-type="string" calcext:value-type="string">
            <text:p>Van Seghbroeck, G (Corresponding Author), Univ Ghent, Dept Informat Technol INTEC, IBBT, Gaston Crommenlaan 8 Bus 201, B-9050 Ghent, Belgium.</text:p>
            <text:p>Van Seghbroeck, Gregory; Volckaert, Bruno; De Turck, Filip; Dhoedt, Bart; Demeester, Piet, Univ Ghent, Dept Informat Technol INTEC, IBBT, B-9050 Ghent, Belgium.</text:p>
          </table:table-cell>
          <table:table-cell table:style-name="ce2"/>
          <table:table-cell table:style-name="ce2" office:value-type="string" calcext:value-type="string">
            <text:p>Web services; choreography; WS-CDL; open bisimulation</text:p>
          </table:table-cell>
          <table:table-cell table:style-name="ce2" office:value-type="string" calcext:value-type="string">
            <text:p>WORLD SCIENTIFIC PUBL CO PTE LTD</text:p>
          </table:table-cell>
          <table:table-cell table:style-name="ce2" office:value-type="string" calcext:value-type="string">
            <text:p>0218-8430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 Decomposition and Metric-Based Evaluation Framework for Microservices</text:p>
          </table:table-cell>
          <table:table-cell table:style-name="ce2" office:value-type="string" calcext:value-type="string">
            <text:p>Taibi, Davide and Systa, Kari</text:p>
          </table:table-cell>
          <table:table-cell table:style-name="ce2"/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33-149</text:p>
          </table:table-cell>
          <table:table-cell table:style-name="ce2" office:value-type="string" calcext:value-type="string">
            <text:p>1218</text:p>
          </table:table-cell>
          <table:table-cell table:style-name="ce2" office:value-type="string" calcext:value-type="string">
            <text:p>Migrating from monolithic systems into microservice is a very complex</text:p>
            <text:p>task. Companies are commonly decomposing the monolithic system manually,</text:p>
            <text:p>analyzing dependencies of the monolith and then assessing different</text:p>
            <text:p>decomposition options. The goal of our work is two-folded: 1) we provide</text:p>
            <text:p>a microservice measurement framework to objectively evaluate and compare</text:p>
            <text:p>the quality of microservices-based systems; 2) we propose a</text:p>
            <text:p>decomposition system based on business process mining. The microservice</text:p>
            <text:p>measurement framework can be applied independently from the</text:p>
            <text:p>decomposition process adopted, but is also useful to continuously</text:p>
            <text:p>evaluate the architectural evolution of a system. Results show that the</text:p>
            <text:p>decomposition framework helps companies to easily identify the different</text:p>
            <text:p>decomposition options. The measurement framework can help to decrease</text:p>
            <text:p>the subjectivity of the decision between different decomposition options</text:p>
            <text:p>and to evaluate architectural erosion in existing system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0-49432-2\_7</text:p>
          </table:table-cell>
          <table:table-cell table:style-name="ce2"/>
          <table:table-cell table:style-name="ce2" office:value-type="string" calcext:value-type="string">
            <text:p>Taibi, D; Systä, K (Corresponding Author), Tampere Univ, TASE Tampere Software Engn Res Grp, Tampere, Finland.</text:p>
            <text:p>Taibi, Davide; Systa, Kari, Tampere Univ, TASE Tampere Software Engn Res Grp, Tampere, Finland.</text:p>
          </table:table-cell>
          <table:table-cell table:style-name="ce2"/>
          <table:table-cell table:style-name="ce2" office:value-type="string" calcext:value-type="string">
            <text:p>Microservices; Cloud-native; Microservice slicing; Microservice</text:p>
            <text:p>decomposition; Microservice migration</text:p>
          </table:table-cell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1865-0929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9th International Conference on Cloud Computing and Services Science</text:p>
            <text:p>(CLOSER), Heraklion, GREECE, MAY 02-04, 2019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Evaluating and Improving Microservice Architecture Conformance to</text:p>
            <text:p>Architectural Design Decisions</text:p>
          </table:table-cell>
          <table:table-cell table:style-name="ce2" office:value-type="string" calcext:value-type="string">
            <text:p>Ntentos, Evangelos and Zdun, Uwe and Plakidas, Konstantinos and Geiger,</text:p>
            <text:p>Sebastian</text:p>
          </table:table-cell>
          <table:table-cell table:style-name="ce2"/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88-203</text:p>
          </table:table-cell>
          <table:table-cell table:style-name="ce2" office:value-type="string" calcext:value-type="string">
            <text:p>13121</text:p>
          </table:table-cell>
          <table:table-cell table:style-name="ce2" office:value-type="string" calcext:value-type="string">
            <text:p>Microservices are a commonly used architectural style targeting</text:p>
            <text:p>independent development, deployment, and release of services, as well as</text:p>
            <text:p>supporting polyglot capabilities and rapid release strategies. This</text:p>
            <text:p>depends on the presence of certain software architecture qualities. A</text:p>
            <text:p>number of architecture patterns and best practices that support the</text:p>
            <text:p>required qualities have been proposed in the literature, but usually in</text:p>
            <text:p>isolation of one another. Additionally, in real-world systems, assessing</text:p>
            <text:p>conformance to these patterns and practices and detecting possible</text:p>
            <text:p>violations is a significant challenge. For small-scale systems of a few</text:p>
            <text:p>services, a manual assessment and violation detection by an expert is</text:p>
            <text:p>probably both accurate and sufficient. However, for industrial-scale</text:p>
            <text:p>systems of several hundred or more services, manual assessment and</text:p>
            <text:p>violation detection is laborious and likely leads to inaccurate results.</text:p>
            <text:p>Furthermore, manual assessment is impractical for rapidly evolving and</text:p>
            <text:p>frequently released system architectures. In this work we examine a</text:p>
            <text:p>subset of microservice-relevant patterns, and propose a method for the</text:p>
            <text:p>semi-automatic detection and resolution of conformance violations. Our</text:p>
            <text:p>aim is to assist the software architect by providing a set of possible</text:p>
            <text:p>fix options and generating models of ``fixed{''} architecture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0-91431-8\_12</text:p>
          </table:table-cell>
          <table:table-cell table:style-name="ce2"/>
          <table:table-cell table:style-name="ce2" office:value-type="string" calcext:value-type="string">
            <text:p>Ntentos, E (Corresponding Author), Univ Vienna, Res Grp Software Architecture, Fac Comp Sci, Vienna, Austria.</text:p>
            <text:p>Ntentos, Evangelos; Zdun, Uwe; Plakidas, Konstantinos, Univ Vienna, Res Grp Software Architecture, Fac Comp Sci, Vienna, Austria.</text:p>
            <text:p>Geiger, Sebastian, Siemens Corp Technol, Vienna, Austria.</text:p>
          </table:table-cell>
          <table:table-cell table:style-name="ce2" table:number-columns-repeated="2"/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9th International Conference on Service-Oriented Computing (ICSOC),</text:p>
            <text:p>ELECTR NETWORK, NOV 22-25, 2021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Constructing a service process model based on distributed tracing for</text:p>
            <text:p>conformance checking of microservices</text:p>
          </table:table-cell>
          <table:table-cell table:style-name="ce2" office:value-type="string" calcext:value-type="string">
            <text:p>Sakai, Masaru and Takahashi, Kensuke</text:p>
          </table:table-cell>
          <table:table-cell table:style-name="ce2"/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 table:number-columns-repeated="2"/>
          <table:table-cell table:style-name="ce2" office:value-type="string" calcext:value-type="string">
            <text:p>In recent years, microservices architectures have become widespread,</text:p>
            <text:p>where services are divided into smaller pieces, communicate with each</text:p>
            <text:p>other, and operate in chains. Distributed tracing, which tracks the</text:p>
            <text:p>processing of user requests, is used to analyze and visualize</text:p>
            <text:p>microservices. In this paper, the trace data obtained from the</text:p>
            <text:p>distributed tracing is divided based on the parent-child relationship</text:p>
            <text:p>and converted into an event log. In addition, process discovery is</text:p>
            <text:p>performed on each of the split event logs to estimate the relationships</text:p>
            <text:p>between microservice processes. Then, generate a normal Petri net model</text:p>
            <text:p>that can reproduce each event log. Finally, the test trace data is used</text:p>
            <text:p>to verify the suitability of the Petri net model. We constructed a</text:p>
            <text:p>service model for two sample microservices with different scales and</text:p>
            <text:p>distributed tracing implementations and demonstrated the proposed</text:p>
            <text:p>method's feasibility through conformance checking using test trace data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NOMS54207.2022.9789804</text:p>
          </table:table-cell>
          <table:table-cell table:style-name="ce2"/>
          <table:table-cell table:style-name="ce2" office:value-type="string" calcext:value-type="string">
            <text:p>Sakai, M (Corresponding Author), NTT Corp, NTT Network Innovat Ctr, Tokyo, Japan.</text:p>
            <text:p>Sakai, Masaru; Takahashi, Kensuke, NTT Corp, NTT Network Innovat Ctr, Tokyo, Japan.</text:p>
          </table:table-cell>
          <table:table-cell table:style-name="ce2"/>
          <table:table-cell table:style-name="ce2" office:value-type="string" calcext:value-type="string">
            <text:p>Distributed Tracing; Process Model; Process Mining; Petri nets;</text:p>
            <text:p>Conformance Checking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1542-1201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IEEE/IFIP Network Operations and Management Symposium, ELECTR NETWORK,</text:p>
            <text:p>APR 25-29, 2022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CATMA: Conformance Analysis Tool For Microservice Applications</text:p>
          </table:table-cell>
          <table:table-cell table:style-name="ce2" office:value-type="string" calcext:value-type="string">
            <text:p>Cao, Clinton and Schneider, Simon and Ferreyra, Nicolas E. Diaz and</text:p>
            <text:p>Verwer, Sicco and Panichella, Annibale and Scandariato, Riccardo</text:p>
          </table:table-cell>
          <table:table-cell table:style-name="ce2"/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59-63</text:p>
          </table:table-cell>
          <table:table-cell table:style-name="ce2"/>
          <table:table-cell table:style-name="ce2" office:value-type="string" calcext:value-type="string">
            <text:p>The microservice architecture allows developers to divide the core</text:p>
            <text:p>functionality of their software system into multiple smaller services.</text:p>
            <text:p>However, this architectural style also makes it harder for them to debug</text:p>
            <text:p>and assess whether the system's deployment conforms to its</text:p>
            <text:p>implementation. We present CATMA, an automated tool that detects</text:p>
            <text:p>non-conformances between the system's deployment and implementation. It</text:p>
            <text:p>automatically visualizes and generates potential interpretations for the</text:p>
            <text:p>detected discrepancies. Our evaluation of CATMA shows promising results</text:p>
            <text:p>in terms of performance and providing useful insights. CATMA is</text:p>
            <text:p>available at https://cyber-analytics.nl/catma.github.io/, and a</text:p>
            <text:p>demonstration video is available at https://youtu.be/WKP1hG-TDKc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45/3639478.3640022</text:p>
          </table:table-cell>
          <table:table-cell table:style-name="ce2"/>
          <table:table-cell table:style-name="ce2" office:value-type="string" calcext:value-type="string">
            <text:p>Cao, C (Corresponding Author), Delft Univ Technol, Delft, Netherlands.</text:p>
            <text:p>Cao, Clinton; Verwer, Sicco; Panichella, Annibale, Delft Univ Technol, Delft, Netherlands.</text:p>
            <text:p>Schneider, Simon; Ferreyra, Nicolas E. Diaz; Scandariato, Riccardo, Hamburg Univ Technol, Hamburg, Germany.</text:p>
          </table:table-cell>
          <table:table-cell table:style-name="ce2"/>
          <table:table-cell table:style-name="ce2" office:value-type="string" calcext:value-type="string">
            <text:p>microservices; static analysis; dynamic analysis; software testing;</text:p>
            <text:p>empirical software engineering</text:p>
          </table:table-cell>
          <table:table-cell table:style-name="ce2" office:value-type="string" calcext:value-type="string">
            <text:p>ASSOC COMPUTING MACHINERY</text:p>
          </table:table-cell>
          <table:table-cell table:style-name="ce2"/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44th International Conference on Software Engineering: Companion</text:p>
            <text:p>Proceedings, Lisbon, PORTUGAL, APR 14-20, 2024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Metrics for Assessing Architecture Conformance to Microservice</text:p>
            <text:p>Architecture Patterns and Practices</text:p>
          </table:table-cell>
          <table:table-cell table:style-name="ce2" office:value-type="string" calcext:value-type="string">
            <text:p>Ntentos, Evangelos and Zdun, Uwe and Plakidas, Konstantinos and Meixner,</text:p>
            <text:p>Sebastian and Geiger, Sebastian</text:p>
          </table:table-cell>
          <table:table-cell table:style-name="ce2"/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580-596</text:p>
          </table:table-cell>
          <table:table-cell table:style-name="ce2" office:value-type="string" calcext:value-type="string">
            <text:p>12571</text:p>
          </table:table-cell>
          <table:table-cell table:style-name="ce2" office:value-type="string" calcext:value-type="string">
            <text:p>Many contemporary service-based systems follow the microservice</text:p>
            <text:p>approach, particularly in DevOps or continuous delivery contexts. They</text:p>
            <text:p>share a set of important tenets such as independent development and</text:p>
            <text:p>deployment, high releasability, polyglot technology support, and loose</text:p>
            <text:p>coupling. A number of best practices for microservice architectures have</text:p>
            <text:p>been codified as patterns, which embody those tenets. However, no</text:p>
            <text:p>real-world microservices system can support all patterns and practices</text:p>
            <text:p>well, but rather architectural decisions making trade-offs among them</text:p>
            <text:p>are needed. Conformance to the patterns and practices selected in such</text:p>
            <text:p>decisions is hard to ensure and assess automatically, especially in</text:p>
            <text:p>large-scale, complex, and evolving systems. In this work, we propose a</text:p>
            <text:p>model-based approach based on generic, technology-independent metrics,</text:p>
            <text:p>tied to typical architectural design decisions in the microservice</text:p>
            <text:p>domain. With this approach we can measure conformance to the patterns</text:p>
            <text:p>and related tenets. We demonstrate and assess the validity and</text:p>
            <text:p>appropriateness of these metrics in performing an assessment of a</text:p>
            <text:p>system's conformance to patterns through statistical method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0-65310-1\_42</text:p>
          </table:table-cell>
          <table:table-cell table:style-name="ce2"/>
          <table:table-cell table:style-name="ce2" office:value-type="string" calcext:value-type="string">
            <text:p>Ntentos, E (Corresponding Author), Univ Vienna, Fac Comp Sci, Res Grp Software Architecture, Vienna, Austria.</text:p>
            <text:p>Ntentos, Evangelos; Zdun, Uwe; Plakidas, Konstantinos, Univ Vienna, Fac Comp Sci, Res Grp Software Architecture, Vienna, Austria.</text:p>
            <text:p>Meixner, Sebastian; Geiger, Sebastian, Siemens Corp Technol, Vienna, Austria.</text:p>
          </table:table-cell>
          <table:table-cell table:style-name="ce2" table:number-columns-repeated="2"/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8th International Conference on Service-Oriented Computing (ICSOC),</text:p>
            <text:p>ELECTR NETWORK, DEC 14-17, 2020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ssessing Architecture Conformance to Coupling-Related Patterns and</text:p>
            <text:p>Practices in Microservices</text:p>
          </table:table-cell>
          <table:table-cell table:style-name="ce2" office:value-type="string" calcext:value-type="string">
            <text:p>Ntentos, Evangelos and Zdun, Uwe and Plakidas, Konstantinos and Meixner,</text:p>
            <text:p>Sebastian and Geiger, Sebastian</text:p>
          </table:table-cell>
          <table:table-cell table:style-name="ce2"/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3-20</text:p>
          </table:table-cell>
          <table:table-cell table:style-name="ce2" office:value-type="string" calcext:value-type="string">
            <text:p>12292</text:p>
          </table:table-cell>
          <table:table-cell table:style-name="ce2" office:value-type="string" calcext:value-type="string">
            <text:p>Microservices are the go-to architectural style for building</text:p>
            <text:p>applications that are polyglot, support high scalability, independent</text:p>
            <text:p>development and deployment, and are rapidly adaptable to changes. Among</text:p>
            <text:p>the core tenets for a successful microservice architecture is high</text:p>
            <text:p>independence of the individual microservices, i.e. loose coupling. A</text:p>
            <text:p>number of patterns and best practices are well-established in the</text:p>
            <text:p>literature, but most actual microservice-based systems do not, as a</text:p>
            <text:p>whole or in part, conform to them. Assessing this conformance manually</text:p>
            <text:p>is not realistically possible for large-scale systems. This study aims</text:p>
            <text:p>to provide the foundations for an automated approach for assessing</text:p>
            <text:p>conformance to coupling-related patterns and practices specific for</text:p>
            <text:p>microservice architectures. We propose a model-based assessment based on</text:p>
            <text:p>generic, technology-independent metrics, connected to typical design</text:p>
            <text:p>decisions encountered in microservice architectures. We demonstrate and</text:p>
            <text:p>assess the validity and appropriateness of these metrics by performing</text:p>
            <text:p>an assessment of the conformance of real-world systems to patterns</text:p>
            <text:p>through statistical method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0-58923-3\_1</text:p>
          </table:table-cell>
          <table:table-cell table:style-name="ce2"/>
          <table:table-cell table:style-name="ce2" office:value-type="string" calcext:value-type="string">
            <text:p>Ntentos, E (Corresponding Author), Univ Vienna, Fac Comp Sci, Res Grp Software Architecture, Vienna, Austria.</text:p>
            <text:p>Ntentos, Evangelos; Zdun, Uwe; Plakidas, Konstantinos, Univ Vienna, Fac Comp Sci, Res Grp Software Architecture, Vienna, Austria.</text:p>
            <text:p>Meixner, Sebastian; Geiger, Sebastian, Siemens Corp Technol, Vienna, Austria.</text:p>
          </table:table-cell>
          <table:table-cell table:style-name="ce2" table:number-columns-repeated="2"/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4th European Conference on Software Architecture (ECSA), ELECTR</text:p>
            <text:p>NETWORK, SEP 14-18, 2020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Detection Strategies for Microservice Security Tactics</text:p>
          </table:table-cell>
          <table:table-cell table:style-name="ce2" office:value-type="string" calcext:value-type="string">
            <text:p>Zdun, Uwe and Queval, Pierre-Jean and Simhandl, Georg and Scandariato,</text:p>
            <text:p>Riccardo and Chakravarty, Somik and Jelic, Marjan and Jovanovic,</text:p>
            <text:p>Aleksandar</text:p>
          </table:table-cell>
          <table:table-cell table:style-name="ce2" office:value-type="string" calcext:value-type="string">
            <text:p>IEEE TRANSACTIONS ON DEPENDABLE AND SECURE COMPUTING</text:p>
          </table:table-cell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1257-127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icroservice architectures are widely used today to implement</text:p>
            <text:p>distributed systems. Securing microservice architectures is challenging</text:p>
            <text:p>because of their polyglot nature, continuous evolution, and various</text:p>
            <text:p>security concerns relevant to such architectures. This article proposes</text:p>
            <text:p>a novel, model-based approach providing detection strategies to address</text:p>
            <text:p>the automated detection of security tactics (or patterns and best</text:p>
            <text:p>practices) in a given microservice architecture decomposition model. Our</text:p>
            <text:p>novel detection strategies are metrics-based rules that decide</text:p>
            <text:p>conformance to a security recommendation based on a statistical</text:p>
            <text:p>predictor. The proposed approach models this recommendation using</text:p>
            <text:p>Architectural Design Decisions (ADDs). We apply our approach for four</text:p>
            <text:p>different security-related ADDs on access management, traffic control,</text:p>
            <text:p>and avoiding plaintext sensitive data in the context of microservice</text:p>
            <text:p>systems. We then apply our approach to a model data set of 10</text:p>
            <text:p>open-source microservice systems and 20 variants of those systems. Our</text:p>
            <text:p>results are detection strategies showing a very low bias, a very high</text:p>
            <text:p>correlation, and a low prediction error in our model data set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109/TDSC.2023.3276487</text:p>
          </table:table-cell>
          <table:table-cell table:style-name="ce2"/>
          <table:table-cell table:style-name="ce2" office:value-type="string" calcext:value-type="string">
            <text:p>Zdun, U (Corresponding Author), Univ Vienna, Fac Comp Sci, Res Grp Software Architecture, A-1010 Vienna, Austria.</text:p>
            <text:p>Zdun, Uwe; Queval, Pierre-Jean; Simhandl, Georg, Univ Vienna, Fac Comp Sci, Res Grp Software Architecture, A-1010 Vienna, Austria.</text:p>
            <text:p>Scandariato, Riccardo, Hamburg Univ Technol TUHH, D-21073 Hamburg, Germany.</text:p>
            <text:p>Chakravarty, Somik; Jelic, Marjan; Jovanovic, Aleksandar, European Risk \&amp; Resilience Inst EU VRi, D-70599 Stuttgart, Germany.</text:p>
          </table:table-cell>
          <table:table-cell table:style-name="ce2"/>
          <table:table-cell table:style-name="ce2" office:value-type="string" calcext:value-type="string">
            <text:p>Security; Microservice architectures; Measurement; Authorization; Data</text:p>
            <text:p>models; Computer architecture; Codes; Conformance checking; detection</text:p>
            <text:p>strategies; metrics; microservice architecture security; microservices</text:p>
          </table:table-cell>
          <table:table-cell table:style-name="ce2" office:value-type="string" calcext:value-type="string">
            <text:p>IEEE COMPUTER SOC</text:p>
          </table:table-cell>
          <table:table-cell table:style-name="ce2" office:value-type="string" calcext:value-type="string">
            <text:p>1545-5971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Ensuring and Assessing Architecture Conformance to Microservice</text:p>
            <text:p>Decomposition Patterns</text:p>
          </table:table-cell>
          <table:table-cell table:style-name="ce2" office:value-type="string" calcext:value-type="string">
            <text:p>Zdun, Uwe and Navarro, Elena and Leymann, Frank</text:p>
          </table:table-cell>
          <table:table-cell table:style-name="ce2"/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411-429</text:p>
          </table:table-cell>
          <table:table-cell table:style-name="ce2" office:value-type="string" calcext:value-type="string">
            <text:p>10601</text:p>
          </table:table-cell>
          <table:table-cell table:style-name="ce2" office:value-type="string" calcext:value-type="string">
            <text:p>Microservice-based software architecture design has been widely</text:p>
            <text:p>discussed, and best practices have been published as architecture design</text:p>
            <text:p>patterns. However, conformance to those patterns is hard to ensure and</text:p>
            <text:p>assess automatically, leading to problems such as architectural drift</text:p>
            <text:p>and erosion, especially in the context of continued software evolution</text:p>
            <text:p>or large-scale microservice systems. In addition, not much in the</text:p>
            <text:p>component and connector architecture models is specific (only) to the</text:p>
            <text:p>microservices approach, whereas other aspects really specific to that</text:p>
            <text:p>approach, such as independent deployment of microservices, are usually</text:p>
            <text:p>modeled in other views or not at all. We suggest a set of constraints to</text:p>
            <text:p>check and metrics to assess architecture conformance to microservice</text:p>
            <text:p>patterns. In comparison to expert judgment derived from the patterns, a</text:p>
            <text:p>subset of these constraints and metrics shows a good relative</text:p>
            <text:p>performance and potential for automation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319-69035-3\_29</text:p>
          </table:table-cell>
          <table:table-cell table:style-name="ce2"/>
          <table:table-cell table:style-name="ce2" office:value-type="string" calcext:value-type="string">
            <text:p>Zdun, U (Corresponding Author), Univ Vienna, Fac Comp Sci, Res Grp Software Architecture, Vienna, Austria.</text:p>
            <text:p>Zdun, Uwe, Univ Vienna, Fac Comp Sci, Res Grp Software Architecture, Vienna, Austria.</text:p>
            <text:p>Navarro, Elena, Univ Castilla La Mancha, Comp Syst Dept, Lab User Interact \&amp; Software Engn, Albacete, Spain.</text:p>
            <text:p>Leymann, Frank, Univ Stuttgart, Inst Architecture Applicat Syst, Stuttgart, Germany.</text:p>
          </table:table-cell>
          <table:table-cell table:style-name="ce2" table:number-columns-repeated="2"/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5th International Conference on Service-Oriented Computing (ICSOC),</text:p>
            <text:p>Malaga, SPAIN, NOV 13-16, 2017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API Description-Based Conformance Assessment of Architectural Design</text:p>
            <text:p>Decision</text:p>
          </table:table-cell>
          <table:table-cell table:style-name="ce2" office:value-type="string" calcext:value-type="string">
            <text:p>Singjai, Apitchaka and Zdun, Uwe</text:p>
          </table:table-cell>
          <table:table-cell table:style-name="ce2"/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59-68</text:p>
          </table:table-cell>
          <table:table-cell table:style-name="ce2"/>
          <table:table-cell table:style-name="ce2" office:value-type="string" calcext:value-type="string">
            <text:p>Microservice APIs are often designed based on Domain-Driven Design. It</text:p>
            <text:p>can be challenging to judge the quality of the relation between such a</text:p>
            <text:p>design and the implemented API, especially when facing frequent releases</text:p>
            <text:p>and changes in an API and its design models. Manual conformance</text:p>
            <text:p>assessment of this relation is time-intensive and error prone. This</text:p>
            <text:p>paper proposes a novel approach for automated conformance assessment of</text:p>
            <text:p>API designs in relation to API design decisions. Our approach aims to</text:p>
            <text:p>provide the first fully automated conformance assessment approach based</text:p>
            <text:p>solely on the code of API Descriptions such as OpenAPI. We applied and</text:p>
            <text:p>exemplified our approach for checking conformance to the patterns and</text:p>
            <text:p>practices in an API design decision for mapping links in a system's</text:p>
            <text:p>domain model to API representations. The total accuracy score</text:p>
            <text:p>(F1-measure) for decision option identification in our multi-case study</text:p>
            <text:p>for this decision is 97.22\%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109/SOSE55356.2022.00013</text:p>
          </table:table-cell>
          <table:table-cell table:style-name="ce2"/>
          <table:table-cell table:style-name="ce2" office:value-type="string" calcext:value-type="string">
            <text:p>Singjai, A (Corresponding Author), Univ Vienna, Res Grp Software Architecture, Vienna, Austria.</text:p>
            <text:p>Singjai, Apitchaka; Zdun, Uwe, Univ Vienna, Res Grp Software Architecture, Vienna, Austria.</text:p>
          </table:table-cell>
          <table:table-cell table:style-name="ce2"/>
          <table:table-cell table:style-name="ce2" office:value-type="string" calcext:value-type="string">
            <text:p>API Design; ADD; Architecture Conformance Assessment; DDD; Microservice</text:p>
            <text:p>Architecture</text:p>
          </table:table-cell>
          <table:table-cell table:style-name="ce2" office:value-type="string" calcext:value-type="string">
            <text:p>IEEE COMPUTER SOC</text:p>
          </table:table-cell>
          <table:table-cell table:style-name="ce2" office:value-type="string" calcext:value-type="string">
            <text:p>2642-658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6th IEEE International Conference on Service-Oriented System</text:p>
            <text:p>Engineering (SOSE), San Francisco, CA, AUG 15-18, 2022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Conformance assessment of Architectural Design Decisions on API endpoint</text:p>
            <text:p>designs derived from domain models</text:p>
          </table:table-cell>
          <table:table-cell table:style-name="ce2" office:value-type="string" calcext:value-type="string">
            <text:p>Singjai, Apitchaka and Zdun, Uwe</text:p>
          </table:table-cell>
          <table:table-cell table:style-name="ce2" office:value-type="string" calcext:value-type="string">
            <text:p>JOURNAL OF SYSTEMS AND SOFTWARE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ISI Web of Science</text:p>
          </table:table-cell>
          <table:table-cell table:style-name="ce2"/>
          <table:table-cell table:style-name="ce2" office:value-type="string" calcext:value-type="string">
            <text:p>193</text:p>
          </table:table-cell>
          <table:table-cell table:style-name="ce2" office:value-type="string" calcext:value-type="string">
            <text:p>Context: Domain-driven design (DDD) is commonly used to design</text:p>
            <text:p>microservices. A crucial aspect of microservice design is API design,</text:p>
            <text:p>which includes the design of API endpoints.</text:p>
            <text:p>Objective: Our objective is to automate the assessment of conformance to</text:p>
            <text:p>Architectural Design Decisions (ADDs) on the interrelation of DDD and</text:p>
            <text:p>APIs. In particular, we studied link mapping, API operation design, and</text:p>
            <text:p>resource segregation as API endpoint design issues that are linked to</text:p>
            <text:p>domain model design. We particularly aim to address conformance checking</text:p>
            <text:p>in the context of frequent release practices, as frequent manual</text:p>
            <text:p>conformance checking is difficult or infeasible.</text:p>
            <text:p>Methods: We suggest a new approach for the automated assessment of</text:p>
            <text:p>conformance to ADD options. The approach suggests automated detectors to</text:p>
            <text:p>detect ADD options selected in a given API endpoint design, as well as</text:p>
            <text:p>an assessment scoring scheme based on empirical results. For the</text:p>
            <text:p>evaluation of our approach, we first manually created a ground truth for</text:p>
            <text:p>12 cases in a multi-case study, and then compared the results of our</text:p>
            <text:p>automated detectors to the ground truth for each of those cases.</text:p>
            <text:p>Results: With our approach, all ADD options in our multi-case study</text:p>
            <text:p>possibly can be automatically detected. Without further improvements,</text:p>
            <text:p>our approach identifies 83\% of the decision points in the multi-case</text:p>
            <text:p>study correctly. A statistical analysis of our data shows only a</text:p>
            <text:p>negligible effect size for differences to the ground truth.</text:p>
            <text:p>Conclusion: Our new approach provides a pragmatic method for automated</text:p>
            <text:p>detection of conformance to ADDs on the interrelation of DDD and APIs.</text:p>
            <text:p>The approach can support the continuous analysis of API endpoint</text:p>
            <text:p>designs. (c) 2022 The Authors. Published by Elsevier Inc. This is an</text:p>
            <text:p>open access article under the CC BY license</text:p>
            <text:p>(http://creativecommons.org/licenses/by/4.0/)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016/j.jss.2022.111433</text:p>
          </table:table-cell>
          <table:table-cell table:style-name="ce2"/>
          <table:table-cell table:style-name="ce2" office:value-type="string" calcext:value-type="string">
            <text:p>Singjai, A (Corresponding Author), Univ Vienna, Res Grp Software Architecture, Fac Comp Sci, Vienna, Austria.</text:p>
            <text:p>Singjai, Apitchaka; Zdun, Uwe, Univ Vienna, Res Grp Software Architecture, Fac Comp Sci, Vienna, Austria.</text:p>
          </table:table-cell>
          <table:table-cell table:style-name="ce2"/>
          <table:table-cell table:style-name="ce2" office:value-type="string" calcext:value-type="string">
            <text:p>Microservice architecture; API design; Domain driven design;</text:p>
            <text:p>Architecture conformance assessment</text:p>
          </table:table-cell>
          <table:table-cell table:style-name="ce2" office:value-type="string" calcext:value-type="string">
            <text:p>ELSEVIER SCIENCE INC</text:p>
          </table:table-cell>
          <table:table-cell table:style-name="ce2" office:value-type="string" calcext:value-type="string">
            <text:p>0164-1212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Extracting the Architecture of Microservices: An Approach for</text:p>
            <text:p>Explainability and Traceability</text:p>
          </table:table-cell>
          <table:table-cell table:style-name="ce2" office:value-type="string" calcext:value-type="string">
            <text:p>Queval, Pierre-Jean and Zdun, Uwe</text:p>
          </table:table-cell>
          <table:table-cell table:style-name="ce2"/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346-353</text:p>
          </table:table-cell>
          <table:table-cell table:style-name="ce2" office:value-type="string" calcext:value-type="string">
            <text:p>14212</text:p>
          </table:table-cell>
          <table:table-cell table:style-name="ce2" office:value-type="string" calcext:value-type="string">
            <text:p>The polyglot nature of microservice architectures and the need for high</text:p>
            <text:p>reliability in security analyses pose unique challenges that existing</text:p>
            <text:p>approaches to automatic architecture recovery often fail to address.</text:p>
            <text:p>This article proposes an approach for extracting detailed architecture</text:p>
            <text:p>models from polyglot microservice source code focusing on explainability</text:p>
            <text:p>and traceability. The approach involves abstracting code navigation as a</text:p>
            <text:p>tree structure, using an exploratory algorithm to detect architectural</text:p>
            <text:p>aspects, and providing a set of generic detectors as input. The</text:p>
            <text:p>architecture models are automatically annotated with detailed</text:p>
            <text:p>information that makes them useful for architecture conformance checking</text:p>
            <text:p>and violation fixing. Our case studies of microservice software systems</text:p>
            <text:p>validate the usefulness of our approach, providing insights into its</text:p>
            <text:p>completeness, accuracy, and effectiveness for software architecture</text:p>
            <text:p>tasks.</text:p>
          </table:table-cell>
          <table:table-cell table:style-name="ce2" office:value-type="string" calcext:value-type="string">
            <text:p>Proceedings Paper</text:p>
          </table:table-cell>
          <table:table-cell table:style-name="ce2" office:value-type="string" calcext:value-type="string">
            <text:p>10.1007/978-3-031-42592-9\_24</text:p>
          </table:table-cell>
          <table:table-cell table:style-name="ce2"/>
          <table:table-cell table:style-name="ce2" office:value-type="string" calcext:value-type="string">
            <text:p>Quéval, PJ (Corresponding Author), Univ Vienna, Vienna, Austria.</text:p>
            <text:p>Quéval, PJ (Corresponding Author), Doctoral Sch Comp Sci, Vienna, Austria.</text:p>
            <text:p>Queval, Pierre-Jean; Zdun, Uwe, Univ Vienna, Vienna, Austria.</text:p>
            <text:p>Queval, Pierre-Jean, Doctoral Sch Comp Sci, Vienna, Austria.</text:p>
          </table:table-cell>
          <table:table-cell table:style-name="ce2"/>
          <table:table-cell table:style-name="ce2" office:value-type="string" calcext:value-type="string">
            <text:p>Architecture; Explainability; Microservices; Polyglot</text:p>
          </table:table-cell>
          <table:table-cell table:style-name="ce2" office:value-type="string" calcext:value-type="string">
            <text:p>SPRINGER INTERNATIONAL PUBLISHING AG</text:p>
          </table:table-cell>
          <table:table-cell table:style-name="ce2" office:value-type="string" calcext:value-type="string">
            <text:p>0302-9743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7th European Conference on Software Architecture (ECSA), Istanbul,</text:p>
            <text:p>TURKEY, SEP 18-22, 2023</text:p>
          </table:table-cell>
          <table:table-cell table:style-name="ce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DOMICO: Checking conformance between domain models and implementations</text:p>
          </table:table-cell>
          <table:table-cell table:style-name="ce2" office:value-type="string" calcext:value-type="string">
            <text:p>Zhong, Chenxing and Zhang, He and Huang, Huang and Chen, Zhikun and Li,</text:p>
            <text:p>Chao and Liu, Xiaodong and Li, Shanshan</text:p>
          </table:table-cell>
          <table:table-cell table:style-name="ce2" office:value-type="string" calcext:value-type="string">
            <text:p>SOFTWARE-PRACTICE \&amp; EXPERIENCE</text:p>
          </table:table-cell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ISI Web of Science</text:p>
          </table:table-cell>
          <table:table-cell table:style-name="ce2" office:value-type="string" calcext:value-type="string">
            <text:p>595-616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As a predominant design method for microsservices architecture (MSA),</text:p>
            <text:p>domain-driven design (DDD) utilizes a series of standard patterns in</text:p>
            <text:p>both models and implementations to effectively support the design of</text:p>
            <text:p>architectural elements. However, an implementation may deviate from its</text:p>
            <text:p>original domain model that uses certain patterns. The deviation between</text:p>
            <text:p>a domain model and its implementation is a type of architectural drift,</text:p>
            <text:p>which needs to be detected promptly. This paper proposes an approach,</text:p>
            <text:p>namely DOMICO, to check the conformance between the domain model and its</text:p>
            <text:p>implementation, by which the conformance is formalized by defining eight</text:p>
            <text:p>common structural patterns of domain modeling and their representations</text:p>
            <text:p>in both models and the corresponding source code. Based on the</text:p>
            <text:p>formalization, our approach can not only identify the discrepancies</text:p>
            <text:p>(e.g., divergence, absence, and modification) with respect to pattern</text:p>
            <text:p>elements, but also detect possible violations of 24 compliance rules</text:p>
            <text:p>imposed by the patterns. To validate DOMICO, we performed a case study</text:p>
            <text:p>to investigate its use in a supply chain project and its performance.</text:p>
            <text:p>The results show that DOMICO can accurately identify 100\% inconsistency</text:p>
            <text:p>issues in the cases examined. As the first conformance checking approach</text:p>
            <text:p>for DDD, DOMICO can be integrated into the regular domain modeling</text:p>
            <text:p>process and help ensure the conformity of microservice implementations</text:p>
            <text:p>to models.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0.1002/spe.3272</text:p>
          </table:table-cell>
          <table:table-cell table:style-name="ce2"/>
          <table:table-cell table:style-name="ce2" office:value-type="string" calcext:value-type="string">
            <text:p>Li, SS (Corresponding Author), Nanjing Univ, State Key Lab Novel Software Technol, Nanjing, Jiangsu, Peoples R China.</text:p>
            <text:p>Zhong, Chenxing; Zhang, He; Chen, Zhikun; Li, Chao; Liu, Xiaodong; Li, Shanshan, Nanjing Univ, Software Inst, Nanjing, Jiangsu, Peoples R China.</text:p>
            <text:p>Zhong, Chenxing; Zhang, He; Chen, Zhikun; Li, Chao; Liu, Xiaodong; Li, Shanshan, Nanjing Univ, State Key Lab Novel Software Technol, Nanjing, Jiangsu, Peoples R China.</text:p>
            <text:p>Huang, Huang, State Grid Nanjng Power Supply Co, Nanjing, Jiangsu, Pe</text:p>
          </table:table-cell>
          <table:table-cell table:style-name="ce2"/>
          <table:table-cell table:style-name="ce2" office:value-type="string" calcext:value-type="string">
            <text:p>architectural drift; architecture conformance checking; code</text:p>
            <text:p>implementation; domain model; domain-driven design; microservices</text:p>
            <text:p>architecture</text:p>
          </table:table-cell>
          <table:table-cell table:style-name="ce2" office:value-type="string" calcext:value-type="string">
            <text:p>WILEY</text:p>
          </table:table-cell>
          <table:table-cell table:style-name="ce2" office:value-type="string" calcext:value-type="string">
            <text:p>0038-0644</text:p>
          </table:table-cell>
          <table:table-cell table:style-name="ce2" office:value-type="string" calcext:value-type="string">
            <text:p>English</text:p>
          </table:table-cell>
          <table:table-cell table:style-name="ce2" table:number-columns-repeated="2"/>
          <table:table-cell table:style-name="ce2" office:value-type="string" calcext:value-type="string">
            <text:p>Unclassified</text:p>
          </table:table-cell>
          <table:table-cell table:style-name="ce2"/>
          <table:table-cell table:number-columns-repeated="1002"/>
        </table:table-row>
        <table:table-row table:style-name="ro1" table:number-rows-repeated="952">
          <table:table-cell table:style-name="ce2" table:number-columns-repeated="22"/>
          <table:table-cell table:number-columns-repeated="100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5" meta:object-count="0"/>
    <meta:generator>LibreOfficeDev/6.0.5.2$Linux_X86_64 LibreOffice_project/</meta:generator>
  </office:meta>
</office:document-meta>
</file>